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stroke-linejoin="round" svg:stroke-linecap="round" draw:fill="none" fo:padding-top="0.007cm" fo:padding-bottom="0.007cm" fo:padding-left="0.007cm" fo:padding-right="0.007cm" loext:decorative="false"/>
    </style:style>
    <style:style style:name="gr2" style:family="graphic" style:parent-style-name="standard">
      <style:graphic-properties draw:stroke="solid" svg:stroke-width="0.049cm" svg:stroke-color="#000000" draw:stroke-linejoin="round" svg:stroke-linecap="round" draw:fill="none" fo:padding-top="0.024cm" fo:padding-bottom="0.024cm" fo:padding-left="0.024cm" fo:padding-right="0.024cm" loext:decorative="false"/>
    </style:style>
    <style:style style:name="gr3" style:family="graphic" style:parent-style-name="standard">
      <style:graphic-properties draw:stroke="solid" svg:stroke-width="0.03cm" svg:stroke-color="#000000" draw:stroke-linejoin="round" svg:stroke-linecap="round" draw:fill="none" fo:padding-top="0.015cm" fo:padding-bottom="0.015cm" fo:padding-left="0.015cm" fo:padding-right="0.015cm" loext:decorative="false"/>
    </style:style>
    <style:style style:name="gr4" style:family="graphic" style:parent-style-name="standard">
      <style:graphic-properties draw:stroke="solid" svg:stroke-width="0.02cm" svg:stroke-color="#000000" draw:stroke-linejoin="round" svg:stroke-linecap="round" draw:fill="none" fo:padding-top="0.01cm" fo:padding-bottom="0.01cm" fo:padding-left="0.01cm" fo:padding-right="0.01cm" loext:decorative="false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solid" svg:stroke-width="0.01cm" svg:stroke-color="#000000" draw:stroke-linejoin="round" svg:stroke-linecap="round" draw:fill="none" fo:padding-top="0.005cm" fo:padding-bottom="0.005cm" fo:padding-left="0.005cm" fo:padding-right="0.00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5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5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0.95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1.87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0.9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0.762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 draw:fill-color="#ffffff"/>
    </style:style>
    <style:style style:name="P4" style:family="paragraph">
      <style:text-properties fo:color="#ff0000" loext:opacity="100%"/>
    </style:style>
    <style:style style:name="P5" style:family="paragraph">
      <loext:graphic-properties draw:fill="none" draw:fill-color="#ffffff"/>
      <style:text-properties fo:color="#ff0000" loext:opacity="100%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color="#ff0000" loext:opacity="100%" fo:font-size="16pt" style:font-size-asian="16pt" style:font-size-complex="16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0.8cm" svg:height="3.2cm" svg:x="13.373cm" svg:y="16.205cm" svg:viewBox="0 0 10801 3201" draw:points="0,0 10801,0 10801,3201 0,3201">
          <text:p/>
        </draw:polygon>
        <draw:line draw:style-name="gr1" draw:text-style-name="P1" draw:layer="layout" svg:x1="13.373cm" svg:y1="17.755cm" svg:x2="24.173cm" svg:y2="17.755cm">
          <text:p/>
        </draw:line>
        <draw:line draw:style-name="gr2" draw:text-style-name="P1" draw:layer="layout" svg:x1="12.144cm" svg:y1="17.53cm" svg:x2="12.245cm" svg:y2="17.631cm">
          <text:p/>
        </draw:line>
        <draw:line draw:style-name="gr2" draw:text-style-name="P1" draw:layer="layout" svg:x1="11.894cm" svg:y1="17.38cm" svg:x2="11.894cm" svg:y2="17.88cm">
          <text:p/>
        </draw:line>
        <draw:polyline draw:style-name="gr2" draw:text-style-name="P1" draw:layer="layout" svg:width="0.257cm" svg:height="0.3cm" svg:x="11.762cm" svg:y="16.99cm" svg:viewBox="0 0 258 301" draw:points="0,0 71,301 128,86 186,301 258,0">
          <text:p/>
        </draw:polyline>
        <draw:polyline draw:style-name="gr2" draw:text-style-name="P1" draw:layer="layout" svg:width="0.171cm" svg:height="0.3cm" svg:x="11.326cm" svg:y="17.491cm" svg:viewBox="0 0 172 301" draw:points="0,286 43,301 114,301 143,286 158,272 172,243 172,215 158,185 143,171 114,157 57,142 28,128 14,114 0,85 0,57 14,28 28,14 57,0 128,0 172,14">
          <text:p/>
        </draw:polyline>
        <draw:line draw:style-name="gr2" draw:text-style-name="P1" draw:layer="layout" svg:x1="9.321cm" svg:y1="2.228cm" svg:x2="9.22cm" svg:y2="2.329cm">
          <text:p/>
        </draw:line>
        <draw:line draw:style-name="gr2" draw:text-style-name="P1" draw:layer="layout" svg:x1="9.69cm" svg:y1="3.213cm" svg:x2="9.791cm" svg:y2="3.314cm">
          <text:p/>
        </draw:line>
        <draw:line draw:style-name="gr2" draw:text-style-name="P1" draw:layer="layout" svg:x1="8.845cm" svg:y1="2.228cm" svg:x2="9.32cm" svg:y2="2.228cm">
          <text:p/>
        </draw:line>
        <draw:line draw:style-name="gr2" draw:text-style-name="P1" draw:layer="layout" svg:x1="9.22cm" svg:y1="2.128cm" svg:x2="9.321cm" svg:y2="2.229cm">
          <text:p/>
        </draw:line>
        <draw:line draw:style-name="gr2" draw:text-style-name="P1" draw:layer="layout" svg:x1="9.79cm" svg:y1="2.328cm" svg:x2="9.79cm" svg:y2="3.313cm">
          <text:p/>
        </draw:line>
        <draw:polyline draw:style-name="gr3" draw:text-style-name="P1" draw:layer="layout" svg:width="0.085cm" svg:height="0.15cm" svg:x="8.114cm" svg:y="2.143cm" svg:viewBox="0 0 86 151" draw:points="0,144 22,151 58,151 72,144 79,137 86,123 86,108 79,94 72,87 58,80 29,72 15,65 8,58 0,44 0,28 8,14 15,7 29,0 65,0 86,7">
          <text:p/>
        </draw:polyline>
        <draw:line draw:style-name="gr3" draw:text-style-name="P1" draw:layer="layout" svg:x1="8.242cm" svg:y1="2.193cm" svg:x2="8.299cm" svg:y2="2.193cm">
          <text:p/>
        </draw:line>
        <draw:polyline draw:style-name="gr3" draw:text-style-name="P1" draw:layer="layout" svg:width="0.035cm" svg:height="0.15cm" svg:x="8.264cm" svg:y="2.143cm" svg:viewBox="0 0 36 151" draw:points="0,0 0,129 7,144 22,151 36,151">
          <text:p/>
        </draw:polyline>
        <draw:polyline draw:style-name="gr3" draw:text-style-name="P1" draw:layer="layout" svg:width="0.065cm" svg:height="0.1cm" svg:x="8.349cm" svg:y="2.193cm" svg:viewBox="0 0 66 101" draw:points="66,101 66,21 59,7 44,0 16,0 0,7">
          <text:p/>
        </draw:polyline>
        <draw:polyline draw:style-name="gr3" draw:text-style-name="P1" draw:layer="layout" svg:width="0.073cm" svg:height="0.064cm" svg:x="8.342cm" svg:y="2.229cm" svg:viewBox="0 0 74 65" draw:points="74,58 58,65 23,65 8,58 0,42 0,28 8,14 23,7 58,7 74,0">
          <text:p/>
        </draw:polyline>
        <draw:line draw:style-name="gr3" draw:text-style-name="P1" draw:layer="layout" svg:x1="8.485cm" svg:y1="2.293cm" svg:x2="8.485cm" svg:y2="2.193cm">
          <text:p/>
        </draw:line>
        <draw:polyline draw:style-name="gr3" draw:text-style-name="P1" draw:layer="layout" svg:width="0.014cm" svg:height="0.014cm" svg:x="8.478cm" svg:y="2.143cm" svg:viewBox="0 0 15 15" draw:points="7,0 0,8 7,15 15,8 7,0 7,15">
          <text:p/>
        </draw:polyline>
        <draw:line draw:style-name="gr3" draw:text-style-name="P1" draw:layer="layout" svg:x1="8.556cm" svg:y1="2.293cm" svg:x2="8.556cm" svg:y2="2.193cm">
          <text:p/>
        </draw:line>
        <draw:polyline draw:style-name="gr3" draw:text-style-name="P1" draw:layer="layout" svg:width="0.043cm" svg:height="0.029cm" svg:x="8.556cm" svg:y="2.193cm" svg:viewBox="0 0 44 30" draw:points="0,30 8,15 15,8 29,0 44,0">
          <text:p/>
        </draw:polyline>
        <draw:polyline draw:style-name="gr3" draw:text-style-name="P1" draw:layer="layout" svg:width="0.065cm" svg:height="0.1cm" svg:x="8.642cm" svg:y="2.193cm" svg:viewBox="0 0 66 101" draw:points="0,94 14,101 44,101 58,94 66,79 66,73 58,58 44,51 22,51 8,44 0,29 0,21 8,7 22,0 44,0 58,7">
          <text:p/>
        </draw:polyline>
        <draw:line draw:style-name="gr2" draw:text-style-name="P1" draw:layer="layout" svg:x1="11.594cm" svg:y1="17.63cm" svg:x2="12.244cm" svg:y2="17.63cm">
          <text:p/>
        </draw:line>
        <draw:line draw:style-name="gr2" draw:text-style-name="P1" draw:layer="layout" svg:x1="12.245cm" svg:y1="17.63cm" svg:x2="12.144cm" svg:y2="17.731cm">
          <text:p/>
        </draw:line>
        <draw:line draw:style-name="gr2" draw:text-style-name="P1" draw:layer="layout" svg:x1="11.84cm" svg:y1="18.133cm" svg:x2="11.94cm" svg:y2="18.133cm">
          <text:p/>
        </draw:line>
        <draw:polyline draw:style-name="gr2" draw:text-style-name="P1" draw:layer="layout" svg:width="0.143cm" svg:height="0.3cm" svg:x="11.84cm" svg:y="17.991cm" svg:viewBox="0 0 144 301" draw:points="144,301 0,301 0,0 144,0">
          <text:p/>
        </draw:polyline>
        <draw:polyline draw:style-name="gr3" draw:text-style-name="P1" draw:layer="layout" svg:width="0.151cm" svg:height="0.092cm" svg:x="23.53cm" svg:y="5.962cm" svg:viewBox="0 0 152 93" draw:points="8,7 0,21 0,43 8,65 22,79 36,87 65,93 86,93 116,87 130,79 144,65 152,43 152,29 144,7 137,0 86,0 86,29">
          <text:p/>
        </draw:polyline>
        <draw:line draw:style-name="gr3" draw:text-style-name="P1" draw:layer="layout" svg:x1="23.681cm" svg:y1="5.897cm" svg:x2="23.581cm" svg:y2="5.897cm">
          <text:p/>
        </draw:line>
        <draw:polyline draw:style-name="gr3" draw:text-style-name="P1" draw:layer="layout" svg:width="0.015cm" svg:height="0.015cm" svg:x="23.53cm" svg:y="5.89cm" svg:viewBox="0 0 16 16" draw:points="0,7 8,16 16,7 8,0 0,7 16,7">
          <text:p/>
        </draw:polyline>
        <draw:line draw:style-name="gr3" draw:text-style-name="P1" draw:layer="layout" svg:x1="23.681cm" svg:y1="5.826cm" svg:x2="23.581cm" svg:y2="5.826cm">
          <text:p/>
        </draw:line>
        <draw:polyline draw:style-name="gr3" draw:text-style-name="P1" draw:layer="layout" svg:width="0.028cm" svg:height="0.043cm" svg:x="23.581cm" svg:y="5.783cm" svg:viewBox="0 0 29 44" draw:points="29,44 15,37 6,29 0,14 0,0">
          <text:p/>
        </draw:polyline>
        <draw:polyline draw:style-name="gr3" draw:text-style-name="P1" draw:layer="layout" svg:width="0.151cm" svg:height="0.021cm" svg:x="23.53cm" svg:y="5.712cm" svg:viewBox="0 0 152 22" draw:points="152,0 144,15 130,22 0,22">
          <text:p/>
        </draw:polyline>
        <draw:line draw:style-name="gr3" draw:text-style-name="P1" draw:layer="layout" svg:x1="23.53cm" svg:y1="5.648cm" svg:x2="23.56cm" svg:y2="5.663cm">
          <text:p/>
        </draw:line>
        <draw:polyline draw:style-name="gr3" draw:text-style-name="P1" draw:layer="layout" svg:width="0.1cm" svg:height="0.064cm" svg:x="23.581cm" svg:y="5.526cm" svg:viewBox="0 0 101 65" draw:points="93,65 101,51 101,22 93,7 79,0 72,0 57,7 49,22 49,44 42,58 28,65 21,65 6,58 0,44 0,22 6,7">
          <text:p/>
        </draw:polyline>
        <draw:line draw:style-name="gr3" draw:text-style-name="P1" draw:layer="layout" svg:x1="23.53cm" svg:y1="5.369cm" svg:x2="23.53cm" svg:y2="5.283cm">
          <text:p/>
        </draw:line>
        <draw:line draw:style-name="gr3" draw:text-style-name="P1" draw:layer="layout" svg:x1="23.681cm" svg:y1="5.326cm" svg:x2="23.53cm" svg:y2="5.326cm">
          <text:p/>
        </draw:line>
        <draw:polygon draw:style-name="gr3" draw:text-style-name="P1" draw:layer="layout" svg:width="0.1cm" svg:height="0.078cm" svg:x="23.581cm" svg:y="5.162cm" svg:viewBox="0 0 101 79" draw:points="101,51 93,65 86,72 72,79 28,79 14,72 6,65 0,51 0,29 6,14 14,7 28,0 72,0 86,7 93,14 101,29">
          <text:p/>
        </draw:polygon>
        <draw:line draw:style-name="gr3" draw:text-style-name="P1" draw:layer="layout" svg:x1="23.681cm" svg:y1="5.097cm" svg:x2="23.581cm" svg:y2="5.097cm">
          <text:p/>
        </draw:line>
        <draw:polyline draw:style-name="gr3" draw:text-style-name="P1" draw:layer="layout" svg:width="0.015cm" svg:height="0.015cm" svg:x="23.53cm" svg:y="5.09cm" svg:viewBox="0 0 16 16" draw:points="0,7 8,16 16,7 8,0 0,7 16,7">
          <text:p/>
        </draw:polyline>
        <draw:polyline draw:style-name="gr3" draw:text-style-name="P1" draw:layer="layout" svg:width="0.151cm" svg:height="0.021cm" svg:x="23.53cm" svg:y="5.005cm" svg:viewBox="0 0 152 22" draw:points="152,0 144,15 130,22 0,22">
          <text:p/>
        </draw:polyline>
        <draw:polyline draw:style-name="gr3" draw:text-style-name="P1" draw:layer="layout" svg:width="0.1cm" svg:height="0.071cm" svg:x="23.581cm" svg:y="4.883cm" svg:viewBox="0 0 101 72" draw:points="93,7 101,22 101,50 93,65 79,72 21,72 6,65 0,50 0,22 6,7 21,0 35,0 49,72">
          <text:p/>
        </draw:polyline>
        <draw:line draw:style-name="gr3" draw:text-style-name="P1" draw:layer="layout" svg:x1="23.581cm" svg:y1="4.84cm" svg:x2="23.581cm" svg:y2="4.783cm">
          <text:p/>
        </draw:line>
        <draw:polyline draw:style-name="gr3" draw:text-style-name="P1" draw:layer="layout" svg:width="0.151cm" svg:height="0.036cm" svg:x="23.53cm" svg:y="4.783cm" svg:viewBox="0 0 152 37" draw:points="0,37 130,37 144,28 152,14 152,0">
          <text:p/>
        </draw:polyline>
        <draw:polyline draw:style-name="gr2" draw:text-style-name="P1" draw:layer="layout" svg:width="0.172cm" svg:height="0.3cm" svg:x="12.34cm" svg:y="17.491cm" svg:viewBox="0 0 173 301" draw:points="0,301 0,0 173,301 173,0">
          <text:p/>
        </draw:polyline>
        <draw:polyline draw:style-name="gr3" draw:text-style-name="P1" draw:layer="layout" svg:width="0.15cm" svg:height="0.092cm" svg:x="7.341cm" svg:y="12.01cm" svg:viewBox="0 0 151 93" draw:points="137,0 143,7 151,28 151,43 143,64 129,78 115,87 86,93 65,93 36,87 21,78 7,64 0,43 0,28 7,7 14,0">
          <text:p/>
        </draw:polyline>
        <draw:polyline draw:style-name="gr3" draw:text-style-name="P1" draw:layer="layout" svg:width="0.15cm" svg:height="0.021cm" svg:x="7.341cm" svg:y="11.924cm" svg:viewBox="0 0 151 22" draw:points="151,0 143,15 129,22 0,22">
          <text:p/>
        </draw:polyline>
        <draw:polyline draw:style-name="gr3" draw:text-style-name="P1" draw:layer="layout" svg:width="0.1cm" svg:height="0.065cm" svg:x="7.391cm" svg:y="11.802cm" svg:viewBox="0 0 101 66" draw:points="101,0 22,0 7,9 0,23 0,52 7,66">
          <text:p/>
        </draw:polyline>
        <draw:polyline draw:style-name="gr3" draw:text-style-name="P1" draw:layer="layout" svg:width="0.065cm" svg:height="0.072cm" svg:x="7.426cm" svg:y="11.802cm" svg:viewBox="0 0 66 73" draw:points="58,0 66,15 66,52 58,66 44,73 30,73 15,66 8,52 8,15 0,0">
          <text:p/>
        </draw:polyline>
        <draw:polyline draw:style-name="gr3" draw:text-style-name="P1" draw:layer="layout" svg:width="0.1cm" svg:height="0.064cm" svg:x="7.391cm" svg:y="11.674cm" svg:viewBox="0 0 101 65" draw:points="93,65 101,51 101,23 93,8 79,0 72,0 58,8 51,23 51,44 44,58 29,65 22,65 7,58 0,44 0,23 7,8">
          <text:p/>
        </draw:polyline>
        <draw:polyline draw:style-name="gr3" draw:text-style-name="P1" draw:layer="layout" svg:width="0.1cm" svg:height="0.064cm" svg:x="7.391cm" svg:y="11.553cm" svg:viewBox="0 0 101 65" draw:points="93,65 101,49 101,21 93,7 79,0 72,0 58,7 51,21 51,42 44,57 29,65 22,65 7,57 0,42 0,21 7,7">
          <text:p/>
        </draw:polyline>
        <draw:line draw:style-name="gr3" draw:text-style-name="P1" draw:layer="layout" svg:x1="7.492cm" svg:y1="11.288cm" svg:x2="7.419cm" svg:y2="11.339cm">
          <text:p/>
        </draw:line>
        <draw:polyline draw:style-name="gr3" draw:text-style-name="P1" draw:layer="layout" svg:width="0.15cm" svg:height="0.086cm" svg:x="7.341cm" svg:y="11.288cm" svg:viewBox="0 0 151 87" draw:points="151,87 0,87 0,29 7,14 14,7 28,0 51,0 65,7 72,14 79,29 79,87">
          <text:p/>
        </draw:polyline>
        <draw:polygon draw:style-name="gr3" draw:text-style-name="P1" draw:layer="layout" svg:width="0.1cm" svg:height="0.078cm" svg:x="7.391cm" svg:y="11.153cm" svg:viewBox="0 0 101 79" draw:points="101,50 93,65 87,72 72,79 29,79 15,72 7,65 0,50 0,28 7,14 15,6 29,0 72,0 87,6 93,14 101,28">
          <text:p/>
        </draw:polygon>
        <draw:polygon draw:style-name="gr3" draw:text-style-name="P1" draw:layer="layout" svg:width="0.1cm" svg:height="0.078cm" svg:x="7.391cm" svg:y="11.017cm" svg:viewBox="0 0 101 79" draw:points="101,51 93,65 87,72 72,79 29,79 15,72 7,65 0,51 0,29 7,14 15,7 29,0 72,0 87,7 93,14 101,29">
          <text:p/>
        </draw:polygon>
        <draw:line draw:style-name="gr3" draw:text-style-name="P1" draw:layer="layout" svg:x1="7.491cm" svg:y1="10.953cm" svg:x2="7.391cm" svg:y2="10.953cm">
          <text:p/>
        </draw:line>
        <draw:polyline draw:style-name="gr3" draw:text-style-name="P1" draw:layer="layout" svg:width="0.1cm" svg:height="0.065cm" svg:x="7.391cm" svg:y="10.888cm" svg:viewBox="0 0 101 66" draw:points="15,66 7,58 0,44 0,23 7,7 22,0 101,0">
          <text:p/>
        </draw:polyline>
        <draw:polyline draw:style-name="gr3" draw:text-style-name="P1" draw:layer="layout" svg:width="0.1cm" svg:height="0.064cm" svg:x="7.391cm" svg:y="10.824cm" svg:viewBox="0 0 101 65" draw:points="22,65 7,58 0,44 0,23 7,7 22,0 101,0">
          <text:p/>
        </draw:polyline>
        <draw:line draw:style-name="gr3" draw:text-style-name="P1" draw:layer="layout" svg:x1="7.732cm" svg:y1="12.017cm" svg:x2="7.732cm" svg:y2="12.102cm">
          <text:p/>
        </draw:line>
        <draw:polyline draw:style-name="gr3" draw:text-style-name="P1" draw:layer="layout" svg:width="0.15cm" svg:height="0.042cm" svg:x="7.582cm" svg:y="12.06cm" svg:viewBox="0 0 151 43" draw:points="151,0 0,0 22,15 36,29 44,43">
          <text:p/>
        </draw:polyline>
        <draw:polyline draw:style-name="gr3" draw:text-style-name="P1" draw:layer="layout" svg:width="0.15cm" svg:height="0.086cm" svg:x="7.582cm" svg:y="11.874cm" svg:viewBox="0 0 151 87" draw:points="0,14 0,43 7,57 15,64 36,80 65,87 123,87 137,80 144,72 151,57 151,28 144,14 137,7 123,0 87,0 73,7 65,14 59,28 59,57 65,72 73,80 87,87">
          <text:p/>
        </draw:polyline>
        <draw:line draw:style-name="gr3" draw:text-style-name="P1" draw:layer="layout" svg:x1="7.733cm" svg:y1="11.825cm" svg:x2="7.632cm" svg:y2="11.745cm">
          <text:p/>
        </draw:line>
        <draw:line draw:style-name="gr3" draw:text-style-name="P1" draw:layer="layout" svg:x1="7.632cm" svg:y1="11.825cm" svg:x2="7.733cm" svg:y2="11.745cm">
          <text:p/>
        </draw:line>
        <draw:line draw:style-name="gr3" draw:text-style-name="P1" draw:layer="layout" svg:x1="7.732cm" svg:y1="11.61cm" svg:x2="7.732cm" svg:y2="11.696cm">
          <text:p/>
        </draw:line>
        <draw:polyline draw:style-name="gr3" draw:text-style-name="P1" draw:layer="layout" svg:width="0.15cm" svg:height="0.044cm" svg:x="7.582cm" svg:y="11.653cm" svg:viewBox="0 0 151 45" draw:points="151,0 0,0 22,15 36,29 44,45">
          <text:p/>
        </draw:polyline>
        <draw:polyline draw:style-name="gr3" draw:text-style-name="P1" draw:layer="layout" svg:width="0.15cm" svg:height="0.086cm" svg:x="7.582cm" svg:y="11.467cm" svg:viewBox="0 0 151 87" draw:points="0,14 0,43 7,58 15,65 36,79 65,87 123,87 137,79 144,72 151,58 151,28 144,14 137,7 123,0 87,0 73,7 65,14 59,28 59,58 65,72 73,79 87,87">
          <text:p/>
        </draw:polyline>
        <draw:polyline draw:style-name="gr3" draw:text-style-name="P1" draw:layer="layout" svg:width="0.15cm" svg:height="0.129cm" svg:x="9.73cm" svg:y="9.083cm" svg:viewBox="0 0 151 130" draw:points="0,130 151,94 43,64 151,36 0,0">
          <text:p/>
        </draw:polyline>
        <draw:line draw:style-name="gr3" draw:text-style-name="P1" draw:layer="layout" svg:x1="9.88cm" svg:y1="9.026cm" svg:x2="9.78cm" svg:y2="9.026cm">
          <text:p/>
        </draw:line>
        <draw:polyline draw:style-name="gr3" draw:text-style-name="P1" draw:layer="layout" svg:width="0.014cm" svg:height="0.014cm" svg:x="9.73cm" svg:y="9.019cm" svg:viewBox="0 0 15 15" draw:points="0,8 9,15 15,8 9,0 0,8 15,8">
          <text:p/>
        </draw:polyline>
        <draw:line draw:style-name="gr3" draw:text-style-name="P1" draw:layer="layout" svg:x1="9.88cm" svg:y1="8.89cm" svg:x2="9.73cm" svg:y2="8.89cm">
          <text:p/>
        </draw:line>
        <draw:polyline draw:style-name="gr3" draw:text-style-name="P1" draw:layer="layout" svg:width="0.1cm" svg:height="0.072cm" svg:x="9.78cm" svg:y="8.89cm" svg:viewBox="0 0 101 73" draw:points="94,0 101,15 101,44 94,58 87,65 73,73 29,73 15,65 7,58 0,44 0,15 7,0">
          <text:p/>
        </draw:polyline>
        <draw:polyline draw:style-name="gr3" draw:text-style-name="P1" draw:layer="layout" svg:width="0.1cm" svg:height="0.071cm" svg:x="9.78cm" svg:y="8.755cm" svg:viewBox="0 0 101 72" draw:points="94,7 101,21 101,51 94,65 80,72 22,72 7,65 0,51 0,21 7,7 22,0 36,0 50,72">
          <text:p/>
        </draw:polyline>
        <draw:polyline draw:style-name="gr3" draw:text-style-name="P1" draw:layer="layout" svg:width="0.15cm" svg:height="0.1cm" svg:x="9.73cm" svg:y="8.498cm" svg:viewBox="0 0 151 101" draw:points="0,101 151,49 0,0">
          <text:p/>
        </draw:polyline>
        <draw:polyline draw:style-name="gr3" draw:text-style-name="P1" draw:layer="layout" svg:width="0.1cm" svg:height="0.072cm" svg:x="9.78cm" svg:y="8.383cm" svg:viewBox="0 0 101 73" draw:points="94,7 101,22 101,51 94,65 80,73 22,73 7,65 0,51 0,22 7,7 22,0 36,0 50,73">
          <text:p/>
        </draw:polyline>
        <draw:line draw:style-name="gr3" draw:text-style-name="P1" draw:layer="layout" svg:x1="9.88cm" svg:y1="8.319cm" svg:x2="9.78cm" svg:y2="8.319cm">
          <text:p/>
        </draw:line>
        <draw:polyline draw:style-name="gr3" draw:text-style-name="P1" draw:layer="layout" svg:width="0.029cm" svg:height="0.043cm" svg:x="9.78cm" svg:y="8.276cm" svg:viewBox="0 0 30 44" draw:points="30,44 16,37 8,30 0,14 0,0">
          <text:p/>
        </draw:polyline>
        <draw:polyline draw:style-name="gr3" draw:text-style-name="P1" draw:layer="layout" svg:width="0.1cm" svg:height="0.064cm" svg:x="9.78cm" svg:y="8.162cm" svg:viewBox="0 0 101 65" draw:points="101,0 22,0 7,7 0,21 0,50 7,65">
          <text:p/>
        </draw:polyline>
        <draw:polyline draw:style-name="gr3" draw:text-style-name="P1" draw:layer="layout" svg:width="0.064cm" svg:height="0.071cm" svg:x="9.816cm" svg:y="8.162cm" svg:viewBox="0 0 65 72" draw:points="58,0 65,14 65,51 58,65 44,72 29,72 15,65 7,51 7,14 0,0">
          <text:p/>
        </draw:polyline>
        <draw:line draw:style-name="gr3" draw:text-style-name="P1" draw:layer="layout" svg:x1="9.78cm" svg:y1="8.09cm" svg:x2="9.88cm" svg:y2="8.09cm">
          <text:p/>
        </draw:line>
        <draw:polyline draw:style-name="gr3" draw:text-style-name="P1" draw:layer="layout" svg:width="0.1cm" svg:height="0.064cm" svg:x="9.78cm" svg:y="8.026cm" svg:viewBox="0 0 101 65" draw:points="15,65 7,58 0,44 0,22 7,8 22,0 101,0">
          <text:p/>
        </draw:polyline>
        <draw:line draw:style-name="gr3" draw:text-style-name="P1" draw:layer="layout" svg:x1="9.88cm" svg:y1="7.89cm" svg:x2="9.73cm" svg:y2="7.89cm">
          <text:p/>
        </draw:line>
        <draw:polyline draw:style-name="gr3" draw:text-style-name="P1" draw:layer="layout" svg:width="0.1cm" svg:height="0.072cm" svg:x="9.78cm" svg:y="7.89cm" svg:viewBox="0 0 101 73" draw:points="94,0 101,14 101,44 94,58 87,66 73,73 29,73 15,66 7,58 0,44 0,14 7,0">
          <text:p/>
        </draw:polyline>
        <draw:line draw:style-name="gr3" draw:text-style-name="P1" draw:layer="layout" svg:x1="9.88cm" svg:y1="7.819cm" svg:x2="9.73cm" svg:y2="7.819cm">
          <text:p/>
        </draw:line>
        <draw:polyline draw:style-name="gr3" draw:text-style-name="P1" draw:layer="layout" svg:width="0.1cm" svg:height="0.064cm" svg:x="9.78cm" svg:y="7.755cm" svg:viewBox="0 0 101 65" draw:points="101,0 22,0 7,7 0,22 0,44 7,58 15,65">
          <text:p/>
        </draw:polyline>
        <draw:polyline draw:style-name="gr3" draw:text-style-name="P1" draw:layer="layout" svg:width="0.1cm" svg:height="0.064cm" svg:x="9.78cm" svg:y="7.619cm" svg:viewBox="0 0 101 65" draw:points="101,0 22,0 7,7 0,21 0,51 7,65">
          <text:p/>
        </draw:polyline>
        <draw:polyline draw:style-name="gr3" draw:text-style-name="P1" draw:layer="layout" svg:width="0.064cm" svg:height="0.071cm" svg:x="9.816cm" svg:y="7.619cm" svg:viewBox="0 0 65 72" draw:points="58,0 65,15 65,51 58,65 44,72 29,72 15,65 7,51 7,15 0,0">
          <text:p/>
        </draw:polyline>
        <draw:line draw:style-name="gr3" draw:text-style-name="P1" draw:layer="layout" svg:x1="9.881cm" svg:y1="7.448cm" svg:x2="9.78cm" svg:y2="7.369cm">
          <text:p/>
        </draw:line>
        <draw:line draw:style-name="gr3" draw:text-style-name="P1" draw:layer="layout" svg:x1="9.78cm" svg:y1="7.448cm" svg:x2="9.881cm" svg:y2="7.369cm">
          <text:p/>
        </draw:line>
        <draw:polyline draw:style-name="gr3" draw:text-style-name="P1" draw:layer="layout" svg:width="0.15cm" svg:height="0.086cm" svg:x="9.73cm" svg:y="7.233cm" svg:viewBox="0 0 151 87" draw:points="151,72 151,44 144,29 137,22 115,7 86,0 29,0 14,7 8,14 0,29 0,58 8,72 14,80 29,87 65,87 79,80 86,72 93,58 93,29 86,14 79,7 65,0">
          <text:p/>
        </draw:polyline>
        <draw:polyline draw:style-name="gr3" draw:text-style-name="P1" draw:layer="layout" svg:width="0.15cm" svg:height="0.093cm" svg:x="7.341cm" svg:y="10.104cm" svg:viewBox="0 0 151 94" draw:points="137,0 143,7 151,29 151,44 143,65 129,79 115,87 86,94 65,94 36,87 21,79 7,65 0,44 0,29 7,7 14,0">
          <text:p/>
        </draw:polyline>
        <draw:polyline draw:style-name="gr3" draw:text-style-name="P1" draw:layer="layout" svg:width="0.15cm" svg:height="0.021cm" svg:x="7.341cm" svg:y="10.018cm" svg:viewBox="0 0 151 22" draw:points="151,0 143,15 129,22 0,22">
          <text:p/>
        </draw:polyline>
        <draw:polyline draw:style-name="gr3" draw:text-style-name="P1" draw:layer="layout" svg:width="0.1cm" svg:height="0.065cm" svg:x="7.391cm" svg:y="9.896cm" svg:viewBox="0 0 101 66" draw:points="101,0 22,0 7,8 0,22 0,52 7,66">
          <text:p/>
        </draw:polyline>
        <draw:polyline draw:style-name="gr3" draw:text-style-name="P1" draw:layer="layout" svg:width="0.065cm" svg:height="0.072cm" svg:x="7.426cm" svg:y="9.896cm" svg:viewBox="0 0 66 73" draw:points="58,0 66,15 66,52 58,66 44,73 30,73 15,66 8,52 8,15 0,0">
          <text:p/>
        </draw:polyline>
        <draw:polyline draw:style-name="gr3" draw:text-style-name="P1" draw:layer="layout" svg:width="0.1cm" svg:height="0.064cm" svg:x="7.391cm" svg:y="9.768cm" svg:viewBox="0 0 101 65" draw:points="93,65 101,51 101,22 93,7 79,0 72,0 58,7 51,22 51,44 44,58 29,65 22,65 7,58 0,44 0,22 7,7">
          <text:p/>
        </draw:polyline>
        <draw:polyline draw:style-name="gr3" draw:text-style-name="P1" draw:layer="layout" svg:width="0.1cm" svg:height="0.064cm" svg:x="7.391cm" svg:y="9.647cm" svg:viewBox="0 0 101 65" draw:points="93,65 101,50 101,22 93,8 79,0 72,0 58,8 51,22 51,44 44,58 29,65 22,65 7,58 0,44 0,22 7,8">
          <text:p/>
        </draw:polyline>
        <draw:line draw:style-name="gr3" draw:text-style-name="P1" draw:layer="layout" svg:x1="7.492cm" svg:y1="9.382cm" svg:x2="7.419cm" svg:y2="9.433cm">
          <text:p/>
        </draw:line>
        <draw:polyline draw:style-name="gr3" draw:text-style-name="P1" draw:layer="layout" svg:width="0.15cm" svg:height="0.086cm" svg:x="7.341cm" svg:y="9.382cm" svg:viewBox="0 0 151 87" draw:points="151,87 0,87 0,29 7,14 14,8 28,0 51,0 65,8 72,14 79,29 79,87">
          <text:p/>
        </draw:polyline>
        <draw:polygon draw:style-name="gr3" draw:text-style-name="P1" draw:layer="layout" svg:width="0.1cm" svg:height="0.078cm" svg:x="7.391cm" svg:y="9.247cm" svg:viewBox="0 0 101 79" draw:points="101,50 93,65 87,72 72,79 29,79 15,72 7,65 0,50 0,28 7,14 15,7 29,0 72,0 87,7 93,14 101,28">
          <text:p/>
        </draw:polygon>
        <draw:polygon draw:style-name="gr3" draw:text-style-name="P1" draw:layer="layout" svg:width="0.1cm" svg:height="0.078cm" svg:x="7.391cm" svg:y="9.111cm" svg:viewBox="0 0 101 79" draw:points="101,51 93,65 87,72 72,79 29,79 15,72 7,65 0,51 0,29 7,14 15,7 29,0 72,0 87,7 93,14 101,29">
          <text:p/>
        </draw:polygon>
        <draw:line draw:style-name="gr3" draw:text-style-name="P1" draw:layer="layout" svg:x1="7.491cm" svg:y1="9.047cm" svg:x2="7.391cm" svg:y2="9.047cm">
          <text:p/>
        </draw:line>
        <draw:polyline draw:style-name="gr3" draw:text-style-name="P1" draw:layer="layout" svg:width="0.1cm" svg:height="0.065cm" svg:x="7.391cm" svg:y="8.982cm" svg:viewBox="0 0 101 66" draw:points="15,66 7,58 0,43 0,22 7,7 22,0 101,0">
          <text:p/>
        </draw:polyline>
        <draw:polyline draw:style-name="gr3" draw:text-style-name="P1" draw:layer="layout" svg:width="0.1cm" svg:height="0.064cm" svg:x="7.391cm" svg:y="8.918cm" svg:viewBox="0 0 101 65" draw:points="22,65 7,58 0,43 0,21 7,7 22,0 101,0">
          <text:p/>
        </draw:polyline>
        <draw:line draw:style-name="gr3" draw:text-style-name="P1" draw:layer="layout" svg:x1="7.732cm" svg:y1="10.111cm" svg:x2="7.732cm" svg:y2="10.197cm">
          <text:p/>
        </draw:line>
        <draw:polyline draw:style-name="gr3" draw:text-style-name="P1" draw:layer="layout" svg:width="0.15cm" svg:height="0.043cm" svg:x="7.582cm" svg:y="10.154cm" svg:viewBox="0 0 151 44" draw:points="151,0 0,0 22,14 36,28 44,44">
          <text:p/>
        </draw:polyline>
        <draw:polyline draw:style-name="gr3" draw:text-style-name="P1" draw:layer="layout" svg:width="0.15cm" svg:height="0.086cm" svg:x="7.582cm" svg:y="9.968cm" svg:viewBox="0 0 151 87" draw:points="0,14 0,43 7,57 15,65 36,80 65,87 123,87 137,80 144,72 151,57 151,28 144,14 137,7 123,0 87,0 73,7 65,14 59,28 59,57 65,72 73,80 87,87">
          <text:p/>
        </draw:polyline>
        <draw:line draw:style-name="gr3" draw:text-style-name="P1" draw:layer="layout" svg:x1="7.733cm" svg:y1="9.919cm" svg:x2="7.632cm" svg:y2="9.839cm">
          <text:p/>
        </draw:line>
        <draw:line draw:style-name="gr3" draw:text-style-name="P1" draw:layer="layout" svg:x1="7.632cm" svg:y1="9.919cm" svg:x2="7.733cm" svg:y2="9.839cm">
          <text:p/>
        </draw:line>
        <draw:line draw:style-name="gr3" draw:text-style-name="P1" draw:layer="layout" svg:x1="7.732cm" svg:y1="9.704cm" svg:x2="7.732cm" svg:y2="9.79cm">
          <text:p/>
        </draw:line>
        <draw:polyline draw:style-name="gr3" draw:text-style-name="P1" draw:layer="layout" svg:width="0.15cm" svg:height="0.043cm" svg:x="7.582cm" svg:y="9.747cm" svg:viewBox="0 0 151 44" draw:points="151,0 0,0 22,14 36,29 44,44">
          <text:p/>
        </draw:polyline>
        <draw:polyline draw:style-name="gr3" draw:text-style-name="P1" draw:layer="layout" svg:width="0.15cm" svg:height="0.086cm" svg:x="7.582cm" svg:y="9.561cm" svg:viewBox="0 0 151 87" draw:points="0,14 0,43 7,58 15,65 36,79 65,87 123,87 137,79 144,72 151,58 151,29 144,14 137,7 123,0 87,0 73,7 65,14 59,29 59,58 65,72 73,79 87,87">
          <text:p/>
        </draw:polyline>
        <draw:polyline draw:style-name="gr3" draw:text-style-name="P1" draw:layer="layout" svg:width="0.15cm" svg:height="0.092cm" svg:x="7.889cm" svg:y="7.512cm" svg:viewBox="0 0 151 93" draw:points="136,0 143,7 151,28 151,43 143,64 128,79 114,87 85,93 64,93 36,87 21,79 7,64 0,43 0,28 7,7 14,0">
          <text:p/>
        </draw:polyline>
        <draw:polyline draw:style-name="gr3" draw:text-style-name="P1" draw:layer="layout" svg:width="0.15cm" svg:height="0.021cm" svg:x="7.889cm" svg:y="7.426cm" svg:viewBox="0 0 151 22" draw:points="151,0 143,14 128,22 0,22">
          <text:p/>
        </draw:polyline>
        <draw:polyline draw:style-name="gr3" draw:text-style-name="P1" draw:layer="layout" svg:width="0.1cm" svg:height="0.065cm" svg:x="7.939cm" svg:y="7.304cm" svg:viewBox="0 0 101 66" draw:points="101,0 22,0 7,8 0,22 0,52 7,66">
          <text:p/>
        </draw:polyline>
        <draw:polyline draw:style-name="gr3" draw:text-style-name="P1" draw:layer="layout" svg:width="0.065cm" svg:height="0.072cm" svg:x="7.974cm" svg:y="7.304cm" svg:viewBox="0 0 66 73" draw:points="57,0 66,15 66,52 57,66 43,73 29,73 15,66 8,52 8,15 0,0">
          <text:p/>
        </draw:polyline>
        <draw:polyline draw:style-name="gr3" draw:text-style-name="P1" draw:layer="layout" svg:width="0.1cm" svg:height="0.064cm" svg:x="7.939cm" svg:y="7.176cm" svg:viewBox="0 0 101 65" draw:points="93,65 101,51 101,22 93,7 79,0 72,0 58,7 51,22 51,44 44,58 29,65 22,65 7,58 0,44 0,22 7,7">
          <text:p/>
        </draw:polyline>
        <draw:polyline draw:style-name="gr3" draw:text-style-name="P1" draw:layer="layout" svg:width="0.1cm" svg:height="0.064cm" svg:x="7.939cm" svg:y="7.055cm" svg:viewBox="0 0 101 65" draw:points="93,65 101,50 101,21 93,7 79,0 72,0 58,7 51,21 51,43 44,58 29,65 22,65 7,58 0,43 0,21 7,7">
          <text:p/>
        </draw:polyline>
        <draw:line draw:style-name="gr3" draw:text-style-name="P1" draw:layer="layout" svg:x1="8.04cm" svg:y1="6.79cm" svg:x2="7.967cm" svg:y2="6.841cm">
          <text:p/>
        </draw:line>
        <draw:polyline draw:style-name="gr3" draw:text-style-name="P1" draw:layer="layout" svg:width="0.15cm" svg:height="0.086cm" svg:x="7.889cm" svg:y="6.79cm" svg:viewBox="0 0 151 87" draw:points="151,87 0,87 0,29 7,14 14,7 28,0 50,0 64,7 71,14 78,29 78,87">
          <text:p/>
        </draw:polyline>
        <draw:polygon draw:style-name="gr3" draw:text-style-name="P1" draw:layer="layout" svg:width="0.1cm" svg:height="0.078cm" svg:x="7.939cm" svg:y="6.655cm" svg:viewBox="0 0 101 79" draw:points="101,50 93,65 87,72 72,79 29,79 15,72 7,65 0,50 0,29 7,15 15,6 29,0 72,0 87,6 93,15 101,29">
          <text:p/>
        </draw:polygon>
        <draw:polygon draw:style-name="gr3" draw:text-style-name="P1" draw:layer="layout" svg:width="0.1cm" svg:height="0.078cm" svg:x="7.939cm" svg:y="6.519cm" svg:viewBox="0 0 101 79" draw:points="101,50 93,64 87,73 72,79 29,79 15,73 7,64 0,50 0,29 7,14 15,7 29,0 72,0 87,7 93,14 101,29">
          <text:p/>
        </draw:polygon>
        <draw:line draw:style-name="gr3" draw:text-style-name="P1" draw:layer="layout" svg:x1="8.039cm" svg:y1="6.455cm" svg:x2="7.939cm" svg:y2="6.455cm">
          <text:p/>
        </draw:line>
        <draw:polyline draw:style-name="gr3" draw:text-style-name="P1" draw:layer="layout" svg:width="0.1cm" svg:height="0.064cm" svg:x="7.939cm" svg:y="6.391cm" svg:viewBox="0 0 101 65" draw:points="15,65 7,58 0,43 0,22 7,7 22,0 101,0">
          <text:p/>
        </draw:polyline>
        <draw:polyline draw:style-name="gr3" draw:text-style-name="P1" draw:layer="layout" svg:width="0.1cm" svg:height="0.065cm" svg:x="7.939cm" svg:y="6.326cm" svg:viewBox="0 0 101 66" draw:points="22,66 7,58 0,44 0,22 7,7 22,0 101,0">
          <text:p/>
        </draw:polyline>
        <draw:polyline draw:style-name="gr3" draw:text-style-name="P1" draw:layer="layout" svg:width="0.15cm" svg:height="0.093cm" svg:x="8.13cm" svg:y="7.519cm" svg:viewBox="0 0 151 94" draw:points="15,86 7,80 0,65 0,28 7,14 15,7 29,0 43,0 64,7 151,94 151,0">
          <text:p/>
        </draw:polyline>
        <draw:polyline draw:style-name="gr3" draw:text-style-name="P1" draw:layer="layout" svg:width="0.15cm" svg:height="0.1cm" svg:x="8.13cm" svg:y="7.369cm" svg:viewBox="0 0 151 101" draw:points="0,101 0,0 151,64">
          <text:p/>
        </draw:polyline>
        <draw:line draw:style-name="gr3" draw:text-style-name="P1" draw:layer="layout" svg:x1="8.281cm" svg:y1="7.327cm" svg:x2="8.18cm" svg:y2="7.247cm">
          <text:p/>
        </draw:line>
        <draw:line draw:style-name="gr3" draw:text-style-name="P1" draw:layer="layout" svg:x1="8.18cm" svg:y1="7.327cm" svg:x2="8.281cm" svg:y2="7.247cm">
          <text:p/>
        </draw:line>
        <draw:line draw:style-name="gr3" draw:text-style-name="P1" draw:layer="layout" svg:x1="8.28cm" svg:y1="7.112cm" svg:x2="8.28cm" svg:y2="7.198cm">
          <text:p/>
        </draw:line>
        <draw:polyline draw:style-name="gr3" draw:text-style-name="P1" draw:layer="layout" svg:width="0.15cm" svg:height="0.043cm" svg:x="8.13cm" svg:y="7.155cm" svg:viewBox="0 0 151 44" draw:points="151,0 0,0 22,15 36,29 43,44">
          <text:p/>
        </draw:polyline>
        <draw:polyline draw:style-name="gr3" draw:text-style-name="P1" draw:layer="layout" svg:width="0.15cm" svg:height="0.086cm" svg:x="8.13cm" svg:y="6.969cm" svg:viewBox="0 0 151 87" draw:points="0,14 0,43 7,58 15,65 36,79 64,87 122,87 136,79 144,72 151,58 151,28 144,14 136,7 122,0 86,0 72,7 64,14 58,28 58,58 64,72 72,79 86,87">
          <text:p/>
        </draw:polyline>
        <draw:line draw:style-name="gr3" draw:text-style-name="P1" draw:layer="layout" svg:x1="10.481cm" svg:y1="7.062cm" svg:x2="10.409cm" svg:y2="7.113cm">
          <text:p/>
        </draw:line>
        <draw:polyline draw:style-name="gr3" draw:text-style-name="P1" draw:layer="layout" svg:width="0.15cm" svg:height="0.085cm" svg:x="10.33cm" svg:y="7.062cm" svg:viewBox="0 0 151 86" draw:points="151,86 0,86 0,28 8,14 14,7 29,0 50,0 65,7 72,14 79,28 79,86">
          <text:p/>
        </draw:polyline>
        <draw:polyline draw:style-name="gr3" draw:text-style-name="P1" draw:layer="layout" svg:width="0.1cm" svg:height="0.064cm" svg:x="10.38cm" svg:y="6.933cm" svg:viewBox="0 0 101 65" draw:points="101,0 22,0 7,7 0,23 0,51 7,65">
          <text:p/>
        </draw:polyline>
        <draw:polyline draw:style-name="gr3" draw:text-style-name="P1" draw:layer="layout" svg:width="0.064cm" svg:height="0.071cm" svg:x="10.416cm" svg:y="6.933cm" svg:viewBox="0 0 65 72" draw:points="58,0 65,14 65,50 58,65 43,72 28,72 14,65 7,50 7,14 0,0">
          <text:p/>
        </draw:polyline>
        <draw:line draw:style-name="gr3" draw:text-style-name="P1" draw:layer="layout" svg:x1="10.48cm" svg:y1="6.861cm" svg:x2="10.38cm" svg:y2="6.861cm">
          <text:p/>
        </draw:line>
        <draw:polyline draw:style-name="gr3" draw:text-style-name="P1" draw:layer="layout" svg:width="0.1cm" svg:height="0.064cm" svg:x="10.38cm" svg:y="6.797cm" svg:viewBox="0 0 101 65" draw:points="15,65 7,59 0,44 0,22 7,7 22,0 101,0">
          <text:p/>
        </draw:polyline>
        <draw:polyline draw:style-name="gr3" draw:text-style-name="P1" draw:layer="layout" svg:width="0.1cm" svg:height="0.064cm" svg:x="10.38cm" svg:y="6.733cm" svg:viewBox="0 0 101 65" draw:points="22,65 7,58 0,44 0,23 7,7 22,0 101,0">
          <text:p/>
        </draw:polyline>
        <draw:line draw:style-name="gr3" draw:text-style-name="P1" draw:layer="layout" svg:x1="10.38cm" svg:y1="6.661cm" svg:x2="10.53cm" svg:y2="6.661cm">
          <text:p/>
        </draw:line>
        <draw:polyline draw:style-name="gr3" draw:text-style-name="P1" draw:layer="layout" svg:width="0.1cm" svg:height="0.07cm" svg:x="10.38cm" svg:y="6.591cm" svg:viewBox="0 0 101 71" draw:points="7,71 0,57 0,29 7,14 15,6 29,0 73,0 87,6 94,14 101,29 101,57 94,71">
          <text:p/>
        </draw:polyline>
        <draw:polyline draw:style-name="gr3" draw:text-style-name="P1" draw:layer="layout" svg:width="0.2cm" svg:height="0.3cm" svg:x="15.759cm" svg:y="17.067cm" svg:viewBox="0 0 201 301" draw:points="0,301 0,0 100,215 201,0 201,301">
          <text:p/>
        </draw:polyline>
        <draw:polyline draw:style-name="gr3" draw:text-style-name="P1" draw:layer="layout" svg:width="0.186cm" svg:height="0.3cm" svg:x="16.087cm" svg:y="17.067cm" svg:viewBox="0 0 187 301" draw:points="173,14 144,0 101,0 59,14 30,42 15,71 0,129 0,172 15,229 30,258 59,286 101,301 130,301 173,286 187,272 187,172 130,172">
          <text:p/>
        </draw:polyline>
        <draw:polyline draw:style-name="gr3" draw:text-style-name="P1" draw:layer="layout" svg:width="0.185cm" svg:height="0.3cm" svg:x="16.388cm" svg:y="17.067cm" svg:viewBox="0 0 186 301" draw:points="172,14 143,0 100,0 57,14 28,42 14,71 0,129 0,172 14,229 28,258 57,286 100,301 129,301 172,286 186,272 186,172 129,172">
          <text:p/>
        </draw:polyline>
        <draw:polyline draw:style-name="gr3" draw:text-style-name="P1" draw:layer="layout" svg:width="0.171cm" svg:height="0.3cm" svg:x="16.688cm" svg:y="17.067cm" svg:viewBox="0 0 172 301" draw:points="0,286 42,301 115,301 143,286 158,272 172,243 172,215 158,186 143,172 115,158 57,144 28,129 14,115 0,85 0,57 14,28 28,14 57,0 129,0 172,14">
          <text:p/>
        </draw:polyline>
        <draw:line draw:style-name="gr3" draw:text-style-name="P1" draw:layer="layout" svg:x1="17.216cm" svg:y1="17.367cm" svg:x2="17.216cm" svg:y2="17.067cm">
          <text:p/>
        </draw:line>
        <draw:line draw:style-name="gr3" draw:text-style-name="P1" draw:layer="layout" svg:x1="17.216cm" svg:y1="17.21cm" svg:x2="17.388cm" svg:y2="17.21cm">
          <text:p/>
        </draw:line>
        <draw:line draw:style-name="gr3" draw:text-style-name="P1" draw:layer="layout" svg:x1="17.388cm" svg:y1="17.367cm" svg:x2="17.388cm" svg:y2="17.067cm">
          <text:p/>
        </draw:line>
        <draw:polygon draw:style-name="gr3" draw:text-style-name="P1" draw:layer="layout" svg:width="0.157cm" svg:height="0.2cm" svg:x="17.516cm" svg:y="17.167cm" svg:viewBox="0 0 158 201" draw:points="57,201 29,186 15,172 0,143 0,57 15,28 29,14 57,0 101,0 130,14 144,28 158,57 158,143 144,172 130,186 101,201">
          <text:p/>
        </draw:polygon>
        <draw:line draw:style-name="gr3" draw:text-style-name="P1" draw:layer="layout" svg:x1="17.931cm" svg:y1="17.167cm" svg:x2="17.931cm" svg:y2="17.367cm">
          <text:p/>
        </draw:line>
        <draw:polyline draw:style-name="gr3" draw:text-style-name="P1" draw:layer="layout" svg:width="0.129cm" svg:height="0.2cm" svg:x="17.802cm" svg:y="17.167cm" svg:viewBox="0 0 130 201" draw:points="0,0 0,158 14,186 43,201 87,201 115,186 130,172">
          <text:p/>
        </draw:polyline>
        <draw:polyline draw:style-name="gr3" draw:text-style-name="P1" draw:layer="layout" svg:width="0.128cm" svg:height="0.2cm" svg:x="18.059cm" svg:y="17.167cm" svg:viewBox="0 0 129 201" draw:points="0,186 29,201 86,201 115,186 129,158 129,143 115,114 86,100 43,100 14,85 0,57 0,43 14,14 43,0 86,0 115,14">
          <text:p/>
        </draw:polyline>
        <draw:line draw:style-name="gr3" draw:text-style-name="P1" draw:layer="layout" svg:x1="18.316cm" svg:y1="17.367cm" svg:x2="18.316cm" svg:y2="17.167cm">
          <text:p/>
        </draw:line>
        <draw:polyline draw:style-name="gr3" draw:text-style-name="P1" draw:layer="layout" svg:width="0.028cm" svg:height="0.028cm" svg:x="18.302cm" svg:y="17.067cm" svg:viewBox="0 0 29 29" draw:points="15,0 0,14 15,29 29,14 15,0 15,29">
          <text:p/>
        </draw:polyline>
        <draw:line draw:style-name="gr3" draw:text-style-name="P1" draw:layer="layout" svg:x1="18.459cm" svg:y1="17.167cm" svg:x2="18.459cm" svg:y2="17.367cm">
          <text:p/>
        </draw:line>
        <draw:polyline draw:style-name="gr3" draw:text-style-name="P1" draw:layer="layout" svg:width="0.128cm" svg:height="0.2cm" svg:x="18.459cm" svg:y="17.167cm" svg:viewBox="0 0 129 201" draw:points="0,28 14,14 42,0 86,0 115,14 129,43 129,201">
          <text:p/>
        </draw:polyline>
        <draw:polyline draw:style-name="gr3" draw:text-style-name="P1" draw:layer="layout" svg:width="0.129cm" svg:height="0.3cm" svg:x="18.73cm" svg:y="17.167cm" svg:viewBox="0 0 130 301" draw:points="130,0 130,243 115,271 101,285 73,301 29,301 0,285">
          <text:p/>
        </draw:polyline>
        <draw:polyline draw:style-name="gr3" draw:text-style-name="P1" draw:layer="layout" svg:width="0.143cm" svg:height="0.2cm" svg:x="18.716cm" svg:y="17.167cm" svg:viewBox="0 0 144 201" draw:points="144,186 115,201 58,201 28,186 14,172 0,143 0,57 14,28 28,14 58,0 115,0 144,14">
          <text:p/>
        </draw:polyline>
        <draw:polyline draw:style-name="gr3" draw:text-style-name="P1" draw:layer="layout" svg:width="0.172cm" svg:height="0.3cm" svg:x="19.23cm" svg:y="17.067cm" svg:viewBox="0 0 173 301" draw:points="100,144 144,158 158,172 173,201 173,243 158,272 144,286 114,301 0,301 0,0 100,0 130,14 144,28 158,57 158,85 144,115 130,129 100,144 0,144">
          <text:p/>
        </draw:polyline>
        <draw:polygon draw:style-name="gr3" draw:text-style-name="P1" draw:layer="layout" svg:width="0.157cm" svg:height="0.2cm" svg:x="19.516cm" svg:y="17.167cm" svg:viewBox="0 0 158 201" draw:points="57,201 29,186 14,172 0,143 0,57 14,28 29,14 57,0 101,0 130,14 144,28 158,57 158,143 144,172 130,186 101,201">
          <text:p/>
        </draw:polygon>
        <draw:polyline draw:style-name="gr3" draw:text-style-name="P1" draw:layer="layout" svg:width="0.128cm" svg:height="0.2cm" svg:x="19.802cm" svg:y="17.167cm" svg:viewBox="0 0 129 201" draw:points="129,201 129,43 114,14 85,0 28,0 0,14">
          <text:p/>
        </draw:polyline>
        <draw:polyline draw:style-name="gr3" draw:text-style-name="P1" draw:layer="layout" svg:width="0.143cm" svg:height="0.129cm" svg:x="19.787cm" svg:y="17.238cm" svg:viewBox="0 0 144 130" draw:points="144,115 116,130 43,130 15,115 0,86 0,57 15,29 43,14 116,14 144,0">
          <text:p/>
        </draw:polyline>
        <draw:line draw:style-name="gr3" draw:text-style-name="P1" draw:layer="layout" svg:x1="20.073cm" svg:y1="17.367cm" svg:x2="20.073cm" svg:y2="17.167cm">
          <text:p/>
        </draw:line>
        <draw:polyline draw:style-name="gr3" draw:text-style-name="P1" draw:layer="layout" svg:width="0.086cm" svg:height="0.057cm" svg:x="20.073cm" svg:y="17.167cm" svg:viewBox="0 0 87 58" draw:points="0,58 14,29 29,14 58,0 87,0">
          <text:p/>
        </draw:polyline>
        <draw:line draw:style-name="gr3" draw:text-style-name="P1" draw:layer="layout" svg:x1="20.387cm" svg:y1="17.367cm" svg:x2="20.387cm" svg:y2="17.067cm">
          <text:p/>
        </draw:line>
        <draw:polyline draw:style-name="gr3" draw:text-style-name="P1" draw:layer="layout" svg:width="0.142cm" svg:height="0.2cm" svg:x="20.245cm" svg:y="17.167cm" svg:viewBox="0 0 143 201" draw:points="143,186 115,201 57,201 28,186 14,172 0,143 0,57 14,28 28,14 57,0 115,0 143,14">
          <text:p/>
        </draw:polyline>
        <draw:polyline draw:style-name="gr3" draw:text-style-name="P1" draw:layer="layout" svg:width="0.171cm" svg:height="0.3cm" svg:x="20.759cm" svg:y="17.067cm" svg:viewBox="0 0 172 301" draw:points="100,144 144,158 158,172 172,201 172,243 158,272 144,286 114,301 0,301 0,0 100,0 129,14 144,28 158,57 158,85 144,115 129,129 100,144 0,144">
          <text:p/>
        </draw:polyline>
        <draw:line draw:style-name="gr3" draw:text-style-name="P1" draw:layer="layout" svg:x1="21.059cm" svg:y1="17.367cm" svg:x2="21.059cm" svg:y2="17.167cm">
          <text:p/>
        </draw:line>
        <draw:polyline draw:style-name="gr3" draw:text-style-name="P1" draw:layer="layout" svg:width="0.028cm" svg:height="0.028cm" svg:x="21.045cm" svg:y="17.067cm" svg:viewBox="0 0 29 29" draw:points="15,0 0,14 15,29 29,14 15,0 15,29">
          <text:p/>
        </draw:polyline>
        <draw:line draw:style-name="gr3" draw:text-style-name="P1" draw:layer="layout" svg:x1="21.202cm" svg:y1="17.367cm" svg:x2="21.202cm" svg:y2="17.067cm">
          <text:p/>
        </draw:line>
        <draw:line draw:style-name="gr3" draw:text-style-name="P1" draw:layer="layout" svg:x1="21.23cm" svg:y1="17.252cm" svg:x2="21.317cm" svg:y2="17.368cm">
          <text:p/>
        </draw:line>
        <draw:line draw:style-name="gr3" draw:text-style-name="P1" draw:layer="layout" svg:x1="21.317cm" svg:y1="17.167cm" svg:x2="21.202cm" svg:y2="17.282cm">
          <text:p/>
        </draw:line>
        <draw:polyline draw:style-name="gr3" draw:text-style-name="P1" draw:layer="layout" svg:width="0.128cm" svg:height="0.2cm" svg:x="21.445cm" svg:y="17.167cm" svg:viewBox="0 0 129 201" draw:points="129,201 129,43 115,14 87,0 29,0 0,14">
          <text:p/>
        </draw:polyline>
        <draw:polyline draw:style-name="gr3" draw:text-style-name="P1" draw:layer="layout" svg:width="0.143cm" svg:height="0.129cm" svg:x="21.43cm" svg:y="17.238cm" svg:viewBox="0 0 144 130" draw:points="144,115 116,130 44,130 15,115 0,86 0,57 15,29 44,14 116,14 144,0">
          <text:p/>
        </draw:polyline>
        <draw:line draw:style-name="gr3" draw:text-style-name="P1" draw:layer="layout" svg:x1="21.716cm" svg:y1="17.167cm" svg:x2="21.716cm" svg:y2="17.367cm">
          <text:p/>
        </draw:line>
        <draw:polyline draw:style-name="gr3" draw:text-style-name="P1" draw:layer="layout" svg:width="0.129cm" svg:height="0.2cm" svg:x="21.716cm" svg:y="17.167cm" svg:viewBox="0 0 130 201" draw:points="0,28 16,14 44,0 87,0 116,14 130,43 130,201">
          <text:p/>
        </draw:polyline>
        <draw:polyline draw:style-name="gr3" draw:text-style-name="P1" draw:layer="layout" svg:width="0.143cm" svg:height="0.2cm" svg:x="21.973cm" svg:y="17.167cm" svg:viewBox="0 0 144 201" draw:points="130,186 101,201 44,201 15,186 0,158 0,43 15,14 44,0 101,0 130,14 144,43 144,71 0,100">
          <text:p/>
        </draw:polyline>
        <draw:line draw:style-name="gr3" draw:text-style-name="P1" draw:layer="layout" svg:x1="22.245cm" svg:y1="17.367cm" svg:x2="22.245cm" svg:y2="17.167cm">
          <text:p/>
        </draw:line>
        <draw:polyline draw:style-name="gr3" draw:text-style-name="P1" draw:layer="layout" svg:width="0.086cm" svg:height="0.057cm" svg:x="22.245cm" svg:y="17.167cm" svg:viewBox="0 0 87 58" draw:points="0,58 14,29 28,14 57,0 87,0">
          <text:p/>
        </draw:polyline>
        <draw:polyline draw:style-name="gr3" draw:text-style-name="P1" draw:layer="layout" svg:width="0.092cm" svg:height="0.149cm" svg:x="17.844cm" svg:y="14.187cm" svg:viewBox="0 0 93 150" draw:points="93,136 87,144 65,150 51,150 28,144 14,129 7,115 0,86 0,65 7,35 14,21 28,7 51,0 65,0 87,7 93,14">
          <text:p/>
        </draw:polyline>
        <draw:polyline draw:style-name="gr3" draw:text-style-name="P1" draw:layer="layout" svg:width="0.021cm" svg:height="0.149cm" svg:x="18.001cm" svg:y="14.187cm" svg:viewBox="0 0 22 150" draw:points="22,150 8,144 0,129 0,0">
          <text:p/>
        </draw:polyline>
        <draw:polyline draw:style-name="gr3" draw:text-style-name="P1" draw:layer="layout" svg:width="0.066cm" svg:height="0.1cm" svg:x="18.079cm" svg:y="14.236cm" svg:viewBox="0 0 67 101" draw:points="67,101 67,23 58,8 44,0 16,0 0,8">
          <text:p/>
        </draw:polyline>
        <draw:polyline draw:style-name="gr3" draw:text-style-name="P1" draw:layer="layout" svg:width="0.072cm" svg:height="0.064cm" svg:x="18.072cm" svg:y="14.272cm" svg:viewBox="0 0 73 65" draw:points="73,59 58,65 22,65 7,59 0,44 0,29 7,15 22,7 58,7 73,0">
          <text:p/>
        </draw:polyline>
        <draw:polyline draw:style-name="gr3" draw:text-style-name="P1" draw:layer="layout" svg:width="0.064cm" svg:height="0.1cm" svg:x="18.208cm" svg:y="14.236cm" svg:viewBox="0 0 65 101" draw:points="0,95 14,101 43,101 57,95 65,80 65,73 57,59 43,52 22,52 7,44 0,30 0,23 7,8 22,0 43,0 57,8">
          <text:p/>
        </draw:polyline>
        <draw:polyline draw:style-name="gr3" draw:text-style-name="P1" draw:layer="layout" svg:width="0.064cm" svg:height="0.1cm" svg:x="18.33cm" svg:y="14.236cm" svg:viewBox="0 0 65 101" draw:points="0,95 14,101 43,101 58,95 65,80 65,73 58,59 43,52 21,52 7,44 0,30 0,23 7,8 21,0 43,0 58,8">
          <text:p/>
        </draw:polyline>
        <draw:line draw:style-name="gr3" draw:text-style-name="P1" draw:layer="layout" svg:x1="18.659cm" svg:y1="14.337cm" svg:x2="18.608cm" svg:y2="14.265cm">
          <text:p/>
        </draw:line>
        <draw:polyline draw:style-name="gr3" draw:text-style-name="P1" draw:layer="layout" svg:width="0.087cm" svg:height="0.149cm" svg:x="18.572cm" svg:y="14.187cm" svg:viewBox="0 0 88 150" draw:points="0,150 0,0 59,0 73,7 80,14 88,28 88,50 80,65 73,72 59,79 0,79">
          <text:p/>
        </draw:polyline>
        <draw:polygon draw:style-name="gr3" draw:text-style-name="P1" draw:layer="layout" svg:width="0.079cm" svg:height="0.1cm" svg:x="18.715cm" svg:y="14.236cm" svg:viewBox="0 0 80 101" draw:points="29,101 15,95 7,87 0,73 0,30 7,16 15,8 29,0 51,0 65,8 73,16 80,30 80,73 73,87 65,95 51,101">
          <text:p/>
        </draw:polygon>
        <draw:polygon draw:style-name="gr3" draw:text-style-name="P1" draw:layer="layout" svg:width="0.079cm" svg:height="0.1cm" svg:x="18.851cm" svg:y="14.236cm" svg:viewBox="0 0 80 101" draw:points="28,101 14,95 7,87 0,73 0,30 7,16 14,8 28,0 50,0 65,8 72,16 80,30 80,73 72,87 65,95 50,101">
          <text:p/>
        </draw:polygon>
        <draw:line draw:style-name="gr3" draw:text-style-name="P1" draw:layer="layout" svg:x1="18.994cm" svg:y1="14.336cm" svg:x2="18.994cm" svg:y2="14.236cm">
          <text:p/>
        </draw:line>
        <draw:polyline draw:style-name="gr3" draw:text-style-name="P1" draw:layer="layout" svg:width="0.064cm" svg:height="0.1cm" svg:x="18.994cm" svg:y="14.236cm" svg:viewBox="0 0 65 101" draw:points="0,16 7,8 21,0 43,0 58,8 65,23 65,101">
          <text:p/>
        </draw:polyline>
        <draw:polyline draw:style-name="gr3" draw:text-style-name="P1" draw:layer="layout" svg:width="0.064cm" svg:height="0.1cm" svg:x="19.058cm" svg:y="14.236cm" svg:viewBox="0 0 65 101" draw:points="0,23 7,8 21,0 43,0 58,8 65,23 65,101">
          <text:p/>
        </draw:polyline>
        <draw:line draw:style-name="gr3" draw:text-style-name="P1" draw:layer="layout" svg:x1="17.93cm" svg:y1="14.578cm" svg:x2="17.844cm" svg:y2="14.578cm">
          <text:p/>
        </draw:line>
        <draw:polyline draw:style-name="gr3" draw:text-style-name="P1" draw:layer="layout" svg:width="0.043cm" svg:height="0.15cm" svg:x="17.844cm" svg:y="14.428cm" svg:viewBox="0 0 44 151" draw:points="44,151 44,0 29,22 14,36 0,43">
          <text:p/>
        </draw:polyline>
        <draw:polyline draw:style-name="gr3" draw:text-style-name="P1" draw:layer="layout" svg:width="0.085cm" svg:height="0.15cm" svg:x="17.987cm" svg:y="14.428cm" svg:viewBox="0 0 86 151" draw:points="71,0 42,0 28,7 21,14 6,36 0,66 0,123 6,137 14,144 28,151 57,151 71,144 79,137 86,123 86,87 79,72 71,66 57,58 28,58 14,66 6,72 0,87">
          <text:p/>
        </draw:polyline>
        <draw:line draw:style-name="gr3" draw:text-style-name="P1" draw:layer="layout" svg:x1="18.122cm" svg:y1="14.579cm" svg:x2="18.202cm" svg:y2="14.478cm">
          <text:p/>
        </draw:line>
        <draw:line draw:style-name="gr3" draw:text-style-name="P1" draw:layer="layout" svg:x1="18.122cm" svg:y1="14.478cm" svg:x2="18.202cm" svg:y2="14.579cm">
          <text:p/>
        </draw:line>
        <draw:polyline draw:style-name="gr3" draw:text-style-name="P1" draw:layer="layout" svg:width="0.093cm" svg:height="0.15cm" svg:x="18.244cm" svg:y="14.428cm" svg:viewBox="0 0 94 151" draw:points="7,14 14,7 29,0 65,0 79,7 87,14 94,29 94,43 87,66 0,151 94,151">
          <text:p/>
        </draw:polyline>
        <draw:polygon draw:style-name="gr3" draw:text-style-name="P1" draw:layer="layout" svg:width="0.085cm" svg:height="0.15cm" svg:x="18.394cm" svg:y="14.428cm" svg:viewBox="0 0 86 151" draw:points="37,0 51,0 65,7 72,14 79,29 86,58 86,94 79,123 72,137 65,144 51,151 37,151 22,144 15,137 7,123 0,94 0,58 7,29 15,14 22,7">
          <text:p/>
        </draw:polygon>
        <draw:polyline draw:style-name="gr3" draw:text-style-name="P1" draw:layer="layout" svg:width="0.15cm" svg:height="0.085cm" svg:x="23.518cm" svg:y="11.662cm" svg:viewBox="0 0 151 86" draw:points="71,37 78,14 85,7 100,0 122,0 137,7 143,14 151,29 151,86 0,86 0,37 7,21 14,14 28,7 42,7 57,14 64,21 71,37 71,86">
          <text:p/>
        </draw:polyline>
        <draw:polygon draw:style-name="gr3" draw:text-style-name="P1" draw:layer="layout" svg:width="0.1cm" svg:height="0.078cm" svg:x="23.568cm" svg:y="11.526cm" svg:viewBox="0 0 101 79" draw:points="101,50 93,65 87,72 71,79 28,79 14,72 7,65 0,50 0,29 7,14 14,7 28,0 71,0 87,7 93,14 101,29">
          <text:p/>
        </draw:polygon>
        <draw:line draw:style-name="gr3" draw:text-style-name="P1" draw:layer="layout" svg:x1="23.568cm" svg:y1="11.477cm" svg:x2="23.669cm" svg:y2="11.44cm">
          <text:p/>
        </draw:line>
        <draw:polyline draw:style-name="gr3" draw:text-style-name="P1" draw:layer="layout" svg:width="0.15cm" svg:height="0.072cm" svg:x="23.568cm" svg:y="11.404cm" svg:viewBox="0 0 151 73" draw:points="0,0 101,36 136,51 144,57 151,73">
          <text:p/>
        </draw:polyline>
        <draw:line draw:style-name="gr3" draw:text-style-name="P1" draw:layer="layout" svg:x1="23.518cm" svg:y1="11.34cm" svg:x2="23.547cm" svg:y2="11.356cm">
          <text:p/>
        </draw:line>
        <draw:polyline draw:style-name="gr3" draw:text-style-name="P1" draw:layer="layout" svg:width="0.1cm" svg:height="0.064cm" svg:x="23.568cm" svg:y="11.219cm" svg:viewBox="0 0 101 65" draw:points="93,65 101,51 101,22 93,7 78,0 71,0 57,7 50,22 50,44 43,58 28,65 21,65 7,58 0,44 0,22 7,7">
          <text:p/>
        </draw:polyline>
        <draw:line draw:style-name="gr3" draw:text-style-name="P1" draw:layer="layout" svg:x1="23.518cm" svg:y1="11.061cm" svg:x2="23.518cm" svg:y2="10.976cm">
          <text:p/>
        </draw:line>
        <draw:line draw:style-name="gr3" draw:text-style-name="P1" draw:layer="layout" svg:x1="23.668cm" svg:y1="11.019cm" svg:x2="23.518cm" svg:y2="11.019cm">
          <text:p/>
        </draw:line>
        <draw:polygon draw:style-name="gr3" draw:text-style-name="P1" draw:layer="layout" svg:width="0.1cm" svg:height="0.078cm" svg:x="23.568cm" svg:y="10.855cm" svg:viewBox="0 0 101 79" draw:points="101,50 93,65 87,72 71,79 28,79 14,72 7,65 0,50 0,29 7,14 14,7 28,0 71,0 87,7 93,14 101,29">
          <text:p/>
        </draw:polygon>
        <draw:line draw:style-name="gr3" draw:text-style-name="P1" draw:layer="layout" svg:x1="23.668cm" svg:y1="10.791cm" svg:x2="23.568cm" svg:y2="10.791cm">
          <text:p/>
        </draw:line>
        <draw:polyline draw:style-name="gr3" draw:text-style-name="P1" draw:layer="layout" svg:width="0.014cm" svg:height="0.014cm" svg:x="23.518cm" svg:y="10.783cm" svg:viewBox="0 0 15 15" draw:points="0,9 7,15 15,9 7,0 0,9 15,9">
          <text:p/>
        </draw:polyline>
        <draw:polyline draw:style-name="gr3" draw:text-style-name="P1" draw:layer="layout" svg:width="0.15cm" svg:height="0.022cm" svg:x="23.518cm" svg:y="10.697cm" svg:viewBox="0 0 151 23" draw:points="151,0 143,16 129,23 0,23">
          <text:p/>
        </draw:polyline>
        <draw:polyline draw:style-name="gr3" draw:text-style-name="P1" draw:layer="layout" svg:width="0.1cm" svg:height="0.072cm" svg:x="23.568cm" svg:y="10.576cm" svg:viewBox="0 0 101 73" draw:points="93,7 101,21 101,51 93,65 78,73 21,73 7,65 0,51 0,21 7,7 21,0 35,0 50,73">
          <text:p/>
        </draw:polyline>
        <draw:line draw:style-name="gr3" draw:text-style-name="P1" draw:layer="layout" svg:x1="23.568cm" svg:y1="10.533cm" svg:x2="23.568cm" svg:y2="10.476cm">
          <text:p/>
        </draw:line>
        <draw:polyline draw:style-name="gr3" draw:text-style-name="P1" draw:layer="layout" svg:width="0.15cm" svg:height="0.036cm" svg:x="23.518cm" svg:y="10.476cm" svg:viewBox="0 0 151 37" draw:points="0,37 129,37 143,30 151,16 151,0">
          <text:p/>
        </draw:polyline>
        <draw:polygon draw:style-name="gr3" draw:text-style-name="P1" draw:layer="layout" svg:width="0.15cm" svg:height="0.086cm" svg:x="23.439cm" svg:y="13.784cm" svg:viewBox="0 0 151 87" draw:points="151,87 0,87 0,51 7,30 21,14 37,7 65,0 86,0 115,7 129,14 144,30 151,51">
          <text:p/>
        </draw:polygon>
        <draw:line draw:style-name="gr3" draw:text-style-name="P1" draw:layer="layout" svg:x1="23.589cm" svg:y1="13.72cm" svg:x2="23.489cm" svg:y2="13.72cm">
          <text:p/>
        </draw:line>
        <draw:polyline draw:style-name="gr3" draw:text-style-name="P1" draw:layer="layout" svg:width="0.029cm" svg:height="0.043cm" svg:x="23.489cm" svg:y="13.677cm" svg:viewBox="0 0 30 44" draw:points="30,44 14,36 7,28 0,14 0,0">
          <text:p/>
        </draw:polyline>
        <draw:line draw:style-name="gr3" draw:text-style-name="P1" draw:layer="layout" svg:x1="23.589cm" svg:y1="13.627cm" svg:x2="23.489cm" svg:y2="13.627cm">
          <text:p/>
        </draw:line>
        <draw:polyline draw:style-name="gr3" draw:text-style-name="P1" draw:layer="layout" svg:width="0.014cm" svg:height="0.015cm" svg:x="23.439cm" svg:y="13.619cm" svg:viewBox="0 0 15 16" draw:points="0,8 8,16 15,8 8,0 0,8 15,8">
          <text:p/>
        </draw:polyline>
        <draw:line draw:style-name="gr3" draw:text-style-name="P1" draw:layer="layout" svg:x1="23.489cm" svg:y1="13.555cm" svg:x2="23.589cm" svg:y2="13.555cm">
          <text:p/>
        </draw:line>
        <draw:polyline draw:style-name="gr3" draw:text-style-name="P1" draw:layer="layout" svg:width="0.1cm" svg:height="0.064cm" svg:x="23.489cm" svg:y="13.491cm" svg:viewBox="0 0 101 65" draw:points="14,65 7,58 0,43 0,22 7,7 21,0 101,0">
          <text:p/>
        </draw:polyline>
        <draw:line draw:style-name="gr3" draw:text-style-name="P1" draw:layer="layout" svg:x1="23.589cm" svg:y1="13.419cm" svg:x2="23.439cm" svg:y2="13.419cm">
          <text:p/>
        </draw:line>
        <draw:line draw:style-name="gr3" draw:text-style-name="P1" draw:layer="layout" svg:x1="23.532cm" svg:y1="13.406cm" svg:x2="23.59cm" svg:y2="13.362cm">
          <text:p/>
        </draw:line>
        <draw:line draw:style-name="gr3" draw:text-style-name="P1" draw:layer="layout" svg:x1="23.489cm" svg:y1="13.362cm" svg:x2="23.547cm" svg:y2="13.42cm">
          <text:p/>
        </draw:line>
        <draw:line draw:style-name="gr3" draw:text-style-name="P1" draw:layer="layout" svg:x1="23.589cm" svg:y1="13.298cm" svg:x2="23.489cm" svg:y2="13.298cm">
          <text:p/>
        </draw:line>
        <draw:polyline draw:style-name="gr3" draw:text-style-name="P1" draw:layer="layout" svg:width="0.014cm" svg:height="0.014cm" svg:x="23.439cm" svg:y="13.291cm" svg:viewBox="0 0 15 15" draw:points="0,8 8,15 15,8 8,0 0,8 15,8">
          <text:p/>
        </draw:polyline>
        <draw:line draw:style-name="gr3" draw:text-style-name="P1" draw:layer="layout" svg:x1="23.489cm" svg:y1="13.227cm" svg:x2="23.589cm" svg:y2="13.227cm">
          <text:p/>
        </draw:line>
        <draw:polyline draw:style-name="gr3" draw:text-style-name="P1" draw:layer="layout" svg:width="0.1cm" svg:height="0.065cm" svg:x="23.489cm" svg:y="13.162cm" svg:viewBox="0 0 101 66" draw:points="14,66 7,58 0,43 0,22 7,8 21,0 101,0">
          <text:p/>
        </draw:polyline>
        <draw:polyline draw:style-name="gr3" draw:text-style-name="P1" draw:layer="layout" svg:width="0.15cm" svg:height="0.064cm" svg:x="23.489cm" svg:y="13.027cm" svg:viewBox="0 0 151 65" draw:points="0,0 121,0 136,7 144,14 151,28 151,50 144,65">
          <text:p/>
        </draw:polyline>
        <draw:polyline draw:style-name="gr3" draw:text-style-name="P1" draw:layer="layout" svg:width="0.1cm" svg:height="0.071cm" svg:x="23.489cm" svg:y="13.027cm" svg:viewBox="0 0 101 72" draw:points="94,0 101,15 101,44 94,58 87,65 72,72 30,72 14,65 7,58 0,44 0,15 7,0">
          <text:p/>
        </draw:polyline>
        <draw:polyline draw:style-name="gr3" draw:text-style-name="P1" draw:layer="layout" svg:width="0.149cm" svg:height="0.129cm" svg:x="23.681cm" svg:y="13.605cm" svg:viewBox="0 0 150 130" draw:points="0,130 150,94 42,66 150,37 0,0">
          <text:p/>
        </draw:polyline>
        <draw:polyline draw:style-name="gr3" draw:text-style-name="P1" draw:layer="layout" svg:width="0.1cm" svg:height="0.064cm" svg:x="23.73cm" svg:y="13.484cm" svg:viewBox="0 0 101 65" draw:points="101,0 22,0 8,7 0,21 0,51 8,65">
          <text:p/>
        </draw:polyline>
        <draw:polyline draw:style-name="gr3" draw:text-style-name="P1" draw:layer="layout" svg:width="0.064cm" svg:height="0.071cm" svg:x="23.766cm" svg:y="13.484cm" svg:viewBox="0 0 65 72" draw:points="58,0 65,14 65,51 58,65 44,72 30,72 15,65 7,51 7,14 0,0">
          <text:p/>
        </draw:polyline>
        <draw:line draw:style-name="gr3" draw:text-style-name="P1" draw:layer="layout" svg:x1="23.73cm" svg:y1="13.434cm" svg:x2="23.73cm" svg:y2="13.377cm">
          <text:p/>
        </draw:line>
        <draw:polyline draw:style-name="gr3" draw:text-style-name="P1" draw:layer="layout" svg:width="0.149cm" svg:height="0.035cm" svg:x="23.681cm" svg:y="13.377cm" svg:viewBox="0 0 150 36" draw:points="0,36 129,36 143,29 150,15 150,0">
          <text:p/>
        </draw:polyline>
        <draw:polyline draw:style-name="gr3" draw:text-style-name="P1" draw:layer="layout" svg:width="0.1cm" svg:height="0.072cm" svg:x="23.73cm" svg:y="13.262cm" svg:viewBox="0 0 101 73" draw:points="94,8 101,22 101,52 94,66 79,73 22,73 8,66 0,52 0,22 8,8 22,0 36,0 51,73">
          <text:p/>
        </draw:polyline>
        <draw:line draw:style-name="gr3" draw:text-style-name="P1" draw:layer="layout" svg:x1="23.83cm" svg:y1="13.198cm" svg:x2="23.73cm" svg:y2="13.198cm">
          <text:p/>
        </draw:line>
        <draw:polyline draw:style-name="gr3" draw:text-style-name="P1" draw:layer="layout" svg:width="0.029cm" svg:height="0.043cm" svg:x="23.73cm" svg:y="13.155cm" svg:viewBox="0 0 30 44" draw:points="30,44 14,37 8,30 0,16 0,0">
          <text:p/>
        </draw:polyline>
        <draw:polyline draw:style-name="gr3" draw:text-style-name="P1" draw:layer="layout" svg:width="0.094cm" svg:height="0.151cm" svg:x="15.543cm" svg:y="14.236cm" svg:viewBox="0 0 95 152" draw:points="95,137 87,144 66,152 52,152 29,144 15,130 8,116 0,86 0,65 8,36 15,22 29,8 52,0 66,0 87,8 95,15">
          <text:p/>
        </draw:polyline>
        <draw:polyline draw:style-name="gr3" draw:text-style-name="P1" draw:layer="layout" svg:width="0.021cm" svg:height="0.151cm" svg:x="15.701cm" svg:y="14.236cm" svg:viewBox="0 0 22 152" draw:points="22,152 7,144 0,130 0,0">
          <text:p/>
        </draw:polyline>
        <draw:polyline draw:style-name="gr3" draw:text-style-name="P1" draw:layer="layout" svg:width="0.063cm" svg:height="0.1cm" svg:x="15.78cm" svg:y="14.287cm" svg:viewBox="0 0 64 101" draw:points="64,101 64,21 58,7 43,0 15,0 0,7">
          <text:p/>
        </draw:polyline>
        <draw:polyline draw:style-name="gr3" draw:text-style-name="P1" draw:layer="layout" svg:width="0.071cm" svg:height="0.065cm" svg:x="15.772cm" svg:y="14.322cm" svg:viewBox="0 0 72 66" draw:points="72,58 58,66 22,66 8,58 0,43 0,29 8,14 22,8 58,8 72,0">
          <text:p/>
        </draw:polyline>
        <draw:polyline draw:style-name="gr3" draw:text-style-name="P1" draw:layer="layout" svg:width="0.064cm" svg:height="0.1cm" svg:x="15.908cm" svg:y="14.287cm" svg:viewBox="0 0 65 101" draw:points="0,93 14,101 43,101 57,93 65,79 65,72 57,57 43,49 21,49 7,43 0,28 0,21 7,7 21,0 43,0 57,7">
          <text:p/>
        </draw:polyline>
        <draw:polyline draw:style-name="gr3" draw:text-style-name="P1" draw:layer="layout" svg:width="0.065cm" svg:height="0.1cm" svg:x="16.029cm" svg:y="14.287cm" svg:viewBox="0 0 66 101" draw:points="0,93 16,101 44,101 58,93 66,79 66,72 58,57 44,49 23,49 9,43 0,28 0,21 9,7 23,0 44,0 58,7">
          <text:p/>
        </draw:polyline>
        <draw:line draw:style-name="gr3" draw:text-style-name="P1" draw:layer="layout" svg:x1="16.359cm" svg:y1="14.388cm" svg:x2="16.308cm" svg:y2="14.315cm">
          <text:p/>
        </draw:line>
        <draw:polyline draw:style-name="gr3" draw:text-style-name="P1" draw:layer="layout" svg:width="0.086cm" svg:height="0.151cm" svg:x="16.272cm" svg:y="14.236cm" svg:viewBox="0 0 87 152" draw:points="0,152 0,0 58,0 73,8 80,15 87,29 87,51 80,65 73,72 58,79 0,79">
          <text:p/>
        </draw:polyline>
        <draw:polygon draw:style-name="gr3" draw:text-style-name="P1" draw:layer="layout" svg:width="0.079cm" svg:height="0.1cm" svg:x="16.415cm" svg:y="14.287cm" svg:viewBox="0 0 80 101" draw:points="30,101 15,93 8,86 0,72 0,28 8,14 15,7 30,0 51,0 66,7 72,14 80,28 80,72 72,86 66,93 51,101">
          <text:p/>
        </draw:polygon>
        <draw:polygon draw:style-name="gr3" draw:text-style-name="P1" draw:layer="layout" svg:width="0.078cm" svg:height="0.1cm" svg:x="16.551cm" svg:y="14.287cm" svg:viewBox="0 0 79 101" draw:points="30,101 14,93 7,86 0,72 0,28 7,14 14,7 30,0 51,0 65,7 72,14 79,28 79,72 72,86 65,93 51,101">
          <text:p/>
        </draw:polygon>
        <draw:line draw:style-name="gr3" draw:text-style-name="P1" draw:layer="layout" svg:x1="16.694cm" svg:y1="14.387cm" svg:x2="16.694cm" svg:y2="14.287cm">
          <text:p/>
        </draw:line>
        <draw:polyline draw:style-name="gr3" draw:text-style-name="P1" draw:layer="layout" svg:width="0.064cm" svg:height="0.1cm" svg:x="16.694cm" svg:y="14.287cm" svg:viewBox="0 0 65 101" draw:points="0,14 7,7 21,0 44,0 58,7 65,21 65,101">
          <text:p/>
        </draw:polyline>
        <draw:polyline draw:style-name="gr3" draw:text-style-name="P1" draw:layer="layout" svg:width="0.064cm" svg:height="0.1cm" svg:x="16.758cm" svg:y="14.287cm" svg:viewBox="0 0 65 101" draw:points="0,21 7,7 22,0 44,0 58,7 65,21 65,101">
          <text:p/>
        </draw:polyline>
        <draw:line draw:style-name="gr3" draw:text-style-name="P1" draw:layer="layout" svg:x1="15.629cm" svg:y1="14.628cm" svg:x2="15.543cm" svg:y2="14.628cm">
          <text:p/>
        </draw:line>
        <draw:polyline draw:style-name="gr3" draw:text-style-name="P1" draw:layer="layout" svg:width="0.043cm" svg:height="0.15cm" svg:x="15.543cm" svg:y="14.478cm" svg:viewBox="0 0 44 151" draw:points="44,151 44,0 30,21 15,36 0,43">
          <text:p/>
        </draw:polyline>
        <draw:polyline draw:style-name="gr3" draw:text-style-name="P1" draw:layer="layout" svg:width="0.086cm" svg:height="0.15cm" svg:x="15.686cm" svg:y="14.478cm" svg:viewBox="0 0 87 151" draw:points="72,0 43,0 29,7 22,15 8,36 0,65 0,123 8,137 15,144 29,151 58,151 72,144 79,137 87,123 87,87 79,73 72,65 58,58 29,58 15,65 8,73 0,87">
          <text:p/>
        </draw:polyline>
        <draw:line draw:style-name="gr3" draw:text-style-name="P1" draw:layer="layout" svg:x1="15.822cm" svg:y1="14.629cm" svg:x2="15.902cm" svg:y2="14.528cm">
          <text:p/>
        </draw:line>
        <draw:line draw:style-name="gr3" draw:text-style-name="P1" draw:layer="layout" svg:x1="15.822cm" svg:y1="14.528cm" svg:x2="15.902cm" svg:y2="14.629cm">
          <text:p/>
        </draw:line>
        <draw:polyline draw:style-name="gr3" draw:text-style-name="P1" draw:layer="layout" svg:width="0.093cm" svg:height="0.15cm" svg:x="15.944cm" svg:y="14.478cm" svg:viewBox="0 0 94 151" draw:points="8,15 15,7 29,0 65,0 79,7 86,15 94,29 94,43 86,65 0,151 94,151">
          <text:p/>
        </draw:polyline>
        <draw:polygon draw:style-name="gr3" draw:text-style-name="P1" draw:layer="layout" svg:width="0.086cm" svg:height="0.15cm" svg:x="16.094cm" svg:y="14.478cm" svg:viewBox="0 0 87 151" draw:points="36,0 51,0 65,7 72,15 79,29 87,58 87,94 79,123 72,137 65,144 51,151 36,151 22,144 15,137 7,123 0,94 0,58 7,29 15,15 22,7">
          <text:p/>
        </draw:polygon>
        <draw:polyline draw:style-name="gr3" draw:text-style-name="P1" draw:layer="layout" svg:width="0.086cm" svg:height="0.15cm" svg:x="18.644cm" svg:y="12.595cm" svg:viewBox="0 0 87 151" draw:points="0,144 22,151 58,151 72,144 79,137 87,123 87,108 79,94 72,87 58,79 29,71 15,65 7,57 0,43 0,29 7,14 15,7 29,0 65,0 87,7">
          <text:p/>
        </draw:polyline>
        <draw:line draw:style-name="gr3" draw:text-style-name="P1" draw:layer="layout" svg:x1="18.772cm" svg:y1="12.645cm" svg:x2="18.83cm" svg:y2="12.645cm">
          <text:p/>
        </draw:line>
        <draw:polyline draw:style-name="gr3" draw:text-style-name="P1" draw:layer="layout" svg:width="0.036cm" svg:height="0.15cm" svg:x="18.794cm" svg:y="12.595cm" svg:viewBox="0 0 37 151" draw:points="0,0 0,130 7,144 22,151 37,151">
          <text:p/>
        </draw:polyline>
        <draw:polygon draw:style-name="gr3" draw:text-style-name="P1" draw:layer="layout" svg:width="0.078cm" svg:height="0.1cm" svg:x="18.873cm" svg:y="12.645cm" svg:viewBox="0 0 79 101" draw:points="28,101 14,94 6,87 0,73 0,30 6,16 14,8 28,0 50,0 65,8 72,16 79,30 79,73 72,87 65,94 50,101">
          <text:p/>
        </draw:polygon>
        <draw:line draw:style-name="gr3" draw:text-style-name="P1" draw:layer="layout" svg:x1="19.015cm" svg:y1="12.745cm" svg:x2="19.015cm" svg:y2="12.645cm">
          <text:p/>
        </draw:line>
        <draw:polyline draw:style-name="gr3" draw:text-style-name="P1" draw:layer="layout" svg:width="0.043cm" svg:height="0.029cm" svg:x="19.015cm" svg:y="12.645cm" svg:viewBox="0 0 44 30" draw:points="0,30 7,15 15,7 29,0 44,0">
          <text:p/>
        </draw:polyline>
        <draw:polyline draw:style-name="gr3" draw:text-style-name="P1" draw:layer="layout" svg:width="0.072cm" svg:height="0.1cm" svg:x="19.101cm" svg:y="12.645cm" svg:viewBox="0 0 73 101" draw:points="65,94 51,101 21,101 7,94 0,80 0,22 7,8 21,0 51,0 65,8 73,22 73,37 0,51">
          <text:p/>
        </draw:polyline>
        <draw:line draw:style-name="gr3" draw:text-style-name="P1" draw:layer="layout" svg:x1="18.738cm" svg:y1="12.988cm" svg:x2="18.687cm" svg:y2="12.915cm">
          <text:p/>
        </draw:line>
        <draw:polyline draw:style-name="gr3" draw:text-style-name="P1" draw:layer="layout" svg:width="0.086cm" svg:height="0.15cm" svg:x="18.651cm" svg:y="12.837cm" svg:viewBox="0 0 87 151" draw:points="0,151 0,0 58,0 72,7 80,14 87,28 87,50 80,65 72,72 58,79 0,79">
          <text:p/>
        </draw:polyline>
        <draw:polygon draw:style-name="gr3" draw:text-style-name="P1" draw:layer="layout" svg:width="0.079cm" svg:height="0.1cm" svg:x="18.794cm" svg:y="12.887cm" svg:viewBox="0 0 80 101" draw:points="28,101 14,94 7,86 0,72 0,28 7,14 14,7 28,0 51,0 65,7 72,14 80,28 80,72 72,86 65,94 51,101">
          <text:p/>
        </draw:polygon>
        <draw:polygon draw:style-name="gr3" draw:text-style-name="P1" draw:layer="layout" svg:width="0.078cm" svg:height="0.1cm" svg:x="18.93cm" svg:y="12.887cm" svg:viewBox="0 0 79 101" draw:points="28,101 14,94 7,86 0,72 0,28 7,14 14,7 28,0 49,0 65,7 72,14 79,28 79,72 72,86 65,94 49,101">
          <text:p/>
        </draw:polygon>
        <draw:line draw:style-name="gr3" draw:text-style-name="P1" draw:layer="layout" svg:x1="19.073cm" svg:y1="12.987cm" svg:x2="19.073cm" svg:y2="12.887cm">
          <text:p/>
        </draw:line>
        <draw:polyline draw:style-name="gr3" draw:text-style-name="P1" draw:layer="layout" svg:width="0.064cm" svg:height="0.1cm" svg:x="19.073cm" svg:y="12.887cm" svg:viewBox="0 0 65 101" draw:points="0,14 6,7 21,0 43,0 58,7 65,21 65,101">
          <text:p/>
        </draw:polyline>
        <draw:polyline draw:style-name="gr3" draw:text-style-name="P1" draw:layer="layout" svg:width="0.064cm" svg:height="0.1cm" svg:x="19.137cm" svg:y="12.887cm" svg:viewBox="0 0 65 101" draw:points="0,21 7,7 21,0 42,0 58,7 65,21 65,101">
          <text:p/>
        </draw:polyline>
        <draw:line draw:style-name="gr3" draw:text-style-name="P1" draw:layer="layout" svg:x1="18.73cm" svg:y1="13.228cm" svg:x2="18.644cm" svg:y2="13.228cm">
          <text:p/>
        </draw:line>
        <draw:polyline draw:style-name="gr3" draw:text-style-name="P1" draw:layer="layout" svg:width="0.043cm" svg:height="0.15cm" svg:x="18.644cm" svg:y="13.078cm" svg:viewBox="0 0 44 151" draw:points="44,151 44,0 29,22 14,36 0,43">
          <text:p/>
        </draw:polyline>
        <draw:polygon draw:style-name="gr3" draw:text-style-name="P1" draw:layer="layout" svg:width="0.086cm" svg:height="0.15cm" svg:x="18.787cm" svg:y="13.078cm" svg:viewBox="0 0 87 151" draw:points="35,0 50,0 65,7 72,14 79,29 87,58 87,94 79,123 72,137 65,144 50,151 35,151 21,144 14,137 7,123 0,94 0,58 7,29 14,14 21,7">
          <text:p/>
        </draw:polygon>
        <draw:line draw:style-name="gr3" draw:text-style-name="P1" draw:layer="layout" svg:x1="18.922cm" svg:y1="13.229cm" svg:x2="19.002cm" svg:y2="13.128cm">
          <text:p/>
        </draw:line>
        <draw:line draw:style-name="gr3" draw:text-style-name="P1" draw:layer="layout" svg:x1="18.922cm" svg:y1="13.128cm" svg:x2="19.002cm" svg:y2="13.229cm">
          <text:p/>
        </draw:line>
        <draw:line draw:style-name="gr3" draw:text-style-name="P1" draw:layer="layout" svg:x1="19.137cm" svg:y1="13.228cm" svg:x2="19.051cm" svg:y2="13.228cm">
          <text:p/>
        </draw:line>
        <draw:polyline draw:style-name="gr3" draw:text-style-name="P1" draw:layer="layout" svg:width="0.043cm" svg:height="0.15cm" svg:x="19.051cm" svg:y="13.078cm" svg:viewBox="0 0 44 151" draw:points="44,151 44,0 28,22 14,36 0,43">
          <text:p/>
        </draw:polyline>
        <draw:line draw:style-name="gr3" draw:text-style-name="P1" draw:layer="layout" svg:x1="19.279cm" svg:y1="13.228cm" svg:x2="19.194cm" svg:y2="13.228cm">
          <text:p/>
        </draw:line>
        <draw:polyline draw:style-name="gr3" draw:text-style-name="P1" draw:layer="layout" svg:width="0.043cm" svg:height="0.15cm" svg:x="19.194cm" svg:y="13.078cm" svg:viewBox="0 0 44 151" draw:points="44,151 44,0 29,22 14,36 0,43">
          <text:p/>
        </draw:polyline>
        <draw:line draw:style-name="gr3" draw:text-style-name="P1" draw:layer="layout" svg:x1="14.979cm" svg:y1="10.928cm" svg:x2="15.065cm" svg:y2="10.928cm">
          <text:p/>
        </draw:line>
        <draw:line draw:style-name="gr3" draw:text-style-name="P1" draw:layer="layout" svg:x1="15.022cm" svg:y1="11.078cm" svg:x2="15.022cm" svg:y2="10.928cm">
          <text:p/>
        </draw:line>
        <draw:line draw:style-name="gr3" draw:text-style-name="P1" draw:layer="layout" svg:x1="15.115cm" svg:y1="11.078cm" svg:x2="15.115cm" svg:y2="10.978cm">
          <text:p/>
        </draw:line>
        <draw:polyline draw:style-name="gr3" draw:text-style-name="P1" draw:layer="layout" svg:width="0.014cm" svg:height="0.014cm" svg:x="15.108cm" svg:y="10.928cm" svg:viewBox="0 0 15 15" draw:points="8,0 0,7 8,15 15,7 8,0 8,15">
          <text:p/>
        </draw:polyline>
        <draw:line draw:style-name="gr3" draw:text-style-name="P1" draw:layer="layout" svg:x1="15.186cm" svg:y1="10.978cm" svg:x2="15.186cm" svg:y2="11.078cm">
          <text:p/>
        </draw:line>
        <draw:polyline draw:style-name="gr3" draw:text-style-name="P1" draw:layer="layout" svg:width="0.065cm" svg:height="0.1cm" svg:x="15.186cm" svg:y="10.978cm" svg:viewBox="0 0 66 101" draw:points="0,15 8,7 23,0 44,0 58,7 66,22 66,101">
          <text:p/>
        </draw:polyline>
        <draw:polyline draw:style-name="gr3" draw:text-style-name="P1" draw:layer="layout" svg:width="0.086cm" svg:height="0.15cm" svg:x="15.429cm" svg:y="10.928cm" svg:viewBox="0 0 87 151" draw:points="0,144 22,151 57,151 72,144 79,137 87,123 87,109 79,93 72,86 57,79 29,72 14,65 8,57 0,43 0,29 8,14 14,7 29,0 65,0 87,7">
          <text:p/>
        </draw:polyline>
        <draw:line draw:style-name="gr3" draw:text-style-name="P1" draw:layer="layout" svg:x1="15.579cm" svg:y1="11.078cm" svg:x2="15.579cm" svg:y2="10.928cm">
          <text:p/>
        </draw:line>
        <draw:polyline draw:style-name="gr3" draw:text-style-name="P1" draw:layer="layout" svg:width="0.065cm" svg:height="0.1cm" svg:x="15.579cm" svg:y="10.978cm" svg:viewBox="0 0 66 101" draw:points="66,101 66,22 59,7 44,0 23,0 8,7 0,15">
          <text:p/>
        </draw:polyline>
        <draw:polyline draw:style-name="gr3" draw:text-style-name="P1" draw:layer="layout" svg:width="0.065cm" svg:height="0.1cm" svg:x="15.715cm" svg:y="10.978cm" svg:viewBox="0 0 66 101" draw:points="66,101 66,22 57,7 43,0 14,0 0,7">
          <text:p/>
        </draw:polyline>
        <draw:polyline draw:style-name="gr3" draw:text-style-name="P1" draw:layer="layout" svg:width="0.072cm" svg:height="0.064cm" svg:x="15.708cm" svg:y="11.014cm" svg:viewBox="0 0 73 65" draw:points="73,58 58,65 22,65 7,58 0,44 0,29 7,14 22,7 58,7 73,0">
          <text:p/>
        </draw:polyline>
        <draw:line draw:style-name="gr3" draw:text-style-name="P1" draw:layer="layout" svg:x1="15.915cm" svg:y1="11.078cm" svg:x2="15.915cm" svg:y2="10.928cm">
          <text:p/>
        </draw:line>
        <draw:polyline draw:style-name="gr3" draw:text-style-name="P1" draw:layer="layout" svg:width="0.072cm" svg:height="0.1cm" svg:x="15.843cm" svg:y="10.978cm" svg:viewBox="0 0 73 101" draw:points="73,94 59,101 30,101 15,94 8,87 0,73 0,29 8,15 15,7 30,0 59,0 73,7">
          <text:p/>
        </draw:polyline>
        <draw:polyline draw:style-name="gr3" draw:text-style-name="P1" draw:layer="layout" svg:width="0.071cm" svg:height="0.1cm" svg:x="15.98cm" svg:y="10.978cm" svg:viewBox="0 0 72 101" draw:points="65,94 50,101 21,101 6,94 0,80 0,22 6,7 21,0 50,0 65,7 72,22 72,36 0,50">
          <text:p/>
        </draw:polyline>
        <draw:line draw:style-name="gr3" draw:text-style-name="P1" draw:layer="layout" svg:x1="16.222cm" svg:y1="11.036cm" svg:x2="16.294cm" svg:y2="11.036cm">
          <text:p/>
        </draw:line>
        <draw:polyline draw:style-name="gr3" draw:text-style-name="P1" draw:layer="layout" svg:width="0.1cm" svg:height="0.15cm" svg:x="16.208cm" svg:y="10.928cm" svg:viewBox="0 0 101 151" draw:points="0,151 51,0 101,151">
          <text:p/>
        </draw:polyline>
        <draw:line draw:style-name="gr3" draw:text-style-name="P1" draw:layer="layout" svg:x1="16.358cm" svg:y1="11.078cm" svg:x2="16.358cm" svg:y2="10.978cm">
          <text:p/>
        </draw:line>
        <draw:polyline draw:style-name="gr3" draw:text-style-name="P1" draw:layer="layout" svg:width="0.044cm" svg:height="0.029cm" svg:x="16.358cm" svg:y="10.978cm" svg:viewBox="0 0 45 30" draw:points="0,30 8,16 15,7 29,0 45,0">
          <text:p/>
        </draw:polyline>
        <draw:polyline draw:style-name="gr3" draw:text-style-name="P1" draw:layer="layout" svg:width="0.071cm" svg:height="0.1cm" svg:x="16.444cm" svg:y="10.978cm" svg:viewBox="0 0 72 101" draw:points="65,94 50,101 21,101 7,94 0,80 0,22 7,7 21,0 50,0 65,7 72,22 72,36 0,50">
          <text:p/>
        </draw:polyline>
        <draw:polyline draw:style-name="gr3" draw:text-style-name="P1" draw:layer="layout" svg:width="0.064cm" svg:height="0.1cm" svg:x="16.58cm" svg:y="10.978cm" svg:viewBox="0 0 65 101" draw:points="65,101 65,22 58,7 43,0 14,0 0,7">
          <text:p/>
        </draw:polyline>
        <draw:polyline draw:style-name="gr3" draw:text-style-name="P1" draw:layer="layout" svg:width="0.072cm" svg:height="0.064cm" svg:x="16.572cm" svg:y="11.014cm" svg:viewBox="0 0 73 65" draw:points="73,58 58,65 23,65 9,58 0,44 0,29 9,14 23,7 58,7 73,0">
          <text:p/>
        </draw:polyline>
        <draw:polygon draw:style-name="gr3" draw:text-style-name="P1" draw:layer="layout" svg:width="0.1cm" svg:height="0.151cm" svg:x="7.444cm" svg:y="13.936cm" svg:viewBox="0 0 101 152" draw:points="36,0 65,0 79,8 94,22 101,51 101,101 94,130 79,144 65,152 36,152 22,144 8,130 0,101 0,51 8,22 22,8">
          <text:p/>
        </draw:polygon>
        <draw:line draw:style-name="gr3" draw:text-style-name="P1" draw:layer="layout" svg:x1="7.608cm" svg:y1="13.987cm" svg:x2="7.608cm" svg:y2="14.137cm">
          <text:p/>
        </draw:line>
        <draw:polyline draw:style-name="gr3" draw:text-style-name="P1" draw:layer="layout" svg:width="0.072cm" svg:height="0.1cm" svg:x="7.608cm" svg:y="13.987cm" svg:viewBox="0 0 73 101" draw:points="0,7 14,0 44,0 58,7 65,14 73,28 73,72 65,86 58,93 44,101 14,101 0,93">
          <text:p/>
        </draw:polyline>
        <draw:polyline draw:style-name="gr3" draw:text-style-name="P1" draw:layer="layout" svg:width="0.071cm" svg:height="0.1cm" svg:x="7.737cm" svg:y="13.987cm" svg:viewBox="0 0 72 101" draw:points="65,93 51,101 21,101 7,93 0,79 0,21 7,7 21,0 51,0 65,7 72,21 72,35 0,49">
          <text:p/>
        </draw:polyline>
        <draw:line draw:style-name="gr3" draw:text-style-name="P1" draw:layer="layout" svg:x1="7.872cm" svg:y1="13.987cm" svg:x2="7.872cm" svg:y2="14.087cm">
          <text:p/>
        </draw:line>
        <draw:polyline draw:style-name="gr3" draw:text-style-name="P1" draw:layer="layout" svg:width="0.065cm" svg:height="0.1cm" svg:x="7.872cm" svg:y="13.987cm" svg:viewBox="0 0 66 101" draw:points="0,14 8,7 22,0 44,0 58,7 66,21 66,101">
          <text:p/>
        </draw:polyline>
        <draw:polyline draw:style-name="gr3" draw:text-style-name="P1" draw:layer="layout" svg:width="0.1cm" svg:height="0.15cm" svg:x="7.429cm" svg:y="14.178cm" svg:viewBox="0 0 101 151" draw:points="0,0 51,151 101,0">
          <text:p/>
        </draw:polyline>
        <draw:polyline draw:style-name="gr3" draw:text-style-name="P1" draw:layer="layout" svg:width="0.072cm" svg:height="0.1cm" svg:x="7.572cm" svg:y="14.228cm" svg:viewBox="0 0 73 101" draw:points="66,94 50,101 22,101 8,94 0,80 0,23 8,7 22,0 50,0 66,7 73,23 73,37 0,51">
          <text:p/>
        </draw:polyline>
        <draw:line draw:style-name="gr3" draw:text-style-name="P1" draw:layer="layout" svg:x1="7.708cm" svg:y1="14.328cm" svg:x2="7.708cm" svg:y2="14.228cm">
          <text:p/>
        </draw:line>
        <draw:polyline draw:style-name="gr3" draw:text-style-name="P1" draw:layer="layout" svg:width="0.043cm" svg:height="0.029cm" svg:x="7.708cm" svg:y="14.228cm" svg:viewBox="0 0 44 30" draw:points="0,30 7,15 14,7 29,0 44,0">
          <text:p/>
        </draw:polyline>
        <draw:polyline draw:style-name="gr3" draw:text-style-name="P1" draw:layer="layout" svg:width="0.064cm" svg:height="0.1cm" svg:x="7.801cm" svg:y="14.228cm" svg:viewBox="0 0 65 101" draw:points="65,101 65,23 58,7 44,0 14,0 0,7">
          <text:p/>
        </draw:polyline>
        <draw:polyline draw:style-name="gr3" draw:text-style-name="P1" draw:layer="layout" svg:width="0.071cm" svg:height="0.064cm" svg:x="7.794cm" svg:y="14.264cm" svg:viewBox="0 0 72 65" draw:points="72,58 58,65 21,65 7,58 0,44 0,29 7,14 21,7 58,7 72,0">
          <text:p/>
        </draw:polyline>
        <draw:line draw:style-name="gr3" draw:text-style-name="P1" draw:layer="layout" svg:x1="7.937cm" svg:y1="14.228cm" svg:x2="7.937cm" svg:y2="14.328cm">
          <text:p/>
        </draw:line>
        <draw:polyline draw:style-name="gr3" draw:text-style-name="P1" draw:layer="layout" svg:width="0.064cm" svg:height="0.1cm" svg:x="7.937cm" svg:y="14.228cm" svg:viewBox="0 0 65 101" draw:points="0,14 7,7 21,0 44,0 58,7 65,23 65,101">
          <text:p/>
        </draw:polyline>
        <draw:line draw:style-name="gr3" draw:text-style-name="P1" draw:layer="layout" svg:x1="8.137cm" svg:y1="14.328cm" svg:x2="8.137cm" svg:y2="14.178cm">
          <text:p/>
        </draw:line>
        <draw:polyline draw:style-name="gr3" draw:text-style-name="P1" draw:layer="layout" svg:width="0.072cm" svg:height="0.1cm" svg:x="8.065cm" svg:y="14.228cm" svg:viewBox="0 0 73 101" draw:points="73,94 57,101 29,101 15,94 7,87 0,72 0,30 7,14 15,7 29,0 57,0 73,7">
          <text:p/>
        </draw:polyline>
        <draw:line draw:style-name="gr3" draw:text-style-name="P1" draw:layer="layout" svg:x1="8.208cm" svg:y1="14.328cm" svg:x2="8.208cm" svg:y2="14.178cm">
          <text:p/>
        </draw:line>
        <draw:polyline draw:style-name="gr3" draw:text-style-name="P1" draw:layer="layout" svg:width="0.064cm" svg:height="0.1cm" svg:x="8.208cm" svg:y="14.228cm" svg:viewBox="0 0 65 101" draw:points="65,101 65,23 58,7 44,0 22,0 7,7 0,14">
          <text:p/>
        </draw:polyline>
        <draw:polyline draw:style-name="gr3" draw:text-style-name="P1" draw:layer="layout" svg:width="0.064cm" svg:height="0.1cm" svg:x="8.344cm" svg:y="14.228cm" svg:viewBox="0 0 65 101" draw:points="65,101 65,23 58,7 44,0 15,0 0,7">
          <text:p/>
        </draw:polyline>
        <draw:polyline draw:style-name="gr3" draw:text-style-name="P1" draw:layer="layout" svg:width="0.071cm" svg:height="0.064cm" svg:x="8.337cm" svg:y="14.264cm" svg:viewBox="0 0 72 65" draw:points="72,58 58,65 22,65 8,58 0,44 0,29 8,14 22,7 58,7 72,0">
          <text:p/>
        </draw:polyline>
        <draw:polyline draw:style-name="gr3" draw:text-style-name="P1" draw:layer="layout" svg:width="0.085cm" svg:height="0.15cm" svg:x="9.044cm" svg:y="14.045cm" svg:viewBox="0 0 86 151" draw:points="0,144 22,151 58,151 72,144 79,137 86,123 86,108 79,94 72,87 58,80 29,72 15,66 7,58 0,44 0,29 7,14 15,7 29,0 65,0 86,7">
          <text:p/>
        </draw:polyline>
        <draw:line draw:style-name="gr3" draw:text-style-name="P1" draw:layer="layout" svg:x1="9.172cm" svg:y1="14.095cm" svg:x2="9.229cm" svg:y2="14.095cm">
          <text:p/>
        </draw:line>
        <draw:polyline draw:style-name="gr3" draw:text-style-name="P1" draw:layer="layout" svg:width="0.036cm" svg:height="0.15cm" svg:x="9.193cm" svg:y="14.045cm" svg:viewBox="0 0 37 151" draw:points="0,0 0,129 8,144 22,151 37,151">
          <text:p/>
        </draw:polyline>
        <draw:polygon draw:style-name="gr3" draw:text-style-name="P1" draw:layer="layout" svg:width="0.079cm" svg:height="0.1cm" svg:x="9.272cm" svg:y="14.095cm" svg:viewBox="0 0 80 101" draw:points="29,101 15,94 7,87 0,73 0,29 7,15 15,7 29,0 51,0 65,7 73,15 80,29 80,73 73,87 65,94 51,101">
          <text:p/>
        </draw:polygon>
        <draw:line draw:style-name="gr3" draw:text-style-name="P1" draw:layer="layout" svg:x1="9.415cm" svg:y1="14.195cm" svg:x2="9.415cm" svg:y2="14.095cm">
          <text:p/>
        </draw:line>
        <draw:polyline draw:style-name="gr3" draw:text-style-name="P1" draw:layer="layout" svg:width="0.043cm" svg:height="0.029cm" svg:x="9.415cm" svg:y="14.095cm" svg:viewBox="0 0 44 30" draw:points="0,30 7,16 16,8 30,0 44,0">
          <text:p/>
        </draw:polyline>
        <draw:polyline draw:style-name="gr3" draw:text-style-name="P1" draw:layer="layout" svg:width="0.071cm" svg:height="0.1cm" svg:x="9.501cm" svg:y="14.095cm" svg:viewBox="0 0 72 101" draw:points="65,94 51,101 21,101 7,94 0,79 0,21 7,7 21,0 51,0 65,7 72,21 72,36 0,50">
          <text:p/>
        </draw:polyline>
        <draw:line draw:style-name="gr3" draw:text-style-name="P1" draw:layer="layout" svg:x1="9.137cm" svg:y1="14.438cm" svg:x2="9.087cm" svg:y2="14.365cm">
          <text:p/>
        </draw:line>
        <draw:polyline draw:style-name="gr3" draw:text-style-name="P1" draw:layer="layout" svg:width="0.085cm" svg:height="0.15cm" svg:x="9.051cm" svg:y="14.287cm" svg:viewBox="0 0 86 151" draw:points="0,151 0,0 58,0 72,7 79,14 86,28 86,49 79,64 72,71 58,78 0,78">
          <text:p/>
        </draw:polyline>
        <draw:polygon draw:style-name="gr3" draw:text-style-name="P1" draw:layer="layout" svg:width="0.079cm" svg:height="0.101cm" svg:x="9.193cm" svg:y="14.336cm" svg:viewBox="0 0 80 102" draw:points="29,102 15,95 8,87 0,73 0,30 8,16 15,8 29,0 52,0 66,8 73,16 80,30 80,73 73,87 66,95 52,102">
          <text:p/>
        </draw:polygon>
        <draw:polygon draw:style-name="gr3" draw:text-style-name="P1" draw:layer="layout" svg:width="0.078cm" svg:height="0.101cm" svg:x="9.33cm" svg:y="14.336cm" svg:viewBox="0 0 79 102" draw:points="28,102 14,95 6,87 0,73 0,30 6,16 14,8 28,0 49,0 64,8 72,16 79,30 79,73 72,87 64,95 49,102">
          <text:p/>
        </draw:polygon>
        <draw:line draw:style-name="gr3" draw:text-style-name="P1" draw:layer="layout" svg:x1="9.472cm" svg:y1="14.437cm" svg:x2="9.472cm" svg:y2="14.336cm">
          <text:p/>
        </draw:line>
        <draw:polyline draw:style-name="gr3" draw:text-style-name="P1" draw:layer="layout" svg:width="0.064cm" svg:height="0.101cm" svg:x="9.472cm" svg:y="14.336cm" svg:viewBox="0 0 65 102" draw:points="0,16 7,8 22,0 44,0 58,8 65,23 65,102">
          <text:p/>
        </draw:polyline>
        <draw:polyline draw:style-name="gr3" draw:text-style-name="P1" draw:layer="layout" svg:width="0.065cm" svg:height="0.101cm" svg:x="9.536cm" svg:y="14.336cm" svg:viewBox="0 0 66 102" draw:points="0,23 8,8 22,0 44,0 59,8 66,23 66,102">
          <text:p/>
        </draw:polyline>
        <draw:line draw:style-name="gr3" draw:text-style-name="P1" draw:layer="layout" svg:x1="9.129cm" svg:y1="14.678cm" svg:x2="9.044cm" svg:y2="14.678cm">
          <text:p/>
        </draw:line>
        <draw:polyline draw:style-name="gr3" draw:text-style-name="P1" draw:layer="layout" svg:width="0.043cm" svg:height="0.15cm" svg:x="9.044cm" svg:y="14.528cm" svg:viewBox="0 0 44 151" draw:points="44,151 44,0 29,22 15,36 0,43">
          <text:p/>
        </draw:polyline>
        <draw:polyline draw:style-name="gr3" draw:text-style-name="P1" draw:layer="layout" svg:width="0.085cm" svg:height="0.15cm" svg:x="9.187cm" svg:y="14.528cm" svg:viewBox="0 0 86 151" draw:points="72,0 43,0 28,7 21,14 6,36 0,65 0,123 6,137 14,144 28,151 58,151 72,144 79,137 86,123 86,86 79,72 72,65 58,57 28,57 14,65 6,72 0,86">
          <text:p/>
        </draw:polyline>
        <draw:line draw:style-name="gr3" draw:text-style-name="P1" draw:layer="layout" svg:x1="9.322cm" svg:y1="14.679cm" svg:x2="9.402cm" svg:y2="14.578cm">
          <text:p/>
        </draw:line>
        <draw:line draw:style-name="gr3" draw:text-style-name="P1" draw:layer="layout" svg:x1="9.322cm" svg:y1="14.578cm" svg:x2="9.402cm" svg:y2="14.679cm">
          <text:p/>
        </draw:line>
        <draw:line draw:style-name="gr3" draw:text-style-name="P1" draw:layer="layout" svg:x1="9.536cm" svg:y1="14.678cm" svg:x2="9.451cm" svg:y2="14.678cm">
          <text:p/>
        </draw:line>
        <draw:polyline draw:style-name="gr3" draw:text-style-name="P1" draw:layer="layout" svg:width="0.042cm" svg:height="0.15cm" svg:x="9.451cm" svg:y="14.528cm" svg:viewBox="0 0 43 151" draw:points="43,151 43,0 29,22 14,36 0,43">
          <text:p/>
        </draw:polyline>
        <draw:polyline draw:style-name="gr3" draw:text-style-name="P1" draw:layer="layout" svg:width="0.092cm" svg:height="0.15cm" svg:x="9.587cm" svg:y="14.528cm" svg:viewBox="0 0 93 151" draw:points="0,0 93,0 44,57 65,57 79,65 86,72 93,86 93,123 86,137 79,144 65,151 21,151 7,144 0,137">
          <text:p/>
        </draw:polyline>
        <draw:polyline draw:style-name="gr3" draw:text-style-name="P1" draw:layer="layout" svg:width="0.086cm" svg:height="0.15cm" svg:x="7.574cm" svg:y="18.302cm" svg:viewBox="0 0 87 151" draw:points="0,151 0,0 87,151 87,0">
          <text:p/>
        </draw:polyline>
        <draw:polygon draw:style-name="gr3" draw:text-style-name="P1" draw:layer="layout" svg:width="0.079cm" svg:height="0.1cm" svg:x="7.724cm" svg:y="18.352cm" svg:viewBox="0 0 80 101" draw:points="28,101 14,94 7,87 0,72 0,30 7,14 14,7 28,0 51,0 65,7 72,14 80,30 80,72 72,87 65,94 51,101">
          <text:p/>
        </draw:polygon>
        <draw:line draw:style-name="gr3" draw:text-style-name="P1" draw:layer="layout" svg:x1="7.845cm" svg:y1="18.352cm" svg:x2="7.902cm" svg:y2="18.352cm">
          <text:p/>
        </draw:line>
        <draw:polyline draw:style-name="gr3" draw:text-style-name="P1" draw:layer="layout" svg:width="0.035cm" svg:height="0.15cm" svg:x="7.867cm" svg:y="18.302cm" svg:viewBox="0 0 36 151" draw:points="0,0 0,130 7,144 22,151 36,151">
          <text:p/>
        </draw:polyline>
        <draw:polyline draw:style-name="gr3" draw:text-style-name="P1" draw:layer="layout" svg:width="0.071cm" svg:height="0.1cm" svg:x="7.945cm" svg:y="18.352cm" svg:viewBox="0 0 72 101" draw:points="66,94 51,101 22,101 7,94 0,80 0,23 7,7 22,0 51,0 66,7 72,23 72,37 0,51">
          <text:p/>
        </draw:polyline>
        <draw:polyline draw:style-name="gr3" draw:text-style-name="P1" draw:layer="layout" svg:width="0.014cm" svg:height="0.014cm" svg:x="8.188cm" svg:y="18.438cm" svg:viewBox="0 0 15 15" draw:points="8,0 15,8 8,15 0,8 8,0 8,15">
          <text:p/>
        </draw:polyline>
        <draw:polyline draw:style-name="gr3" draw:text-style-name="P1" draw:layer="layout" svg:width="0.014cm" svg:height="0.015cm" svg:x="8.188cm" svg:y="18.359cm" svg:viewBox="0 0 15 16" draw:points="8,0 15,7 8,16 0,7 8,0 8,16">
          <text:p/>
        </draw:polyline>
        <draw:polyline draw:style-name="gr3" draw:text-style-name="P1" draw:layer="layout" svg:width="0.086cm" svg:height="0.15cm" svg:x="8.381cm" svg:y="18.302cm" svg:viewBox="0 0 87 151" draw:points="0,0 0,122 7,137 14,144 29,151 57,151 72,144 79,137 87,122 87,0">
          <text:p/>
        </draw:polyline>
        <draw:line draw:style-name="gr3" draw:text-style-name="P1" draw:layer="layout" svg:x1="8.538cm" svg:y1="18.352cm" svg:x2="8.538cm" svg:y2="18.452cm">
          <text:p/>
        </draw:line>
        <draw:polyline draw:style-name="gr3" draw:text-style-name="P1" draw:layer="layout" svg:width="0.064cm" svg:height="0.1cm" svg:x="8.538cm" svg:y="18.352cm" svg:viewBox="0 0 65 101" draw:points="0,14 7,7 21,0 43,0 57,7 65,23 65,101">
          <text:p/>
        </draw:polyline>
        <draw:line draw:style-name="gr3" draw:text-style-name="P1" draw:layer="layout" svg:x1="8.674cm" svg:y1="18.452cm" svg:x2="8.674cm" svg:y2="18.352cm">
          <text:p/>
        </draw:line>
        <draw:polyline draw:style-name="gr3" draw:text-style-name="P1" draw:layer="layout" svg:width="0.014cm" svg:height="0.014cm" svg:x="8.667cm" svg:y="18.302cm" svg:viewBox="0 0 15 15" draw:points="7,0 0,8 7,15 15,8 7,0 7,15">
          <text:p/>
        </draw:polyline>
        <draw:line draw:style-name="gr3" draw:text-style-name="P1" draw:layer="layout" svg:x1="8.724cm" svg:y1="18.352cm" svg:x2="8.781cm" svg:y2="18.352cm">
          <text:p/>
        </draw:line>
        <draw:polyline draw:style-name="gr3" draw:text-style-name="P1" draw:layer="layout" svg:width="0.036cm" svg:height="0.15cm" svg:x="8.745cm" svg:y="18.302cm" svg:viewBox="0 0 37 151" draw:points="0,0 0,130 7,144 23,151 37,151">
          <text:p/>
        </draw:polyline>
        <draw:polyline draw:style-name="gr3" draw:text-style-name="P1" draw:layer="layout" svg:width="0.064cm" svg:height="0.1cm" svg:x="8.824cm" svg:y="18.352cm" svg:viewBox="0 0 65 101" draw:points="0,94 14,101 44,101 58,94 65,80 65,72 58,58 44,51 21,51 7,44 0,30 0,23 7,7 21,0 44,0 58,7">
          <text:p/>
        </draw:polyline>
        <draw:polyline draw:style-name="gr3" draw:text-style-name="P1" draw:layer="layout" svg:width="0.064cm" svg:height="0.1cm" svg:x="9.067cm" svg:y="18.352cm" svg:viewBox="0 0 65 101" draw:points="65,101 65,23 58,7 43,0 14,0 0,7">
          <text:p/>
        </draw:polyline>
        <draw:polyline draw:style-name="gr3" draw:text-style-name="P1" draw:layer="layout" svg:width="0.072cm" svg:height="0.064cm" svg:x="9.059cm" svg:y="18.388cm" svg:viewBox="0 0 73 65" draw:points="73,58 58,65 22,65 8,58 0,44 0,29 8,14 22,7 58,7 73,0">
          <text:p/>
        </draw:polyline>
        <draw:line draw:style-name="gr3" draw:text-style-name="P1" draw:layer="layout" svg:x1="9.202cm" svg:y1="18.452cm" svg:x2="9.202cm" svg:y2="18.352cm">
          <text:p/>
        </draw:line>
        <draw:polyline draw:style-name="gr3" draw:text-style-name="P1" draw:layer="layout" svg:width="0.043cm" svg:height="0.029cm" svg:x="9.202cm" svg:y="18.352cm" svg:viewBox="0 0 44 30" draw:points="0,30 8,15 15,7 29,0 44,0">
          <text:p/>
        </draw:polyline>
        <draw:polyline draw:style-name="gr3" draw:text-style-name="P1" draw:layer="layout" svg:width="0.071cm" svg:height="0.1cm" svg:x="9.288cm" svg:y="18.352cm" svg:viewBox="0 0 72 101" draw:points="66,94 50,101 22,101 7,94 0,80 0,23 7,7 22,0 50,0 66,7 72,23 72,37 0,51">
          <text:p/>
        </draw:polyline>
        <draw:line draw:style-name="gr3" draw:text-style-name="P1" draw:layer="layout" svg:x1="9.538cm" svg:y1="18.452cm" svg:x2="9.538cm" svg:y2="18.352cm">
          <text:p/>
        </draw:line>
        <draw:polyline draw:style-name="gr3" draw:text-style-name="P1" draw:layer="layout" svg:width="0.014cm" svg:height="0.014cm" svg:x="9.531cm" svg:y="18.302cm" svg:viewBox="0 0 15 15" draw:points="8,0 0,8 8,15 15,8 8,0 8,15">
          <text:p/>
        </draw:polyline>
        <draw:line draw:style-name="gr3" draw:text-style-name="P1" draw:layer="layout" svg:x1="9.61cm" svg:y1="18.352cm" svg:x2="9.61cm" svg:y2="18.452cm">
          <text:p/>
        </draw:line>
        <draw:polyline draw:style-name="gr3" draw:text-style-name="P1" draw:layer="layout" svg:width="0.064cm" svg:height="0.1cm" svg:x="9.61cm" svg:y="18.352cm" svg:viewBox="0 0 65 101" draw:points="0,14 7,7 22,0 44,0 58,7 65,23 65,101">
          <text:p/>
        </draw:polyline>
        <draw:line draw:style-name="gr3" draw:text-style-name="P1" draw:layer="layout" svg:x1="9.838cm" svg:y1="18.352cm" svg:x2="9.896cm" svg:y2="18.352cm">
          <text:p/>
        </draw:line>
        <draw:polyline draw:style-name="gr3" draw:text-style-name="P1" draw:layer="layout" svg:width="0.036cm" svg:height="0.15cm" svg:x="9.86cm" svg:y="18.302cm" svg:viewBox="0 0 37 151" draw:points="0,151 0,21 7,7 22,0 37,0">
          <text:p/>
        </draw:polyline>
        <draw:polygon draw:style-name="gr3" draw:text-style-name="P1" draw:layer="layout" svg:width="0.079cm" svg:height="0.1cm" svg:x="9.938cm" svg:y="18.352cm" svg:viewBox="0 0 80 101" draw:points="29,101 15,94 7,87 0,72 0,30 7,14 15,7 29,0 51,0 65,7 72,14 80,30 80,72 72,87 65,94 51,101">
          <text:p/>
        </draw:polygon>
        <draw:polygon draw:style-name="gr3" draw:text-style-name="P1" draw:layer="layout" svg:width="0.078cm" svg:height="0.1cm" svg:x="10.074cm" svg:y="18.352cm" svg:viewBox="0 0 79 101" draw:points="28,101 14,94 7,87 0,72 0,30 7,14 14,7 28,0 51,0 65,7 72,14 79,30 79,72 72,87 65,94 51,101">
          <text:p/>
        </draw:polygon>
        <draw:line draw:style-name="gr3" draw:text-style-name="P1" draw:layer="layout" svg:x1="10.195cm" svg:y1="18.352cm" svg:x2="10.252cm" svg:y2="18.352cm">
          <text:p/>
        </draw:line>
        <draw:polyline draw:style-name="gr3" draw:text-style-name="P1" draw:layer="layout" svg:width="0.035cm" svg:height="0.15cm" svg:x="10.217cm" svg:y="18.302cm" svg:viewBox="0 0 36 151" draw:points="0,0 0,130 7,144 22,151 36,151">
          <text:p/>
        </draw:polyline>
        <draw:line draw:style-name="gr3" draw:text-style-name="P1" draw:layer="layout" svg:x1="9.024cm" svg:y1="17.474cm" svg:x2="9.138cm" svg:y2="17.474cm">
          <text:p/>
        </draw:line>
        <draw:line draw:style-name="gr3" draw:text-style-name="P1" draw:layer="layout" svg:x1="9.138cm" svg:y1="17.516cm" svg:x2="9.024cm" svg:y2="17.516cm">
          <text:p/>
        </draw:line>
        <draw:polygon draw:style-name="gr3" draw:text-style-name="P1" draw:layer="layout" svg:width="0.1cm" svg:height="0.15cm" svg:x="9.317cm" svg:y="17.402cm" svg:viewBox="0 0 101 151" draw:points="36,0 65,0 79,7 94,22 101,51 101,101 94,130 79,144 65,151 36,151 21,144 7,130 0,101 0,51 7,22 21,7">
          <text:p/>
        </draw:polygon>
        <draw:line draw:style-name="gr3" draw:text-style-name="P1" draw:layer="layout" svg:x1="9.545cm" svg:y1="17.452cm" svg:x2="9.545cm" svg:y2="17.552cm">
          <text:p/>
        </draw:line>
        <draw:polyline draw:style-name="gr3" draw:text-style-name="P1" draw:layer="layout" svg:width="0.064cm" svg:height="0.1cm" svg:x="9.481cm" svg:y="17.452cm" svg:viewBox="0 0 65 101" draw:points="0,0 0,80 7,94 22,101 44,101 58,94 65,87">
          <text:p/>
        </draw:polyline>
        <draw:line draw:style-name="gr3" draw:text-style-name="P1" draw:layer="layout" svg:x1="9.596cm" svg:y1="17.452cm" svg:x2="9.653cm" svg:y2="17.452cm">
          <text:p/>
        </draw:line>
        <draw:polyline draw:style-name="gr3" draw:text-style-name="P1" draw:layer="layout" svg:width="0.036cm" svg:height="0.15cm" svg:x="9.617cm" svg:y="17.402cm" svg:viewBox="0 0 37 151" draw:points="0,0 0,130 7,144 22,151 37,151">
          <text:p/>
        </draw:polyline>
        <draw:line draw:style-name="gr3" draw:text-style-name="P1" draw:layer="layout" svg:x1="9.767cm" svg:y1="17.552cm" svg:x2="9.767cm" svg:y2="17.402cm">
          <text:p/>
        </draw:line>
        <draw:polyline draw:style-name="gr3" draw:text-style-name="P1" draw:layer="layout" svg:width="0.073cm" svg:height="0.1cm" svg:x="9.695cm" svg:y="17.452cm" svg:viewBox="0 0 74 101" draw:points="74,94 59,101 30,101 16,94 8,87 0,73 0,30 8,15 16,7 30,0 59,0 74,7">
          <text:p/>
        </draw:polyline>
        <draw:polygon draw:style-name="gr3" draw:text-style-name="P1" draw:layer="layout" svg:width="0.079cm" svg:height="0.1cm" svg:x="9.831cm" svg:y="17.452cm" svg:viewBox="0 0 80 101" draw:points="29,101 14,94 7,87 0,73 0,30 7,15 14,7 29,0 51,0 66,7 72,15 80,30 80,73 72,87 66,94 51,101">
          <text:p/>
        </draw:polygon>
        <draw:polygon draw:style-name="gr3" draw:text-style-name="P1" draw:layer="layout" svg:width="0.079cm" svg:height="0.1cm" svg:x="9.966cm" svg:y="17.452cm" svg:viewBox="0 0 80 101" draw:points="29,101 15,94 8,87 0,73 0,30 8,15 15,7 29,0 51,0 66,7 73,15 80,30 80,73 73,87 66,94 51,101">
          <text:p/>
        </draw:polygon>
        <draw:line draw:style-name="gr3" draw:text-style-name="P1" draw:layer="layout" svg:x1="10.109cm" svg:y1="17.552cm" svg:x2="10.109cm" svg:y2="17.452cm">
          <text:p/>
        </draw:line>
        <draw:polyline draw:style-name="gr3" draw:text-style-name="P1" draw:layer="layout" svg:width="0.043cm" svg:height="0.029cm" svg:x="10.109cm" svg:y="17.452cm" svg:viewBox="0 0 44 30" draw:points="0,30 8,15 16,7 30,0 44,0">
          <text:p/>
        </draw:polyline>
        <draw:polyline draw:style-name="gr3" draw:text-style-name="P1" draw:layer="layout" svg:width="0.094cm" svg:height="0.15cm" svg:x="10.309cm" svg:y="17.402cm" svg:viewBox="0 0 95 151" draw:points="87,7 73,0 52,0 30,7 15,22 8,36 0,66 0,87 8,115 15,130 30,144 52,151 66,151 87,144 95,137 95,87 66,87">
          <text:p/>
        </draw:polyline>
        <draw:polyline draw:style-name="gr3" draw:text-style-name="P1" draw:layer="layout" svg:width="0.065cm" svg:height="0.1cm" svg:x="10.466cm" svg:y="17.452cm" svg:viewBox="0 0 66 101" draw:points="66,101 66,23 59,7 43,0 15,0 0,7">
          <text:p/>
        </draw:polyline>
        <draw:polyline draw:style-name="gr3" draw:text-style-name="P1" draw:layer="layout" svg:width="0.071cm" svg:height="0.064cm" svg:x="10.46cm" svg:y="17.488cm" svg:viewBox="0 0 72 65" draw:points="72,58 58,65 22,65 6,58 0,44 0,29 6,15 22,7 58,7 72,0">
          <text:p/>
        </draw:polyline>
        <draw:line draw:style-name="gr3" draw:text-style-name="P1" draw:layer="layout" svg:x1="10.581cm" svg:y1="17.452cm" svg:x2="10.638cm" svg:y2="17.452cm">
          <text:p/>
        </draw:line>
        <draw:polyline draw:style-name="gr3" draw:text-style-name="P1" draw:layer="layout" svg:width="0.036cm" svg:height="0.15cm" svg:x="10.602cm" svg:y="17.402cm" svg:viewBox="0 0 37 151" draw:points="0,0 0,130 7,144 23,151 37,151">
          <text:p/>
        </draw:polyline>
        <draw:polyline draw:style-name="gr3" draw:text-style-name="P1" draw:layer="layout" svg:width="0.071cm" svg:height="0.1cm" svg:x="10.681cm" svg:y="17.452cm" svg:viewBox="0 0 72 101" draw:points="65,94 51,101 23,101 7,94 0,80 0,23 7,7 23,0 51,0 65,7 72,23 72,37 0,51">
          <text:p/>
        </draw:polyline>
        <draw:line draw:style-name="gr3" draw:text-style-name="P1" draw:layer="layout" svg:x1="9.024cm" svg:y1="16.873cm" svg:x2="9.138cm" svg:y2="16.873cm">
          <text:p/>
        </draw:line>
        <draw:line draw:style-name="gr3" draw:text-style-name="P1" draw:layer="layout" svg:x1="9.138cm" svg:y1="16.916cm" svg:x2="9.024cm" svg:y2="16.916cm">
          <text:p/>
        </draw:line>
        <draw:line draw:style-name="gr3" draw:text-style-name="P1" draw:layer="layout" svg:x1="9.411cm" svg:y1="16.953cm" svg:x2="9.359cm" svg:y2="16.881cm">
          <text:p/>
        </draw:line>
        <draw:polyline draw:style-name="gr3" draw:text-style-name="P1" draw:layer="layout" svg:width="0.086cm" svg:height="0.15cm" svg:x="9.324cm" svg:y="16.802cm" svg:viewBox="0 0 87 151" draw:points="0,151 0,0 58,0 72,7 79,14 87,29 87,51 79,66 72,72 58,80 0,80">
          <text:p/>
        </draw:polyline>
        <draw:polygon draw:style-name="gr3" draw:text-style-name="P1" draw:layer="layout" svg:width="0.078cm" svg:height="0.1cm" svg:x="9.467cm" svg:y="16.852cm" svg:viewBox="0 0 79 101" draw:points="29,101 15,94 7,87 0,73 0,30 7,15 15,7 29,0 51,0 65,7 72,15 79,30 79,73 72,87 65,94 51,101">
          <text:p/>
        </draw:polygon>
        <draw:polygon draw:style-name="gr3" draw:text-style-name="P1" draw:layer="layout" svg:width="0.079cm" svg:height="0.1cm" svg:x="9.602cm" svg:y="16.852cm" svg:viewBox="0 0 80 101" draw:points="29,101 15,94 8,87 0,73 0,30 8,15 15,7 29,0 52,0 66,7 73,15 80,30 80,73 73,87 66,94 52,101">
          <text:p/>
        </draw:polygon>
        <draw:line draw:style-name="gr3" draw:text-style-name="P1" draw:layer="layout" svg:x1="9.745cm" svg:y1="16.952cm" svg:x2="9.745cm" svg:y2="16.852cm">
          <text:p/>
        </draw:line>
        <draw:polyline draw:style-name="gr3" draw:text-style-name="P1" draw:layer="layout" svg:width="0.065cm" svg:height="0.1cm" svg:x="9.745cm" svg:y="16.852cm" svg:viewBox="0 0 66 101" draw:points="0,15 9,7 23,0 44,0 58,7 66,21 66,101">
          <text:p/>
        </draw:polyline>
        <draw:polyline draw:style-name="gr3" draw:text-style-name="P1" draw:layer="layout" svg:width="0.064cm" svg:height="0.1cm" svg:x="9.81cm" svg:y="16.852cm" svg:viewBox="0 0 65 101" draw:points="0,21 7,7 21,0 44,0 58,7 65,21 65,101">
          <text:p/>
        </draw:polyline>
        <draw:polygon draw:style-name="gr3" draw:text-style-name="P1" draw:layer="layout" svg:width="0.085cm" svg:height="0.15cm" svg:x="10.06cm" svg:y="16.802cm" svg:viewBox="0 0 86 151" draw:points="0,151 0,0 36,0 58,7 72,22 79,36 86,66 86,87 79,115 72,130 58,144 36,151">
          <text:p/>
        </draw:polygon>
        <draw:polygon draw:style-name="gr3" draw:text-style-name="P1" draw:layer="layout" svg:width="0.079cm" svg:height="0.1cm" svg:x="10.202cm" svg:y="16.852cm" svg:viewBox="0 0 80 101" draw:points="29,101 15,94 7,87 0,73 0,30 7,15 15,7 29,0 50,0 66,7 73,15 80,30 80,73 73,87 66,94 50,101">
          <text:p/>
        </draw:polygon>
        <draw:polygon draw:style-name="gr3" draw:text-style-name="P1" draw:layer="layout" svg:width="0.079cm" svg:height="0.1cm" svg:x="10.338cm" svg:y="16.852cm" svg:viewBox="0 0 80 101" draw:points="28,101 14,94 7,87 0,73 0,30 7,15 14,7 28,0 50,0 65,7 71,15 80,30 80,73 71,87 65,94 50,101">
          <text:p/>
        </draw:polygon>
        <draw:line draw:style-name="gr3" draw:text-style-name="P1" draw:layer="layout" svg:x1="10.481cm" svg:y1="16.952cm" svg:x2="10.481cm" svg:y2="16.852cm">
          <text:p/>
        </draw:line>
        <draw:polyline draw:style-name="gr3" draw:text-style-name="P1" draw:layer="layout" svg:width="0.043cm" svg:height="0.029cm" svg:x="10.481cm" svg:y="16.852cm" svg:viewBox="0 0 44 30" draw:points="0,30 7,16 14,8 29,0 44,0">
          <text:p/>
        </draw:polyline>
        <draw:polyline draw:style-name="gr3" draw:text-style-name="P1" draw:layer="layout" svg:width="0.128cm" svg:height="0.15cm" svg:x="12.987cm" svg:y="12.778cm" svg:viewBox="0 0 129 151" draw:points="0,0 36,151 65,43 93,151 129,0">
          <text:p/>
        </draw:polyline>
        <draw:line draw:style-name="gr3" draw:text-style-name="P1" draw:layer="layout" svg:x1="13.172cm" svg:y1="12.928cm" svg:x2="13.172cm" svg:y2="12.828cm">
          <text:p/>
        </draw:line>
        <draw:polyline draw:style-name="gr3" draw:text-style-name="P1" draw:layer="layout" svg:width="0.014cm" svg:height="0.014cm" svg:x="13.165cm" svg:y="12.778cm" svg:viewBox="0 0 15 15" draw:points="8,0 0,8 8,15 15,8 8,0 8,15">
          <text:p/>
        </draw:polyline>
        <draw:line draw:style-name="gr3" draw:text-style-name="P1" draw:layer="layout" svg:x1="13.308cm" svg:y1="12.928cm" svg:x2="13.308cm" svg:y2="12.778cm">
          <text:p/>
        </draw:line>
        <draw:polyline draw:style-name="gr3" draw:text-style-name="P1" draw:layer="layout" svg:width="0.072cm" svg:height="0.1cm" svg:x="13.236cm" svg:y="12.828cm" svg:viewBox="0 0 73 101" draw:points="73,94 58,101 30,101 16,94 9,87 0,73 0,30 9,15 16,7 30,0 58,0 73,7">
          <text:p/>
        </draw:polyline>
        <draw:polyline draw:style-name="gr3" draw:text-style-name="P1" draw:layer="layout" svg:width="0.072cm" svg:height="0.1cm" svg:x="13.372cm" svg:y="12.828cm" svg:viewBox="0 0 73 101" draw:points="65,94 51,101 22,101 7,94 0,80 0,23 7,7 22,0 51,0 65,7 73,23 73,37 0,51">
          <text:p/>
        </draw:polyline>
        <draw:polyline draw:style-name="gr3" draw:text-style-name="P1" draw:layer="layout" svg:width="0.1cm" svg:height="0.15cm" svg:x="13.601cm" svg:y="12.778cm" svg:viewBox="0 0 101 151" draw:points="0,0 51,151 101,0">
          <text:p/>
        </draw:polyline>
        <draw:polyline draw:style-name="gr3" draw:text-style-name="P1" draw:layer="layout" svg:width="0.071cm" svg:height="0.1cm" svg:x="13.744cm" svg:y="12.828cm" svg:viewBox="0 0 72 101" draw:points="64,94 50,101 21,101 7,94 0,80 0,23 7,7 21,0 50,0 64,7 72,23 72,37 0,51">
          <text:p/>
        </draw:polyline>
        <draw:line draw:style-name="gr3" draw:text-style-name="P1" draw:layer="layout" svg:x1="13.879cm" svg:y1="12.928cm" svg:x2="13.879cm" svg:y2="12.828cm">
          <text:p/>
        </draw:line>
        <draw:polyline draw:style-name="gr3" draw:text-style-name="P1" draw:layer="layout" svg:width="0.043cm" svg:height="0.029cm" svg:x="13.879cm" svg:y="12.828cm" svg:viewBox="0 0 44 30" draw:points="0,30 9,16 16,7 30,0 44,0">
          <text:p/>
        </draw:polyline>
        <draw:polyline draw:style-name="gr3" draw:text-style-name="P1" draw:layer="layout" svg:width="0.064cm" svg:height="0.1cm" svg:x="13.972cm" svg:y="12.828cm" svg:viewBox="0 0 65 101" draw:points="65,101 65,23 59,7 44,0 16,0 0,7">
          <text:p/>
        </draw:polyline>
        <draw:polyline draw:style-name="gr3" draw:text-style-name="P1" draw:layer="layout" svg:width="0.071cm" svg:height="0.064cm" svg:x="13.965cm" svg:y="12.864cm" svg:viewBox="0 0 72 65" draw:points="72,58 57,65 22,65 7,58 0,44 0,28 7,14 22,7 57,7 72,0">
          <text:p/>
        </draw:polyline>
        <draw:line draw:style-name="gr3" draw:text-style-name="P1" draw:layer="layout" svg:x1="14.108cm" svg:y1="12.828cm" svg:x2="14.108cm" svg:y2="12.928cm">
          <text:p/>
        </draw:line>
        <draw:polyline draw:style-name="gr3" draw:text-style-name="P1" draw:layer="layout" svg:width="0.064cm" svg:height="0.1cm" svg:x="14.108cm" svg:y="12.828cm" svg:viewBox="0 0 65 101" draw:points="0,15 8,7 23,0 44,0 58,7 65,23 65,101">
          <text:p/>
        </draw:polyline>
        <draw:line draw:style-name="gr3" draw:text-style-name="P1" draw:layer="layout" svg:x1="14.308cm" svg:y1="12.928cm" svg:x2="14.308cm" svg:y2="12.778cm">
          <text:p/>
        </draw:line>
        <draw:polyline draw:style-name="gr3" draw:text-style-name="P1" draw:layer="layout" svg:width="0.072cm" svg:height="0.1cm" svg:x="14.236cm" svg:y="12.828cm" svg:viewBox="0 0 73 101" draw:points="73,94 58,101 29,101 15,94 8,87 0,73 0,30 8,15 15,7 29,0 58,0 73,7">
          <text:p/>
        </draw:polyline>
        <draw:line draw:style-name="gr3" draw:text-style-name="P1" draw:layer="layout" svg:x1="14.379cm" svg:y1="12.928cm" svg:x2="14.379cm" svg:y2="12.778cm">
          <text:p/>
        </draw:line>
        <draw:polyline draw:style-name="gr3" draw:text-style-name="P1" draw:layer="layout" svg:width="0.065cm" svg:height="0.1cm" svg:x="14.379cm" svg:y="12.828cm" svg:viewBox="0 0 66 101" draw:points="66,101 66,23 59,7 43,0 22,0 8,7 0,15">
          <text:p/>
        </draw:polyline>
        <draw:polyline draw:style-name="gr3" draw:text-style-name="P1" draw:layer="layout" svg:width="0.064cm" svg:height="0.1cm" svg:x="14.515cm" svg:y="12.828cm" svg:viewBox="0 0 65 101" draw:points="65,101 65,23 59,7 43,0 15,0 0,7">
          <text:p/>
        </draw:polyline>
        <draw:polyline draw:style-name="gr3" draw:text-style-name="P1" draw:layer="layout" svg:width="0.071cm" svg:height="0.064cm" svg:x="14.508cm" svg:y="12.864cm" svg:viewBox="0 0 72 65" draw:points="72,58 58,65 23,65 7,58 0,44 0,28 7,14 23,7 58,7 72,0">
          <text:p/>
        </draw:polyline>
        <draw:line draw:style-name="gr3" draw:text-style-name="P1" draw:layer="layout" svg:x1="14.751cm" svg:y1="12.929cm" svg:x2="14.831cm" svg:y2="12.828cm">
          <text:p/>
        </draw:line>
        <draw:line draw:style-name="gr3" draw:text-style-name="P1" draw:layer="layout" svg:x1="14.751cm" svg:y1="12.828cm" svg:x2="14.831cm" svg:y2="12.929cm">
          <text:p/>
        </draw:line>
        <draw:polyline draw:style-name="gr3" draw:text-style-name="P1" draw:layer="layout" svg:width="0.086cm" svg:height="0.15cm" svg:x="14.879cm" svg:y="12.778cm" svg:viewBox="0 0 87 151" draw:points="15,151 44,151 59,144 66,137 80,115 87,87 87,29 80,14 73,8 59,0 29,0 15,8 8,14 0,29 0,66 8,80 15,87 29,94 59,94 73,87 80,80 87,66">
          <text:p/>
        </draw:polyline>
        <draw:line draw:style-name="gr3" draw:text-style-name="P1" draw:layer="layout" svg:x1="9.018cm" svg:y1="17.895cm" svg:x2="9.132cm" svg:y2="17.895cm">
          <text:p/>
        </draw:line>
        <draw:line draw:style-name="gr3" draw:text-style-name="P1" draw:layer="layout" svg:x1="9.132cm" svg:y1="17.938cm" svg:x2="9.018cm" svg:y2="17.938cm">
          <text:p/>
        </draw:line>
        <draw:polyline draw:style-name="gr3" draw:text-style-name="P1" draw:layer="layout" svg:width="0.128cm" svg:height="0.15cm" svg:x="9.304cm" svg:y="17.824cm" svg:viewBox="0 0 129 151" draw:points="0,0 35,151 64,43 92,151 129,0">
          <text:p/>
        </draw:polyline>
        <draw:line draw:style-name="gr3" draw:text-style-name="P1" draw:layer="layout" svg:x1="9.489cm" svg:y1="17.974cm" svg:x2="9.489cm" svg:y2="17.874cm">
          <text:p/>
        </draw:line>
        <draw:polyline draw:style-name="gr3" draw:text-style-name="P1" draw:layer="layout" svg:width="0.014cm" svg:height="0.014cm" svg:x="9.482cm" svg:y="17.824cm" svg:viewBox="0 0 15 15" draw:points="8,0 0,8 8,15 15,8 8,0 8,15">
          <text:p/>
        </draw:polyline>
        <draw:line draw:style-name="gr3" draw:text-style-name="P1" draw:layer="layout" svg:x1="9.561cm" svg:y1="17.874cm" svg:x2="9.561cm" svg:y2="17.974cm">
          <text:p/>
        </draw:line>
        <draw:polyline draw:style-name="gr3" draw:text-style-name="P1" draw:layer="layout" svg:width="0.064cm" svg:height="0.1cm" svg:x="9.561cm" svg:y="17.874cm" svg:viewBox="0 0 65 101" draw:points="0,15 7,7 22,0 44,0 58,7 65,21 65,101">
          <text:p/>
        </draw:polyline>
        <draw:line draw:style-name="gr3" draw:text-style-name="P1" draw:layer="layout" svg:x1="9.761cm" svg:y1="17.974cm" svg:x2="9.761cm" svg:y2="17.824cm">
          <text:p/>
        </draw:line>
        <draw:polyline draw:style-name="gr3" draw:text-style-name="P1" draw:layer="layout" svg:width="0.072cm" svg:height="0.1cm" svg:x="9.689cm" svg:y="17.874cm" svg:viewBox="0 0 73 101" draw:points="73,94 58,101 29,101 15,94 7,87 0,73 0,30 7,15 15,7 29,0 58,0 73,7">
          <text:p/>
        </draw:polyline>
        <draw:polygon draw:style-name="gr3" draw:text-style-name="P1" draw:layer="layout" svg:width="0.079cm" svg:height="0.1cm" svg:x="9.825cm" svg:y="17.874cm" svg:viewBox="0 0 80 101" draw:points="29,101 14,94 7,87 0,73 0,30 7,15 14,7 29,0 50,0 66,7 72,15 80,30 80,73 72,87 66,94 50,101">
          <text:p/>
        </draw:polygon>
        <draw:polyline draw:style-name="gr3" draw:text-style-name="P1" draw:layer="layout" svg:width="0.114cm" svg:height="0.1cm" svg:x="9.954cm" svg:y="17.874cm" svg:viewBox="0 0 115 101" draw:points="0,0 28,101 58,30 86,101 115,0">
          <text:p/>
        </draw:polyline>
        <draw:polyline draw:style-name="gr3" draw:text-style-name="P1" draw:layer="layout" svg:width="0.093cm" svg:height="0.149cm" svg:x="13.194cm" svg:y="14.187cm" svg:viewBox="0 0 94 150" draw:points="94,136 86,144 65,150 50,150 28,144 14,129 7,115 0,86 0,65 7,35 14,21 28,7 50,0 65,0 86,7 94,14">
          <text:p/>
        </draw:polyline>
        <draw:polyline draw:style-name="gr3" draw:text-style-name="P1" draw:layer="layout" svg:width="0.021cm" svg:height="0.149cm" svg:x="13.351cm" svg:y="14.187cm" svg:viewBox="0 0 22 150" draw:points="22,150 7,144 0,129 0,0">
          <text:p/>
        </draw:polyline>
        <draw:polyline draw:style-name="gr3" draw:text-style-name="P1" draw:layer="layout" svg:width="0.065cm" svg:height="0.1cm" svg:x="13.429cm" svg:y="14.236cm" svg:viewBox="0 0 66 101" draw:points="66,101 66,23 59,8 44,0 15,0 0,8">
          <text:p/>
        </draw:polyline>
        <draw:polyline draw:style-name="gr3" draw:text-style-name="P1" draw:layer="layout" svg:width="0.072cm" svg:height="0.064cm" svg:x="13.422cm" svg:y="14.272cm" svg:viewBox="0 0 73 65" draw:points="73,59 58,65 22,65 7,59 0,44 0,29 7,15 22,7 58,7 73,0">
          <text:p/>
        </draw:polyline>
        <draw:polyline draw:style-name="gr3" draw:text-style-name="P1" draw:layer="layout" svg:width="0.064cm" svg:height="0.1cm" svg:x="13.558cm" svg:y="14.236cm" svg:viewBox="0 0 65 101" draw:points="0,95 14,101 44,101 58,95 65,80 65,73 58,59 44,52 21,52 7,44 0,30 0,23 7,8 21,0 44,0 58,8">
          <text:p/>
        </draw:polyline>
        <draw:polyline draw:style-name="gr3" draw:text-style-name="P1" draw:layer="layout" svg:width="0.065cm" svg:height="0.1cm" svg:x="13.679cm" svg:y="14.236cm" svg:viewBox="0 0 66 101" draw:points="0,95 14,101 43,101 58,95 66,80 66,73 58,59 43,52 22,52 8,44 0,30 0,23 8,8 22,0 43,0 58,8">
          <text:p/>
        </draw:polyline>
        <draw:line draw:style-name="gr3" draw:text-style-name="P1" draw:layer="layout" svg:x1="14.009cm" svg:y1="14.337cm" svg:x2="13.958cm" svg:y2="14.265cm">
          <text:p/>
        </draw:line>
        <draw:polyline draw:style-name="gr3" draw:text-style-name="P1" draw:layer="layout" svg:width="0.086cm" svg:height="0.149cm" svg:x="13.922cm" svg:y="14.187cm" svg:viewBox="0 0 87 150" draw:points="0,150 0,0 57,0 73,7 80,14 87,28 87,50 80,65 73,72 57,79 0,79">
          <text:p/>
        </draw:polyline>
        <draw:polygon draw:style-name="gr3" draw:text-style-name="P1" draw:layer="layout" svg:width="0.079cm" svg:height="0.1cm" svg:x="14.065cm" svg:y="14.236cm" svg:viewBox="0 0 80 101" draw:points="30,101 15,95 7,87 0,73 0,30 7,16 15,8 30,0 51,0 66,8 73,16 80,30 80,73 73,87 66,95 51,101">
          <text:p/>
        </draw:polygon>
        <draw:polygon draw:style-name="gr3" draw:text-style-name="P1" draw:layer="layout" svg:width="0.078cm" svg:height="0.1cm" svg:x="14.201cm" svg:y="14.236cm" svg:viewBox="0 0 79 101" draw:points="29,101 14,95 7,87 0,73 0,30 7,16 14,8 29,0 51,0 65,8 72,16 79,30 79,73 72,87 65,95 51,101">
          <text:p/>
        </draw:polygon>
        <draw:line draw:style-name="gr3" draw:text-style-name="P1" draw:layer="layout" svg:x1="14.344cm" svg:y1="14.336cm" svg:x2="14.344cm" svg:y2="14.236cm">
          <text:p/>
        </draw:line>
        <draw:polyline draw:style-name="gr3" draw:text-style-name="P1" draw:layer="layout" svg:width="0.064cm" svg:height="0.1cm" svg:x="14.344cm" svg:y="14.236cm" svg:viewBox="0 0 65 101" draw:points="0,16 7,8 21,0 43,0 58,8 65,23 65,101">
          <text:p/>
        </draw:polyline>
        <draw:polyline draw:style-name="gr3" draw:text-style-name="P1" draw:layer="layout" svg:width="0.064cm" svg:height="0.1cm" svg:x="14.408cm" svg:y="14.236cm" svg:viewBox="0 0 65 101" draw:points="0,23 7,8 22,0 44,0 58,8 65,23 65,101">
          <text:p/>
        </draw:polyline>
        <draw:line draw:style-name="gr3" draw:text-style-name="P1" draw:layer="layout" svg:x1="13.279cm" svg:y1="14.578cm" svg:x2="13.194cm" svg:y2="14.578cm">
          <text:p/>
        </draw:line>
        <draw:polyline draw:style-name="gr3" draw:text-style-name="P1" draw:layer="layout" svg:width="0.042cm" svg:height="0.15cm" svg:x="13.194cm" svg:y="14.428cm" svg:viewBox="0 0 43 151" draw:points="43,151 43,0 29,22 14,36 0,43">
          <text:p/>
        </draw:polyline>
        <draw:polyline draw:style-name="gr3" draw:text-style-name="P1" draw:layer="layout" svg:width="0.086cm" svg:height="0.15cm" svg:x="13.336cm" svg:y="14.428cm" svg:viewBox="0 0 87 151" draw:points="73,0 43,0 29,7 22,14 8,36 0,66 0,123 8,137 15,144 29,151 58,151 73,144 80,137 87,123 87,87 80,72 73,66 58,58 29,58 15,66 8,72 0,87">
          <text:p/>
        </draw:polyline>
        <draw:line draw:style-name="gr3" draw:text-style-name="P1" draw:layer="layout" svg:x1="13.472cm" svg:y1="14.579cm" svg:x2="13.552cm" svg:y2="14.478cm">
          <text:p/>
        </draw:line>
        <draw:line draw:style-name="gr3" draw:text-style-name="P1" draw:layer="layout" svg:x1="13.472cm" svg:y1="14.478cm" svg:x2="13.552cm" svg:y2="14.579cm">
          <text:p/>
        </draw:line>
        <draw:polyline draw:style-name="gr3" draw:text-style-name="P1" draw:layer="layout" svg:width="0.093cm" svg:height="0.15cm" svg:x="13.594cm" svg:y="14.428cm" svg:viewBox="0 0 94 151" draw:points="7,14 14,7 28,0 65,0 79,7 86,14 94,29 94,43 86,66 0,151 94,151">
          <text:p/>
        </draw:polyline>
        <draw:polygon draw:style-name="gr3" draw:text-style-name="P1" draw:layer="layout" svg:width="0.085cm" svg:height="0.15cm" svg:x="13.744cm" svg:y="14.428cm" svg:viewBox="0 0 86 151" draw:points="35,0 50,0 64,7 72,14 79,29 86,58 86,94 79,123 72,137 64,144 50,151 35,151 21,144 14,137 7,123 0,94 0,58 7,29 14,14 21,7">
          <text:p/>
        </draw:polygon>
        <draw:polyline draw:style-name="gr3" draw:text-style-name="P1" draw:layer="layout" svg:width="0.094cm" svg:height="0.151cm" svg:x="10.843cm" svg:y="14.236cm" svg:viewBox="0 0 95 152" draw:points="95,137 87,144 65,152 51,152 29,144 15,130 8,116 0,86 0,65 8,36 15,22 29,8 51,0 65,0 87,8 95,15">
          <text:p/>
        </draw:polyline>
        <draw:polyline draw:style-name="gr3" draw:text-style-name="P1" draw:layer="layout" svg:width="0.021cm" svg:height="0.151cm" svg:x="11.001cm" svg:y="14.236cm" svg:viewBox="0 0 22 152" draw:points="22,152 7,144 0,130 0,0">
          <text:p/>
        </draw:polyline>
        <draw:polyline draw:style-name="gr3" draw:text-style-name="P1" draw:layer="layout" svg:width="0.064cm" svg:height="0.1cm" svg:x="11.079cm" svg:y="14.287cm" svg:viewBox="0 0 65 101" draw:points="65,101 65,21 59,7 44,0 15,0 0,7">
          <text:p/>
        </draw:polyline>
        <draw:polyline draw:style-name="gr3" draw:text-style-name="P1" draw:layer="layout" svg:width="0.071cm" svg:height="0.065cm" svg:x="11.072cm" svg:y="14.322cm" svg:viewBox="0 0 72 66" draw:points="72,58 58,66 22,66 7,58 0,43 0,29 7,14 22,8 58,8 72,0">
          <text:p/>
        </draw:polyline>
        <draw:polyline draw:style-name="gr3" draw:text-style-name="P1" draw:layer="layout" svg:width="0.064cm" svg:height="0.1cm" svg:x="11.208cm" svg:y="14.287cm" svg:viewBox="0 0 65 101" draw:points="0,93 14,101 44,101 58,93 65,79 65,72 58,57 44,49 21,49 7,43 0,28 0,21 7,7 21,0 44,0 58,7">
          <text:p/>
        </draw:polyline>
        <draw:polyline draw:style-name="gr3" draw:text-style-name="P1" draw:layer="layout" svg:width="0.065cm" svg:height="0.1cm" svg:x="11.329cm" svg:y="14.287cm" svg:viewBox="0 0 66 101" draw:points="0,93 14,101 44,101 58,93 66,79 66,72 58,57 44,49 22,49 8,43 0,28 0,21 8,7 22,0 44,0 58,7">
          <text:p/>
        </draw:polyline>
        <draw:line draw:style-name="gr3" draw:text-style-name="P1" draw:layer="layout" svg:x1="11.659cm" svg:y1="14.388cm" svg:x2="11.608cm" svg:y2="14.315cm">
          <text:p/>
        </draw:line>
        <draw:polyline draw:style-name="gr3" draw:text-style-name="P1" draw:layer="layout" svg:width="0.086cm" svg:height="0.151cm" svg:x="11.572cm" svg:y="14.236cm" svg:viewBox="0 0 87 152" draw:points="0,152 0,0 58,0 72,8 80,15 87,29 87,51 80,65 72,72 58,79 0,79">
          <text:p/>
        </draw:polyline>
        <draw:polygon draw:style-name="gr3" draw:text-style-name="P1" draw:layer="layout" svg:width="0.079cm" svg:height="0.1cm" svg:x="11.715cm" svg:y="14.287cm" svg:viewBox="0 0 80 101" draw:points="30,101 14,93 7,86 0,72 0,28 7,14 14,7 30,0 51,0 66,7 72,14 80,28 80,72 72,86 66,93 51,101">
          <text:p/>
        </draw:polygon>
        <draw:polygon draw:style-name="gr3" draw:text-style-name="P1" draw:layer="layout" svg:width="0.078cm" svg:height="0.1cm" svg:x="11.851cm" svg:y="14.287cm" svg:viewBox="0 0 79 101" draw:points="29,101 14,93 7,86 0,72 0,28 7,14 14,7 29,0 51,0 65,7 72,14 79,28 79,72 72,86 65,93 51,101">
          <text:p/>
        </draw:polygon>
        <draw:line draw:style-name="gr3" draw:text-style-name="P1" draw:layer="layout" svg:x1="11.994cm" svg:y1="14.387cm" svg:x2="11.994cm" svg:y2="14.287cm">
          <text:p/>
        </draw:line>
        <draw:polyline draw:style-name="gr3" draw:text-style-name="P1" draw:layer="layout" svg:width="0.064cm" svg:height="0.1cm" svg:x="11.994cm" svg:y="14.287cm" svg:viewBox="0 0 65 101" draw:points="0,14 8,7 22,0 44,0 58,7 65,21 65,101">
          <text:p/>
        </draw:polyline>
        <draw:polyline draw:style-name="gr3" draw:text-style-name="P1" draw:layer="layout" svg:width="0.064cm" svg:height="0.1cm" svg:x="12.058cm" svg:y="14.287cm" svg:viewBox="0 0 65 101" draw:points="0,21 8,7 23,0 44,0 58,7 65,21 65,101">
          <text:p/>
        </draw:polyline>
        <draw:line draw:style-name="gr3" draw:text-style-name="P1" draw:layer="layout" svg:x1="10.929cm" svg:y1="14.628cm" svg:x2="10.843cm" svg:y2="14.628cm">
          <text:p/>
        </draw:line>
        <draw:polyline draw:style-name="gr3" draw:text-style-name="P1" draw:layer="layout" svg:width="0.043cm" svg:height="0.15cm" svg:x="10.843cm" svg:y="14.478cm" svg:viewBox="0 0 44 151" draw:points="44,151 44,0 30,21 16,36 0,43">
          <text:p/>
        </draw:polyline>
        <draw:polyline draw:style-name="gr3" draw:text-style-name="P1" draw:layer="layout" svg:width="0.086cm" svg:height="0.15cm" svg:x="10.986cm" svg:y="14.478cm" svg:viewBox="0 0 87 151" draw:points="73,0 44,0 30,7 23,15 8,36 0,65 0,123 8,137 15,144 30,151 59,151 73,144 80,137 87,123 87,87 80,73 73,65 59,58 30,58 15,65 8,73 0,87">
          <text:p/>
        </draw:polyline>
        <draw:line draw:style-name="gr3" draw:text-style-name="P1" draw:layer="layout" svg:x1="11.122cm" svg:y1="14.629cm" svg:x2="11.202cm" svg:y2="14.528cm">
          <text:p/>
        </draw:line>
        <draw:line draw:style-name="gr3" draw:text-style-name="P1" draw:layer="layout" svg:x1="11.122cm" svg:y1="14.528cm" svg:x2="11.202cm" svg:y2="14.629cm">
          <text:p/>
        </draw:line>
        <draw:polyline draw:style-name="gr3" draw:text-style-name="P1" draw:layer="layout" svg:width="0.094cm" svg:height="0.15cm" svg:x="11.243cm" svg:y="14.478cm" svg:viewBox="0 0 95 151" draw:points="8,15 15,7 29,0 66,0 80,7 87,15 95,29 95,43 87,65 0,151 95,151">
          <text:p/>
        </draw:polyline>
        <draw:polygon draw:style-name="gr3" draw:text-style-name="P1" draw:layer="layout" svg:width="0.086cm" svg:height="0.15cm" svg:x="11.394cm" svg:y="14.478cm" svg:viewBox="0 0 87 151" draw:points="35,0 51,0 65,7 72,15 79,29 87,58 87,94 79,123 72,137 65,144 51,151 35,151 21,144 14,137 7,123 0,94 0,58 7,29 14,15 21,7">
          <text:p/>
        </draw:polygon>
        <draw:line draw:style-name="gr2" draw:text-style-name="P1" draw:layer="layout" svg:x1="9.79cm" svg:y1="3.314cm" svg:x2="9.886cm" svg:y2="3.213cm">
          <text:p/>
        </draw:line>
        <draw:line draw:style-name="gr3" draw:text-style-name="P1" draw:layer="layout" svg:x1="13.429cm" svg:y1="8.978cm" svg:x2="13.515cm" svg:y2="8.978cm">
          <text:p/>
        </draw:line>
        <draw:line draw:style-name="gr3" draw:text-style-name="P1" draw:layer="layout" svg:x1="13.472cm" svg:y1="9.128cm" svg:x2="13.472cm" svg:y2="8.978cm">
          <text:p/>
        </draw:line>
        <draw:line draw:style-name="gr3" draw:text-style-name="P1" draw:layer="layout" svg:x1="13.565cm" svg:y1="9.128cm" svg:x2="13.565cm" svg:y2="9.028cm">
          <text:p/>
        </draw:line>
        <draw:polyline draw:style-name="gr3" draw:text-style-name="P1" draw:layer="layout" svg:width="0.014cm" svg:height="0.014cm" svg:x="13.558cm" svg:y="8.978cm" svg:viewBox="0 0 15 15" draw:points="8,0 0,9 8,15 15,9 8,0 8,15">
          <text:p/>
        </draw:polyline>
        <draw:line draw:style-name="gr3" draw:text-style-name="P1" draw:layer="layout" svg:x1="13.636cm" svg:y1="9.028cm" svg:x2="13.636cm" svg:y2="9.128cm">
          <text:p/>
        </draw:line>
        <draw:polyline draw:style-name="gr3" draw:text-style-name="P1" draw:layer="layout" svg:width="0.065cm" svg:height="0.1cm" svg:x="13.636cm" svg:y="9.028cm" svg:viewBox="0 0 66 101" draw:points="0,15 8,7 22,0 44,0 58,7 66,22 66,101">
          <text:p/>
        </draw:polyline>
        <draw:polyline draw:style-name="gr3" draw:text-style-name="P1" draw:layer="layout" svg:width="0.086cm" svg:height="0.15cm" svg:x="13.879cm" svg:y="8.978cm" svg:viewBox="0 0 87 151" draw:points="0,144 23,151 58,151 73,144 80,137 87,123 87,109 80,94 73,87 58,80 30,73 15,66 8,58 0,44 0,29 8,14 15,8 30,0 66,0 87,8">
          <text:p/>
        </draw:polyline>
        <draw:line draw:style-name="gr3" draw:text-style-name="P1" draw:layer="layout" svg:x1="14.03cm" svg:y1="9.128cm" svg:x2="14.03cm" svg:y2="8.978cm">
          <text:p/>
        </draw:line>
        <draw:polyline draw:style-name="gr3" draw:text-style-name="P1" draw:layer="layout" svg:width="0.064cm" svg:height="0.1cm" svg:x="14.03cm" svg:y="9.028cm" svg:viewBox="0 0 65 101" draw:points="65,101 65,22 58,7 42,0 21,0 6,7 0,15">
          <text:p/>
        </draw:polyline>
        <draw:polyline draw:style-name="gr3" draw:text-style-name="P1" draw:layer="layout" svg:width="0.065cm" svg:height="0.1cm" svg:x="14.165cm" svg:y="9.028cm" svg:viewBox="0 0 66 101" draw:points="66,101 66,22 58,7 44,0 15,0 0,7">
          <text:p/>
        </draw:polyline>
        <draw:polyline draw:style-name="gr3" draw:text-style-name="P1" draw:layer="layout" svg:width="0.072cm" svg:height="0.064cm" svg:x="14.158cm" svg:y="9.064cm" svg:viewBox="0 0 73 65" draw:points="73,58 58,65 22,65 8,58 0,43 0,28 8,14 22,7 58,7 73,0">
          <text:p/>
        </draw:polyline>
        <draw:line draw:style-name="gr3" draw:text-style-name="P1" draw:layer="layout" svg:x1="14.365cm" svg:y1="9.128cm" svg:x2="14.365cm" svg:y2="8.978cm">
          <text:p/>
        </draw:line>
        <draw:polyline draw:style-name="gr3" draw:text-style-name="P1" draw:layer="layout" svg:width="0.071cm" svg:height="0.1cm" svg:x="14.294cm" svg:y="9.028cm" svg:viewBox="0 0 72 101" draw:points="72,94 58,101 29,101 15,94 7,87 0,73 0,29 7,15 15,7 29,0 58,0 72,7">
          <text:p/>
        </draw:polyline>
        <draw:polyline draw:style-name="gr3" draw:text-style-name="P1" draw:layer="layout" svg:width="0.071cm" svg:height="0.1cm" svg:x="14.43cm" svg:y="9.028cm" svg:viewBox="0 0 72 101" draw:points="65,94 50,101 22,101 7,94 0,80 0,22 7,7 22,0 50,0 65,7 72,22 72,37 0,51">
          <text:p/>
        </draw:polyline>
        <draw:line draw:style-name="gr3" draw:text-style-name="P1" draw:layer="layout" svg:x1="14.672cm" svg:y1="9.086cm" svg:x2="14.744cm" svg:y2="9.086cm">
          <text:p/>
        </draw:line>
        <draw:polyline draw:style-name="gr3" draw:text-style-name="P1" draw:layer="layout" svg:width="0.1cm" svg:height="0.15cm" svg:x="14.658cm" svg:y="8.978cm" svg:viewBox="0 0 101 151" draw:points="0,151 50,0 101,151">
          <text:p/>
        </draw:polyline>
        <draw:line draw:style-name="gr3" draw:text-style-name="P1" draw:layer="layout" svg:x1="14.808cm" svg:y1="9.128cm" svg:x2="14.808cm" svg:y2="9.028cm">
          <text:p/>
        </draw:line>
        <draw:polyline draw:style-name="gr3" draw:text-style-name="P1" draw:layer="layout" svg:width="0.043cm" svg:height="0.029cm" svg:x="14.808cm" svg:y="9.028cm" svg:viewBox="0 0 44 30" draw:points="0,30 7,16 14,8 29,0 44,0">
          <text:p/>
        </draw:polyline>
        <draw:polyline draw:style-name="gr3" draw:text-style-name="P1" draw:layer="layout" svg:width="0.071cm" svg:height="0.1cm" svg:x="14.894cm" svg:y="9.028cm" svg:viewBox="0 0 72 101" draw:points="65,94 50,101 21,101 7,94 0,80 0,22 7,7 21,0 50,0 65,7 72,22 72,37 0,51">
          <text:p/>
        </draw:polyline>
        <draw:polyline draw:style-name="gr3" draw:text-style-name="P1" draw:layer="layout" svg:width="0.065cm" svg:height="0.1cm" svg:x="15.029cm" svg:y="9.028cm" svg:viewBox="0 0 66 101" draw:points="66,101 66,22 58,7 44,0 14,0 0,7">
          <text:p/>
        </draw:polyline>
        <draw:polyline draw:style-name="gr3" draw:text-style-name="P1" draw:layer="layout" svg:width="0.072cm" svg:height="0.064cm" svg:x="15.022cm" svg:y="9.064cm" svg:viewBox="0 0 73 65" draw:points="73,58 57,65 21,65 7,58 0,43 0,28 7,14 21,7 57,7 73,0">
          <text:p/>
        </draw:polyline>
        <draw:polyline draw:style-name="gr3" draw:text-style-name="P1" draw:layer="layout" svg:width="0.092cm" svg:height="0.15cm" svg:x="11.494cm" svg:y="2.937cm" svg:viewBox="0 0 93 151" draw:points="93,136 87,144 65,151 50,151 28,144 14,128 7,114 0,85 0,64 7,36 14,21 28,7 50,0 65,0 87,7 93,14">
          <text:p/>
        </draw:polyline>
        <draw:polyline draw:style-name="gr3" draw:text-style-name="P1" draw:layer="layout" svg:width="0.021cm" svg:height="0.15cm" svg:x="11.651cm" svg:y="2.937cm" svg:viewBox="0 0 22 151" draw:points="22,151 7,144 0,128 0,0">
          <text:p/>
        </draw:polyline>
        <draw:polyline draw:style-name="gr3" draw:text-style-name="P1" draw:layer="layout" svg:width="0.065cm" svg:height="0.1cm" svg:x="11.729cm" svg:y="2.987cm" svg:viewBox="0 0 66 101" draw:points="66,101 66,21 58,7 44,0 16,0 0,7">
          <text:p/>
        </draw:polyline>
        <draw:polyline draw:style-name="gr3" draw:text-style-name="P1" draw:layer="layout" svg:width="0.072cm" svg:height="0.065cm" svg:x="11.722cm" svg:y="3.022cm" svg:viewBox="0 0 73 66" draw:points="73,59 59,66 22,66 7,59 0,44 0,30 7,15 22,8 59,8 73,0">
          <text:p/>
        </draw:polyline>
        <draw:polyline draw:style-name="gr3" draw:text-style-name="P1" draw:layer="layout" svg:width="0.064cm" svg:height="0.1cm" svg:x="11.858cm" svg:y="2.987cm" svg:viewBox="0 0 65 101" draw:points="0,94 15,101 44,101 58,94 65,79 65,72 58,58 44,51 23,51 7,44 0,28 0,21 7,7 23,0 44,0 58,7">
          <text:p/>
        </draw:polyline>
        <draw:polyline draw:style-name="gr3" draw:text-style-name="P1" draw:layer="layout" svg:width="0.064cm" svg:height="0.1cm" svg:x="11.98cm" svg:y="2.987cm" svg:viewBox="0 0 65 101" draw:points="0,94 14,101 43,101 58,94 65,79 65,72 58,58 43,51 21,51 7,44 0,28 0,21 7,7 21,0 43,0 58,7">
          <text:p/>
        </draw:polyline>
        <draw:line draw:style-name="gr3" draw:text-style-name="P1" draw:layer="layout" svg:x1="12.309cm" svg:y1="3.088cm" svg:x2="12.258cm" svg:y2="3.015cm">
          <text:p/>
        </draw:line>
        <draw:polyline draw:style-name="gr3" draw:text-style-name="P1" draw:layer="layout" svg:width="0.086cm" svg:height="0.15cm" svg:x="12.222cm" svg:y="2.937cm" svg:viewBox="0 0 87 151" draw:points="0,151 0,0 58,0 73,7 80,14 87,28 87,50 80,64 73,71 58,78 0,78">
          <text:p/>
        </draw:polyline>
        <draw:polygon draw:style-name="gr3" draw:text-style-name="P1" draw:layer="layout" svg:width="0.079cm" svg:height="0.1cm" svg:x="12.365cm" svg:y="2.987cm" svg:viewBox="0 0 80 101" draw:points="29,101 15,94 7,87 0,72 0,28 7,14 15,7 29,0 50,0 64,7 72,14 80,28 80,72 72,87 64,94 50,101">
          <text:p/>
        </draw:polygon>
        <draw:polygon draw:style-name="gr3" draw:text-style-name="P1" draw:layer="layout" svg:width="0.079cm" svg:height="0.1cm" svg:x="12.501cm" svg:y="2.987cm" svg:viewBox="0 0 80 101" draw:points="29,101 14,94 7,87 0,72 0,28 7,14 14,7 29,0 51,0 65,7 72,14 80,28 80,72 72,87 65,94 51,101">
          <text:p/>
        </draw:polygon>
        <draw:line draw:style-name="gr3" draw:text-style-name="P1" draw:layer="layout" svg:x1="12.644cm" svg:y1="3.087cm" svg:x2="12.644cm" svg:y2="2.987cm">
          <text:p/>
        </draw:line>
        <draw:polyline draw:style-name="gr3" draw:text-style-name="P1" draw:layer="layout" svg:width="0.064cm" svg:height="0.1cm" svg:x="12.644cm" svg:y="2.987cm" svg:viewBox="0 0 65 101" draw:points="0,14 7,7 21,0 43,0 57,7 65,21 65,101">
          <text:p/>
        </draw:polyline>
        <draw:polyline draw:style-name="gr3" draw:text-style-name="P1" draw:layer="layout" svg:width="0.064cm" svg:height="0.1cm" svg:x="12.708cm" svg:y="2.987cm" svg:viewBox="0 0 65 101" draw:points="0,21 7,7 21,0 43,0 57,7 65,21 65,101">
          <text:p/>
        </draw:polyline>
        <draw:polyline draw:style-name="gr3" draw:text-style-name="P1" draw:layer="layout" svg:width="0.094cm" svg:height="0.15cm" svg:x="11.486cm" svg:y="3.178cm" svg:viewBox="0 0 95 151" draw:points="8,14 15,7 29,0 65,0 79,7 86,14 95,28 95,43 86,65 0,151 95,151">
          <text:p/>
        </draw:polyline>
        <draw:polygon draw:style-name="gr3" draw:text-style-name="P1" draw:layer="layout" svg:width="0.085cm" svg:height="0.15cm" svg:x="11.637cm" svg:y="3.178cm" svg:viewBox="0 0 86 151" draw:points="35,0 49,0 65,7 72,14 79,28 86,58 86,94 79,123 72,137 65,144 49,151 35,151 21,144 14,137 6,123 0,94 0,58 6,28 14,14 21,7">
          <text:p/>
        </draw:polygon>
        <draw:line draw:style-name="gr3" draw:text-style-name="P1" draw:layer="layout" svg:x1="11.772cm" svg:y1="3.329cm" svg:x2="11.852cm" svg:y2="3.228cm">
          <text:p/>
        </draw:line>
        <draw:line draw:style-name="gr3" draw:text-style-name="P1" draw:layer="layout" svg:x1="11.772cm" svg:y1="3.228cm" svg:x2="11.852cm" svg:y2="3.329cm">
          <text:p/>
        </draw:line>
        <draw:polyline draw:style-name="gr3" draw:text-style-name="P1" draw:layer="layout" svg:width="0.093cm" svg:height="0.15cm" svg:x="11.894cm" svg:y="3.178cm" svg:viewBox="0 0 94 151" draw:points="7,14 14,7 29,0 65,0 79,7 87,14 94,28 94,43 87,65 0,151 94,151">
          <text:p/>
        </draw:polyline>
        <draw:polyline draw:style-name="gr3" draw:text-style-name="P1" draw:layer="layout" svg:width="0.085cm" svg:height="0.15cm" svg:x="12.044cm" svg:y="3.178cm" svg:viewBox="0 0 86 151" draw:points="28,65 14,58 7,51 0,36 0,28 7,14 14,7 28,0 57,0 72,7 79,14 86,28 86,36 79,51 72,58 57,65 28,65 14,72 7,80 0,94 0,123 7,137 14,144 28,151 57,151 72,144 79,137 86,123 86,94 79,80 72,72 57,65">
          <text:p/>
        </draw:polyline>
        <draw:polygon draw:style-name="gr3" draw:text-style-name="P1" draw:layer="layout" svg:width="0.1cm" svg:height="0.15cm" svg:x="18.744cm" svg:y="2.887cm" svg:viewBox="0 0 101 151" draw:points="36,0 65,0 79,7 93,22 101,51 101,101 93,129 79,144 65,151 36,151 22,144 8,129 0,101 0,51 8,22 22,7">
          <text:p/>
        </draw:polygon>
        <draw:line draw:style-name="gr3" draw:text-style-name="P1" draw:layer="layout" svg:x1="18.887cm" svg:y1="2.937cm" svg:x2="18.944cm" svg:y2="2.937cm">
          <text:p/>
        </draw:line>
        <draw:polyline draw:style-name="gr3" draw:text-style-name="P1" draw:layer="layout" svg:width="0.036cm" svg:height="0.15cm" svg:x="18.908cm" svg:y="2.887cm" svg:viewBox="0 0 37 151" draw:points="0,151 0,22 7,7 23,0 37,0">
          <text:p/>
        </draw:polyline>
        <draw:line draw:style-name="gr3" draw:text-style-name="P1" draw:layer="layout" svg:x1="18.972cm" svg:y1="2.937cm" svg:x2="19.03cm" svg:y2="2.937cm">
          <text:p/>
        </draw:line>
        <draw:polyline draw:style-name="gr3" draw:text-style-name="P1" draw:layer="layout" svg:width="0.036cm" svg:height="0.15cm" svg:x="18.994cm" svg:y="2.887cm" svg:viewBox="0 0 37 151" draw:points="0,151 0,22 7,7 21,0 37,0">
          <text:p/>
        </draw:polyline>
        <draw:line draw:style-name="gr3" draw:text-style-name="P1" draw:layer="layout" svg:x1="19.079cm" svg:y1="3.037cm" svg:x2="19.079cm" svg:y2="2.937cm">
          <text:p/>
        </draw:line>
        <draw:polyline draw:style-name="gr3" draw:text-style-name="P1" draw:layer="layout" svg:width="0.014cm" svg:height="0.014cm" svg:x="19.073cm" svg:y="2.887cm" svg:viewBox="0 0 15 15" draw:points="7,0 0,8 7,15 15,8 7,0 7,15">
          <text:p/>
        </draw:polyline>
        <draw:polyline draw:style-name="gr3" draw:text-style-name="P1" draw:layer="layout" svg:width="0.072cm" svg:height="0.1cm" svg:x="19.144cm" svg:y="2.937cm" svg:viewBox="0 0 73 101" draw:points="73,94 58,101 30,101 15,94 8,86 0,72 0,29 8,15 15,7 30,0 58,0 73,7">
          <text:p/>
        </draw:polyline>
        <draw:polyline draw:style-name="gr3" draw:text-style-name="P1" draw:layer="layout" svg:width="0.071cm" svg:height="0.1cm" svg:x="19.272cm" svg:y="2.937cm" svg:viewBox="0 0 72 101" draw:points="66,94 51,101 23,101 8,94 0,79 0,22 8,7 23,0 51,0 66,7 72,22 72,37 0,51">
          <text:p/>
        </draw:polyline>
        <draw:line draw:style-name="gr3" draw:text-style-name="P1" draw:layer="layout" svg:x1="19.609cm" svg:y1="3.038cm" svg:x2="19.558cm" svg:y2="2.965cm">
          <text:p/>
        </draw:line>
        <draw:polyline draw:style-name="gr3" draw:text-style-name="P1" draw:layer="layout" svg:width="0.086cm" svg:height="0.15cm" svg:x="19.522cm" svg:y="2.887cm" svg:viewBox="0 0 87 151" draw:points="0,151 0,0 57,0 73,7 80,14 87,29 87,51 80,65 73,72 57,79 0,79">
          <text:p/>
        </draw:polyline>
        <draw:polygon draw:style-name="gr3" draw:text-style-name="P1" draw:layer="layout" svg:width="0.078cm" svg:height="0.1cm" svg:x="19.665cm" svg:y="2.937cm" svg:viewBox="0 0 79 101" draw:points="29,101 15,94 7,86 0,72 0,29 7,15 15,7 29,0 51,0 65,7 73,15 79,29 79,72 73,86 65,94 51,101">
          <text:p/>
        </draw:polygon>
        <draw:polygon draw:style-name="gr3" draw:text-style-name="P1" draw:layer="layout" svg:width="0.078cm" svg:height="0.1cm" svg:x="19.801cm" svg:y="2.937cm" svg:viewBox="0 0 79 101" draw:points="28,101 14,94 7,86 0,72 0,29 7,15 14,7 28,0 51,0 65,7 72,15 79,29 79,72 72,86 65,94 51,101">
          <text:p/>
        </draw:polygon>
        <draw:line draw:style-name="gr3" draw:text-style-name="P1" draw:layer="layout" svg:x1="19.944cm" svg:y1="3.037cm" svg:x2="19.944cm" svg:y2="2.937cm">
          <text:p/>
        </draw:line>
        <draw:polyline draw:style-name="gr3" draw:text-style-name="P1" draw:layer="layout" svg:width="0.064cm" svg:height="0.1cm" svg:x="19.944cm" svg:y="2.937cm" svg:viewBox="0 0 65 101" draw:points="0,15 7,7 21,0 42,0 58,7 65,22 65,101">
          <text:p/>
        </draw:polyline>
        <draw:polyline draw:style-name="gr3" draw:text-style-name="P1" draw:layer="layout" svg:width="0.064cm" svg:height="0.1cm" svg:x="20.008cm" svg:y="2.937cm" svg:viewBox="0 0 65 101" draw:points="0,22 7,7 21,0 43,0 58,7 65,22 65,101">
          <text:p/>
        </draw:polyline>
        <draw:polyline draw:style-name="gr3" draw:text-style-name="P1" draw:layer="layout" svg:width="0.093cm" svg:height="0.15cm" svg:x="18.737cm" svg:y="3.128cm" svg:viewBox="0 0 94 151" draw:points="8,15 15,7 29,0 65,0 79,7 86,15 94,29 94,43 86,64 0,151 94,151">
          <text:p/>
        </draw:polyline>
        <draw:polygon draw:style-name="gr3" draw:text-style-name="P1" draw:layer="layout" svg:width="0.085cm" svg:height="0.15cm" svg:x="18.887cm" svg:y="3.128cm" svg:viewBox="0 0 86 151" draw:points="36,0 51,0 65,7 72,15 79,29 86,57 86,94 79,122 72,137 65,144 51,151 36,151 21,144 14,137 7,122 0,94 0,57 7,29 14,15 21,7">
          <text:p/>
        </draw:polygon>
        <draw:line draw:style-name="gr3" draw:text-style-name="P1" draw:layer="layout" svg:x1="19.022cm" svg:y1="3.279cm" svg:x2="19.102cm" svg:y2="3.178cm">
          <text:p/>
        </draw:line>
        <draw:line draw:style-name="gr3" draw:text-style-name="P1" draw:layer="layout" svg:x1="19.022cm" svg:y1="3.178cm" svg:x2="19.102cm" svg:y2="3.279cm">
          <text:p/>
        </draw:line>
        <draw:polyline draw:style-name="gr3" draw:text-style-name="P1" draw:layer="layout" svg:width="0.093cm" svg:height="0.15cm" svg:x="19.144cm" svg:y="3.128cm" svg:viewBox="0 0 94 151" draw:points="7,15 14,7 29,0 65,0 79,7 86,15 94,29 94,43 86,64 0,151 94,151">
          <text:p/>
        </draw:polyline>
        <draw:polyline draw:style-name="gr3" draw:text-style-name="P1" draw:layer="layout" svg:width="0.085cm" svg:height="0.15cm" svg:x="19.294cm" svg:y="3.128cm" svg:viewBox="0 0 86 151" draw:points="28,64 14,57 7,50 0,36 0,29 7,15 14,7 28,0 58,0 72,7 79,15 86,29 86,36 79,50 72,57 58,64 28,64 14,72 7,79 0,94 0,122 7,137 14,144 28,151 58,151 72,144 79,137 86,122 86,94 79,79 72,72 58,64">
          <text:p/>
        </draw:polyline>
        <draw:polyline draw:style-name="gr3" draw:text-style-name="P1" draw:layer="layout" svg:width="0.129cm" svg:height="0.15cm" svg:x="14.713cm" svg:y="5.028cm" svg:viewBox="0 0 130 151" draw:points="0,0 36,151 65,43 94,151 130,0">
          <text:p/>
        </draw:polyline>
        <draw:line draw:style-name="gr3" draw:text-style-name="P1" draw:layer="layout" svg:x1="14.899cm" svg:y1="5.178cm" svg:x2="14.899cm" svg:y2="5.078cm">
          <text:p/>
        </draw:line>
        <draw:polyline draw:style-name="gr3" draw:text-style-name="P1" draw:layer="layout" svg:width="0.014cm" svg:height="0.014cm" svg:x="14.892cm" svg:y="5.028cm" svg:viewBox="0 0 15 15" draw:points="7,0 0,8 7,15 15,8 7,0 7,15">
          <text:p/>
        </draw:polyline>
        <draw:line draw:style-name="gr3" draw:text-style-name="P1" draw:layer="layout" svg:x1="15.035cm" svg:y1="5.178cm" svg:x2="15.035cm" svg:y2="5.028cm">
          <text:p/>
        </draw:line>
        <draw:polyline draw:style-name="gr3" draw:text-style-name="P1" draw:layer="layout" svg:width="0.072cm" svg:height="0.1cm" svg:x="14.963cm" svg:y="5.078cm" svg:viewBox="0 0 73 101" draw:points="73,94 59,101 29,101 15,94 7,87 0,73 0,29 7,14 15,7 29,0 59,0 73,7">
          <text:p/>
        </draw:polyline>
        <draw:polyline draw:style-name="gr3" draw:text-style-name="P1" draw:layer="layout" svg:width="0.071cm" svg:height="0.1cm" svg:x="15.099cm" svg:y="5.078cm" svg:viewBox="0 0 72 101" draw:points="66,94 50,101 22,101 7,94 0,80 0,21 7,7 22,0 50,0 66,7 72,21 72,36 0,50">
          <text:p/>
        </draw:polyline>
        <draw:polyline draw:style-name="gr3" draw:text-style-name="P1" draw:layer="layout" svg:width="0.1cm" svg:height="0.15cm" svg:x="15.328cm" svg:y="5.028cm" svg:viewBox="0 0 101 151" draw:points="0,0 51,151 101,0">
          <text:p/>
        </draw:polyline>
        <draw:polyline draw:style-name="gr3" draw:text-style-name="P1" draw:layer="layout" svg:width="0.072cm" svg:height="0.1cm" svg:x="15.47cm" svg:y="5.078cm" svg:viewBox="0 0 73 101" draw:points="66,94 52,101 22,101 8,94 0,80 0,21 8,7 22,0 52,0 66,7 73,21 73,36 0,50">
          <text:p/>
        </draw:polyline>
        <draw:line draw:style-name="gr3" draw:text-style-name="P1" draw:layer="layout" svg:x1="15.606cm" svg:y1="5.178cm" svg:x2="15.606cm" svg:y2="5.078cm">
          <text:p/>
        </draw:line>
        <draw:polyline draw:style-name="gr3" draw:text-style-name="P1" draw:layer="layout" svg:width="0.043cm" svg:height="0.029cm" svg:x="15.606cm" svg:y="5.078cm" svg:viewBox="0 0 44 30" draw:points="0,30 7,15 15,8 29,0 44,0">
          <text:p/>
        </draw:polyline>
        <draw:polyline draw:style-name="gr3" draw:text-style-name="P1" draw:layer="layout" svg:width="0.064cm" svg:height="0.1cm" svg:x="15.699cm" svg:y="5.078cm" svg:viewBox="0 0 65 101" draw:points="65,101 65,21 58,7 44,0 15,0 0,7">
          <text:p/>
        </draw:polyline>
        <draw:polyline draw:style-name="gr3" draw:text-style-name="P1" draw:layer="layout" svg:width="0.071cm" svg:height="0.064cm" svg:x="15.692cm" svg:y="5.114cm" svg:viewBox="0 0 72 65" draw:points="72,58 58,65 21,65 7,58 0,44 0,28 7,14 21,7 58,7 72,0">
          <text:p/>
        </draw:polyline>
        <draw:line draw:style-name="gr3" draw:text-style-name="P1" draw:layer="layout" svg:x1="15.835cm" svg:y1="5.078cm" svg:x2="15.835cm" svg:y2="5.178cm">
          <text:p/>
        </draw:line>
        <draw:polyline draw:style-name="gr3" draw:text-style-name="P1" draw:layer="layout" svg:width="0.064cm" svg:height="0.1cm" svg:x="15.835cm" svg:y="5.078cm" svg:viewBox="0 0 65 101" draw:points="0,14 8,7 22,0 43,0 58,7 65,21 65,101">
          <text:p/>
        </draw:polyline>
        <draw:line draw:style-name="gr3" draw:text-style-name="P1" draw:layer="layout" svg:x1="16.035cm" svg:y1="5.178cm" svg:x2="16.035cm" svg:y2="5.028cm">
          <text:p/>
        </draw:line>
        <draw:polyline draw:style-name="gr3" draw:text-style-name="P1" draw:layer="layout" svg:width="0.072cm" svg:height="0.1cm" svg:x="15.963cm" svg:y="5.078cm" svg:viewBox="0 0 73 101" draw:points="73,94 58,101 29,101 14,94 8,87 0,73 0,29 8,14 14,7 29,0 58,0 73,7">
          <text:p/>
        </draw:polyline>
        <draw:line draw:style-name="gr3" draw:text-style-name="P1" draw:layer="layout" svg:x1="16.106cm" svg:y1="5.178cm" svg:x2="16.106cm" svg:y2="5.028cm">
          <text:p/>
        </draw:line>
        <draw:polyline draw:style-name="gr3" draw:text-style-name="P1" draw:layer="layout" svg:width="0.065cm" svg:height="0.1cm" svg:x="16.106cm" svg:y="5.078cm" svg:viewBox="0 0 66 101" draw:points="66,101 66,21 58,7 43,0 22,0 7,7 0,14">
          <text:p/>
        </draw:polyline>
        <draw:polyline draw:style-name="gr3" draw:text-style-name="P1" draw:layer="layout" svg:width="0.064cm" svg:height="0.1cm" svg:x="16.242cm" svg:y="5.078cm" svg:viewBox="0 0 65 101" draw:points="65,101 65,21 58,7 43,0 14,0 0,7">
          <text:p/>
        </draw:polyline>
        <draw:polyline draw:style-name="gr3" draw:text-style-name="P1" draw:layer="layout" svg:width="0.071cm" svg:height="0.064cm" svg:x="16.235cm" svg:y="5.114cm" svg:viewBox="0 0 72 65" draw:points="72,58 57,65 21,65 7,58 0,44 0,28 7,14 21,7 57,7 72,0">
          <text:p/>
        </draw:polyline>
        <draw:line draw:style-name="gr3" draw:text-style-name="P1" draw:layer="layout" svg:x1="16.478cm" svg:y1="5.179cm" svg:x2="16.557cm" svg:y2="5.078cm">
          <text:p/>
        </draw:line>
        <draw:line draw:style-name="gr3" draw:text-style-name="P1" draw:layer="layout" svg:x1="16.478cm" svg:y1="5.078cm" svg:x2="16.557cm" svg:y2="5.179cm">
          <text:p/>
        </draw:line>
        <draw:polyline draw:style-name="gr3" draw:text-style-name="P1" draw:layer="layout" svg:width="0.086cm" svg:height="0.15cm" svg:x="16.606cm" svg:y="5.028cm" svg:viewBox="0 0 87 151" draw:points="15,151 44,151 58,143 66,136 80,114 87,86 87,28 80,14 72,7 58,0 30,0 15,7 8,14 0,28 0,64 8,79 15,86 30,93 58,93 72,86 80,79 87,64">
          <text:p/>
        </draw:polyline>
        <draw:polyline draw:style-name="gr3" draw:text-style-name="P1" draw:layer="layout" svg:width="0.093cm" svg:height="0.15cm" svg:x="14.874cm" svg:y="2.887cm" svg:viewBox="0 0 94 151" draw:points="94,136 86,144 65,151 50,151 28,144 14,129 7,115 0,87 0,65 7,36 14,22 28,7 50,0 65,0 86,7 94,14">
          <text:p/>
        </draw:polyline>
        <draw:polyline draw:style-name="gr3" draw:text-style-name="P1" draw:layer="layout" svg:width="0.021cm" svg:height="0.15cm" svg:x="15.031cm" svg:y="2.887cm" svg:viewBox="0 0 22 151" draw:points="22,151 7,144 0,129 0,0">
          <text:p/>
        </draw:polyline>
        <draw:polyline draw:style-name="gr3" draw:text-style-name="P1" draw:layer="layout" svg:width="0.064cm" svg:height="0.1cm" svg:x="15.11cm" svg:y="2.937cm" svg:viewBox="0 0 65 101" draw:points="65,101 65,22 58,7 43,0 14,0 0,7">
          <text:p/>
        </draw:polyline>
        <draw:polyline draw:style-name="gr3" draw:text-style-name="P1" draw:layer="layout" svg:width="0.072cm" svg:height="0.064cm" svg:x="15.102cm" svg:y="2.973cm" svg:viewBox="0 0 73 65" draw:points="73,58 58,65 22,65 8,58 0,43 0,29 8,15 22,8 58,8 73,0">
          <text:p/>
        </draw:polyline>
        <draw:polyline draw:style-name="gr3" draw:text-style-name="P1" draw:layer="layout" svg:width="0.064cm" svg:height="0.1cm" svg:x="15.238cm" svg:y="2.937cm" svg:viewBox="0 0 65 101" draw:points="0,94 14,101 44,101 58,94 65,79 65,72 58,58 44,51 21,51 7,44 0,29 0,22 7,7 21,0 44,0 58,7">
          <text:p/>
        </draw:polyline>
        <draw:polyline draw:style-name="gr3" draw:text-style-name="P1" draw:layer="layout" svg:width="0.065cm" svg:height="0.1cm" svg:x="15.359cm" svg:y="2.937cm" svg:viewBox="0 0 66 101" draw:points="0,94 15,101 44,101 58,94 66,79 66,72 58,58 44,51 22,51 8,44 0,29 0,22 8,7 22,0 44,0 58,7">
          <text:p/>
        </draw:polyline>
        <draw:line draw:style-name="gr3" draw:text-style-name="P1" draw:layer="layout" svg:x1="15.689cm" svg:y1="3.038cm" svg:x2="15.638cm" svg:y2="2.965cm">
          <text:p/>
        </draw:line>
        <draw:polyline draw:style-name="gr3" draw:text-style-name="P1" draw:layer="layout" svg:width="0.086cm" svg:height="0.15cm" svg:x="15.602cm" svg:y="2.887cm" svg:viewBox="0 0 87 151" draw:points="0,151 0,0 57,0 72,7 79,14 87,29 87,51 79,65 72,72 57,79 0,79">
          <text:p/>
        </draw:polyline>
        <draw:polygon draw:style-name="gr3" draw:text-style-name="P1" draw:layer="layout" svg:width="0.078cm" svg:height="0.1cm" svg:x="15.745cm" svg:y="2.937cm" svg:viewBox="0 0 79 101" draw:points="29,101 14,94 8,86 0,72 0,29 8,15 14,7 29,0 51,0 65,7 73,15 79,29 79,72 73,86 65,94 51,101">
          <text:p/>
        </draw:polygon>
        <draw:polygon draw:style-name="gr3" draw:text-style-name="P1" draw:layer="layout" svg:width="0.078cm" svg:height="0.1cm" svg:x="15.881cm" svg:y="2.937cm" svg:viewBox="0 0 79 101" draw:points="28,101 14,94 7,86 0,72 0,29 7,15 14,7 28,0 50,0 64,7 72,15 79,29 79,72 72,86 64,94 50,101">
          <text:p/>
        </draw:polygon>
        <draw:line draw:style-name="gr3" draw:text-style-name="P1" draw:layer="layout" svg:x1="16.023cm" svg:y1="3.037cm" svg:x2="16.023cm" svg:y2="2.937cm">
          <text:p/>
        </draw:line>
        <draw:polyline draw:style-name="gr3" draw:text-style-name="P1" draw:layer="layout" svg:width="0.065cm" svg:height="0.1cm" svg:x="16.023cm" svg:y="2.937cm" svg:viewBox="0 0 66 101" draw:points="0,15 8,7 23,0 44,0 59,7 66,22 66,101">
          <text:p/>
        </draw:polyline>
        <draw:polyline draw:style-name="gr3" draw:text-style-name="P1" draw:layer="layout" svg:width="0.064cm" svg:height="0.1cm" svg:x="16.088cm" svg:y="2.937cm" svg:viewBox="0 0 65 101" draw:points="0,22 7,7 22,0 44,0 58,7 65,22 65,101">
          <text:p/>
        </draw:polyline>
        <draw:polyline draw:style-name="gr3" draw:text-style-name="P1" draw:layer="layout" svg:width="0.092cm" svg:height="0.15cm" svg:x="14.867cm" svg:y="3.128cm" svg:viewBox="0 0 93 151" draw:points="7,15 14,7 28,0 64,0 78,7 86,15 93,29 93,43 86,64 0,151 93,151">
          <text:p/>
        </draw:polyline>
        <draw:polygon draw:style-name="gr3" draw:text-style-name="P1" draw:layer="layout" svg:width="0.086cm" svg:height="0.15cm" svg:x="15.016cm" svg:y="3.128cm" svg:viewBox="0 0 87 151" draw:points="36,0 51,0 65,7 73,15 80,29 87,57 87,94 80,122 73,137 65,144 51,151 36,151 22,144 15,137 8,122 0,94 0,57 8,29 15,15 22,7">
          <text:p/>
        </draw:polygon>
        <draw:line draw:style-name="gr3" draw:text-style-name="P1" draw:layer="layout" svg:x1="15.152cm" svg:y1="3.279cm" svg:x2="15.232cm" svg:y2="3.178cm">
          <text:p/>
        </draw:line>
        <draw:line draw:style-name="gr3" draw:text-style-name="P1" draw:layer="layout" svg:x1="15.152cm" svg:y1="3.178cm" svg:x2="15.232cm" svg:y2="3.279cm">
          <text:p/>
        </draw:line>
        <draw:polyline draw:style-name="gr3" draw:text-style-name="P1" draw:layer="layout" svg:width="0.093cm" svg:height="0.15cm" svg:x="15.274cm" svg:y="3.128cm" svg:viewBox="0 0 94 151" draw:points="7,15 14,7 29,0 65,0 79,7 86,15 94,29 94,43 86,64 0,151 94,151">
          <text:p/>
        </draw:polyline>
        <draw:polyline draw:style-name="gr3" draw:text-style-name="P1" draw:layer="layout" svg:width="0.086cm" svg:height="0.15cm" svg:x="15.424cm" svg:y="3.128cm" svg:viewBox="0 0 87 151" draw:points="30,64 15,57 8,50 0,36 0,29 8,15 15,7 30,0 58,0 72,7 79,15 87,29 87,36 79,50 72,57 58,64 30,64 15,72 8,79 0,94 0,122 8,137 15,144 30,151 58,151 72,144 79,137 87,122 87,94 79,79 72,72 58,64">
          <text:p/>
        </draw:polyline>
        <draw:line draw:style-name="gr4" draw:text-style-name="P1" draw:layer="layout" svg:x1="19.7cm" svg:y1="15.098cm" svg:x2="19.7cm" svg:y2="14.748cm">
          <text:p/>
        </draw:line>
        <draw:line draw:style-name="gr4" draw:text-style-name="P1" draw:layer="layout" svg:x1="19.6cm" svg:y1="14.098cm" svg:x2="19.6cm" svg:y2="14.748cm">
          <text:p/>
        </draw:line>
        <draw:line draw:style-name="gr4" draw:text-style-name="P1" draw:layer="layout" svg:x1="19.6cm" svg:y1="14.748cm" svg:x2="19.7cm" svg:y2="14.748cm">
          <text:p/>
        </draw:line>
        <draw:line draw:style-name="gr4" draw:text-style-name="P1" draw:layer="layout" svg:x1="19.7cm" svg:y1="14.748cm" svg:x2="19.7cm" svg:y2="14.098cm">
          <text:p/>
        </draw:line>
        <draw:line draw:style-name="gr4" draw:text-style-name="P1" draw:layer="layout" svg:x1="19.7cm" svg:y1="14.098cm" svg:x2="19.6cm" svg:y2="14.098cm">
          <text:p/>
        </draw:line>
        <draw:polygon draw:style-name="gr5" draw:text-style-name="P2" draw:layer="layout" svg:width="0.1cm" svg:height="0.65cm" svg:x="19.6cm" svg:y="14.098cm" svg:viewBox="0 0 101 651" draw:points="0,0 101,0 101,651 0,651">
          <text:p/>
        </draw:polygon>
        <draw:line draw:style-name="gr4" draw:text-style-name="P1" draw:layer="layout" svg:x1="19.6cm" svg:y1="14.748cm" svg:x2="19.6cm" svg:y2="15.098cm">
          <text:p/>
        </draw:line>
        <draw:line draw:style-name="gr4" draw:text-style-name="P1" draw:layer="layout" svg:x1="19.6cm" svg:y1="15.098cm" svg:x2="19.6cm" svg:y2="15.448cm">
          <text:p/>
        </draw:line>
        <draw:line draw:style-name="gr4" draw:text-style-name="P1" draw:layer="layout" svg:x1="19.6cm" svg:y1="15.448cm" svg:x2="19.7cm" svg:y2="15.448cm">
          <text:p/>
        </draw:line>
        <draw:line draw:style-name="gr4" draw:text-style-name="P1" draw:layer="layout" svg:x1="19.7cm" svg:y1="15.448cm" svg:x2="19.7cm" svg:y2="15.098cm">
          <text:p/>
        </draw:line>
        <draw:line draw:style-name="gr4" draw:text-style-name="P1" draw:layer="layout" svg:x1="19.7cm" svg:y1="15.098cm" svg:x2="19.6cm" svg:y2="15.098cm">
          <text:p/>
        </draw:line>
        <draw:polygon draw:style-name="gr5" draw:text-style-name="P2" draw:layer="layout" svg:width="0.1cm" svg:height="0.35cm" svg:x="19.6cm" svg:y="15.098cm" svg:viewBox="0 0 101 351" draw:points="0,0 101,0 101,351 0,351">
          <text:p/>
        </draw:polygon>
        <draw:line draw:style-name="gr4" draw:text-style-name="P1" draw:layer="layout" svg:x1="19.65cm" svg:y1="12.398cm" svg:x2="19.65cm" svg:y2="7.848cm">
          <text:p/>
        </draw:line>
        <draw:line draw:style-name="gr4" draw:text-style-name="P1" draw:layer="layout" svg:x1="19.1cm" svg:y1="12.448cm" svg:x2="18.75cm" svg:y2="12.448cm">
          <text:p/>
        </draw:line>
        <draw:line draw:style-name="gr4" draw:text-style-name="P1" draw:layer="layout" svg:x1="18.25cm" svg:y1="12.348cm" svg:x2="18.25cm" svg:y2="12.448cm">
          <text:p/>
        </draw:line>
        <draw:line draw:style-name="gr4" draw:text-style-name="P1" draw:layer="layout" svg:x1="18.25cm" svg:y1="12.448cm" svg:x2="18.75cm" svg:y2="12.448cm">
          <text:p/>
        </draw:line>
        <draw:line draw:style-name="gr4" draw:text-style-name="P1" draw:layer="layout" svg:x1="18.75cm" svg:y1="12.448cm" svg:x2="18.75cm" svg:y2="12.348cm">
          <text:p/>
        </draw:line>
        <draw:line draw:style-name="gr4" draw:text-style-name="P1" draw:layer="layout" svg:x1="18.75cm" svg:y1="12.348cm" svg:x2="18.25cm" svg:y2="12.348cm">
          <text:p/>
        </draw:line>
        <draw:polygon draw:style-name="gr5" draw:text-style-name="P2" draw:layer="layout" svg:width="0.5cm" svg:height="0.1cm" svg:x="18.25cm" svg:y="12.348cm" svg:viewBox="0 0 501 101" draw:points="0,0 501,0 501,101 0,101">
          <text:p/>
        </draw:polygon>
        <draw:line draw:style-name="gr4" draw:text-style-name="P1" draw:layer="layout" svg:x1="17.8cm" svg:y1="13.448cm" svg:x2="17.8cm" svg:y2="13.548cm">
          <text:p/>
        </draw:line>
        <draw:line draw:style-name="gr4" draw:text-style-name="P1" draw:layer="layout" svg:x1="17.8cm" svg:y1="13.548cm" svg:x2="19.65cm" svg:y2="13.548cm">
          <text:p/>
        </draw:line>
        <draw:line draw:style-name="gr4" draw:text-style-name="P1" draw:layer="layout" svg:x1="19.65cm" svg:y1="13.548cm" svg:x2="19.65cm" svg:y2="13.448cm">
          <text:p/>
        </draw:line>
        <draw:line draw:style-name="gr4" draw:text-style-name="P1" draw:layer="layout" svg:x1="19.65cm" svg:y1="13.448cm" svg:x2="17.8cm" svg:y2="13.448cm">
          <text:p/>
        </draw:line>
        <draw:polygon draw:style-name="gr5" draw:text-style-name="P2" draw:layer="layout" svg:width="1.85cm" svg:height="0.1cm" svg:x="17.8cm" svg:y="13.448cm" svg:viewBox="0 0 1851 101" draw:points="0,0 1851,0 1851,101 0,101">
          <text:p/>
        </draw:polygon>
        <draw:line draw:style-name="gr4" draw:text-style-name="P1" draw:layer="layout" svg:x1="18.335cm" svg:y1="13.392cm" svg:x2="18.089cm" svg:y2="13.062cm">
          <text:p/>
        </draw:line>
        <draw:line draw:style-name="gr4" draw:text-style-name="P1" draw:layer="layout" svg:x1="19.1cm" svg:y1="12.348cm" svg:x2="19.1cm" svg:y2="12.448cm">
          <text:p/>
        </draw:line>
        <draw:line draw:style-name="gr4" draw:text-style-name="P1" draw:layer="layout" svg:x1="19.1cm" svg:y1="12.448cm" svg:x2="19.7cm" svg:y2="12.448cm">
          <text:p/>
        </draw:line>
        <draw:line draw:style-name="gr4" draw:text-style-name="P1" draw:layer="layout" svg:x1="19.7cm" svg:y1="12.448cm" svg:x2="19.7cm" svg:y2="12.348cm">
          <text:p/>
        </draw:line>
        <draw:line draw:style-name="gr4" draw:text-style-name="P1" draw:layer="layout" svg:x1="19.7cm" svg:y1="12.348cm" svg:x2="19.1cm" svg:y2="12.348cm">
          <text:p/>
        </draw:line>
        <draw:polygon draw:style-name="gr5" draw:text-style-name="P2" draw:layer="layout" svg:width="0.6cm" svg:height="0.1cm" svg:x="19.1cm" svg:y="12.348cm" svg:viewBox="0 0 601 101" draw:points="0,0 601,0 601,101 0,101">
          <text:p/>
        </draw:polygon>
        <draw:line draw:style-name="gr4" draw:text-style-name="P1" draw:layer="layout" svg:x1="19.6cm" svg:y1="12.348cm" svg:x2="19.6cm" svg:y2="12.598cm">
          <text:p/>
        </draw:line>
        <draw:line draw:style-name="gr4" draw:text-style-name="P1" draw:layer="layout" svg:x1="19.6cm" svg:y1="12.598cm" svg:x2="19.7cm" svg:y2="12.598cm">
          <text:p/>
        </draw:line>
        <draw:line draw:style-name="gr4" draw:text-style-name="P1" draw:layer="layout" svg:x1="19.7cm" svg:y1="12.598cm" svg:x2="19.7cm" svg:y2="12.348cm">
          <text:p/>
        </draw:line>
        <draw:line draw:style-name="gr4" draw:text-style-name="P1" draw:layer="layout" svg:x1="19.7cm" svg:y1="12.348cm" svg:x2="19.6cm" svg:y2="12.348cm">
          <text:p/>
        </draw:line>
        <draw:polygon draw:style-name="gr5" draw:text-style-name="P2" draw:layer="layout" svg:width="0.1cm" svg:height="0.25cm" svg:x="19.6cm" svg:y="12.348cm" svg:viewBox="0 0 101 251" draw:points="0,0 101,0 101,251 0,251">
          <text:p/>
        </draw:polygon>
        <draw:line draw:style-name="gr4" draw:text-style-name="P1" draw:layer="layout" svg:x1="23.15cm" svg:y1="14.348cm" svg:x2="24.2cm" svg:y2="14.348cm">
          <text:p/>
        </draw:line>
        <draw:line draw:style-name="gr4" draw:text-style-name="P1" draw:layer="layout" svg:x1="23.15cm" svg:y1="12.548cm" svg:x2="23.15cm" svg:y2="14.348cm">
          <text:p/>
        </draw:line>
        <draw:line draw:style-name="gr4" draw:text-style-name="P1" draw:layer="layout" svg:x1="23.001cm" svg:y1="16.074cm" svg:x2="22.2cm" svg:y2="15.923cm">
          <text:p/>
        </draw:line>
        <draw:line draw:style-name="gr4" draw:text-style-name="P1" draw:layer="layout" svg:x1="22.7cm" svg:y1="15.923cm" svg:x2="22.7cm" svg:y2="16.123cm">
          <text:p/>
        </draw:line>
        <draw:line draw:style-name="gr4" draw:text-style-name="P1" draw:layer="layout" svg:x1="23.15cm" svg:y1="12.548cm" svg:x2="24.2cm" svg:y2="12.548cm">
          <text:p/>
        </draw:line>
        <draw:line draw:style-name="gr4" draw:text-style-name="P1" draw:layer="layout" svg:x1="21.35cm" svg:y1="15.848cm" svg:x2="21.35cm" svg:y2="16.048cm">
          <text:p/>
        </draw:line>
        <draw:line draw:style-name="gr4" draw:text-style-name="P1" draw:layer="layout" svg:x1="21.901cm" svg:y1="16.049cm" svg:x2="21.1cm" svg:y2="15.898cm">
          <text:p/>
        </draw:line>
        <draw:line draw:style-name="gr4" draw:text-style-name="P1" draw:layer="layout" svg:x1="21.85cm" svg:y1="15.998cm" svg:x2="21.85cm" svg:y2="16.098cm">
          <text:p/>
        </draw:line>
        <draw:line draw:style-name="gr4" draw:text-style-name="P1" draw:layer="layout" svg:x1="21.538cm" svg:y1="16.072cm" svg:x2="21.838cm" svg:y2="16.072cm">
          <text:p/>
        </draw:line>
        <draw:line draw:style-name="gr4" draw:text-style-name="P1" draw:layer="layout" svg:x1="22.15cm" svg:y1="16.098cm" svg:x2="22.15cm" svg:y2="15.998cm">
          <text:p/>
        </draw:line>
        <draw:line draw:style-name="gr4" draw:text-style-name="P1" draw:layer="layout" svg:x1="22.15cm" svg:y1="15.998cm" svg:x2="21.85cm" svg:y2="15.998cm">
          <text:p/>
        </draw:line>
        <draw:polygon draw:style-name="gr5" draw:text-style-name="P2" draw:layer="layout" svg:width="0.3cm" svg:height="0.1cm" svg:x="21.85cm" svg:y="15.998cm" svg:viewBox="0 0 301 101" draw:points="0,0 301,0 301,101 0,101">
          <text:p/>
        </draw:polygon>
        <draw:line draw:style-name="gr4" draw:text-style-name="P1" draw:layer="layout" svg:x1="21.6cm" svg:y1="15.898cm" svg:x2="21.6cm" svg:y2="16.098cm">
          <text:p/>
        </draw:line>
        <draw:line draw:style-name="gr4" draw:text-style-name="P1" draw:layer="layout" svg:x1="22.45cm" svg:y1="15.873cm" svg:x2="22.45cm" svg:y2="16.073cm">
          <text:p/>
        </draw:line>
        <draw:line draw:style-name="gr4" draw:text-style-name="P1" draw:layer="layout" svg:x1="20.25cm" svg:y1="16.049cm" svg:x2="21.151cm" svg:y2="15.948cm">
          <text:p/>
        </draw:line>
        <draw:line draw:style-name="gr4" draw:text-style-name="P1" draw:layer="layout" svg:x1="20.75cm" svg:y1="15.898cm" svg:x2="20.75cm" svg:y2="16.048cm">
          <text:p/>
        </draw:line>
        <draw:line draw:style-name="gr4" draw:text-style-name="P1" draw:layer="layout" svg:x1="20.5cm" svg:y1="15.948cm" svg:x2="20.5cm" svg:y2="16.098cm">
          <text:p/>
        </draw:line>
        <draw:line draw:style-name="gr4" draw:text-style-name="P1" draw:layer="layout" svg:x1="19.6cm" svg:y1="13.748cm" svg:x2="19.6cm" svg:y2="14.098cm">
          <text:p/>
        </draw:line>
        <draw:line draw:style-name="gr4" draw:text-style-name="P1" draw:layer="layout" svg:x1="19.7cm" svg:y1="12.598cm" svg:x2="19.7cm" svg:y2="12.948cm">
          <text:p/>
        </draw:line>
        <draw:line draw:style-name="gr4" draw:text-style-name="P1" draw:layer="layout" svg:x1="19.7cm" svg:y1="14.098cm" svg:x2="19.7cm" svg:y2="13.748cm">
          <text:p/>
        </draw:line>
        <draw:line draw:style-name="gr4" draw:text-style-name="P1" draw:layer="layout" svg:x1="19.6cm" svg:y1="12.948cm" svg:x2="19.6cm" svg:y2="13.748cm">
          <text:p/>
        </draw:line>
        <draw:line draw:style-name="gr4" draw:text-style-name="P1" draw:layer="layout" svg:x1="19.6cm" svg:y1="13.748cm" svg:x2="19.7cm" svg:y2="13.748cm">
          <text:p/>
        </draw:line>
        <draw:line draw:style-name="gr4" draw:text-style-name="P1" draw:layer="layout" svg:x1="19.7cm" svg:y1="13.748cm" svg:x2="19.7cm" svg:y2="12.948cm">
          <text:p/>
        </draw:line>
        <draw:line draw:style-name="gr4" draw:text-style-name="P1" draw:layer="layout" svg:x1="19.7cm" svg:y1="12.948cm" svg:x2="19.6cm" svg:y2="12.948cm">
          <text:p/>
        </draw:line>
        <draw:polygon draw:style-name="gr5" draw:text-style-name="P2" draw:layer="layout" svg:width="0.1cm" svg:height="0.8cm" svg:x="19.6cm" svg:y="12.948cm" svg:viewBox="0 0 101 801" draw:points="0,0 101,0 101,801 0,801">
          <text:p/>
        </draw:polygon>
        <draw:line draw:style-name="gr4" draw:text-style-name="P1" draw:layer="layout" svg:x1="19.6cm" svg:y1="12.948cm" svg:x2="19.6cm" svg:y2="12.598cm">
          <text:p/>
        </draw:line>
        <draw:line draw:style-name="gr4" draw:text-style-name="P1" draw:layer="layout" svg:x1="23.251cm" svg:y1="1.948cm" svg:x2="22.05cm" svg:y2="2.199cm">
          <text:p/>
        </draw:line>
        <draw:path draw:style-name="gr4" draw:text-style-name="P1" draw:layer="layout" svg:width="0.092cm" svg:height="0.128cm" svg:x="20.25cm" svg:y="4.67cm" svg:viewBox="0 0 93 129" svg:d="M87 0c11 28 8 61-9 87s-47 42-78 42">
          <text:p/>
        </draw:path>
        <draw:line draw:style-name="gr4" draw:text-style-name="P1" draw:layer="layout" svg:x1="21.8cm" svg:y1="1.923cm" svg:x2="21.8cm" svg:y2="2.098cm">
          <text:p/>
        </draw:line>
        <draw:line draw:style-name="gr4" draw:text-style-name="P1" draw:layer="layout" svg:x1="18.44cm" svg:y1="4.448cm" svg:x2="18.44cm" svg:y2="4.548cm">
          <text:p/>
        </draw:line>
        <draw:line draw:style-name="gr4" draw:text-style-name="P1" draw:layer="layout" svg:x1="18.44cm" svg:y1="4.548cm" svg:x2="20cm" svg:y2="4.548cm">
          <text:p/>
        </draw:line>
        <draw:line draw:style-name="gr4" draw:text-style-name="P1" draw:layer="layout" svg:x1="20cm" svg:y1="4.548cm" svg:x2="20cm" svg:y2="4.448cm">
          <text:p/>
        </draw:line>
        <draw:line draw:style-name="gr4" draw:text-style-name="P1" draw:layer="layout" svg:x1="20cm" svg:y1="4.448cm" svg:x2="18.44cm" svg:y2="4.448cm">
          <text:p/>
        </draw:line>
        <draw:polygon draw:style-name="gr5" draw:text-style-name="P2" draw:layer="layout" svg:width="1.56cm" svg:height="0.1cm" svg:x="18.44cm" svg:y="4.448cm" svg:viewBox="0 0 1561 101" draw:points="0,0 1561,0 1561,101 0,101">
          <text:p/>
        </draw:polygon>
        <draw:line draw:style-name="gr4" draw:text-style-name="P1" draw:layer="layout" svg:x1="20.3cm" svg:y1="1.898cm" svg:x2="20.3cm" svg:y2="1.998cm">
          <text:p/>
        </draw:line>
        <draw:line draw:style-name="gr4" draw:text-style-name="P1" draw:layer="layout" svg:x1="20.3cm" svg:y1="1.998cm" svg:x2="20.95cm" svg:y2="1.998cm">
          <text:p/>
        </draw:line>
        <draw:line draw:style-name="gr4" draw:text-style-name="P1" draw:layer="layout" svg:x1="20.95cm" svg:y1="1.998cm" svg:x2="20.95cm" svg:y2="1.898cm">
          <text:p/>
        </draw:line>
        <draw:line draw:style-name="gr4" draw:text-style-name="P1" draw:layer="layout" svg:x1="20.95cm" svg:y1="1.898cm" svg:x2="20.3cm" svg:y2="1.898cm">
          <text:p/>
        </draw:line>
        <draw:polygon draw:style-name="gr5" draw:text-style-name="P2" draw:layer="layout" svg:width="0.65cm" svg:height="0.1cm" svg:x="20.3cm" svg:y="1.898cm" svg:viewBox="0 0 651 101" draw:points="0,0 651,0 651,101 0,101">
          <text:p/>
        </draw:polygon>
        <draw:line draw:style-name="gr4" draw:text-style-name="P1" draw:layer="layout" svg:x1="20.3cm" svg:y1="1.898cm" svg:x2="19.85cm" svg:y2="1.898cm">
          <text:p/>
        </draw:line>
        <draw:line draw:style-name="gr4" draw:text-style-name="P1" draw:layer="layout" svg:x1="20.45cm" svg:y1="4.448cm" svg:x2="20.45cm" svg:y2="4.548cm">
          <text:p/>
        </draw:line>
        <draw:line draw:style-name="gr4" draw:text-style-name="P1" draw:layer="layout" svg:x1="20.45cm" svg:y1="4.548cm" svg:x2="20.95cm" svg:y2="4.548cm">
          <text:p/>
        </draw:line>
        <draw:line draw:style-name="gr4" draw:text-style-name="P1" draw:layer="layout" svg:x1="20.95cm" svg:y1="4.548cm" svg:x2="20.95cm" svg:y2="4.448cm">
          <text:p/>
        </draw:line>
        <draw:line draw:style-name="gr4" draw:text-style-name="P1" draw:layer="layout" svg:x1="20.95cm" svg:y1="4.448cm" svg:x2="20.45cm" svg:y2="4.448cm">
          <text:p/>
        </draw:line>
        <draw:polygon draw:style-name="gr5" draw:text-style-name="P2" draw:layer="layout" svg:width="0.5cm" svg:height="0.1cm" svg:x="20.45cm" svg:y="4.448cm" svg:viewBox="0 0 501 101" draw:points="0,0 501,0 501,101 0,101">
          <text:p/>
        </draw:polygon>
        <draw:line draw:style-name="gr4" draw:text-style-name="P1" draw:layer="layout" svg:x1="24.15cm" svg:y1="1.898cm" svg:x2="24.15cm" svg:y2="16.098cm">
          <text:p/>
        </draw:line>
        <draw:line draw:style-name="gr4" draw:text-style-name="P1" draw:layer="layout" svg:x1="23.838cm" svg:y1="16.072cm" svg:x2="23.938cm" svg:y2="16.072cm">
          <text:p/>
        </draw:line>
        <draw:line draw:style-name="gr4" draw:text-style-name="P1" draw:layer="layout" svg:x1="24.25cm" svg:y1="16.098cm" svg:x2="24.25cm" svg:y2="1.898cm">
          <text:p/>
        </draw:line>
        <draw:line draw:style-name="gr4" draw:text-style-name="P1" draw:layer="layout" svg:x1="24.25cm" svg:y1="1.898cm" svg:x2="24.15cm" svg:y2="1.898cm">
          <text:p/>
        </draw:line>
        <draw:polygon draw:style-name="gr5" draw:text-style-name="P2" draw:layer="layout" svg:width="0.1cm" svg:height="14.2cm" svg:x="24.15cm" svg:y="1.898cm" svg:viewBox="0 0 101 14201" draw:points="0,0 101,0 101,14201 0,14201">
          <text:p/>
        </draw:polygon>
        <draw:line draw:style-name="gr4" draw:text-style-name="P1" draw:layer="layout" svg:x1="23.15cm" svg:y1="10.248cm" svg:x2="23.15cm" svg:y2="12.048cm">
          <text:p/>
        </draw:line>
        <draw:line draw:style-name="gr4" draw:text-style-name="P1" draw:layer="layout" svg:x1="24.225cm" svg:y1="12.048cm" svg:x2="23.15cm" svg:y2="12.048cm">
          <text:p/>
        </draw:line>
        <draw:line draw:style-name="gr4" draw:text-style-name="P1" draw:layer="layout" svg:x1="24.2cm" svg:y1="10.248cm" svg:x2="23.15cm" svg:y2="10.248cm">
          <text:p/>
        </draw:line>
        <draw:line draw:style-name="gr4" draw:text-style-name="P1" draw:layer="layout" svg:x1="22.9cm" svg:y1="15.998cm" svg:x2="22.9cm" svg:y2="16.098cm">
          <text:p/>
        </draw:line>
        <draw:line draw:style-name="gr4" draw:text-style-name="P1" draw:layer="layout" svg:x1="22.588cm" svg:y1="16.072cm" svg:x2="23.938cm" svg:y2="16.072cm">
          <text:p/>
        </draw:line>
        <draw:line draw:style-name="gr4" draw:text-style-name="P1" draw:layer="layout" svg:x1="24.25cm" svg:y1="16.098cm" svg:x2="24.25cm" svg:y2="15.998cm">
          <text:p/>
        </draw:line>
        <draw:line draw:style-name="gr4" draw:text-style-name="P1" draw:layer="layout" svg:x1="24.25cm" svg:y1="15.998cm" svg:x2="22.9cm" svg:y2="15.998cm">
          <text:p/>
        </draw:line>
        <draw:polygon draw:style-name="gr5" draw:text-style-name="P2" draw:layer="layout" svg:width="1.35cm" svg:height="0.1cm" svg:x="22.9cm" svg:y="15.998cm" svg:viewBox="0 0 1351 101" draw:points="0,0 1351,0 1351,101 0,101">
          <text:p/>
        </draw:polygon>
        <draw:line draw:style-name="gr4" draw:text-style-name="P1" draw:layer="layout" svg:x1="19.3cm" svg:y1="5.398cm" svg:x2="19.3cm" svg:y2="5.498cm">
          <text:p/>
        </draw:line>
        <draw:line draw:style-name="gr4" draw:text-style-name="P1" draw:layer="layout" svg:x1="19.3cm" svg:y1="5.498cm" svg:x2="19.4cm" svg:y2="5.498cm">
          <text:p/>
        </draw:line>
        <draw:line draw:style-name="gr4" draw:text-style-name="P1" draw:layer="layout" svg:x1="19.4cm" svg:y1="5.498cm" svg:x2="19.4cm" svg:y2="5.398cm">
          <text:p/>
        </draw:line>
        <draw:line draw:style-name="gr4" draw:text-style-name="P1" draw:layer="layout" svg:x1="19.4cm" svg:y1="5.398cm" svg:x2="19.3cm" svg:y2="5.398cm">
          <text:p/>
        </draw:line>
        <draw:polygon draw:style-name="gr5" draw:text-style-name="P2" draw:layer="layout" svg:width="0.1cm" svg:height="0.1cm" svg:x="19.3cm" svg:y="5.398cm" svg:viewBox="0 0 101 101" draw:points="0,0 101,0 101,101 0,101">
          <text:p/>
        </draw:polygon>
        <draw:line draw:style-name="gr4" draw:text-style-name="P1" draw:layer="layout" svg:x1="16.822cm" svg:y1="4.453cm" svg:x2="16.822cm" svg:y2="4.553cm">
          <text:p/>
        </draw:line>
        <draw:line draw:style-name="gr4" draw:text-style-name="P1" draw:layer="layout" svg:x1="16.822cm" svg:y1="4.553cm" svg:x2="17.887cm" svg:y2="4.553cm">
          <text:p/>
        </draw:line>
        <draw:line draw:style-name="gr4" draw:text-style-name="P1" draw:layer="layout" svg:x1="17.887cm" svg:y1="4.553cm" svg:x2="17.887cm" svg:y2="4.453cm">
          <text:p/>
        </draw:line>
        <draw:line draw:style-name="gr4" draw:text-style-name="P1" draw:layer="layout" svg:x1="17.887cm" svg:y1="4.453cm" svg:x2="16.822cm" svg:y2="4.453cm">
          <text:p/>
        </draw:line>
        <draw:polygon draw:style-name="gr5" draw:text-style-name="P2" draw:layer="layout" svg:width="1.065cm" svg:height="0.1cm" svg:x="16.822cm" svg:y="4.453cm" svg:viewBox="0 0 1066 101" draw:points="0,0 1066,0 1066,101 0,101">
          <text:p/>
        </draw:polygon>
        <draw:line draw:style-name="gr4" draw:text-style-name="P1" draw:layer="layout" svg:x1="17.845cm" svg:y1="4.503cm" svg:x2="18.296cm" svg:y2="4.804cm">
          <text:p/>
        </draw:line>
        <draw:path draw:style-name="gr4" draw:text-style-name="P1" draw:layer="layout" svg:width="0.092cm" svg:height="0.128cm" svg:x="18.218cm" svg:y="4.716cm" svg:viewBox="0 0 93 129" svg:d="M87 0c11 29 8 62-9 88-17 25-47 41-78 41">
          <text:p/>
        </draw:path>
        <draw:line draw:style-name="gr4" draw:text-style-name="P1" draw:layer="layout" svg:x1="17.75cm" svg:y1="5.398cm" svg:x2="17.75cm" svg:y2="5.498cm">
          <text:p/>
        </draw:line>
        <draw:line draw:style-name="gr4" draw:text-style-name="P1" draw:layer="layout" svg:x1="17.75cm" svg:y1="5.498cm" svg:x2="17.85cm" svg:y2="5.498cm">
          <text:p/>
        </draw:line>
        <draw:line draw:style-name="gr4" draw:text-style-name="P1" draw:layer="layout" svg:x1="17.85cm" svg:y1="5.498cm" svg:x2="17.85cm" svg:y2="5.398cm">
          <text:p/>
        </draw:line>
        <draw:line draw:style-name="gr4" draw:text-style-name="P1" draw:layer="layout" svg:x1="17.85cm" svg:y1="5.398cm" svg:x2="17.75cm" svg:y2="5.398cm">
          <text:p/>
        </draw:line>
        <draw:polygon draw:style-name="gr5" draw:text-style-name="P2" draw:layer="layout" svg:width="0.1cm" svg:height="0.1cm" svg:x="17.75cm" svg:y="5.398cm" svg:viewBox="0 0 101 101" draw:points="0,0 101,0 101,101 0,101">
          <text:p/>
        </draw:polygon>
        <draw:path draw:style-name="gr4" draw:text-style-name="P1" draw:layer="layout" svg:width="0.092cm" svg:height="0.128cm" svg:x="14.6cm" svg:y="4.72cm" svg:viewBox="0 0 93 129" svg:d="M86 0c12 29 9 62-8 88-19 26-47 41-78 41">
          <text:p/>
        </draw:path>
        <draw:line draw:style-name="gr4" draw:text-style-name="P1" draw:layer="layout" svg:x1="16.78cm" svg:y1="1.898cm" svg:x2="16.18cm" svg:y2="1.898cm">
          <text:p/>
        </draw:line>
        <draw:path draw:style-name="gr4" draw:text-style-name="P1" draw:layer="layout" svg:width="0.092cm" svg:height="0.128cm" svg:x="16.63cm" svg:y="4.72cm" svg:viewBox="0 0 93 129" svg:d="M86 0c12 29 9 62-8 88-18 25-47 41-78 41">
          <text:p/>
        </draw:path>
        <draw:line draw:style-name="gr4" draw:text-style-name="P1" draw:layer="layout" svg:x1="15.15cm" svg:y1="1.898cm" svg:x2="14.4cm" svg:y2="1.898cm">
          <text:p/>
        </draw:line>
        <draw:line draw:style-name="gr4" draw:text-style-name="P1" draw:layer="layout" svg:x1="16cm" svg:y1="5.398cm" svg:x2="16cm" svg:y2="5.498cm">
          <text:p/>
        </draw:line>
        <draw:line draw:style-name="gr4" draw:text-style-name="P1" draw:layer="layout" svg:x1="16cm" svg:y1="5.498cm" svg:x2="16.1cm" svg:y2="5.498cm">
          <text:p/>
        </draw:line>
        <draw:line draw:style-name="gr4" draw:text-style-name="P1" draw:layer="layout" svg:x1="16.1cm" svg:y1="5.498cm" svg:x2="16.1cm" svg:y2="5.398cm">
          <text:p/>
        </draw:line>
        <draw:line draw:style-name="gr4" draw:text-style-name="P1" draw:layer="layout" svg:x1="16.1cm" svg:y1="5.398cm" svg:x2="16cm" svg:y2="5.398cm">
          <text:p/>
        </draw:line>
        <draw:polygon draw:style-name="gr5" draw:text-style-name="P2" draw:layer="layout" svg:width="0.1cm" svg:height="0.1cm" svg:x="16cm" svg:y="5.398cm" svg:viewBox="0 0 101 101" draw:points="0,0 101,0 101,101 0,101">
          <text:p/>
        </draw:polygon>
        <draw:line draw:style-name="gr4" draw:text-style-name="P1" draw:layer="layout" svg:x1="20.85cm" svg:y1="5.398cm" svg:x2="20.85cm" svg:y2="5.498cm">
          <text:p/>
        </draw:line>
        <draw:line draw:style-name="gr4" draw:text-style-name="P1" draw:layer="layout" svg:x1="20.85cm" svg:y1="5.498cm" svg:x2="20.95cm" svg:y2="5.498cm">
          <text:p/>
        </draw:line>
        <draw:line draw:style-name="gr4" draw:text-style-name="P1" draw:layer="layout" svg:x1="20.95cm" svg:y1="5.498cm" svg:x2="20.95cm" svg:y2="5.398cm">
          <text:p/>
        </draw:line>
        <draw:line draw:style-name="gr4" draw:text-style-name="P1" draw:layer="layout" svg:x1="20.95cm" svg:y1="5.398cm" svg:x2="20.85cm" svg:y2="5.398cm">
          <text:p/>
        </draw:line>
        <draw:polygon draw:style-name="gr5" draw:text-style-name="P2" draw:layer="layout" svg:width="0.1cm" svg:height="0.1cm" svg:x="20.85cm" svg:y="5.398cm" svg:viewBox="0 0 101 101" draw:points="0,0 101,0 101,101 0,101">
          <text:p/>
        </draw:polygon>
        <draw:line draw:style-name="gr4" draw:text-style-name="P1" draw:layer="layout" svg:x1="24.2cm" svg:y1="4.548cm" svg:x2="23.15cm" svg:y2="4.548cm">
          <text:p/>
        </draw:line>
        <draw:line draw:style-name="gr4" draw:text-style-name="P1" draw:layer="layout" svg:x1="23.15cm" svg:y1="4.548cm" svg:x2="23.15cm" svg:y2="6.348cm">
          <text:p/>
        </draw:line>
        <draw:line draw:style-name="gr4" draw:text-style-name="P1" draw:layer="layout" svg:x1="23.15cm" svg:y1="6.348cm" svg:x2="24.2cm" svg:y2="6.348cm">
          <text:p/>
        </draw:line>
        <draw:line draw:style-name="gr4" draw:text-style-name="P1" draw:layer="layout" svg:x1="23.2cm" svg:y1="1.898cm" svg:x2="23.2cm" svg:y2="1.998cm">
          <text:p/>
        </draw:line>
        <draw:line draw:style-name="gr4" draw:text-style-name="P1" draw:layer="layout" svg:x1="23.2cm" svg:y1="1.998cm" svg:x2="24.25cm" svg:y2="1.998cm">
          <text:p/>
        </draw:line>
        <draw:line draw:style-name="gr4" draw:text-style-name="P1" draw:layer="layout" svg:x1="24.25cm" svg:y1="1.998cm" svg:x2="24.25cm" svg:y2="1.898cm">
          <text:p/>
        </draw:line>
        <draw:line draw:style-name="gr4" draw:text-style-name="P1" draw:layer="layout" svg:x1="24.25cm" svg:y1="1.898cm" svg:x2="23.2cm" svg:y2="1.898cm">
          <text:p/>
        </draw:line>
        <draw:polygon draw:style-name="gr5" draw:text-style-name="P2" draw:layer="layout" svg:width="1.05cm" svg:height="0.1cm" svg:x="23.2cm" svg:y="1.898cm" svg:viewBox="0 0 1051 101" draw:points="0,0 1051,0 1051,101 0,101">
          <text:p/>
        </draw:polygon>
        <draw:line draw:style-name="gr4" draw:text-style-name="P1" draw:layer="layout" svg:x1="22.5cm" svg:y1="1.998cm" svg:x2="22.5cm" svg:y2="2.198cm">
          <text:p/>
        </draw:line>
        <draw:line draw:style-name="gr4" draw:text-style-name="P1" draw:layer="layout" svg:x1="20.9cm" svg:y1="1.948cm" svg:x2="22.301cm" svg:y2="2.049cm">
          <text:p/>
        </draw:line>
        <draw:line draw:style-name="gr4" draw:text-style-name="P1" draw:layer="layout" svg:x1="20.85cm" svg:y1="1.898cm" svg:x2="20.85cm" svg:y2="4.548cm">
          <text:p/>
        </draw:line>
        <draw:line draw:style-name="gr4" draw:text-style-name="P1" draw:layer="layout" svg:x1="20.85cm" svg:y1="4.548cm" svg:x2="20.95cm" svg:y2="4.548cm">
          <text:p/>
        </draw:line>
        <draw:line draw:style-name="gr4" draw:text-style-name="P1" draw:layer="layout" svg:x1="20.95cm" svg:y1="4.548cm" svg:x2="20.95cm" svg:y2="1.898cm">
          <text:p/>
        </draw:line>
        <draw:line draw:style-name="gr4" draw:text-style-name="P1" draw:layer="layout" svg:x1="20.95cm" svg:y1="1.898cm" svg:x2="20.85cm" svg:y2="1.898cm">
          <text:p/>
        </draw:line>
        <draw:polygon draw:style-name="gr5" draw:text-style-name="P2" draw:layer="layout" svg:width="0.1cm" svg:height="2.65cm" svg:x="20.85cm" svg:y="1.898cm" svg:viewBox="0 0 101 2651" draw:points="0,0 101,0 101,2651 0,2651">
          <text:p/>
        </draw:polygon>
        <draw:line draw:style-name="gr4" draw:text-style-name="P1" draw:layer="layout" svg:x1="22.85cm" svg:y1="1.948cm" svg:x2="22.85cm" svg:y2="2.148cm">
          <text:p/>
        </draw:line>
        <draw:line draw:style-name="gr4" draw:text-style-name="P1" draw:layer="layout" svg:x1="21.35cm" svg:y1="1.898cm" svg:x2="21.35cm" svg:y2="2.073cm">
          <text:p/>
        </draw:line>
        <draw:line draw:style-name="gr4" draw:text-style-name="P1" draw:layer="layout" svg:x1="10.85cm" svg:y1="1.898cm" svg:x2="11.3cm" svg:y2="1.898cm">
          <text:p/>
        </draw:line>
        <draw:line draw:style-name="gr4" draw:text-style-name="P1" draw:layer="layout" svg:x1="11.25cm" svg:y1="4.448cm" svg:x2="11.25cm" svg:y2="4.548cm">
          <text:p/>
        </draw:line>
        <draw:line draw:style-name="gr4" draw:text-style-name="P1" draw:layer="layout" svg:x1="11.25cm" svg:y1="4.548cm" svg:x2="12.6cm" svg:y2="4.548cm">
          <text:p/>
        </draw:line>
        <draw:line draw:style-name="gr4" draw:text-style-name="P1" draw:layer="layout" svg:x1="12.6cm" svg:y1="4.548cm" svg:x2="12.6cm" svg:y2="4.448cm">
          <text:p/>
        </draw:line>
        <draw:line draw:style-name="gr4" draw:text-style-name="P1" draw:layer="layout" svg:x1="12.6cm" svg:y1="4.448cm" svg:x2="11.25cm" svg:y2="4.448cm">
          <text:p/>
        </draw:line>
        <draw:polygon draw:style-name="gr5" draw:text-style-name="P2" draw:layer="layout" svg:width="1.35cm" svg:height="0.1cm" svg:x="11.25cm" svg:y="4.448cm" svg:viewBox="0 0 1351 101" draw:points="0,0 1351,0 1351,101 0,101">
          <text:p/>
        </draw:polygon>
        <draw:line draw:style-name="gr4" draw:text-style-name="P1" draw:layer="layout" svg:x1="11.3cm" svg:y1="1.998cm" svg:x2="10.85cm" svg:y2="1.998cm">
          <text:p/>
        </draw:line>
        <draw:line draw:style-name="gr4" draw:text-style-name="P1" draw:layer="layout" svg:x1="10.15cm" svg:y1="4.448cm" svg:x2="10.15cm" svg:y2="4.548cm">
          <text:p/>
        </draw:line>
        <draw:line draw:style-name="gr4" draw:text-style-name="P1" draw:layer="layout" svg:x1="10.15cm" svg:y1="4.548cm" svg:x2="10.7cm" svg:y2="4.548cm">
          <text:p/>
        </draw:line>
        <draw:line draw:style-name="gr4" draw:text-style-name="P1" draw:layer="layout" svg:x1="10.7cm" svg:y1="4.548cm" svg:x2="10.7cm" svg:y2="4.448cm">
          <text:p/>
        </draw:line>
        <draw:line draw:style-name="gr4" draw:text-style-name="P1" draw:layer="layout" svg:x1="10.7cm" svg:y1="4.448cm" svg:x2="10.15cm" svg:y2="4.448cm">
          <text:p/>
        </draw:line>
        <draw:polygon draw:style-name="gr5" draw:text-style-name="P2" draw:layer="layout" svg:width="0.55cm" svg:height="0.1cm" svg:x="10.15cm" svg:y="4.448cm" svg:viewBox="0 0 551 101" draw:points="0,0 551,0 551,101 0,101">
          <text:p/>
        </draw:polygon>
        <draw:line draw:style-name="gr4" draw:text-style-name="P1" draw:layer="layout" svg:x1="11.3cm" svg:y1="1.898cm" svg:x2="11.3cm" svg:y2="1.998cm">
          <text:p/>
        </draw:line>
        <draw:line draw:style-name="gr4" draw:text-style-name="P1" draw:layer="layout" svg:x1="11.3cm" svg:y1="1.998cm" svg:x2="12.45cm" svg:y2="1.998cm">
          <text:p/>
        </draw:line>
        <draw:line draw:style-name="gr4" draw:text-style-name="P1" draw:layer="layout" svg:x1="12.45cm" svg:y1="1.998cm" svg:x2="12.45cm" svg:y2="1.898cm">
          <text:p/>
        </draw:line>
        <draw:line draw:style-name="gr4" draw:text-style-name="P1" draw:layer="layout" svg:x1="12.45cm" svg:y1="1.898cm" svg:x2="11.3cm" svg:y2="1.898cm">
          <text:p/>
        </draw:line>
        <draw:polygon draw:style-name="gr5" draw:text-style-name="P2" draw:layer="layout" svg:width="1.15cm" svg:height="0.1cm" svg:x="11.3cm" svg:y="1.898cm" svg:viewBox="0 0 1151 101" draw:points="0,0 1151,0 1151,101 0,101">
          <text:p/>
        </draw:polygon>
        <draw:line draw:style-name="gr4" draw:text-style-name="P1" draw:layer="layout" svg:x1="10.2cm" svg:y1="5.448cm" svg:x2="20.9cm" svg:y2="5.448cm">
          <text:p/>
        </draw:line>
        <draw:line draw:style-name="gr4" draw:text-style-name="P1" draw:layer="layout" svg:x1="11.4cm" svg:y1="5.398cm" svg:x2="11.4cm" svg:y2="5.498cm">
          <text:p/>
        </draw:line>
        <draw:line draw:style-name="gr4" draw:text-style-name="P1" draw:layer="layout" svg:x1="11.4cm" svg:y1="5.498cm" svg:x2="11.5cm" svg:y2="5.498cm">
          <text:p/>
        </draw:line>
        <draw:line draw:style-name="gr4" draw:text-style-name="P1" draw:layer="layout" svg:x1="11.5cm" svg:y1="5.498cm" svg:x2="11.5cm" svg:y2="5.398cm">
          <text:p/>
        </draw:line>
        <draw:line draw:style-name="gr4" draw:text-style-name="P1" draw:layer="layout" svg:x1="11.5cm" svg:y1="5.398cm" svg:x2="11.4cm" svg:y2="5.398cm">
          <text:p/>
        </draw:line>
        <draw:polygon draw:style-name="gr5" draw:text-style-name="P2" draw:layer="layout" svg:width="0.1cm" svg:height="0.1cm" svg:x="11.4cm" svg:y="5.398cm" svg:viewBox="0 0 101 101" draw:points="0,0 101,0 101,101 0,101">
          <text:p/>
        </draw:polygon>
        <draw:line draw:style-name="gr6" draw:text-style-name="P1" draw:layer="layout" svg:x1="10.65cm" svg:y1="10.098cm" svg:x2="10.652cm" svg:y2="10.098cm">
          <text:p/>
        </draw:line>
        <draw:line draw:style-name="gr6" draw:text-style-name="P1" draw:layer="layout" svg:x1="10.692cm" svg:y1="10.098cm" svg:x2="10.694cm" svg:y2="10.098cm">
          <text:p/>
        </draw:line>
        <draw:line draw:style-name="gr6" draw:text-style-name="P1" draw:layer="layout" svg:x1="10.734cm" svg:y1="10.098cm" svg:x2="10.736cm" svg:y2="10.098cm">
          <text:p/>
        </draw:line>
        <draw:line draw:style-name="gr6" draw:text-style-name="P1" draw:layer="layout" svg:x1="10.776cm" svg:y1="10.098cm" svg:x2="10.778cm" svg:y2="10.098cm">
          <text:p/>
        </draw:line>
        <draw:line draw:style-name="gr6" draw:text-style-name="P1" draw:layer="layout" svg:x1="10.818cm" svg:y1="10.098cm" svg:x2="10.82cm" svg:y2="10.098cm">
          <text:p/>
        </draw:line>
        <draw:line draw:style-name="gr6" draw:text-style-name="P1" draw:layer="layout" svg:x1="10.86cm" svg:y1="10.098cm" svg:x2="10.862cm" svg:y2="10.098cm">
          <text:p/>
        </draw:line>
        <draw:line draw:style-name="gr6" draw:text-style-name="P1" draw:layer="layout" svg:x1="10.902cm" svg:y1="10.098cm" svg:x2="10.904cm" svg:y2="10.098cm">
          <text:p/>
        </draw:line>
        <draw:line draw:style-name="gr6" draw:text-style-name="P1" draw:layer="layout" svg:x1="10.944cm" svg:y1="10.098cm" svg:x2="10.946cm" svg:y2="10.098cm">
          <text:p/>
        </draw:line>
        <draw:line draw:style-name="gr6" draw:text-style-name="P1" draw:layer="layout" svg:x1="10.986cm" svg:y1="10.098cm" svg:x2="10.988cm" svg:y2="10.098cm">
          <text:p/>
        </draw:line>
        <draw:line draw:style-name="gr6" draw:text-style-name="P1" draw:layer="layout" svg:x1="11.028cm" svg:y1="10.098cm" svg:x2="11.03cm" svg:y2="10.098cm">
          <text:p/>
        </draw:line>
        <draw:line draw:style-name="gr6" draw:text-style-name="P1" draw:layer="layout" svg:x1="11.07cm" svg:y1="10.098cm" svg:x2="11.072cm" svg:y2="10.098cm">
          <text:p/>
        </draw:line>
        <draw:line draw:style-name="gr6" draw:text-style-name="P1" draw:layer="layout" svg:x1="11.112cm" svg:y1="10.098cm" svg:x2="11.114cm" svg:y2="10.098cm">
          <text:p/>
        </draw:line>
        <draw:line draw:style-name="gr6" draw:text-style-name="P1" draw:layer="layout" svg:x1="11.154cm" svg:y1="10.098cm" svg:x2="11.156cm" svg:y2="10.098cm">
          <text:p/>
        </draw:line>
        <draw:line draw:style-name="gr6" draw:text-style-name="P1" draw:layer="layout" svg:x1="11.196cm" svg:y1="10.098cm" svg:x2="11.198cm" svg:y2="10.098cm">
          <text:p/>
        </draw:line>
        <draw:line draw:style-name="gr6" draw:text-style-name="P1" draw:layer="layout" svg:x1="11.238cm" svg:y1="10.098cm" svg:x2="11.24cm" svg:y2="10.098cm">
          <text:p/>
        </draw:line>
        <draw:line draw:style-name="gr6" draw:text-style-name="P1" draw:layer="layout" svg:x1="11.28cm" svg:y1="10.098cm" svg:x2="11.282cm" svg:y2="10.098cm">
          <text:p/>
        </draw:line>
        <draw:line draw:style-name="gr6" draw:text-style-name="P1" draw:layer="layout" svg:x1="11.322cm" svg:y1="10.098cm" svg:x2="11.324cm" svg:y2="10.098cm">
          <text:p/>
        </draw:line>
        <draw:line draw:style-name="gr6" draw:text-style-name="P1" draw:layer="layout" svg:x1="11.364cm" svg:y1="10.098cm" svg:x2="11.366cm" svg:y2="10.098cm">
          <text:p/>
        </draw:line>
        <draw:line draw:style-name="gr6" draw:text-style-name="P1" draw:layer="layout" svg:x1="11.406cm" svg:y1="10.098cm" svg:x2="11.408cm" svg:y2="10.098cm">
          <text:p/>
        </draw:line>
        <draw:line draw:style-name="gr6" draw:text-style-name="P1" draw:layer="layout" svg:x1="11.448cm" svg:y1="10.098cm" svg:x2="11.45cm" svg:y2="10.098cm">
          <text:p/>
        </draw:line>
        <draw:line draw:style-name="gr6" draw:text-style-name="P1" draw:layer="layout" svg:x1="11.49cm" svg:y1="10.098cm" svg:x2="11.492cm" svg:y2="10.098cm">
          <text:p/>
        </draw:line>
        <draw:line draw:style-name="gr6" draw:text-style-name="P1" draw:layer="layout" svg:x1="11.532cm" svg:y1="10.098cm" svg:x2="11.534cm" svg:y2="10.098cm">
          <text:p/>
        </draw:line>
        <draw:line draw:style-name="gr6" draw:text-style-name="P1" draw:layer="layout" svg:x1="11.574cm" svg:y1="10.098cm" svg:x2="11.576cm" svg:y2="10.098cm">
          <text:p/>
        </draw:line>
        <draw:line draw:style-name="gr6" draw:text-style-name="P1" draw:layer="layout" svg:x1="11.616cm" svg:y1="10.098cm" svg:x2="11.618cm" svg:y2="10.098cm">
          <text:p/>
        </draw:line>
        <draw:line draw:style-name="gr6" draw:text-style-name="P1" draw:layer="layout" svg:x1="11.658cm" svg:y1="10.098cm" svg:x2="11.66cm" svg:y2="10.098cm">
          <text:p/>
        </draw:line>
        <draw:line draw:style-name="gr6" draw:text-style-name="P1" draw:layer="layout" svg:x1="11.7cm" svg:y1="10.098cm" svg:x2="11.702cm" svg:y2="10.098cm">
          <text:p/>
        </draw:line>
        <draw:line draw:style-name="gr6" draw:text-style-name="P1" draw:layer="layout" svg:x1="11.742cm" svg:y1="10.098cm" svg:x2="11.744cm" svg:y2="10.098cm">
          <text:p/>
        </draw:line>
        <draw:line draw:style-name="gr6" draw:text-style-name="P1" draw:layer="layout" svg:x1="11.784cm" svg:y1="10.098cm" svg:x2="11.786cm" svg:y2="10.098cm">
          <text:p/>
        </draw:line>
        <draw:line draw:style-name="gr6" draw:text-style-name="P1" draw:layer="layout" svg:x1="11.826cm" svg:y1="10.098cm" svg:x2="11.828cm" svg:y2="10.098cm">
          <text:p/>
        </draw:line>
        <draw:line draw:style-name="gr6" draw:text-style-name="P1" draw:layer="layout" svg:x1="11.868cm" svg:y1="10.098cm" svg:x2="11.87cm" svg:y2="10.098cm">
          <text:p/>
        </draw:line>
        <draw:line draw:style-name="gr6" draw:text-style-name="P1" draw:layer="layout" svg:x1="11.91cm" svg:y1="10.098cm" svg:x2="11.912cm" svg:y2="10.098cm">
          <text:p/>
        </draw:line>
        <draw:line draw:style-name="gr6" draw:text-style-name="P1" draw:layer="layout" svg:x1="11.952cm" svg:y1="10.098cm" svg:x2="11.954cm" svg:y2="10.098cm">
          <text:p/>
        </draw:line>
        <draw:line draw:style-name="gr6" draw:text-style-name="P1" draw:layer="layout" svg:x1="11.994cm" svg:y1="10.098cm" svg:x2="11.996cm" svg:y2="10.098cm">
          <text:p/>
        </draw:line>
        <draw:line draw:style-name="gr6" draw:text-style-name="P1" draw:layer="layout" svg:x1="12.036cm" svg:y1="10.098cm" svg:x2="12.038cm" svg:y2="10.098cm">
          <text:p/>
        </draw:line>
        <draw:line draw:style-name="gr6" draw:text-style-name="P1" draw:layer="layout" svg:x1="12.078cm" svg:y1="10.098cm" svg:x2="12.08cm" svg:y2="10.098cm">
          <text:p/>
        </draw:line>
        <draw:line draw:style-name="gr6" draw:text-style-name="P1" draw:layer="layout" svg:x1="12.12cm" svg:y1="10.098cm" svg:x2="12.122cm" svg:y2="10.098cm">
          <text:p/>
        </draw:line>
        <draw:line draw:style-name="gr6" draw:text-style-name="P1" draw:layer="layout" svg:x1="12.162cm" svg:y1="10.098cm" svg:x2="12.164cm" svg:y2="10.098cm">
          <text:p/>
        </draw:line>
        <draw:line draw:style-name="gr6" draw:text-style-name="P1" draw:layer="layout" svg:x1="12.204cm" svg:y1="10.098cm" svg:x2="12.206cm" svg:y2="10.098cm">
          <text:p/>
        </draw:line>
        <draw:line draw:style-name="gr6" draw:text-style-name="P1" draw:layer="layout" svg:x1="12.246cm" svg:y1="10.098cm" svg:x2="12.248cm" svg:y2="10.098cm">
          <text:p/>
        </draw:line>
        <draw:line draw:style-name="gr6" draw:text-style-name="P1" draw:layer="layout" svg:x1="12.288cm" svg:y1="10.098cm" svg:x2="12.29cm" svg:y2="10.098cm">
          <text:p/>
        </draw:line>
        <draw:line draw:style-name="gr6" draw:text-style-name="P1" draw:layer="layout" svg:x1="12.33cm" svg:y1="10.098cm" svg:x2="12.332cm" svg:y2="10.098cm">
          <text:p/>
        </draw:line>
        <draw:line draw:style-name="gr6" draw:text-style-name="P1" draw:layer="layout" svg:x1="12.372cm" svg:y1="10.098cm" svg:x2="12.374cm" svg:y2="10.098cm">
          <text:p/>
        </draw:line>
        <draw:line draw:style-name="gr6" draw:text-style-name="P1" draw:layer="layout" svg:x1="12.414cm" svg:y1="10.098cm" svg:x2="12.416cm" svg:y2="10.098cm">
          <text:p/>
        </draw:line>
        <draw:line draw:style-name="gr6" draw:text-style-name="P1" draw:layer="layout" svg:x1="12.456cm" svg:y1="10.098cm" svg:x2="12.458cm" svg:y2="10.098cm">
          <text:p/>
        </draw:line>
        <draw:line draw:style-name="gr6" draw:text-style-name="P1" draw:layer="layout" svg:x1="12.498cm" svg:y1="10.098cm" svg:x2="12.5cm" svg:y2="10.098cm">
          <text:p/>
        </draw:line>
        <draw:line draw:style-name="gr6" draw:text-style-name="P1" draw:layer="layout" svg:x1="12.54cm" svg:y1="10.098cm" svg:x2="12.542cm" svg:y2="10.098cm">
          <text:p/>
        </draw:line>
        <draw:line draw:style-name="gr6" draw:text-style-name="P1" draw:layer="layout" svg:x1="12.582cm" svg:y1="10.098cm" svg:x2="12.584cm" svg:y2="10.098cm">
          <text:p/>
        </draw:line>
        <draw:line draw:style-name="gr6" draw:text-style-name="P1" draw:layer="layout" svg:x1="12.624cm" svg:y1="10.098cm" svg:x2="12.626cm" svg:y2="10.098cm">
          <text:p/>
        </draw:line>
        <draw:line draw:style-name="gr6" draw:text-style-name="P1" draw:layer="layout" svg:x1="12.666cm" svg:y1="10.098cm" svg:x2="12.668cm" svg:y2="10.098cm">
          <text:p/>
        </draw:line>
        <draw:line draw:style-name="gr6" draw:text-style-name="P1" draw:layer="layout" svg:x1="12.708cm" svg:y1="10.098cm" svg:x2="12.71cm" svg:y2="10.098cm">
          <text:p/>
        </draw:line>
        <draw:line draw:style-name="gr6" draw:text-style-name="P1" draw:layer="layout" svg:x1="12.75cm" svg:y1="10.098cm" svg:x2="12.752cm" svg:y2="10.098cm">
          <text:p/>
        </draw:line>
        <draw:line draw:style-name="gr6" draw:text-style-name="P1" draw:layer="layout" svg:x1="12.792cm" svg:y1="10.098cm" svg:x2="12.794cm" svg:y2="10.098cm">
          <text:p/>
        </draw:line>
        <draw:line draw:style-name="gr6" draw:text-style-name="P1" draw:layer="layout" svg:x1="12.834cm" svg:y1="10.098cm" svg:x2="12.836cm" svg:y2="10.098cm">
          <text:p/>
        </draw:line>
        <draw:line draw:style-name="gr6" draw:text-style-name="P1" draw:layer="layout" svg:x1="12.876cm" svg:y1="10.098cm" svg:x2="12.878cm" svg:y2="10.098cm">
          <text:p/>
        </draw:line>
        <draw:line draw:style-name="gr6" draw:text-style-name="P1" draw:layer="layout" svg:x1="12.918cm" svg:y1="10.098cm" svg:x2="12.92cm" svg:y2="10.098cm">
          <text:p/>
        </draw:line>
        <draw:line draw:style-name="gr6" draw:text-style-name="P1" draw:layer="layout" svg:x1="12.96cm" svg:y1="10.098cm" svg:x2="12.962cm" svg:y2="10.098cm">
          <text:p/>
        </draw:line>
        <draw:line draw:style-name="gr6" draw:text-style-name="P1" draw:layer="layout" svg:x1="13.002cm" svg:y1="10.098cm" svg:x2="13.004cm" svg:y2="10.098cm">
          <text:p/>
        </draw:line>
        <draw:line draw:style-name="gr6" draw:text-style-name="P1" draw:layer="layout" svg:x1="13.044cm" svg:y1="10.098cm" svg:x2="13.046cm" svg:y2="10.098cm">
          <text:p/>
        </draw:line>
        <draw:line draw:style-name="gr6" draw:text-style-name="P1" draw:layer="layout" svg:x1="13.086cm" svg:y1="10.098cm" svg:x2="13.088cm" svg:y2="10.098cm">
          <text:p/>
        </draw:line>
        <draw:line draw:style-name="gr6" draw:text-style-name="P1" draw:layer="layout" svg:x1="13.128cm" svg:y1="10.098cm" svg:x2="13.13cm" svg:y2="10.098cm">
          <text:p/>
        </draw:line>
        <draw:line draw:style-name="gr6" draw:text-style-name="P1" draw:layer="layout" svg:x1="13.17cm" svg:y1="10.098cm" svg:x2="13.172cm" svg:y2="10.098cm">
          <text:p/>
        </draw:line>
        <draw:line draw:style-name="gr6" draw:text-style-name="P1" draw:layer="layout" svg:x1="13.212cm" svg:y1="10.098cm" svg:x2="13.214cm" svg:y2="10.098cm">
          <text:p/>
        </draw:line>
        <draw:line draw:style-name="gr6" draw:text-style-name="P1" draw:layer="layout" svg:x1="13.254cm" svg:y1="10.098cm" svg:x2="13.257cm" svg:y2="10.098cm">
          <text:p/>
        </draw:line>
        <draw:line draw:style-name="gr6" draw:text-style-name="P1" draw:layer="layout" svg:x1="13.296cm" svg:y1="10.098cm" svg:x2="13.298cm" svg:y2="10.098cm">
          <text:p/>
        </draw:line>
        <draw:line draw:style-name="gr6" draw:text-style-name="P1" draw:layer="layout" svg:x1="13.338cm" svg:y1="10.098cm" svg:x2="13.34cm" svg:y2="10.098cm">
          <text:p/>
        </draw:line>
        <draw:line draw:style-name="gr6" draw:text-style-name="P1" draw:layer="layout" svg:x1="13.38cm" svg:y1="10.098cm" svg:x2="13.382cm" svg:y2="10.098cm">
          <text:p/>
        </draw:line>
        <draw:line draw:style-name="gr6" draw:text-style-name="P1" draw:layer="layout" svg:x1="13.422cm" svg:y1="10.098cm" svg:x2="13.424cm" svg:y2="10.098cm">
          <text:p/>
        </draw:line>
        <draw:line draw:style-name="gr6" draw:text-style-name="P1" draw:layer="layout" svg:x1="13.464cm" svg:y1="10.098cm" svg:x2="13.466cm" svg:y2="10.098cm">
          <text:p/>
        </draw:line>
        <draw:line draw:style-name="gr6" draw:text-style-name="P1" draw:layer="layout" svg:x1="13.506cm" svg:y1="10.098cm" svg:x2="13.508cm" svg:y2="10.098cm">
          <text:p/>
        </draw:line>
        <draw:line draw:style-name="gr6" draw:text-style-name="P1" draw:layer="layout" svg:x1="13.548cm" svg:y1="10.098cm" svg:x2="13.55cm" svg:y2="10.098cm">
          <text:p/>
        </draw:line>
        <draw:line draw:style-name="gr6" draw:text-style-name="P1" draw:layer="layout" svg:x1="13.59cm" svg:y1="10.098cm" svg:x2="13.592cm" svg:y2="10.098cm">
          <text:p/>
        </draw:line>
        <draw:line draw:style-name="gr6" draw:text-style-name="P1" draw:layer="layout" svg:x1="13.632cm" svg:y1="10.098cm" svg:x2="13.634cm" svg:y2="10.098cm">
          <text:p/>
        </draw:line>
        <draw:line draw:style-name="gr6" draw:text-style-name="P1" draw:layer="layout" svg:x1="13.674cm" svg:y1="10.098cm" svg:x2="13.676cm" svg:y2="10.098cm">
          <text:p/>
        </draw:line>
        <draw:line draw:style-name="gr6" draw:text-style-name="P1" draw:layer="layout" svg:x1="13.716cm" svg:y1="10.098cm" svg:x2="13.718cm" svg:y2="10.098cm">
          <text:p/>
        </draw:line>
        <draw:line draw:style-name="gr6" draw:text-style-name="P1" draw:layer="layout" svg:x1="13.758cm" svg:y1="10.098cm" svg:x2="13.76cm" svg:y2="10.098cm">
          <text:p/>
        </draw:line>
        <draw:line draw:style-name="gr6" draw:text-style-name="P1" draw:layer="layout" svg:x1="13.8cm" svg:y1="10.098cm" svg:x2="13.802cm" svg:y2="10.098cm">
          <text:p/>
        </draw:line>
        <draw:line draw:style-name="gr6" draw:text-style-name="P1" draw:layer="layout" svg:x1="13.842cm" svg:y1="10.098cm" svg:x2="13.844cm" svg:y2="10.098cm">
          <text:p/>
        </draw:line>
        <draw:line draw:style-name="gr6" draw:text-style-name="P1" draw:layer="layout" svg:x1="13.884cm" svg:y1="10.098cm" svg:x2="13.886cm" svg:y2="10.098cm">
          <text:p/>
        </draw:line>
        <draw:line draw:style-name="gr6" draw:text-style-name="P1" draw:layer="layout" svg:x1="13.926cm" svg:y1="10.098cm" svg:x2="13.928cm" svg:y2="10.098cm">
          <text:p/>
        </draw:line>
        <draw:line draw:style-name="gr6" draw:text-style-name="P1" draw:layer="layout" svg:x1="13.968cm" svg:y1="10.098cm" svg:x2="13.97cm" svg:y2="10.098cm">
          <text:p/>
        </draw:line>
        <draw:line draw:style-name="gr6" draw:text-style-name="P1" draw:layer="layout" svg:x1="14.01cm" svg:y1="10.098cm" svg:x2="14.012cm" svg:y2="10.098cm">
          <text:p/>
        </draw:line>
        <draw:line draw:style-name="gr6" draw:text-style-name="P1" draw:layer="layout" svg:x1="14.052cm" svg:y1="10.098cm" svg:x2="14.054cm" svg:y2="10.098cm">
          <text:p/>
        </draw:line>
        <draw:line draw:style-name="gr6" draw:text-style-name="P1" draw:layer="layout" svg:x1="14.094cm" svg:y1="10.098cm" svg:x2="14.096cm" svg:y2="10.098cm">
          <text:p/>
        </draw:line>
        <draw:line draw:style-name="gr6" draw:text-style-name="P1" draw:layer="layout" svg:x1="14.137cm" svg:y1="10.098cm" svg:x2="14.138cm" svg:y2="10.098cm">
          <text:p/>
        </draw:line>
        <draw:line draw:style-name="gr6" draw:text-style-name="P1" draw:layer="layout" svg:x1="14.178cm" svg:y1="10.098cm" svg:x2="14.18cm" svg:y2="10.098cm">
          <text:p/>
        </draw:line>
        <draw:line draw:style-name="gr6" draw:text-style-name="P1" draw:layer="layout" svg:x1="14.22cm" svg:y1="10.098cm" svg:x2="14.222cm" svg:y2="10.098cm">
          <text:p/>
        </draw:line>
        <draw:line draw:style-name="gr6" draw:text-style-name="P1" draw:layer="layout" svg:x1="14.262cm" svg:y1="10.098cm" svg:x2="14.264cm" svg:y2="10.098cm">
          <text:p/>
        </draw:line>
        <draw:line draw:style-name="gr6" draw:text-style-name="P1" draw:layer="layout" svg:x1="14.304cm" svg:y1="10.098cm" svg:x2="14.306cm" svg:y2="10.098cm">
          <text:p/>
        </draw:line>
        <draw:line draw:style-name="gr6" draw:text-style-name="P1" draw:layer="layout" svg:x1="14.346cm" svg:y1="10.098cm" svg:x2="14.348cm" svg:y2="10.098cm">
          <text:p/>
        </draw:line>
        <draw:line draw:style-name="gr6" draw:text-style-name="P1" draw:layer="layout" svg:x1="14.388cm" svg:y1="10.098cm" svg:x2="14.391cm" svg:y2="10.098cm">
          <text:p/>
        </draw:line>
        <draw:line draw:style-name="gr6" draw:text-style-name="P1" draw:layer="layout" svg:x1="14.43cm" svg:y1="10.098cm" svg:x2="14.432cm" svg:y2="10.098cm">
          <text:p/>
        </draw:line>
        <draw:line draw:style-name="gr6" draw:text-style-name="P1" draw:layer="layout" svg:x1="14.472cm" svg:y1="10.098cm" svg:x2="14.474cm" svg:y2="10.098cm">
          <text:p/>
        </draw:line>
        <draw:line draw:style-name="gr6" draw:text-style-name="P1" draw:layer="layout" svg:x1="14.514cm" svg:y1="10.098cm" svg:x2="14.516cm" svg:y2="10.098cm">
          <text:p/>
        </draw:line>
        <draw:line draw:style-name="gr6" draw:text-style-name="P1" draw:layer="layout" svg:x1="14.556cm" svg:y1="10.098cm" svg:x2="14.558cm" svg:y2="10.098cm">
          <text:p/>
        </draw:line>
        <draw:line draw:style-name="gr6" draw:text-style-name="P1" draw:layer="layout" svg:x1="14.598cm" svg:y1="10.098cm" svg:x2="14.6cm" svg:y2="10.098cm">
          <text:p/>
        </draw:line>
        <draw:line draw:style-name="gr6" draw:text-style-name="P1" draw:layer="layout" svg:x1="14.64cm" svg:y1="10.098cm" svg:x2="14.642cm" svg:y2="10.098cm">
          <text:p/>
        </draw:line>
        <draw:line draw:style-name="gr6" draw:text-style-name="P1" draw:layer="layout" svg:x1="14.682cm" svg:y1="10.098cm" svg:x2="14.684cm" svg:y2="10.098cm">
          <text:p/>
        </draw:line>
        <draw:line draw:style-name="gr6" draw:text-style-name="P1" draw:layer="layout" svg:x1="14.724cm" svg:y1="10.098cm" svg:x2="14.726cm" svg:y2="10.098cm">
          <text:p/>
        </draw:line>
        <draw:line draw:style-name="gr6" draw:text-style-name="P1" draw:layer="layout" svg:x1="14.766cm" svg:y1="10.098cm" svg:x2="14.768cm" svg:y2="10.098cm">
          <text:p/>
        </draw:line>
        <draw:line draw:style-name="gr6" draw:text-style-name="P1" draw:layer="layout" svg:x1="14.808cm" svg:y1="10.098cm" svg:x2="14.81cm" svg:y2="10.098cm">
          <text:p/>
        </draw:line>
        <draw:line draw:style-name="gr6" draw:text-style-name="P1" draw:layer="layout" svg:x1="14.85cm" svg:y1="10.098cm" svg:x2="14.852cm" svg:y2="10.098cm">
          <text:p/>
        </draw:line>
        <draw:line draw:style-name="gr6" draw:text-style-name="P1" draw:layer="layout" svg:x1="14.892cm" svg:y1="10.098cm" svg:x2="14.894cm" svg:y2="10.098cm">
          <text:p/>
        </draw:line>
        <draw:line draw:style-name="gr6" draw:text-style-name="P1" draw:layer="layout" svg:x1="14.934cm" svg:y1="10.098cm" svg:x2="14.936cm" svg:y2="10.098cm">
          <text:p/>
        </draw:line>
        <draw:line draw:style-name="gr6" draw:text-style-name="P1" draw:layer="layout" svg:x1="14.976cm" svg:y1="10.098cm" svg:x2="14.978cm" svg:y2="10.098cm">
          <text:p/>
        </draw:line>
        <draw:line draw:style-name="gr6" draw:text-style-name="P1" draw:layer="layout" svg:x1="15.018cm" svg:y1="10.098cm" svg:x2="15.02cm" svg:y2="10.098cm">
          <text:p/>
        </draw:line>
        <draw:line draw:style-name="gr6" draw:text-style-name="P1" draw:layer="layout" svg:x1="15.06cm" svg:y1="10.098cm" svg:x2="15.062cm" svg:y2="10.098cm">
          <text:p/>
        </draw:line>
        <draw:line draw:style-name="gr6" draw:text-style-name="P1" draw:layer="layout" svg:x1="15.102cm" svg:y1="10.098cm" svg:x2="15.104cm" svg:y2="10.098cm">
          <text:p/>
        </draw:line>
        <draw:line draw:style-name="gr6" draw:text-style-name="P1" draw:layer="layout" svg:x1="15.144cm" svg:y1="10.098cm" svg:x2="15.146cm" svg:y2="10.098cm">
          <text:p/>
        </draw:line>
        <draw:line draw:style-name="gr6" draw:text-style-name="P1" draw:layer="layout" svg:x1="15.186cm" svg:y1="10.098cm" svg:x2="15.188cm" svg:y2="10.098cm">
          <text:p/>
        </draw:line>
        <draw:line draw:style-name="gr6" draw:text-style-name="P1" draw:layer="layout" svg:x1="15.228cm" svg:y1="10.098cm" svg:x2="15.23cm" svg:y2="10.098cm">
          <text:p/>
        </draw:line>
        <draw:line draw:style-name="gr6" draw:text-style-name="P1" draw:layer="layout" svg:x1="15.27cm" svg:y1="10.098cm" svg:x2="15.272cm" svg:y2="10.098cm">
          <text:p/>
        </draw:line>
        <draw:line draw:style-name="gr6" draw:text-style-name="P1" draw:layer="layout" svg:x1="15.312cm" svg:y1="10.098cm" svg:x2="15.314cm" svg:y2="10.098cm">
          <text:p/>
        </draw:line>
        <draw:line draw:style-name="gr6" draw:text-style-name="P1" draw:layer="layout" svg:x1="15.354cm" svg:y1="10.098cm" svg:x2="15.356cm" svg:y2="10.098cm">
          <text:p/>
        </draw:line>
        <draw:line draw:style-name="gr6" draw:text-style-name="P1" draw:layer="layout" svg:x1="15.396cm" svg:y1="10.098cm" svg:x2="15.398cm" svg:y2="10.098cm">
          <text:p/>
        </draw:line>
        <draw:line draw:style-name="gr6" draw:text-style-name="P1" draw:layer="layout" svg:x1="15.438cm" svg:y1="10.098cm" svg:x2="15.44cm" svg:y2="10.098cm">
          <text:p/>
        </draw:line>
        <draw:line draw:style-name="gr6" draw:text-style-name="P1" draw:layer="layout" svg:x1="15.48cm" svg:y1="10.098cm" svg:x2="15.482cm" svg:y2="10.098cm">
          <text:p/>
        </draw:line>
        <draw:line draw:style-name="gr6" draw:text-style-name="P1" draw:layer="layout" svg:x1="15.522cm" svg:y1="10.098cm" svg:x2="15.524cm" svg:y2="10.098cm">
          <text:p/>
        </draw:line>
        <draw:line draw:style-name="gr6" draw:text-style-name="P1" draw:layer="layout" svg:x1="15.564cm" svg:y1="10.098cm" svg:x2="15.566cm" svg:y2="10.098cm">
          <text:p/>
        </draw:line>
        <draw:line draw:style-name="gr6" draw:text-style-name="P1" draw:layer="layout" svg:x1="15.606cm" svg:y1="10.098cm" svg:x2="15.608cm" svg:y2="10.098cm">
          <text:p/>
        </draw:line>
        <draw:line draw:style-name="gr6" draw:text-style-name="P1" draw:layer="layout" svg:x1="15.648cm" svg:y1="10.098cm" svg:x2="15.65cm" svg:y2="10.098cm">
          <text:p/>
        </draw:line>
        <draw:line draw:style-name="gr6" draw:text-style-name="P1" draw:layer="layout" svg:x1="15.69cm" svg:y1="10.098cm" svg:x2="15.692cm" svg:y2="10.098cm">
          <text:p/>
        </draw:line>
        <draw:line draw:style-name="gr6" draw:text-style-name="P1" draw:layer="layout" svg:x1="15.732cm" svg:y1="10.098cm" svg:x2="15.734cm" svg:y2="10.098cm">
          <text:p/>
        </draw:line>
        <draw:line draw:style-name="gr6" draw:text-style-name="P1" draw:layer="layout" svg:x1="15.774cm" svg:y1="10.098cm" svg:x2="15.776cm" svg:y2="10.098cm">
          <text:p/>
        </draw:line>
        <draw:line draw:style-name="gr6" draw:text-style-name="P1" draw:layer="layout" svg:x1="15.816cm" svg:y1="10.098cm" svg:x2="15.818cm" svg:y2="10.098cm">
          <text:p/>
        </draw:line>
        <draw:line draw:style-name="gr6" draw:text-style-name="P1" draw:layer="layout" svg:x1="15.858cm" svg:y1="10.098cm" svg:x2="15.86cm" svg:y2="10.098cm">
          <text:p/>
        </draw:line>
        <draw:line draw:style-name="gr6" draw:text-style-name="P1" draw:layer="layout" svg:x1="15.9cm" svg:y1="10.098cm" svg:x2="15.902cm" svg:y2="10.098cm">
          <text:p/>
        </draw:line>
        <draw:line draw:style-name="gr6" draw:text-style-name="P1" draw:layer="layout" svg:x1="15.942cm" svg:y1="10.098cm" svg:x2="15.944cm" svg:y2="10.098cm">
          <text:p/>
        </draw:line>
        <draw:line draw:style-name="gr6" draw:text-style-name="P1" draw:layer="layout" svg:x1="15.984cm" svg:y1="10.098cm" svg:x2="15.986cm" svg:y2="10.098cm">
          <text:p/>
        </draw:line>
        <draw:line draw:style-name="gr6" draw:text-style-name="P1" draw:layer="layout" svg:x1="16.026cm" svg:y1="10.098cm" svg:x2="16.028cm" svg:y2="10.098cm">
          <text:p/>
        </draw:line>
        <draw:line draw:style-name="gr6" draw:text-style-name="P1" draw:layer="layout" svg:x1="16.068cm" svg:y1="10.098cm" svg:x2="16.07cm" svg:y2="10.098cm">
          <text:p/>
        </draw:line>
        <draw:line draw:style-name="gr6" draw:text-style-name="P1" draw:layer="layout" svg:x1="16.11cm" svg:y1="10.098cm" svg:x2="16.112cm" svg:y2="10.098cm">
          <text:p/>
        </draw:line>
        <draw:line draw:style-name="gr6" draw:text-style-name="P1" draw:layer="layout" svg:x1="16.152cm" svg:y1="10.098cm" svg:x2="16.154cm" svg:y2="10.098cm">
          <text:p/>
        </draw:line>
        <draw:line draw:style-name="gr6" draw:text-style-name="P1" draw:layer="layout" svg:x1="16.194cm" svg:y1="10.098cm" svg:x2="16.196cm" svg:y2="10.098cm">
          <text:p/>
        </draw:line>
        <draw:line draw:style-name="gr6" draw:text-style-name="P1" draw:layer="layout" svg:x1="16.236cm" svg:y1="10.098cm" svg:x2="16.238cm" svg:y2="10.098cm">
          <text:p/>
        </draw:line>
        <draw:line draw:style-name="gr6" draw:text-style-name="P1" draw:layer="layout" svg:x1="16.278cm" svg:y1="10.098cm" svg:x2="16.28cm" svg:y2="10.098cm">
          <text:p/>
        </draw:line>
        <draw:line draw:style-name="gr6" draw:text-style-name="P1" draw:layer="layout" svg:x1="16.32cm" svg:y1="10.098cm" svg:x2="16.322cm" svg:y2="10.098cm">
          <text:p/>
        </draw:line>
        <draw:line draw:style-name="gr6" draw:text-style-name="P1" draw:layer="layout" svg:x1="16.362cm" svg:y1="10.098cm" svg:x2="16.364cm" svg:y2="10.098cm">
          <text:p/>
        </draw:line>
        <draw:line draw:style-name="gr6" draw:text-style-name="P1" draw:layer="layout" svg:x1="16.404cm" svg:y1="10.098cm" svg:x2="16.406cm" svg:y2="10.098cm">
          <text:p/>
        </draw:line>
        <draw:line draw:style-name="gr6" draw:text-style-name="P1" draw:layer="layout" svg:x1="16.446cm" svg:y1="10.098cm" svg:x2="16.448cm" svg:y2="10.098cm">
          <text:p/>
        </draw:line>
        <draw:line draw:style-name="gr6" draw:text-style-name="P1" draw:layer="layout" svg:x1="16.488cm" svg:y1="10.098cm" svg:x2="16.49cm" svg:y2="10.098cm">
          <text:p/>
        </draw:line>
        <draw:line draw:style-name="gr6" draw:text-style-name="P1" draw:layer="layout" svg:x1="16.53cm" svg:y1="10.098cm" svg:x2="16.532cm" svg:y2="10.098cm">
          <text:p/>
        </draw:line>
        <draw:line draw:style-name="gr6" draw:text-style-name="P1" draw:layer="layout" svg:x1="16.572cm" svg:y1="10.098cm" svg:x2="16.574cm" svg:y2="10.098cm">
          <text:p/>
        </draw:line>
        <draw:line draw:style-name="gr6" draw:text-style-name="P1" draw:layer="layout" svg:x1="16.614cm" svg:y1="10.098cm" svg:x2="16.616cm" svg:y2="10.098cm">
          <text:p/>
        </draw:line>
        <draw:line draw:style-name="gr6" draw:text-style-name="P1" draw:layer="layout" svg:x1="16.656cm" svg:y1="10.098cm" svg:x2="16.658cm" svg:y2="10.098cm">
          <text:p/>
        </draw:line>
        <draw:line draw:style-name="gr6" draw:text-style-name="P1" draw:layer="layout" svg:x1="16.698cm" svg:y1="10.098cm" svg:x2="16.7cm" svg:y2="10.098cm">
          <text:p/>
        </draw:line>
        <draw:line draw:style-name="gr6" draw:text-style-name="P1" draw:layer="layout" svg:x1="16.74cm" svg:y1="10.098cm" svg:x2="16.742cm" svg:y2="10.098cm">
          <text:p/>
        </draw:line>
        <draw:line draw:style-name="gr6" draw:text-style-name="P1" draw:layer="layout" svg:x1="16.782cm" svg:y1="10.098cm" svg:x2="16.784cm" svg:y2="10.098cm">
          <text:p/>
        </draw:line>
        <draw:line draw:style-name="gr6" draw:text-style-name="P1" draw:layer="layout" svg:x1="16.824cm" svg:y1="10.098cm" svg:x2="16.826cm" svg:y2="10.098cm">
          <text:p/>
        </draw:line>
        <draw:line draw:style-name="gr6" draw:text-style-name="P1" draw:layer="layout" svg:x1="16.866cm" svg:y1="10.098cm" svg:x2="16.868cm" svg:y2="10.098cm">
          <text:p/>
        </draw:line>
        <draw:line draw:style-name="gr6" draw:text-style-name="P1" draw:layer="layout" svg:x1="16.908cm" svg:y1="10.098cm" svg:x2="16.91cm" svg:y2="10.098cm">
          <text:p/>
        </draw:line>
        <draw:line draw:style-name="gr6" draw:text-style-name="P1" draw:layer="layout" svg:x1="16.95cm" svg:y1="10.098cm" svg:x2="16.952cm" svg:y2="10.098cm">
          <text:p/>
        </draw:line>
        <draw:line draw:style-name="gr6" draw:text-style-name="P1" draw:layer="layout" svg:x1="16.992cm" svg:y1="10.098cm" svg:x2="16.994cm" svg:y2="10.098cm">
          <text:p/>
        </draw:line>
        <draw:line draw:style-name="gr6" draw:text-style-name="P1" draw:layer="layout" svg:x1="17.034cm" svg:y1="10.098cm" svg:x2="17.036cm" svg:y2="10.098cm">
          <text:p/>
        </draw:line>
        <draw:line draw:style-name="gr6" draw:text-style-name="P1" draw:layer="layout" svg:x1="17.076cm" svg:y1="10.098cm" svg:x2="17.078cm" svg:y2="10.098cm">
          <text:p/>
        </draw:line>
        <draw:line draw:style-name="gr6" draw:text-style-name="P1" draw:layer="layout" svg:x1="17.118cm" svg:y1="10.098cm" svg:x2="17.12cm" svg:y2="10.098cm">
          <text:p/>
        </draw:line>
        <draw:line draw:style-name="gr6" draw:text-style-name="P1" draw:layer="layout" svg:x1="17.16cm" svg:y1="10.098cm" svg:x2="17.162cm" svg:y2="10.098cm">
          <text:p/>
        </draw:line>
        <draw:line draw:style-name="gr6" draw:text-style-name="P1" draw:layer="layout" svg:x1="17.202cm" svg:y1="10.098cm" svg:x2="17.204cm" svg:y2="10.098cm">
          <text:p/>
        </draw:line>
        <draw:line draw:style-name="gr6" draw:text-style-name="P1" draw:layer="layout" svg:x1="17.244cm" svg:y1="10.098cm" svg:x2="17.246cm" svg:y2="10.098cm">
          <text:p/>
        </draw:line>
        <draw:line draw:style-name="gr6" draw:text-style-name="P1" draw:layer="layout" svg:x1="17.286cm" svg:y1="10.098cm" svg:x2="17.288cm" svg:y2="10.098cm">
          <text:p/>
        </draw:line>
        <draw:line draw:style-name="gr6" draw:text-style-name="P1" draw:layer="layout" svg:x1="17.328cm" svg:y1="10.098cm" svg:x2="17.33cm" svg:y2="10.098cm">
          <text:p/>
        </draw:line>
        <draw:line draw:style-name="gr6" draw:text-style-name="P1" draw:layer="layout" svg:x1="17.37cm" svg:y1="10.098cm" svg:x2="17.372cm" svg:y2="10.098cm">
          <text:p/>
        </draw:line>
        <draw:line draw:style-name="gr6" draw:text-style-name="P1" draw:layer="layout" svg:x1="17.412cm" svg:y1="10.098cm" svg:x2="17.414cm" svg:y2="10.098cm">
          <text:p/>
        </draw:line>
        <draw:line draw:style-name="gr6" draw:text-style-name="P1" draw:layer="layout" svg:x1="17.454cm" svg:y1="10.098cm" svg:x2="17.456cm" svg:y2="10.098cm">
          <text:p/>
        </draw:line>
        <draw:line draw:style-name="gr6" draw:text-style-name="P1" draw:layer="layout" svg:x1="17.496cm" svg:y1="10.098cm" svg:x2="17.498cm" svg:y2="10.098cm">
          <text:p/>
        </draw:line>
        <draw:line draw:style-name="gr6" draw:text-style-name="P1" draw:layer="layout" svg:x1="17.538cm" svg:y1="10.098cm" svg:x2="17.54cm" svg:y2="10.098cm">
          <text:p/>
        </draw:line>
        <draw:line draw:style-name="gr6" draw:text-style-name="P1" draw:layer="layout" svg:x1="17.58cm" svg:y1="10.098cm" svg:x2="17.582cm" svg:y2="10.098cm">
          <text:p/>
        </draw:line>
        <draw:line draw:style-name="gr6" draw:text-style-name="P1" draw:layer="layout" svg:x1="17.622cm" svg:y1="10.098cm" svg:x2="17.624cm" svg:y2="10.098cm">
          <text:p/>
        </draw:line>
        <draw:line draw:style-name="gr6" draw:text-style-name="P1" draw:layer="layout" svg:x1="17.664cm" svg:y1="10.098cm" svg:x2="17.666cm" svg:y2="10.098cm">
          <text:p/>
        </draw:line>
        <draw:line draw:style-name="gr6" draw:text-style-name="P1" draw:layer="layout" svg:x1="17.706cm" svg:y1="10.098cm" svg:x2="17.708cm" svg:y2="10.098cm">
          <text:p/>
        </draw:line>
        <draw:line draw:style-name="gr6" draw:text-style-name="P1" draw:layer="layout" svg:x1="17.748cm" svg:y1="10.098cm" svg:x2="17.75cm" svg:y2="10.098cm">
          <text:p/>
        </draw:line>
        <draw:line draw:style-name="gr6" draw:text-style-name="P1" draw:layer="layout" svg:x1="17.79cm" svg:y1="10.098cm" svg:x2="17.792cm" svg:y2="10.098cm">
          <text:p/>
        </draw:line>
        <draw:line draw:style-name="gr6" draw:text-style-name="P1" draw:layer="layout" svg:x1="17.832cm" svg:y1="10.098cm" svg:x2="17.834cm" svg:y2="10.098cm">
          <text:p/>
        </draw:line>
        <draw:line draw:style-name="gr6" draw:text-style-name="P1" draw:layer="layout" svg:x1="17.874cm" svg:y1="10.098cm" svg:x2="17.876cm" svg:y2="10.098cm">
          <text:p/>
        </draw:line>
        <draw:line draw:style-name="gr6" draw:text-style-name="P1" draw:layer="layout" svg:x1="17.916cm" svg:y1="10.098cm" svg:x2="17.918cm" svg:y2="10.098cm">
          <text:p/>
        </draw:line>
        <draw:line draw:style-name="gr6" draw:text-style-name="P1" draw:layer="layout" svg:x1="17.958cm" svg:y1="10.098cm" svg:x2="17.96cm" svg:y2="10.098cm">
          <text:p/>
        </draw:line>
        <draw:line draw:style-name="gr6" draw:text-style-name="P1" draw:layer="layout" svg:x1="18cm" svg:y1="10.098cm" svg:x2="18.002cm" svg:y2="10.098cm">
          <text:p/>
        </draw:line>
        <draw:line draw:style-name="gr6" draw:text-style-name="P1" draw:layer="layout" svg:x1="18.042cm" svg:y1="10.098cm" svg:x2="18.044cm" svg:y2="10.098cm">
          <text:p/>
        </draw:line>
        <draw:line draw:style-name="gr6" draw:text-style-name="P1" draw:layer="layout" svg:x1="18.084cm" svg:y1="10.098cm" svg:x2="18.086cm" svg:y2="10.098cm">
          <text:p/>
        </draw:line>
        <draw:line draw:style-name="gr6" draw:text-style-name="P1" draw:layer="layout" svg:x1="18.126cm" svg:y1="10.098cm" svg:x2="18.128cm" svg:y2="10.098cm">
          <text:p/>
        </draw:line>
        <draw:line draw:style-name="gr6" draw:text-style-name="P1" draw:layer="layout" svg:x1="18.168cm" svg:y1="10.098cm" svg:x2="18.17cm" svg:y2="10.098cm">
          <text:p/>
        </draw:line>
        <draw:line draw:style-name="gr6" draw:text-style-name="P1" draw:layer="layout" svg:x1="18.21cm" svg:y1="10.098cm" svg:x2="18.212cm" svg:y2="10.098cm">
          <text:p/>
        </draw:line>
        <draw:line draw:style-name="gr6" draw:text-style-name="P1" draw:layer="layout" svg:x1="18.252cm" svg:y1="10.098cm" svg:x2="18.254cm" svg:y2="10.098cm">
          <text:p/>
        </draw:line>
        <draw:line draw:style-name="gr6" draw:text-style-name="P1" draw:layer="layout" svg:x1="18.294cm" svg:y1="10.098cm" svg:x2="18.296cm" svg:y2="10.098cm">
          <text:p/>
        </draw:line>
        <draw:line draw:style-name="gr6" draw:text-style-name="P1" draw:layer="layout" svg:x1="18.337cm" svg:y1="10.098cm" svg:x2="18.338cm" svg:y2="10.098cm">
          <text:p/>
        </draw:line>
        <draw:line draw:style-name="gr6" draw:text-style-name="P1" draw:layer="layout" svg:x1="18.378cm" svg:y1="10.098cm" svg:x2="18.38cm" svg:y2="10.098cm">
          <text:p/>
        </draw:line>
        <draw:line draw:style-name="gr6" draw:text-style-name="P1" draw:layer="layout" svg:x1="18.42cm" svg:y1="10.098cm" svg:x2="18.422cm" svg:y2="10.098cm">
          <text:p/>
        </draw:line>
        <draw:line draw:style-name="gr6" draw:text-style-name="P1" draw:layer="layout" svg:x1="18.462cm" svg:y1="10.098cm" svg:x2="18.464cm" svg:y2="10.098cm">
          <text:p/>
        </draw:line>
        <draw:line draw:style-name="gr6" draw:text-style-name="P1" draw:layer="layout" svg:x1="18.504cm" svg:y1="10.098cm" svg:x2="18.506cm" svg:y2="10.098cm">
          <text:p/>
        </draw:line>
        <draw:line draw:style-name="gr6" draw:text-style-name="P1" draw:layer="layout" svg:x1="18.546cm" svg:y1="10.098cm" svg:x2="18.548cm" svg:y2="10.098cm">
          <text:p/>
        </draw:line>
        <draw:line draw:style-name="gr6" draw:text-style-name="P1" draw:layer="layout" svg:x1="18.588cm" svg:y1="10.098cm" svg:x2="18.59cm" svg:y2="10.098cm">
          <text:p/>
        </draw:line>
        <draw:line draw:style-name="gr6" draw:text-style-name="P1" draw:layer="layout" svg:x1="18.63cm" svg:y1="10.098cm" svg:x2="18.632cm" svg:y2="10.098cm">
          <text:p/>
        </draw:line>
        <draw:line draw:style-name="gr6" draw:text-style-name="P1" draw:layer="layout" svg:x1="18.672cm" svg:y1="10.098cm" svg:x2="18.674cm" svg:y2="10.098cm">
          <text:p/>
        </draw:line>
        <draw:line draw:style-name="gr6" draw:text-style-name="P1" draw:layer="layout" svg:x1="18.714cm" svg:y1="10.098cm" svg:x2="18.716cm" svg:y2="10.098cm">
          <text:p/>
        </draw:line>
        <draw:line draw:style-name="gr6" draw:text-style-name="P1" draw:layer="layout" svg:x1="18.756cm" svg:y1="10.098cm" svg:x2="18.758cm" svg:y2="10.098cm">
          <text:p/>
        </draw:line>
        <draw:line draw:style-name="gr6" draw:text-style-name="P1" draw:layer="layout" svg:x1="18.798cm" svg:y1="10.098cm" svg:x2="18.8cm" svg:y2="10.098cm">
          <text:p/>
        </draw:line>
        <draw:line draw:style-name="gr6" draw:text-style-name="P1" draw:layer="layout" svg:x1="18.84cm" svg:y1="10.098cm" svg:x2="18.842cm" svg:y2="10.098cm">
          <text:p/>
        </draw:line>
        <draw:line draw:style-name="gr6" draw:text-style-name="P1" draw:layer="layout" svg:x1="18.882cm" svg:y1="10.098cm" svg:x2="18.884cm" svg:y2="10.098cm">
          <text:p/>
        </draw:line>
        <draw:line draw:style-name="gr6" draw:text-style-name="P1" draw:layer="layout" svg:x1="18.924cm" svg:y1="10.098cm" svg:x2="18.926cm" svg:y2="10.098cm">
          <text:p/>
        </draw:line>
        <draw:line draw:style-name="gr6" draw:text-style-name="P1" draw:layer="layout" svg:x1="18.966cm" svg:y1="10.098cm" svg:x2="18.968cm" svg:y2="10.098cm">
          <text:p/>
        </draw:line>
        <draw:line draw:style-name="gr6" draw:text-style-name="P1" draw:layer="layout" svg:x1="19.008cm" svg:y1="10.098cm" svg:x2="19.01cm" svg:y2="10.098cm">
          <text:p/>
        </draw:line>
        <draw:line draw:style-name="gr6" draw:text-style-name="P1" draw:layer="layout" svg:x1="19.05cm" svg:y1="10.098cm" svg:x2="19.052cm" svg:y2="10.098cm">
          <text:p/>
        </draw:line>
        <draw:line draw:style-name="gr6" draw:text-style-name="P1" draw:layer="layout" svg:x1="19.092cm" svg:y1="10.098cm" svg:x2="19.094cm" svg:y2="10.098cm">
          <text:p/>
        </draw:line>
        <draw:line draw:style-name="gr6" draw:text-style-name="P1" draw:layer="layout" svg:x1="19.134cm" svg:y1="10.098cm" svg:x2="19.136cm" svg:y2="10.098cm">
          <text:p/>
        </draw:line>
        <draw:line draw:style-name="gr6" draw:text-style-name="P1" draw:layer="layout" svg:x1="19.176cm" svg:y1="10.098cm" svg:x2="19.178cm" svg:y2="10.098cm">
          <text:p/>
        </draw:line>
        <draw:line draw:style-name="gr6" draw:text-style-name="P1" draw:layer="layout" svg:x1="19.218cm" svg:y1="10.098cm" svg:x2="19.22cm" svg:y2="10.098cm">
          <text:p/>
        </draw:line>
        <draw:line draw:style-name="gr6" draw:text-style-name="P1" draw:layer="layout" svg:x1="19.26cm" svg:y1="10.098cm" svg:x2="19.262cm" svg:y2="10.098cm">
          <text:p/>
        </draw:line>
        <draw:line draw:style-name="gr6" draw:text-style-name="P1" draw:layer="layout" svg:x1="19.302cm" svg:y1="10.098cm" svg:x2="19.304cm" svg:y2="10.098cm">
          <text:p/>
        </draw:line>
        <draw:line draw:style-name="gr6" draw:text-style-name="P1" draw:layer="layout" svg:x1="19.344cm" svg:y1="10.098cm" svg:x2="19.346cm" svg:y2="10.098cm">
          <text:p/>
        </draw:line>
        <draw:line draw:style-name="gr6" draw:text-style-name="P1" draw:layer="layout" svg:x1="19.386cm" svg:y1="10.098cm" svg:x2="19.388cm" svg:y2="10.098cm">
          <text:p/>
        </draw:line>
        <draw:line draw:style-name="gr6" draw:text-style-name="P1" draw:layer="layout" svg:x1="19.428cm" svg:y1="10.098cm" svg:x2="19.43cm" svg:y2="10.098cm">
          <text:p/>
        </draw:line>
        <draw:line draw:style-name="gr6" draw:text-style-name="P1" draw:layer="layout" svg:x1="19.471cm" svg:y1="10.098cm" svg:x2="19.472cm" svg:y2="10.098cm">
          <text:p/>
        </draw:line>
        <draw:line draw:style-name="gr6" draw:text-style-name="P1" draw:layer="layout" svg:x1="19.512cm" svg:y1="10.098cm" svg:x2="19.514cm" svg:y2="10.098cm">
          <text:p/>
        </draw:line>
        <draw:line draw:style-name="gr6" draw:text-style-name="P1" draw:layer="layout" svg:x1="19.554cm" svg:y1="10.098cm" svg:x2="19.556cm" svg:y2="10.098cm">
          <text:p/>
        </draw:line>
        <draw:line draw:style-name="gr6" draw:text-style-name="P1" draw:layer="layout" svg:x1="19.596cm" svg:y1="10.098cm" svg:x2="19.598cm" svg:y2="10.098cm">
          <text:p/>
        </draw:line>
        <draw:line draw:style-name="gr6" draw:text-style-name="P1" draw:layer="layout" svg:x1="19.638cm" svg:y1="10.098cm" svg:x2="19.64cm" svg:y2="10.098cm">
          <text:p/>
        </draw:line>
        <draw:path draw:style-name="gr4" draw:text-style-name="P1" draw:layer="layout" svg:width="0.092cm" svg:height="0.128cm" svg:x="11.023cm" svg:y="4.711cm" svg:viewBox="0 0 93 129" svg:d="M86 0c12 29 9 62-8 88-18 25-47 41-78 41">
          <text:p/>
        </draw:path>
        <draw:line draw:style-name="gr4" draw:text-style-name="P1" draw:layer="layout" svg:x1="10.65cm" svg:y1="4.498cm" svg:x2="11.101cm" svg:y2="4.799cm">
          <text:p/>
        </draw:line>
        <draw:line draw:style-name="gr4" draw:text-style-name="P1" draw:layer="layout" svg:x1="14.227cm" svg:y1="4.507cm" svg:x2="14.678cm" svg:y2="4.808cm">
          <text:p/>
        </draw:line>
        <draw:line draw:style-name="gr4" draw:text-style-name="P1" draw:layer="layout" svg:x1="10.2cm" svg:y1="7.848cm" svg:x2="19.65cm" svg:y2="7.848cm">
          <text:p/>
        </draw:line>
        <draw:line draw:style-name="gr4" draw:text-style-name="P1" draw:layer="layout" svg:x1="16.256cm" svg:y1="4.507cm" svg:x2="16.708cm" svg:y2="4.808cm">
          <text:p/>
        </draw:line>
        <draw:line draw:style-name="gr4" draw:text-style-name="P1" draw:layer="layout" svg:x1="13.05cm" svg:y1="1.998cm" svg:x2="13.05cm" svg:y2="1.898cm">
          <text:p/>
        </draw:line>
        <draw:line draw:style-name="gr4" draw:text-style-name="P1" draw:layer="layout" svg:x1="13.05cm" svg:y1="1.898cm" svg:x2="13.05cm" svg:y2="1.998cm">
          <text:p/>
        </draw:line>
        <draw:line draw:style-name="gr4" draw:text-style-name="P1" draw:layer="layout" svg:x1="13.05cm" svg:y1="1.998cm" svg:x2="14.4cm" svg:y2="1.998cm">
          <text:p/>
        </draw:line>
        <draw:line draw:style-name="gr4" draw:text-style-name="P1" draw:layer="layout" svg:x1="14.4cm" svg:y1="1.998cm" svg:x2="14.4cm" svg:y2="1.898cm">
          <text:p/>
        </draw:line>
        <draw:line draw:style-name="gr4" draw:text-style-name="P1" draw:layer="layout" svg:x1="14.4cm" svg:y1="1.898cm" svg:x2="13.05cm" svg:y2="1.898cm">
          <text:p/>
        </draw:line>
        <draw:polygon draw:style-name="gr5" draw:text-style-name="P2" draw:layer="layout" svg:width="1.35cm" svg:height="0.1cm" svg:x="13.05cm" svg:y="1.898cm" svg:viewBox="0 0 1351 101" draw:points="0,0 1351,0 1351,101 0,101">
          <text:p/>
        </draw:polygon>
        <draw:line draw:style-name="gr4" draw:text-style-name="P1" draw:layer="layout" svg:x1="12.45cm" svg:y1="1.998cm" svg:x2="13.05cm" svg:y2="1.998cm">
          <text:p/>
        </draw:line>
        <draw:line draw:style-name="gr4" draw:text-style-name="P1" draw:layer="layout" svg:x1="13.7cm" svg:y1="1.898cm" svg:x2="13.7cm" svg:y2="4.548cm">
          <text:p/>
        </draw:line>
        <draw:line draw:style-name="gr4" draw:text-style-name="P1" draw:layer="layout" svg:x1="13.7cm" svg:y1="4.548cm" svg:x2="13.8cm" svg:y2="4.548cm">
          <text:p/>
        </draw:line>
        <draw:line draw:style-name="gr4" draw:text-style-name="P1" draw:layer="layout" svg:x1="13.8cm" svg:y1="4.548cm" svg:x2="13.8cm" svg:y2="1.898cm">
          <text:p/>
        </draw:line>
        <draw:line draw:style-name="gr4" draw:text-style-name="P1" draw:layer="layout" svg:x1="13.8cm" svg:y1="1.898cm" svg:x2="13.7cm" svg:y2="1.898cm">
          <text:p/>
        </draw:line>
        <draw:polygon draw:style-name="gr5" draw:text-style-name="P2" draw:layer="layout" svg:width="0.1cm" svg:height="2.65cm" svg:x="13.7cm" svg:y="1.898cm" svg:viewBox="0 0 101 2651" draw:points="0,0 101,0 101,2651 0,2651">
          <text:p/>
        </draw:polygon>
        <draw:line draw:style-name="gr4" draw:text-style-name="P1" draw:layer="layout" svg:x1="13.05cm" svg:y1="1.898cm" svg:x2="12.45cm" svg:y2="1.898cm">
          <text:p/>
        </draw:line>
        <draw:line draw:style-name="gr4" draw:text-style-name="P1" draw:layer="layout" svg:x1="9.45cm" svg:y1="2.998cm" svg:x2="10.15cm" svg:y2="2.998cm">
          <text:p/>
        </draw:line>
        <draw:line draw:style-name="gr4" draw:text-style-name="P1" draw:layer="layout" svg:x1="9.45cm" svg:y1="2.399cm" svg:x2="10.15cm" svg:y2="1.998cm">
          <text:p/>
        </draw:line>
        <draw:line draw:style-name="gr4" draw:text-style-name="P1" draw:layer="layout" svg:x1="9.45cm" svg:y1="2.398cm" svg:x2="10.15cm" svg:y2="2.398cm">
          <text:p/>
        </draw:line>
        <draw:line draw:style-name="gr4" draw:text-style-name="P1" draw:layer="layout" svg:x1="9.45cm" svg:y1="2.598cm" svg:x2="10.15cm" svg:y2="2.598cm">
          <text:p/>
        </draw:line>
        <draw:line draw:style-name="gr4" draw:text-style-name="P1" draw:layer="layout" svg:x1="9.45cm" svg:y1="2.798cm" svg:x2="10.15cm" svg:y2="2.798cm">
          <text:p/>
        </draw:line>
        <draw:line draw:style-name="gr4" draw:text-style-name="P1" draw:layer="layout" svg:x1="20.9cm" svg:y1="5.448cm" svg:x2="20.9cm" svg:y2="4.498cm">
          <text:p/>
        </draw:line>
        <draw:line draw:style-name="gr4" draw:text-style-name="P1" draw:layer="layout" svg:x1="18.1cm" svg:y1="1.998cm" svg:x2="18.6cm" svg:y2="1.998cm">
          <text:p/>
        </draw:line>
        <draw:line draw:style-name="gr4" draw:text-style-name="P1" draw:layer="layout" svg:x1="18.6cm" svg:y1="1.898cm" svg:x2="18.1cm" svg:y2="1.898cm">
          <text:p/>
        </draw:line>
        <draw:line draw:style-name="gr4" draw:text-style-name="P1" draw:layer="layout" svg:x1="18.6cm" svg:y1="1.898cm" svg:x2="18.6cm" svg:y2="1.998cm">
          <text:p/>
        </draw:line>
        <draw:line draw:style-name="gr4" draw:text-style-name="P1" draw:layer="layout" svg:x1="18.6cm" svg:y1="1.998cm" svg:x2="19.85cm" svg:y2="1.998cm">
          <text:p/>
        </draw:line>
        <draw:line draw:style-name="gr4" draw:text-style-name="P1" draw:layer="layout" svg:x1="19.85cm" svg:y1="1.998cm" svg:x2="19.85cm" svg:y2="1.898cm">
          <text:p/>
        </draw:line>
        <draw:line draw:style-name="gr4" draw:text-style-name="P1" draw:layer="layout" svg:x1="19.85cm" svg:y1="1.898cm" svg:x2="18.6cm" svg:y2="1.898cm">
          <text:p/>
        </draw:line>
        <draw:polygon draw:style-name="gr5" draw:text-style-name="P2" draw:layer="layout" svg:width="1.25cm" svg:height="0.1cm" svg:x="18.6cm" svg:y="1.898cm" svg:viewBox="0 0 1251 101" draw:points="0,0 1251,0 1251,101 0,101">
          <text:p/>
        </draw:polygon>
        <draw:line draw:style-name="gr4" draw:text-style-name="P1" draw:layer="layout" svg:x1="19.85cm" svg:y1="1.998cm" svg:x2="20.3cm" svg:y2="1.998cm">
          <text:p/>
        </draw:line>
        <draw:line draw:style-name="gr4" draw:text-style-name="P1" draw:layer="layout" svg:x1="19.877cm" svg:y1="4.457cm" svg:x2="20.328cm" svg:y2="4.758cm">
          <text:p/>
        </draw:line>
        <draw:line draw:style-name="gr4" draw:text-style-name="P1" draw:layer="layout" svg:x1="16.18cm" svg:y1="1.998cm" svg:x2="16.78cm" svg:y2="1.998cm">
          <text:p/>
        </draw:line>
        <draw:line draw:style-name="gr4" draw:text-style-name="P1" draw:layer="layout" svg:x1="14.88cm" svg:y1="4.448cm" svg:x2="14.88cm" svg:y2="4.548cm">
          <text:p/>
        </draw:line>
        <draw:line draw:style-name="gr4" draw:text-style-name="P1" draw:layer="layout" svg:x1="14.88cm" svg:y1="4.548cm" svg:x2="16.23cm" svg:y2="4.548cm">
          <text:p/>
        </draw:line>
        <draw:line draw:style-name="gr4" draw:text-style-name="P1" draw:layer="layout" svg:x1="16.23cm" svg:y1="4.548cm" svg:x2="16.23cm" svg:y2="4.448cm">
          <text:p/>
        </draw:line>
        <draw:line draw:style-name="gr4" draw:text-style-name="P1" draw:layer="layout" svg:x1="16.23cm" svg:y1="4.448cm" svg:x2="14.88cm" svg:y2="4.448cm">
          <text:p/>
        </draw:line>
        <draw:polygon draw:style-name="gr5" draw:text-style-name="P2" draw:layer="layout" svg:width="1.35cm" svg:height="0.1cm" svg:x="14.88cm" svg:y="4.448cm" svg:viewBox="0 0 1351 101" draw:points="0,0 1351,0 1351,101 0,101">
          <text:p/>
        </draw:polygon>
        <draw:line draw:style-name="gr4" draw:text-style-name="P1" draw:layer="layout" svg:x1="15.13cm" svg:y1="1.898cm" svg:x2="15.13cm" svg:y2="1.998cm">
          <text:p/>
        </draw:line>
        <draw:line draw:style-name="gr4" draw:text-style-name="P1" draw:layer="layout" svg:x1="15.13cm" svg:y1="1.998cm" svg:x2="16.18cm" svg:y2="1.998cm">
          <text:p/>
        </draw:line>
        <draw:line draw:style-name="gr4" draw:text-style-name="P1" draw:layer="layout" svg:x1="16.18cm" svg:y1="1.998cm" svg:x2="16.18cm" svg:y2="1.898cm">
          <text:p/>
        </draw:line>
        <draw:line draw:style-name="gr4" draw:text-style-name="P1" draw:layer="layout" svg:x1="16.18cm" svg:y1="1.898cm" svg:x2="15.13cm" svg:y2="1.898cm">
          <text:p/>
        </draw:line>
        <draw:polygon draw:style-name="gr5" draw:text-style-name="P2" draw:layer="layout" svg:width="1.05cm" svg:height="0.1cm" svg:x="15.13cm" svg:y="1.898cm" svg:viewBox="0 0 1051 101" draw:points="0,0 1051,0 1051,101 0,101">
          <text:p/>
        </draw:polygon>
        <draw:line draw:style-name="gr4" draw:text-style-name="P1" draw:layer="layout" svg:x1="17.375cm" svg:y1="1.898cm" svg:x2="17.375cm" svg:y2="4.548cm">
          <text:p/>
        </draw:line>
        <draw:line draw:style-name="gr4" draw:text-style-name="P1" draw:layer="layout" svg:x1="17.375cm" svg:y1="4.548cm" svg:x2="17.475cm" svg:y2="4.548cm">
          <text:p/>
        </draw:line>
        <draw:line draw:style-name="gr4" draw:text-style-name="P1" draw:layer="layout" svg:x1="17.475cm" svg:y1="4.548cm" svg:x2="17.475cm" svg:y2="1.898cm">
          <text:p/>
        </draw:line>
        <draw:line draw:style-name="gr4" draw:text-style-name="P1" draw:layer="layout" svg:x1="17.475cm" svg:y1="1.898cm" svg:x2="17.375cm" svg:y2="1.898cm">
          <text:p/>
        </draw:line>
        <draw:polygon draw:style-name="gr5" draw:text-style-name="P2" draw:layer="layout" svg:width="0.1cm" svg:height="2.65cm" svg:x="17.375cm" svg:y="1.898cm" svg:viewBox="0 0 101 2651" draw:points="0,0 101,0 101,2651 0,2651">
          <text:p/>
        </draw:polygon>
        <draw:line draw:style-name="gr4" draw:text-style-name="P1" draw:layer="layout" svg:x1="14.4cm" svg:y1="1.998cm" svg:x2="15.2cm" svg:y2="1.998cm">
          <text:p/>
        </draw:line>
        <draw:line draw:style-name="gr4" draw:text-style-name="P1" draw:layer="layout" svg:x1="9.45cm" svg:y1="3.398cm" svg:x2="10.15cm" svg:y2="3.398cm">
          <text:p/>
        </draw:line>
        <draw:line draw:style-name="gr4" draw:text-style-name="P1" draw:layer="layout" svg:x1="9.45cm" svg:y1="3.598cm" svg:x2="10.15cm" svg:y2="3.598cm">
          <text:p/>
        </draw:line>
        <draw:line draw:style-name="gr4" draw:text-style-name="P1" draw:layer="layout" svg:x1="10.15cm" svg:y1="1.898cm" svg:x2="10.15cm" svg:y2="4.548cm">
          <text:p/>
        </draw:line>
        <draw:line draw:style-name="gr4" draw:text-style-name="P1" draw:layer="layout" svg:x1="10.15cm" svg:y1="4.548cm" svg:x2="10.25cm" svg:y2="4.548cm">
          <text:p/>
        </draw:line>
        <draw:line draw:style-name="gr4" draw:text-style-name="P1" draw:layer="layout" svg:x1="10.25cm" svg:y1="4.548cm" svg:x2="10.25cm" svg:y2="1.898cm">
          <text:p/>
        </draw:line>
        <draw:line draw:style-name="gr4" draw:text-style-name="P1" draw:layer="layout" svg:x1="10.25cm" svg:y1="1.898cm" svg:x2="10.15cm" svg:y2="1.898cm">
          <text:p/>
        </draw:line>
        <draw:polygon draw:style-name="gr5" draw:text-style-name="P2" draw:layer="layout" svg:width="0.1cm" svg:height="2.65cm" svg:x="10.15cm" svg:y="1.898cm" svg:viewBox="0 0 101 2651" draw:points="0,0 101,0 101,2651 0,2651">
          <text:p/>
        </draw:polygon>
        <draw:line draw:style-name="gr4" draw:text-style-name="P1" draw:layer="layout" svg:x1="9.45cm" svg:y1="3.798cm" svg:x2="10.15cm" svg:y2="3.798cm">
          <text:p/>
        </draw:line>
        <draw:line draw:style-name="gr4" draw:text-style-name="P1" draw:layer="layout" svg:x1="9.45cm" svg:y1="4.198cm" svg:x2="10.15cm" svg:y2="4.198cm">
          <text:p/>
        </draw:line>
        <draw:line draw:style-name="gr4" draw:text-style-name="P1" draw:layer="layout" svg:x1="9.45cm" svg:y1="3.998cm" svg:x2="10.15cm" svg:y2="3.998cm">
          <text:p/>
        </draw:line>
        <draw:line draw:style-name="gr4" draw:text-style-name="P1" draw:layer="layout" svg:x1="9.45cm" svg:y1="1.948cm" svg:x2="9.45cm" svg:y2="5.398cm">
          <text:p/>
        </draw:line>
        <draw:line draw:style-name="gr4" draw:text-style-name="P1" draw:layer="layout" svg:x1="9.45cm" svg:y1="4.398cm" svg:x2="10.15cm" svg:y2="4.398cm">
          <text:p/>
        </draw:line>
        <draw:line draw:style-name="gr4" draw:text-style-name="P1" draw:layer="layout" svg:x1="12.6cm" svg:y1="5.398cm" svg:x2="12.6cm" svg:y2="5.498cm">
          <text:p/>
        </draw:line>
        <draw:line draw:style-name="gr4" draw:text-style-name="P1" draw:layer="layout" svg:x1="12.6cm" svg:y1="5.498cm" svg:x2="12.7cm" svg:y2="5.498cm">
          <text:p/>
        </draw:line>
        <draw:line draw:style-name="gr4" draw:text-style-name="P1" draw:layer="layout" svg:x1="12.7cm" svg:y1="5.498cm" svg:x2="12.7cm" svg:y2="5.398cm">
          <text:p/>
        </draw:line>
        <draw:line draw:style-name="gr4" draw:text-style-name="P1" draw:layer="layout" svg:x1="12.7cm" svg:y1="5.398cm" svg:x2="12.6cm" svg:y2="5.398cm">
          <text:p/>
        </draw:line>
        <draw:polygon draw:style-name="gr5" draw:text-style-name="P2" draw:layer="layout" svg:width="0.1cm" svg:height="0.1cm" svg:x="12.6cm" svg:y="5.398cm" svg:viewBox="0 0 101 101" draw:points="0,0 101,0 101,101 0,101">
          <text:p/>
        </draw:polygon>
        <draw:line draw:style-name="gr4" draw:text-style-name="P1" draw:layer="layout" svg:x1="12.577cm" svg:y1="4.507cm" svg:x2="13.028cm" svg:y2="4.808cm">
          <text:p/>
        </draw:line>
        <draw:line draw:style-name="gr4" draw:text-style-name="P1" draw:layer="layout" svg:x1="13.2cm" svg:y1="4.448cm" svg:x2="13.2cm" svg:y2="4.548cm">
          <text:p/>
        </draw:line>
        <draw:line draw:style-name="gr4" draw:text-style-name="P1" draw:layer="layout" svg:x1="13.2cm" svg:y1="4.548cm" svg:x2="14.25cm" svg:y2="4.548cm">
          <text:p/>
        </draw:line>
        <draw:line draw:style-name="gr4" draw:text-style-name="P1" draw:layer="layout" svg:x1="14.25cm" svg:y1="4.548cm" svg:x2="14.25cm" svg:y2="4.448cm">
          <text:p/>
        </draw:line>
        <draw:line draw:style-name="gr4" draw:text-style-name="P1" draw:layer="layout" svg:x1="14.25cm" svg:y1="4.448cm" svg:x2="13.2cm" svg:y2="4.448cm">
          <text:p/>
        </draw:line>
        <draw:polygon draw:style-name="gr5" draw:text-style-name="P2" draw:layer="layout" svg:width="1.05cm" svg:height="0.1cm" svg:x="13.2cm" svg:y="4.448cm" svg:viewBox="0 0 1051 101" draw:points="0,0 1051,0 1051,101 0,101">
          <text:p/>
        </draw:polygon>
        <draw:path draw:style-name="gr4" draw:text-style-name="P1" draw:layer="layout" svg:width="0.092cm" svg:height="0.128cm" svg:x="12.95cm" svg:y="4.72cm" svg:viewBox="0 0 93 129" svg:d="M86 0c12 29 9 62-8 88-18 26-47 41-78 41">
          <text:p/>
        </draw:path>
        <draw:line draw:style-name="gr4" draw:text-style-name="P1" draw:layer="layout" svg:x1="8.467cm" svg:y1="17.844cm" svg:x2="8.467cm" svg:y2="17.944cm">
          <text:p/>
        </draw:line>
        <draw:line draw:style-name="gr4" draw:text-style-name="P1" draw:layer="layout" svg:x1="8.467cm" svg:y1="17.944cm" svg:x2="8.617cm" svg:y2="17.944cm">
          <text:p/>
        </draw:line>
        <draw:line draw:style-name="gr4" draw:text-style-name="P1" draw:layer="layout" svg:x1="8.617cm" svg:y1="17.944cm" svg:x2="8.617cm" svg:y2="17.844cm">
          <text:p/>
        </draw:line>
        <draw:line draw:style-name="gr4" draw:text-style-name="P1" draw:layer="layout" svg:x1="8.617cm" svg:y1="17.844cm" svg:x2="8.467cm" svg:y2="17.844cm">
          <text:p/>
        </draw:line>
        <draw:polygon draw:style-name="gr5" draw:text-style-name="P2" draw:layer="layout" svg:width="0.15cm" svg:height="0.1cm" svg:x="8.467cm" svg:y="17.844cm" svg:viewBox="0 0 151 101" draw:points="0,0 151,0 151,101 0,101">
          <text:p/>
        </draw:polygon>
        <draw:line draw:style-name="gr4" draw:text-style-name="P1" draw:layer="layout" svg:x1="14.25cm" svg:y1="15.348cm" svg:x2="14.6cm" svg:y2="15.348cm">
          <text:p/>
        </draw:line>
        <draw:line draw:style-name="gr4" draw:text-style-name="P1" draw:layer="layout" svg:x1="14.6cm" svg:y1="15.348cm" svg:x2="14.6cm" svg:y2="15.448cm">
          <text:p/>
        </draw:line>
        <draw:line draw:style-name="gr4" draw:text-style-name="P1" draw:layer="layout" svg:x1="14.6cm" svg:y1="15.448cm" svg:x2="15.25cm" svg:y2="15.448cm">
          <text:p/>
        </draw:line>
        <draw:line draw:style-name="gr4" draw:text-style-name="P1" draw:layer="layout" svg:x1="15.25cm" svg:y1="15.448cm" svg:x2="15.25cm" svg:y2="15.348cm">
          <text:p/>
        </draw:line>
        <draw:line draw:style-name="gr4" draw:text-style-name="P1" draw:layer="layout" svg:x1="15.25cm" svg:y1="15.348cm" svg:x2="14.6cm" svg:y2="15.348cm">
          <text:p/>
        </draw:line>
        <draw:polygon draw:style-name="gr5" draw:text-style-name="P2" draw:layer="layout" svg:width="0.65cm" svg:height="0.1cm" svg:x="14.6cm" svg:y="15.348cm" svg:viewBox="0 0 651 101" draw:points="0,0 651,0 651,101 0,101">
          <text:p/>
        </draw:polygon>
        <draw:line draw:style-name="gr4" draw:text-style-name="P1" draw:layer="layout" svg:x1="14.25cm" svg:y1="15.448cm" svg:x2="14.6cm" svg:y2="15.448cm">
          <text:p/>
        </draw:line>
        <draw:line draw:style-name="gr4" draw:text-style-name="P1" draw:layer="layout" svg:x1="14.75cm" svg:y1="13.448cm" svg:x2="14.75cm" svg:y2="13.548cm">
          <text:p/>
        </draw:line>
        <draw:line draw:style-name="gr4" draw:text-style-name="P1" draw:layer="layout" svg:x1="14.75cm" svg:y1="13.548cm" svg:x2="15.05cm" svg:y2="13.548cm">
          <text:p/>
        </draw:line>
        <draw:line draw:style-name="gr4" draw:text-style-name="P1" draw:layer="layout" svg:x1="15.05cm" svg:y1="13.548cm" svg:x2="15.05cm" svg:y2="13.448cm">
          <text:p/>
        </draw:line>
        <draw:line draw:style-name="gr4" draw:text-style-name="P1" draw:layer="layout" svg:x1="15.05cm" svg:y1="13.448cm" svg:x2="14.75cm" svg:y2="13.448cm">
          <text:p/>
        </draw:line>
        <draw:polygon draw:style-name="gr5" draw:text-style-name="P2" draw:layer="layout" svg:width="0.3cm" svg:height="0.1cm" svg:x="14.75cm" svg:y="13.448cm" svg:viewBox="0 0 301 101" draw:points="0,0 301,0 301,101 0,101">
          <text:p/>
        </draw:polygon>
        <draw:line draw:style-name="gr4" draw:text-style-name="P1" draw:layer="layout" svg:x1="14.935cm" svg:y1="13.548cm" svg:x2="15.351cm" svg:y2="13.248cm">
          <text:p/>
        </draw:line>
        <draw:line draw:style-name="gr4" draw:text-style-name="P1" draw:layer="layout" svg:x1="14.235cm" svg:y1="13.548cm" svg:x2="14.651cm" svg:y2="13.248cm">
          <text:p/>
        </draw:line>
        <draw:path draw:style-name="gr4" draw:text-style-name="P1" draw:layer="layout" svg:width="0.104cm" svg:height="0.14cm" svg:x="14.557cm" svg:y="13.206cm" svg:viewBox="0 0 105 141" svg:d="M0 3c37-11 76 5 94 39 19 32 12 73-15 99">
          <text:p/>
        </draw:path>
        <draw:path draw:style-name="gr4" draw:text-style-name="P1" draw:layer="layout" svg:width="0.103cm" svg:height="0.14cm" svg:x="15.257cm" svg:y="13.207cm" svg:viewBox="0 0 104 141" svg:d="M0 3c36-11 76 5 94 38s12 74-15 100">
          <text:p/>
        </draw:path>
        <draw:line draw:style-name="gr4" draw:text-style-name="P1" draw:layer="layout" svg:x1="14.85cm" svg:y1="13.448cm" svg:x2="14.85cm" svg:y2="15.448cm">
          <text:p/>
        </draw:line>
        <draw:line draw:style-name="gr4" draw:text-style-name="P1" draw:layer="layout" svg:x1="14.85cm" svg:y1="15.448cm" svg:x2="14.95cm" svg:y2="15.448cm">
          <text:p/>
        </draw:line>
        <draw:line draw:style-name="gr4" draw:text-style-name="P1" draw:layer="layout" svg:x1="14.95cm" svg:y1="15.448cm" svg:x2="14.95cm" svg:y2="13.448cm">
          <text:p/>
        </draw:line>
        <draw:line draw:style-name="gr4" draw:text-style-name="P1" draw:layer="layout" svg:x1="14.95cm" svg:y1="13.448cm" svg:x2="14.85cm" svg:y2="13.448cm">
          <text:p/>
        </draw:line>
        <draw:polygon draw:style-name="gr5" draw:text-style-name="P2" draw:layer="layout" svg:width="0.1cm" svg:height="2cm" svg:x="14.85cm" svg:y="13.448cm" svg:viewBox="0 0 101 2001" draw:points="0,0 101,0 101,2001 0,2001">
          <text:p/>
        </draw:polygon>
        <draw:line draw:style-name="gr4" draw:text-style-name="P1" draw:layer="layout" svg:x1="14.7cm" svg:y1="12.348cm" svg:x2="14.7cm" svg:y2="12.448cm">
          <text:p/>
        </draw:line>
        <draw:line draw:style-name="gr4" draw:text-style-name="P1" draw:layer="layout" svg:x1="14.7cm" svg:y1="12.448cm" svg:x2="14.8cm" svg:y2="12.448cm">
          <text:p/>
        </draw:line>
        <draw:line draw:style-name="gr4" draw:text-style-name="P1" draw:layer="layout" svg:x1="14.8cm" svg:y1="12.448cm" svg:x2="14.8cm" svg:y2="12.348cm">
          <text:p/>
        </draw:line>
        <draw:line draw:style-name="gr4" draw:text-style-name="P1" draw:layer="layout" svg:x1="14.8cm" svg:y1="12.348cm" svg:x2="14.7cm" svg:y2="12.348cm">
          <text:p/>
        </draw:line>
        <draw:polygon draw:style-name="gr5" draw:text-style-name="P2" draw:layer="layout" svg:width="0.1cm" svg:height="0.1cm" svg:x="14.7cm" svg:y="12.348cm" svg:viewBox="0 0 101 101" draw:points="0,0 101,0 101,101 0,101">
          <text:p/>
        </draw:polygon>
        <draw:line draw:style-name="gr4" draw:text-style-name="P1" draw:layer="layout" svg:x1="13.55cm" svg:y1="12.348cm" svg:x2="13.55cm" svg:y2="12.448cm">
          <text:p/>
        </draw:line>
        <draw:line draw:style-name="gr4" draw:text-style-name="P1" draw:layer="layout" svg:x1="13.55cm" svg:y1="12.448cm" svg:x2="13.65cm" svg:y2="12.448cm">
          <text:p/>
        </draw:line>
        <draw:line draw:style-name="gr4" draw:text-style-name="P1" draw:layer="layout" svg:x1="13.65cm" svg:y1="12.448cm" svg:x2="13.65cm" svg:y2="12.348cm">
          <text:p/>
        </draw:line>
        <draw:line draw:style-name="gr4" draw:text-style-name="P1" draw:layer="layout" svg:x1="13.65cm" svg:y1="12.348cm" svg:x2="13.55cm" svg:y2="12.348cm">
          <text:p/>
        </draw:line>
        <draw:polygon draw:style-name="gr5" draw:text-style-name="P2" draw:layer="layout" svg:width="0.1cm" svg:height="0.1cm" svg:x="13.55cm" svg:y="12.348cm" svg:viewBox="0 0 101 101" draw:points="0,0 101,0 101,101 0,101">
          <text:p/>
        </draw:polygon>
        <draw:line draw:style-name="gr4" draw:text-style-name="P1" draw:layer="layout" svg:x1="13.55cm" svg:y1="13.548cm" svg:x2="13.95cm" svg:y2="13.548cm">
          <text:p/>
        </draw:line>
        <draw:line draw:style-name="gr4" draw:text-style-name="P1" draw:layer="layout" svg:x1="13.95cm" svg:y1="13.448cm" svg:x2="13.95cm" svg:y2="13.548cm">
          <text:p/>
        </draw:line>
        <draw:line draw:style-name="gr4" draw:text-style-name="P1" draw:layer="layout" svg:x1="13.95cm" svg:y1="13.548cm" svg:x2="14.35cm" svg:y2="13.548cm">
          <text:p/>
        </draw:line>
        <draw:line draw:style-name="gr4" draw:text-style-name="P1" draw:layer="layout" svg:x1="14.35cm" svg:y1="13.548cm" svg:x2="14.35cm" svg:y2="13.448cm">
          <text:p/>
        </draw:line>
        <draw:line draw:style-name="gr4" draw:text-style-name="P1" draw:layer="layout" svg:x1="14.35cm" svg:y1="13.448cm" svg:x2="13.95cm" svg:y2="13.448cm">
          <text:p/>
        </draw:line>
        <draw:polygon draw:style-name="gr5" draw:text-style-name="P2" draw:layer="layout" svg:width="0.4cm" svg:height="0.1cm" svg:x="13.95cm" svg:y="13.448cm" svg:viewBox="0 0 401 101" draw:points="0,0 401,0 401,101 0,101">
          <text:p/>
        </draw:polygon>
        <draw:line draw:style-name="gr4" draw:text-style-name="P1" draw:layer="layout" svg:x1="13.95cm" svg:y1="13.448cm" svg:x2="13.55cm" svg:y2="13.448cm">
          <text:p/>
        </draw:line>
        <draw:line draw:style-name="gr4" draw:text-style-name="P1" draw:layer="layout" svg:x1="15.25cm" svg:y1="15.448cm" svg:x2="15.6cm" svg:y2="15.448cm">
          <text:p/>
        </draw:line>
        <draw:line draw:style-name="gr4" draw:text-style-name="P1" draw:layer="layout" svg:x1="16.95cm" svg:y1="15.348cm" svg:x2="16.6cm" svg:y2="15.348cm">
          <text:p/>
        </draw:line>
        <draw:line draw:style-name="gr4" draw:text-style-name="P1" draw:layer="layout" svg:x1="16.6cm" svg:y1="15.448cm" svg:x2="16.95cm" svg:y2="15.448cm">
          <text:p/>
        </draw:line>
        <draw:line draw:style-name="gr4" draw:text-style-name="P1" draw:layer="layout" svg:x1="15.6cm" svg:y1="15.348cm" svg:x2="15.25cm" svg:y2="15.348cm">
          <text:p/>
        </draw:line>
        <draw:line draw:style-name="gr4" draw:text-style-name="P1" draw:layer="layout" svg:x1="15.6cm" svg:y1="15.348cm" svg:x2="15.6cm" svg:y2="15.448cm">
          <text:p/>
        </draw:line>
        <draw:line draw:style-name="gr4" draw:text-style-name="P1" draw:layer="layout" svg:x1="15.6cm" svg:y1="15.448cm" svg:x2="16.6cm" svg:y2="15.448cm">
          <text:p/>
        </draw:line>
        <draw:line draw:style-name="gr4" draw:text-style-name="P1" draw:layer="layout" svg:x1="16.6cm" svg:y1="15.448cm" svg:x2="16.6cm" svg:y2="15.348cm">
          <text:p/>
        </draw:line>
        <draw:line draw:style-name="gr4" draw:text-style-name="P1" draw:layer="layout" svg:x1="16.6cm" svg:y1="15.348cm" svg:x2="15.6cm" svg:y2="15.348cm">
          <text:p/>
        </draw:line>
        <draw:polygon draw:style-name="gr5" draw:text-style-name="P2" draw:layer="layout" svg:width="1cm" svg:height="0.1cm" svg:x="15.6cm" svg:y="15.348cm" svg:viewBox="0 0 1001 101" draw:points="0,0 1001,0 1001,101 0,101">
          <text:p/>
        </draw:polygon>
        <draw:line draw:style-name="gr4" draw:text-style-name="P1" draw:layer="layout" svg:x1="17.1cm" svg:y1="13.448cm" svg:x2="17.1cm" svg:y2="13.548cm">
          <text:p/>
        </draw:line>
        <draw:line draw:style-name="gr4" draw:text-style-name="P1" draw:layer="layout" svg:x1="17.1cm" svg:y1="13.548cm" svg:x2="17.45cm" svg:y2="13.548cm">
          <text:p/>
        </draw:line>
        <draw:line draw:style-name="gr4" draw:text-style-name="P1" draw:layer="layout" svg:x1="17.45cm" svg:y1="13.548cm" svg:x2="17.45cm" svg:y2="13.448cm">
          <text:p/>
        </draw:line>
        <draw:line draw:style-name="gr4" draw:text-style-name="P1" draw:layer="layout" svg:x1="17.45cm" svg:y1="13.448cm" svg:x2="17.1cm" svg:y2="13.448cm">
          <text:p/>
        </draw:line>
        <draw:polygon draw:style-name="gr5" draw:text-style-name="P2" draw:layer="layout" svg:width="0.35cm" svg:height="0.1cm" svg:x="17.1cm" svg:y="13.448cm" svg:viewBox="0 0 351 101" draw:points="0,0 351,0 351,101 0,101">
          <text:p/>
        </draw:polygon>
        <draw:line draw:style-name="gr4" draw:text-style-name="P1" draw:layer="layout" svg:x1="17.285cm" svg:y1="13.548cm" svg:x2="17.701cm" svg:y2="13.248cm">
          <text:p/>
        </draw:line>
        <draw:line draw:style-name="gr4" draw:text-style-name="P1" draw:layer="layout" svg:x1="17.25cm" svg:y1="13.448cm" svg:x2="17.25cm" svg:y2="15.448cm">
          <text:p/>
        </draw:line>
        <draw:line draw:style-name="gr4" draw:text-style-name="P1" draw:layer="layout" svg:x1="17.25cm" svg:y1="15.448cm" svg:x2="17.35cm" svg:y2="15.448cm">
          <text:p/>
        </draw:line>
        <draw:line draw:style-name="gr4" draw:text-style-name="P1" draw:layer="layout" svg:x1="17.35cm" svg:y1="15.448cm" svg:x2="17.35cm" svg:y2="13.448cm">
          <text:p/>
        </draw:line>
        <draw:line draw:style-name="gr4" draw:text-style-name="P1" draw:layer="layout" svg:x1="17.35cm" svg:y1="13.448cm" svg:x2="17.25cm" svg:y2="13.448cm">
          <text:p/>
        </draw:line>
        <draw:polygon draw:style-name="gr5" draw:text-style-name="P2" draw:layer="layout" svg:width="0.1cm" svg:height="2cm" svg:x="17.25cm" svg:y="13.448cm" svg:viewBox="0 0 101 2001" draw:points="0,0 101,0 101,2001 0,2001">
          <text:p/>
        </draw:polygon>
        <draw:line draw:style-name="gr4" draw:text-style-name="P1" draw:layer="layout" svg:x1="16.95cm" svg:y1="15.348cm" svg:x2="16.95cm" svg:y2="15.448cm">
          <text:p/>
        </draw:line>
        <draw:line draw:style-name="gr4" draw:text-style-name="P1" draw:layer="layout" svg:x1="16.95cm" svg:y1="15.448cm" svg:x2="17.65cm" svg:y2="15.448cm">
          <text:p/>
        </draw:line>
        <draw:line draw:style-name="gr4" draw:text-style-name="P1" draw:layer="layout" svg:x1="17.65cm" svg:y1="15.448cm" svg:x2="17.65cm" svg:y2="15.348cm">
          <text:p/>
        </draw:line>
        <draw:line draw:style-name="gr4" draw:text-style-name="P1" draw:layer="layout" svg:x1="17.65cm" svg:y1="15.348cm" svg:x2="16.95cm" svg:y2="15.348cm">
          <text:p/>
        </draw:line>
        <draw:polygon draw:style-name="gr5" draw:text-style-name="P2" draw:layer="layout" svg:width="0.7cm" svg:height="0.1cm" svg:x="16.95cm" svg:y="15.348cm" svg:viewBox="0 0 701 101" draw:points="0,0 701,0 701,101 0,101">
          <text:p/>
        </draw:polygon>
        <draw:path draw:style-name="gr4" draw:text-style-name="P1" draw:layer="layout" svg:width="0.103cm" svg:height="0.14cm" svg:x="17.607cm" svg:y="13.207cm" svg:viewBox="0 0 104 141" svg:d="M0 3c36-11 76 5 94 38s12 74-15 100">
          <text:p/>
        </draw:path>
        <draw:line draw:style-name="gr4" draw:text-style-name="P1" draw:layer="layout" svg:x1="15.9cm" svg:y1="13.448cm" svg:x2="16.3cm" svg:y2="13.448cm">
          <text:p/>
        </draw:line>
        <draw:line draw:style-name="gr4" draw:text-style-name="P1" draw:layer="layout" svg:x1="16.585cm" svg:y1="13.548cm" svg:x2="17.001cm" svg:y2="13.248cm">
          <text:p/>
        </draw:line>
        <draw:line draw:style-name="gr4" draw:text-style-name="P1" draw:layer="layout" svg:x1="16.3cm" svg:y1="13.548cm" svg:x2="15.9cm" svg:y2="13.548cm">
          <text:p/>
        </draw:line>
        <draw:line draw:style-name="gr4" draw:text-style-name="P1" draw:layer="layout" svg:x1="16.3cm" svg:y1="13.448cm" svg:x2="16.3cm" svg:y2="13.548cm">
          <text:p/>
        </draw:line>
        <draw:line draw:style-name="gr4" draw:text-style-name="P1" draw:layer="layout" svg:x1="16.3cm" svg:y1="13.548cm" svg:x2="16.7cm" svg:y2="13.548cm">
          <text:p/>
        </draw:line>
        <draw:line draw:style-name="gr4" draw:text-style-name="P1" draw:layer="layout" svg:x1="16.7cm" svg:y1="13.548cm" svg:x2="16.7cm" svg:y2="13.448cm">
          <text:p/>
        </draw:line>
        <draw:line draw:style-name="gr4" draw:text-style-name="P1" draw:layer="layout" svg:x1="16.7cm" svg:y1="13.448cm" svg:x2="16.3cm" svg:y2="13.448cm">
          <text:p/>
        </draw:line>
        <draw:polygon draw:style-name="gr5" draw:text-style-name="P2" draw:layer="layout" svg:width="0.4cm" svg:height="0.1cm" svg:x="16.3cm" svg:y="13.448cm" svg:viewBox="0 0 401 101" draw:points="0,0 401,0 401,101 0,101">
          <text:p/>
        </draw:polygon>
        <draw:path draw:style-name="gr4" draw:text-style-name="P1" draw:layer="layout" svg:width="0.104cm" svg:height="0.14cm" svg:x="16.907cm" svg:y="13.206cm" svg:viewBox="0 0 105 141" svg:d="M0 3c36-11 76 5 94 39 19 32 12 73-15 99">
          <text:p/>
        </draw:path>
        <draw:line draw:style-name="gr4" draw:text-style-name="P1" draw:layer="layout" svg:x1="15.45cm" svg:y1="13.448cm" svg:x2="15.45cm" svg:y2="13.548cm">
          <text:p/>
        </draw:line>
        <draw:line draw:style-name="gr4" draw:text-style-name="P1" draw:layer="layout" svg:x1="15.45cm" svg:y1="13.548cm" svg:x2="15.9cm" svg:y2="13.548cm">
          <text:p/>
        </draw:line>
        <draw:line draw:style-name="gr4" draw:text-style-name="P1" draw:layer="layout" svg:x1="15.9cm" svg:y1="13.548cm" svg:x2="15.9cm" svg:y2="13.448cm">
          <text:p/>
        </draw:line>
        <draw:line draw:style-name="gr4" draw:text-style-name="P1" draw:layer="layout" svg:x1="15.9cm" svg:y1="13.448cm" svg:x2="15.45cm" svg:y2="13.448cm">
          <text:p/>
        </draw:line>
        <draw:polygon draw:style-name="gr5" draw:text-style-name="P2" draw:layer="layout" svg:width="0.45cm" svg:height="0.1cm" svg:x="15.45cm" svg:y="13.448cm" svg:viewBox="0 0 451 101" draw:points="0,0 451,0 451,101 0,101">
          <text:p/>
        </draw:polygon>
        <draw:line draw:style-name="gr4" draw:text-style-name="P1" draw:layer="layout" svg:x1="15.85cm" svg:y1="12.248cm" svg:x2="17.05cm" svg:y2="12.248cm">
          <text:p/>
        </draw:line>
        <draw:line draw:style-name="gr4" draw:text-style-name="P1" draw:layer="layout" svg:x1="15.85cm" svg:y1="11.948cm" svg:x2="17.05cm" svg:y2="11.948cm">
          <text:p/>
        </draw:line>
        <draw:line draw:style-name="gr4" draw:text-style-name="P1" draw:layer="layout" svg:x1="17.05cm" svg:y1="11.948cm" svg:x2="17.05cm" svg:y2="12.398cm">
          <text:p/>
        </draw:line>
        <draw:line draw:style-name="gr4" draw:text-style-name="P1" draw:layer="layout" svg:x1="15.85cm" svg:y1="12.098cm" svg:x2="17.05cm" svg:y2="12.098cm">
          <text:p/>
        </draw:line>
        <draw:line draw:style-name="gr4" draw:text-style-name="P1" draw:layer="layout" svg:x1="15.8cm" svg:y1="12.348cm" svg:x2="15.8cm" svg:y2="12.448cm">
          <text:p/>
        </draw:line>
        <draw:line draw:style-name="gr4" draw:text-style-name="P1" draw:layer="layout" svg:x1="15.8cm" svg:y1="12.448cm" svg:x2="15.9cm" svg:y2="12.448cm">
          <text:p/>
        </draw:line>
        <draw:line draw:style-name="gr4" draw:text-style-name="P1" draw:layer="layout" svg:x1="15.9cm" svg:y1="12.448cm" svg:x2="15.9cm" svg:y2="12.348cm">
          <text:p/>
        </draw:line>
        <draw:line draw:style-name="gr4" draw:text-style-name="P1" draw:layer="layout" svg:x1="15.9cm" svg:y1="12.348cm" svg:x2="15.8cm" svg:y2="12.348cm">
          <text:p/>
        </draw:line>
        <draw:polygon draw:style-name="gr5" draw:text-style-name="P2" draw:layer="layout" svg:width="0.1cm" svg:height="0.1cm" svg:x="15.8cm" svg:y="12.348cm" svg:viewBox="0 0 101 101" draw:points="0,0 101,0 101,101 0,101">
          <text:p/>
        </draw:polygon>
        <draw:line draw:style-name="gr4" draw:text-style-name="P1" draw:layer="layout" svg:x1="15.85cm" svg:y1="12.398cm" svg:x2="15.85cm" svg:y2="11.948cm">
          <text:p/>
        </draw:line>
        <draw:line draw:style-name="gr4" draw:text-style-name="P1" draw:layer="layout" svg:x1="17cm" svg:y1="12.348cm" svg:x2="17cm" svg:y2="12.448cm">
          <text:p/>
        </draw:line>
        <draw:line draw:style-name="gr4" draw:text-style-name="P1" draw:layer="layout" svg:x1="17cm" svg:y1="12.448cm" svg:x2="17.1cm" svg:y2="12.448cm">
          <text:p/>
        </draw:line>
        <draw:line draw:style-name="gr4" draw:text-style-name="P1" draw:layer="layout" svg:x1="17.1cm" svg:y1="12.448cm" svg:x2="17.1cm" svg:y2="12.348cm">
          <text:p/>
        </draw:line>
        <draw:line draw:style-name="gr4" draw:text-style-name="P1" draw:layer="layout" svg:x1="17.1cm" svg:y1="12.348cm" svg:x2="17cm" svg:y2="12.348cm">
          <text:p/>
        </draw:line>
        <draw:polygon draw:style-name="gr5" draw:text-style-name="P2" draw:layer="layout" svg:width="0.1cm" svg:height="0.1cm" svg:x="17cm" svg:y="12.348cm" svg:viewBox="0 0 101 101" draw:points="0,0 101,0 101,101 0,101">
          <text:p/>
        </draw:polygon>
        <draw:line draw:style-name="gr4" draw:text-style-name="P1" draw:layer="layout" svg:x1="18cm" svg:y1="15.348cm" svg:x2="17.65cm" svg:y2="15.348cm">
          <text:p/>
        </draw:line>
        <draw:line draw:style-name="gr4" draw:text-style-name="P1" draw:layer="layout" svg:x1="18cm" svg:y1="15.348cm" svg:x2="18cm" svg:y2="15.448cm">
          <text:p/>
        </draw:line>
        <draw:line draw:style-name="gr4" draw:text-style-name="P1" draw:layer="layout" svg:x1="18cm" svg:y1="15.448cm" svg:x2="19cm" svg:y2="15.448cm">
          <text:p/>
        </draw:line>
        <draw:line draw:style-name="gr4" draw:text-style-name="P1" draw:layer="layout" svg:x1="19cm" svg:y1="15.448cm" svg:x2="19cm" svg:y2="15.348cm">
          <text:p/>
        </draw:line>
        <draw:line draw:style-name="gr4" draw:text-style-name="P1" draw:layer="layout" svg:x1="19cm" svg:y1="15.348cm" svg:x2="18cm" svg:y2="15.348cm">
          <text:p/>
        </draw:line>
        <draw:polygon draw:style-name="gr5" draw:text-style-name="P2" draw:layer="layout" svg:width="1cm" svg:height="0.1cm" svg:x="18cm" svg:y="15.348cm" svg:viewBox="0 0 1001 101" draw:points="0,0 1001,0 1001,101 0,101">
          <text:p/>
        </draw:polygon>
        <draw:line draw:style-name="gr4" draw:text-style-name="P1" draw:layer="layout" svg:x1="19cm" svg:y1="15.448cm" svg:x2="19.35cm" svg:y2="15.448cm">
          <text:p/>
        </draw:line>
        <draw:line draw:style-name="gr4" draw:text-style-name="P1" draw:layer="layout" svg:x1="17.65cm" svg:y1="15.448cm" svg:x2="18cm" svg:y2="15.448cm">
          <text:p/>
        </draw:line>
        <draw:line draw:style-name="gr4" draw:text-style-name="P1" draw:layer="layout" svg:x1="19.35cm" svg:y1="15.348cm" svg:x2="19cm" svg:y2="15.348cm">
          <text:p/>
        </draw:line>
        <draw:line draw:style-name="gr4" draw:text-style-name="P1" draw:layer="layout" svg:x1="18.25cm" svg:y1="13.348cm" svg:x2="18.25cm" svg:y2="13.548cm">
          <text:p/>
        </draw:line>
        <draw:line draw:style-name="gr4" draw:text-style-name="P1" draw:layer="layout" svg:x1="18.25cm" svg:y1="13.548cm" svg:x2="18.35cm" svg:y2="13.548cm">
          <text:p/>
        </draw:line>
        <draw:line draw:style-name="gr4" draw:text-style-name="P1" draw:layer="layout" svg:x1="18.35cm" svg:y1="13.548cm" svg:x2="18.35cm" svg:y2="13.348cm">
          <text:p/>
        </draw:line>
        <draw:line draw:style-name="gr4" draw:text-style-name="P1" draw:layer="layout" svg:x1="18.35cm" svg:y1="13.348cm" svg:x2="18.25cm" svg:y2="13.348cm">
          <text:p/>
        </draw:line>
        <draw:polygon draw:style-name="gr5" draw:text-style-name="P2" draw:layer="layout" svg:width="0.1cm" svg:height="0.2cm" svg:x="18.25cm" svg:y="13.348cm" svg:viewBox="0 0 101 201" draw:points="0,0 101,0 101,201 0,201">
          <text:p/>
        </draw:polygon>
        <draw:line draw:style-name="gr4" draw:text-style-name="P1" draw:layer="layout" svg:x1="18.75cm" svg:y1="12.348cm" svg:x2="19.1cm" svg:y2="12.348cm">
          <text:p/>
        </draw:line>
        <draw:line draw:style-name="gr4" draw:text-style-name="P1" draw:layer="layout" svg:x1="18.25cm" svg:y1="12.348cm" svg:x2="18.25cm" svg:y2="12.948cm">
          <text:p/>
        </draw:line>
        <draw:line draw:style-name="gr4" draw:text-style-name="P1" draw:layer="layout" svg:x1="18.25cm" svg:y1="12.948cm" svg:x2="18.35cm" svg:y2="12.948cm">
          <text:p/>
        </draw:line>
        <draw:line draw:style-name="gr4" draw:text-style-name="P1" draw:layer="layout" svg:x1="18.35cm" svg:y1="12.948cm" svg:x2="18.35cm" svg:y2="12.348cm">
          <text:p/>
        </draw:line>
        <draw:line draw:style-name="gr4" draw:text-style-name="P1" draw:layer="layout" svg:x1="18.35cm" svg:y1="12.348cm" svg:x2="18.25cm" svg:y2="12.348cm">
          <text:p/>
        </draw:line>
        <draw:polygon draw:style-name="gr5" draw:text-style-name="P2" draw:layer="layout" svg:width="0.1cm" svg:height="0.6cm" svg:x="18.25cm" svg:y="12.348cm" svg:viewBox="0 0 101 601" draw:points="0,0 101,0 101,601 0,601">
          <text:p/>
        </draw:polygon>
        <draw:path draw:style-name="gr4" draw:text-style-name="P1" draw:layer="layout" svg:width="0.157cm" svg:height="0.122cm" svg:x="18.044cm" svg:y="13.042cm" svg:viewBox="0 0 158 123" svg:d="M1 123c-6-40 11-81 44-104s76-26 113-7">
          <text:p/>
        </draw:path>
        <draw:line draw:style-name="gr4" draw:text-style-name="P1" draw:layer="layout" svg:x1="9.05cm" svg:y1="5.348cm" svg:x2="9.05cm" svg:y2="5.598cm">
          <text:p/>
        </draw:line>
        <draw:line draw:style-name="gr4" draw:text-style-name="P1" draw:layer="layout" svg:x1="9.05cm" svg:y1="5.598cm" svg:x2="9.15cm" svg:y2="5.598cm">
          <text:p/>
        </draw:line>
        <draw:line draw:style-name="gr4" draw:text-style-name="P1" draw:layer="layout" svg:x1="9.15cm" svg:y1="5.598cm" svg:x2="9.15cm" svg:y2="5.348cm">
          <text:p/>
        </draw:line>
        <draw:line draw:style-name="gr4" draw:text-style-name="P1" draw:layer="layout" svg:x1="9.15cm" svg:y1="5.348cm" svg:x2="9.05cm" svg:y2="5.348cm">
          <text:p/>
        </draw:line>
        <draw:polygon draw:style-name="gr5" draw:text-style-name="P2" draw:layer="layout" svg:width="0.1cm" svg:height="0.249cm" svg:x="9.05cm" svg:y="5.348cm" svg:viewBox="0 0 101 250" draw:points="0,0 101,0 101,250 0,250">
          <text:p/>
        </draw:polygon>
        <draw:line draw:style-name="gr4" draw:text-style-name="P1" draw:layer="layout" svg:x1="9.05cm" svg:y1="5.948cm" svg:x2="9.05cm" svg:y2="6.748cm">
          <text:p/>
        </draw:line>
        <draw:line draw:style-name="gr4" draw:text-style-name="P1" draw:layer="layout" svg:x1="9.05cm" svg:y1="6.748cm" svg:x2="9.15cm" svg:y2="6.748cm">
          <text:p/>
        </draw:line>
        <draw:line draw:style-name="gr4" draw:text-style-name="P1" draw:layer="layout" svg:x1="9.15cm" svg:y1="6.748cm" svg:x2="9.15cm" svg:y2="5.948cm">
          <text:p/>
        </draw:line>
        <draw:line draw:style-name="gr4" draw:text-style-name="P1" draw:layer="layout" svg:x1="9.15cm" svg:y1="5.948cm" svg:x2="9.05cm" svg:y2="5.948cm">
          <text:p/>
        </draw:line>
        <draw:polygon draw:style-name="gr5" draw:text-style-name="P2" draw:layer="layout" svg:width="0.1cm" svg:height="0.8cm" svg:x="9.05cm" svg:y="5.948cm" svg:viewBox="0 0 101 801" draw:points="0,0 101,0 101,801 0,801">
          <text:p/>
        </draw:polygon>
        <draw:line draw:style-name="gr4" draw:text-style-name="P1" draw:layer="layout" svg:x1="9.1cm" svg:y1="5.999cm" svg:x2="9.301cm" svg:y2="5.648cm">
          <text:p/>
        </draw:line>
        <draw:line draw:style-name="gr4" draw:text-style-name="P1" draw:layer="layout" svg:x1="9.1cm" svg:y1="5.398cm" svg:x2="10.2cm" svg:y2="5.398cm">
          <text:p/>
        </draw:line>
        <draw:path draw:style-name="gr4" draw:text-style-name="P1" draw:layer="layout" svg:width="0.144cm" svg:height="0.1cm" svg:x="9.203cm" svg:y="5.633cm" svg:viewBox="0 0 145 101" svg:d="M0 11c30-16 67-14 98 4 29 18 47 51 47 86">
          <text:p/>
        </draw:path>
        <draw:line draw:style-name="gr4" draw:text-style-name="P1" draw:layer="layout" svg:x1="10.15cm" svg:y1="5.398cm" svg:x2="10.15cm" svg:y2="5.498cm">
          <text:p/>
        </draw:line>
        <draw:line draw:style-name="gr4" draw:text-style-name="P1" draw:layer="layout" svg:x1="10.15cm" svg:y1="5.498cm" svg:x2="10.25cm" svg:y2="5.498cm">
          <text:p/>
        </draw:line>
        <draw:line draw:style-name="gr4" draw:text-style-name="P1" draw:layer="layout" svg:x1="10.25cm" svg:y1="5.498cm" svg:x2="10.25cm" svg:y2="5.398cm">
          <text:p/>
        </draw:line>
        <draw:line draw:style-name="gr4" draw:text-style-name="P1" draw:layer="layout" svg:x1="10.25cm" svg:y1="5.398cm" svg:x2="10.15cm" svg:y2="5.398cm">
          <text:p/>
        </draw:line>
        <draw:polygon draw:style-name="gr5" draw:text-style-name="P2" draw:layer="layout" svg:width="0.1cm" svg:height="0.1cm" svg:x="10.15cm" svg:y="5.398cm" svg:viewBox="0 0 101 101" draw:points="0,0 101,0 101,101 0,101">
          <text:p/>
        </draw:polygon>
        <draw:line draw:style-name="gr4" draw:text-style-name="P1" draw:layer="layout" svg:x1="9.45cm" svg:y1="5.198cm" svg:x2="10.15cm" svg:y2="5.198cm">
          <text:p/>
        </draw:line>
        <draw:line draw:style-name="gr4" draw:text-style-name="P1" draw:layer="layout" svg:x1="10.15cm" svg:y1="5.393cm" svg:x2="10.15cm" svg:y2="4.548cm">
          <text:p/>
        </draw:line>
        <draw:line draw:style-name="gr4" draw:text-style-name="P1" draw:layer="layout" svg:x1="9.45cm" svg:y1="4.798cm" svg:x2="10.15cm" svg:y2="4.798cm">
          <text:p/>
        </draw:line>
        <draw:line draw:style-name="gr4" draw:text-style-name="P1" draw:layer="layout" svg:x1="9.45cm" svg:y1="4.998cm" svg:x2="10.15cm" svg:y2="4.998cm">
          <text:p/>
        </draw:line>
        <draw:line draw:style-name="gr4" draw:text-style-name="P1" draw:layer="layout" svg:x1="9.45cm" svg:y1="4.598cm" svg:x2="10.15cm" svg:y2="4.598cm">
          <text:p/>
        </draw:line>
        <draw:line draw:style-name="gr4" draw:text-style-name="P1" draw:layer="layout" svg:x1="7.2cm" svg:y1="5.348cm" svg:x2="7.2cm" svg:y2="5.998cm">
          <text:p/>
        </draw:line>
        <draw:line draw:style-name="gr4" draw:text-style-name="P1" draw:layer="layout" svg:x1="7.2cm" svg:y1="5.998cm" svg:x2="7.3cm" svg:y2="5.998cm">
          <text:p/>
        </draw:line>
        <draw:line draw:style-name="gr4" draw:text-style-name="P1" draw:layer="layout" svg:x1="7.3cm" svg:y1="5.998cm" svg:x2="7.3cm" svg:y2="5.348cm">
          <text:p/>
        </draw:line>
        <draw:line draw:style-name="gr4" draw:text-style-name="P1" draw:layer="layout" svg:x1="7.3cm" svg:y1="5.348cm" svg:x2="7.2cm" svg:y2="5.348cm">
          <text:p/>
        </draw:line>
        <draw:polygon draw:style-name="gr5" draw:text-style-name="P2" draw:layer="layout" svg:width="0.1cm" svg:height="0.65cm" svg:x="7.2cm" svg:y="5.348cm" svg:viewBox="0 0 101 651" draw:points="0,0 101,0 101,651 0,651">
          <text:p/>
        </draw:polygon>
        <draw:line draw:style-name="gr4" draw:text-style-name="P1" draw:layer="layout" svg:x1="7.3cm" svg:y1="7.548cm" svg:x2="7.3cm" svg:y2="7.898cm">
          <text:p/>
        </draw:line>
        <draw:line draw:style-name="gr4" draw:text-style-name="P1" draw:layer="layout" svg:x1="7.2cm" svg:y1="6.348cm" svg:x2="7.2cm" svg:y2="7.548cm">
          <text:p/>
        </draw:line>
        <draw:line draw:style-name="gr4" draw:text-style-name="P1" draw:layer="layout" svg:x1="7.2cm" svg:y1="7.548cm" svg:x2="7.3cm" svg:y2="7.548cm">
          <text:p/>
        </draw:line>
        <draw:line draw:style-name="gr4" draw:text-style-name="P1" draw:layer="layout" svg:x1="7.3cm" svg:y1="7.548cm" svg:x2="7.3cm" svg:y2="6.348cm">
          <text:p/>
        </draw:line>
        <draw:line draw:style-name="gr4" draw:text-style-name="P1" draw:layer="layout" svg:x1="7.3cm" svg:y1="6.348cm" svg:x2="7.2cm" svg:y2="6.348cm">
          <text:p/>
        </draw:line>
        <draw:polygon draw:style-name="gr5" draw:text-style-name="P2" draw:layer="layout" svg:width="0.1cm" svg:height="1.2cm" svg:x="7.2cm" svg:y="6.348cm" svg:viewBox="0 0 101 1201" draw:points="0,0 101,0 101,1201 0,1201">
          <text:p/>
        </draw:polygon>
        <draw:line draw:style-name="gr4" draw:text-style-name="P1" draw:layer="layout" svg:x1="7.2cm" svg:y1="7.548cm" svg:x2="7.2cm" svg:y2="7.898cm">
          <text:p/>
        </draw:line>
        <draw:line draw:style-name="gr4" draw:text-style-name="P1" draw:layer="layout" svg:x1="7.2cm" svg:y1="5.348cm" svg:x2="7.2cm" svg:y2="5.448cm">
          <text:p/>
        </draw:line>
        <draw:line draw:style-name="gr4" draw:text-style-name="P1" draw:layer="layout" svg:x1="7.2cm" svg:y1="5.448cm" svg:x2="9.05cm" svg:y2="5.448cm">
          <text:p/>
        </draw:line>
        <draw:line draw:style-name="gr4" draw:text-style-name="P1" draw:layer="layout" svg:x1="9.05cm" svg:y1="5.448cm" svg:x2="9.05cm" svg:y2="5.348cm">
          <text:p/>
        </draw:line>
        <draw:line draw:style-name="gr4" draw:text-style-name="P1" draw:layer="layout" svg:x1="9.05cm" svg:y1="5.348cm" svg:x2="7.2cm" svg:y2="5.348cm">
          <text:p/>
        </draw:line>
        <draw:polygon draw:style-name="gr5" draw:text-style-name="P2" draw:layer="layout" svg:width="1.85cm" svg:height="0.1cm" svg:x="7.2cm" svg:y="5.348cm" svg:viewBox="0 0 1851 101" draw:points="0,0 1851,0 1851,101 0,101">
          <text:p/>
        </draw:polygon>
        <draw:line draw:style-name="gr4" draw:text-style-name="P1" draw:layer="layout" svg:x1="7.3cm" svg:y1="5.998cm" svg:x2="7.3cm" svg:y2="6.348cm">
          <text:p/>
        </draw:line>
        <draw:line draw:style-name="gr4" draw:text-style-name="P1" draw:layer="layout" svg:x1="7.2cm" svg:y1="5.998cm" svg:x2="7.2cm" svg:y2="6.348cm">
          <text:p/>
        </draw:line>
        <draw:line draw:style-name="gr4" draw:text-style-name="P1" draw:layer="layout" svg:x1="9.05cm" svg:y1="6.748cm" svg:x2="9.05cm" svg:y2="7.298cm">
          <text:p/>
        </draw:line>
        <draw:line draw:style-name="gr4" draw:text-style-name="P1" draw:layer="layout" svg:x1="10.15cm" svg:y1="7.798cm" svg:x2="10.15cm" svg:y2="7.898cm">
          <text:p/>
        </draw:line>
        <draw:line draw:style-name="gr4" draw:text-style-name="P1" draw:layer="layout" svg:x1="10.15cm" svg:y1="7.898cm" svg:x2="10.25cm" svg:y2="7.898cm">
          <text:p/>
        </draw:line>
        <draw:line draw:style-name="gr4" draw:text-style-name="P1" draw:layer="layout" svg:x1="10.25cm" svg:y1="7.898cm" svg:x2="10.25cm" svg:y2="7.798cm">
          <text:p/>
        </draw:line>
        <draw:line draw:style-name="gr4" draw:text-style-name="P1" draw:layer="layout" svg:x1="10.25cm" svg:y1="7.798cm" svg:x2="10.15cm" svg:y2="7.798cm">
          <text:p/>
        </draw:line>
        <draw:polygon draw:style-name="gr5" draw:text-style-name="P2" draw:layer="layout" svg:width="0.1cm" svg:height="0.1cm" svg:x="10.15cm" svg:y="7.798cm" svg:viewBox="0 0 101 101" draw:points="0,0 101,0 101,101 0,101">
          <text:p/>
        </draw:polygon>
        <draw:line draw:style-name="gr4" draw:text-style-name="P1" draw:layer="layout" svg:x1="10.15cm" svg:y1="6.648cm" svg:x2="10.15cm" svg:y2="6.748cm">
          <text:p/>
        </draw:line>
        <draw:line draw:style-name="gr4" draw:text-style-name="P1" draw:layer="layout" svg:x1="10.15cm" svg:y1="6.748cm" svg:x2="10.25cm" svg:y2="6.748cm">
          <text:p/>
        </draw:line>
        <draw:line draw:style-name="gr4" draw:text-style-name="P1" draw:layer="layout" svg:x1="10.25cm" svg:y1="6.748cm" svg:x2="10.25cm" svg:y2="6.648cm">
          <text:p/>
        </draw:line>
        <draw:line draw:style-name="gr4" draw:text-style-name="P1" draw:layer="layout" svg:x1="10.25cm" svg:y1="6.648cm" svg:x2="10.15cm" svg:y2="6.648cm">
          <text:p/>
        </draw:line>
        <draw:polygon draw:style-name="gr5" draw:text-style-name="P2" draw:layer="layout" svg:width="0.1cm" svg:height="0.1cm" svg:x="10.15cm" svg:y="6.648cm" svg:viewBox="0 0 101 101" draw:points="0,0 101,0 101,101 0,101">
          <text:p/>
        </draw:polygon>
        <draw:line draw:style-name="gr4" draw:text-style-name="P1" draw:layer="layout" svg:x1="9.15cm" svg:y1="7.298cm" svg:x2="9.15cm" svg:y2="6.748cm">
          <text:p/>
        </draw:line>
        <draw:line draw:style-name="gr4" draw:text-style-name="P1" draw:layer="layout" svg:x1="13.3cm" svg:y1="15.348cm" svg:x2="13.3cm" svg:y2="15.448cm">
          <text:p/>
        </draw:line>
        <draw:line draw:style-name="gr4" draw:text-style-name="P1" draw:layer="layout" svg:x1="13.3cm" svg:y1="15.448cm" svg:x2="14.25cm" svg:y2="15.448cm">
          <text:p/>
        </draw:line>
        <draw:line draw:style-name="gr4" draw:text-style-name="P1" draw:layer="layout" svg:x1="14.25cm" svg:y1="15.448cm" svg:x2="14.25cm" svg:y2="15.348cm">
          <text:p/>
        </draw:line>
        <draw:line draw:style-name="gr4" draw:text-style-name="P1" draw:layer="layout" svg:x1="14.25cm" svg:y1="15.348cm" svg:x2="13.3cm" svg:y2="15.348cm">
          <text:p/>
        </draw:line>
        <draw:polygon draw:style-name="gr5" draw:text-style-name="P2" draw:layer="layout" svg:width="0.95cm" svg:height="0.1cm" svg:x="13.3cm" svg:y="15.348cm" svg:viewBox="0 0 951 101" draw:points="0,0 951,0 951,101 0,101">
          <text:p/>
        </draw:polygon>
        <draw:line draw:style-name="gr4" draw:text-style-name="P1" draw:layer="layout" svg:x1="8.467cm" svg:y1="17.844cm" svg:x2="8.067cm" svg:y2="17.844cm">
          <text:p/>
        </draw:line>
        <draw:line draw:style-name="gr4" draw:text-style-name="P1" draw:layer="layout" svg:x1="12.2cm" svg:y1="15.348cm" svg:x2="12.2cm" svg:y2="15.448cm">
          <text:p/>
        </draw:line>
        <draw:line draw:style-name="gr4" draw:text-style-name="P1" draw:layer="layout" svg:x1="12.2cm" svg:y1="15.448cm" svg:x2="12.95cm" svg:y2="15.448cm">
          <text:p/>
        </draw:line>
        <draw:line draw:style-name="gr4" draw:text-style-name="P1" draw:layer="layout" svg:x1="12.95cm" svg:y1="15.448cm" svg:x2="12.95cm" svg:y2="15.348cm">
          <text:p/>
        </draw:line>
        <draw:line draw:style-name="gr4" draw:text-style-name="P1" draw:layer="layout" svg:x1="12.95cm" svg:y1="15.348cm" svg:x2="12.2cm" svg:y2="15.348cm">
          <text:p/>
        </draw:line>
        <draw:polygon draw:style-name="gr5" draw:text-style-name="P2" draw:layer="layout" svg:width="0.75cm" svg:height="0.1cm" svg:x="12.2cm" svg:y="15.348cm" svg:viewBox="0 0 751 101" draw:points="0,0 751,0 751,101 0,101">
          <text:p/>
        </draw:polygon>
        <draw:line draw:style-name="gr4" draw:text-style-name="P1" draw:layer="layout" svg:x1="12.95cm" svg:y1="15.348cm" svg:x2="13.3cm" svg:y2="15.348cm">
          <text:p/>
        </draw:line>
        <draw:line draw:style-name="gr4" draw:text-style-name="P1" draw:layer="layout" svg:x1="8.067cm" svg:y1="17.944cm" svg:x2="8.467cm" svg:y2="17.944cm">
          <text:p/>
        </draw:line>
        <draw:line draw:style-name="gr4" draw:text-style-name="P1" draw:layer="layout" svg:x1="12.95cm" svg:y1="15.448cm" svg:x2="13.3cm" svg:y2="15.448cm">
          <text:p/>
        </draw:line>
        <draw:line draw:style-name="gr4" draw:text-style-name="P1" draw:layer="layout" svg:x1="13.1cm" svg:y1="13.448cm" svg:x2="13.1cm" svg:y2="13.548cm">
          <text:p/>
        </draw:line>
        <draw:line draw:style-name="gr4" draw:text-style-name="P1" draw:layer="layout" svg:x1="13.1cm" svg:y1="13.548cm" svg:x2="13.55cm" svg:y2="13.548cm">
          <text:p/>
        </draw:line>
        <draw:line draw:style-name="gr4" draw:text-style-name="P1" draw:layer="layout" svg:x1="13.55cm" svg:y1="13.548cm" svg:x2="13.55cm" svg:y2="13.448cm">
          <text:p/>
        </draw:line>
        <draw:line draw:style-name="gr4" draw:text-style-name="P1" draw:layer="layout" svg:x1="13.55cm" svg:y1="13.448cm" svg:x2="13.1cm" svg:y2="13.448cm">
          <text:p/>
        </draw:line>
        <draw:polygon draw:style-name="gr5" draw:text-style-name="P2" draw:layer="layout" svg:width="0.45cm" svg:height="0.1cm" svg:x="13.1cm" svg:y="13.448cm" svg:viewBox="0 0 451 101" draw:points="0,0 451,0 451,101 0,101">
          <text:p/>
        </draw:polygon>
        <draw:line draw:style-name="gr4" draw:text-style-name="P1" draw:layer="layout" svg:x1="12.4cm" svg:y1="13.448cm" svg:x2="12.4cm" svg:y2="13.548cm">
          <text:p/>
        </draw:line>
        <draw:line draw:style-name="gr4" draw:text-style-name="P1" draw:layer="layout" svg:x1="12.4cm" svg:y1="13.548cm" svg:x2="12.7cm" svg:y2="13.548cm">
          <text:p/>
        </draw:line>
        <draw:line draw:style-name="gr4" draw:text-style-name="P1" draw:layer="layout" svg:x1="12.7cm" svg:y1="13.548cm" svg:x2="12.7cm" svg:y2="13.448cm">
          <text:p/>
        </draw:line>
        <draw:line draw:style-name="gr4" draw:text-style-name="P1" draw:layer="layout" svg:x1="12.7cm" svg:y1="13.448cm" svg:x2="12.4cm" svg:y2="13.448cm">
          <text:p/>
        </draw:line>
        <draw:polygon draw:style-name="gr5" draw:text-style-name="P2" draw:layer="layout" svg:width="0.3cm" svg:height="0.1cm" svg:x="12.4cm" svg:y="13.448cm" svg:viewBox="0 0 301 101" draw:points="0,0 301,0 301,101 0,101">
          <text:p/>
        </draw:polygon>
        <draw:line draw:style-name="gr4" draw:text-style-name="P1" draw:layer="layout" svg:x1="12.585cm" svg:y1="13.548cm" svg:x2="13.001cm" svg:y2="13.248cm">
          <text:p/>
        </draw:line>
        <draw:line draw:style-name="gr4" draw:text-style-name="P1" draw:layer="layout" svg:x1="12.45cm" svg:y1="12.348cm" svg:x2="12.45cm" svg:y2="12.448cm">
          <text:p/>
        </draw:line>
        <draw:line draw:style-name="gr4" draw:text-style-name="P1" draw:layer="layout" svg:x1="12.45cm" svg:y1="12.448cm" svg:x2="12.55cm" svg:y2="12.448cm">
          <text:p/>
        </draw:line>
        <draw:line draw:style-name="gr4" draw:text-style-name="P1" draw:layer="layout" svg:x1="12.55cm" svg:y1="12.448cm" svg:x2="12.55cm" svg:y2="12.348cm">
          <text:p/>
        </draw:line>
        <draw:line draw:style-name="gr4" draw:text-style-name="P1" draw:layer="layout" svg:x1="12.55cm" svg:y1="12.348cm" svg:x2="12.45cm" svg:y2="12.348cm">
          <text:p/>
        </draw:line>
        <draw:polygon draw:style-name="gr5" draw:text-style-name="P2" draw:layer="layout" svg:width="0.1cm" svg:height="0.1cm" svg:x="12.45cm" svg:y="12.348cm" svg:viewBox="0 0 101 101" draw:points="0,0 101,0 101,101 0,101">
          <text:p/>
        </draw:polygon>
        <draw:path draw:style-name="gr4" draw:text-style-name="P1" draw:layer="layout" svg:width="0.104cm" svg:height="0.14cm" svg:x="12.907cm" svg:y="13.206cm" svg:viewBox="0 0 105 141" svg:d="M0 3c37-11 76 5 94 39 19 32 12 73-15 99">
          <text:p/>
        </draw:path>
        <draw:line draw:style-name="gr4" draw:text-style-name="P1" draw:layer="layout" svg:x1="12.5cm" svg:y1="13.448cm" svg:x2="12.5cm" svg:y2="15.448cm">
          <text:p/>
        </draw:line>
        <draw:line draw:style-name="gr4" draw:text-style-name="P1" draw:layer="layout" svg:x1="12.5cm" svg:y1="15.448cm" svg:x2="12.6cm" svg:y2="15.448cm">
          <text:p/>
        </draw:line>
        <draw:line draw:style-name="gr4" draw:text-style-name="P1" draw:layer="layout" svg:x1="12.6cm" svg:y1="15.448cm" svg:x2="12.6cm" svg:y2="13.448cm">
          <text:p/>
        </draw:line>
        <draw:line draw:style-name="gr4" draw:text-style-name="P1" draw:layer="layout" svg:x1="12.6cm" svg:y1="13.448cm" svg:x2="12.5cm" svg:y2="13.448cm">
          <text:p/>
        </draw:line>
        <draw:polygon draw:style-name="gr5" draw:text-style-name="P2" draw:layer="layout" svg:width="0.1cm" svg:height="2cm" svg:x="12.5cm" svg:y="13.448cm" svg:viewBox="0 0 101 2001" draw:points="0,0 101,0 101,2001 0,2001">
          <text:p/>
        </draw:polygon>
        <draw:line draw:style-name="gr4" draw:text-style-name="P1" draw:layer="layout" svg:x1="11.55cm" svg:y1="13.448cm" svg:x2="11.2cm" svg:y2="13.448cm">
          <text:p/>
        </draw:line>
        <draw:line draw:style-name="gr4" draw:text-style-name="P1" draw:layer="layout" svg:x1="11.55cm" svg:y1="13.448cm" svg:x2="11.55cm" svg:y2="13.548cm">
          <text:p/>
        </draw:line>
        <draw:line draw:style-name="gr4" draw:text-style-name="P1" draw:layer="layout" svg:x1="11.55cm" svg:y1="13.548cm" svg:x2="12cm" svg:y2="13.548cm">
          <text:p/>
        </draw:line>
        <draw:line draw:style-name="gr4" draw:text-style-name="P1" draw:layer="layout" svg:x1="12cm" svg:y1="13.548cm" svg:x2="12cm" svg:y2="13.448cm">
          <text:p/>
        </draw:line>
        <draw:line draw:style-name="gr4" draw:text-style-name="P1" draw:layer="layout" svg:x1="12cm" svg:y1="13.448cm" svg:x2="11.55cm" svg:y2="13.448cm">
          <text:p/>
        </draw:line>
        <draw:polygon draw:style-name="gr5" draw:text-style-name="P2" draw:layer="layout" svg:width="0.45cm" svg:height="0.1cm" svg:x="11.55cm" svg:y="13.448cm" svg:viewBox="0 0 451 101" draw:points="0,0 451,0 451,101 0,101">
          <text:p/>
        </draw:polygon>
        <draw:line draw:style-name="gr4" draw:text-style-name="P1" draw:layer="layout" svg:x1="10.75cm" svg:y1="13.448cm" svg:x2="10.75cm" svg:y2="13.548cm">
          <text:p/>
        </draw:line>
        <draw:line draw:style-name="gr4" draw:text-style-name="P1" draw:layer="layout" svg:x1="10.75cm" svg:y1="13.548cm" svg:x2="11.2cm" svg:y2="13.548cm">
          <text:p/>
        </draw:line>
        <draw:line draw:style-name="gr4" draw:text-style-name="P1" draw:layer="layout" svg:x1="11.2cm" svg:y1="13.548cm" svg:x2="11.2cm" svg:y2="13.448cm">
          <text:p/>
        </draw:line>
        <draw:line draw:style-name="gr4" draw:text-style-name="P1" draw:layer="layout" svg:x1="11.2cm" svg:y1="13.448cm" svg:x2="10.75cm" svg:y2="13.448cm">
          <text:p/>
        </draw:line>
        <draw:polygon draw:style-name="gr5" draw:text-style-name="P2" draw:layer="layout" svg:width="0.45cm" svg:height="0.1cm" svg:x="10.75cm" svg:y="13.448cm" svg:viewBox="0 0 451 101" draw:points="0,0 451,0 451,101 0,101">
          <text:p/>
        </draw:polygon>
        <draw:line draw:style-name="gr4" draw:text-style-name="P1" draw:layer="layout" svg:x1="11.2cm" svg:y1="13.548cm" svg:x2="11.55cm" svg:y2="13.548cm">
          <text:p/>
        </draw:line>
        <draw:line draw:style-name="gr4" draw:text-style-name="P1" draw:layer="layout" svg:x1="12.2cm" svg:y1="15.348cm" svg:x2="11.8cm" svg:y2="15.348cm">
          <text:p/>
        </draw:line>
        <draw:line draw:style-name="gr4" draw:text-style-name="P1" draw:layer="layout" svg:x1="11.8cm" svg:y1="15.448cm" svg:x2="12.2cm" svg:y2="15.448cm">
          <text:p/>
        </draw:line>
        <draw:line draw:style-name="gr4" draw:text-style-name="P1" draw:layer="layout" svg:x1="11.05cm" svg:y1="15.348cm" svg:x2="10.65cm" svg:y2="15.348cm">
          <text:p/>
        </draw:line>
        <draw:line draw:style-name="gr4" draw:text-style-name="P1" draw:layer="layout" svg:x1="9.6cm" svg:y1="15.348cm" svg:x2="9.6cm" svg:y2="15.448cm">
          <text:p/>
        </draw:line>
        <draw:line draw:style-name="gr4" draw:text-style-name="P1" draw:layer="layout" svg:x1="9.6cm" svg:y1="15.448cm" svg:x2="10.65cm" svg:y2="15.448cm">
          <text:p/>
        </draw:line>
        <draw:line draw:style-name="gr4" draw:text-style-name="P1" draw:layer="layout" svg:x1="10.65cm" svg:y1="15.448cm" svg:x2="10.65cm" svg:y2="15.348cm">
          <text:p/>
        </draw:line>
        <draw:line draw:style-name="gr4" draw:text-style-name="P1" draw:layer="layout" svg:x1="10.65cm" svg:y1="15.348cm" svg:x2="9.6cm" svg:y2="15.348cm">
          <text:p/>
        </draw:line>
        <draw:polygon draw:style-name="gr5" draw:text-style-name="P2" draw:layer="layout" svg:width="1.05cm" svg:height="0.1cm" svg:x="9.6cm" svg:y="15.348cm" svg:viewBox="0 0 1051 101" draw:points="0,0 1051,0 1051,101 0,101">
          <text:p/>
        </draw:polygon>
        <draw:line draw:style-name="gr4" draw:text-style-name="P1" draw:layer="layout" svg:x1="9.6cm" svg:y1="15.348cm" svg:x2="9.2cm" svg:y2="15.348cm">
          <text:p/>
        </draw:line>
        <draw:line draw:style-name="gr4" draw:text-style-name="P1" draw:layer="layout" svg:x1="9.2cm" svg:y1="15.448cm" svg:x2="9.6cm" svg:y2="15.448cm">
          <text:p/>
        </draw:line>
        <draw:line draw:style-name="gr4" draw:text-style-name="P1" draw:layer="layout" svg:x1="9.05cm" svg:y1="10.298cm" svg:x2="9.05cm" svg:y2="10.648cm">
          <text:p/>
        </draw:line>
        <draw:line draw:style-name="gr4" draw:text-style-name="P1" draw:layer="layout" svg:x1="9.05cm" svg:y1="10.648cm" svg:x2="9.15cm" svg:y2="10.648cm">
          <text:p/>
        </draw:line>
        <draw:line draw:style-name="gr4" draw:text-style-name="P1" draw:layer="layout" svg:x1="9.15cm" svg:y1="10.648cm" svg:x2="9.15cm" svg:y2="10.298cm">
          <text:p/>
        </draw:line>
        <draw:line draw:style-name="gr4" draw:text-style-name="P1" draw:layer="layout" svg:x1="9.15cm" svg:y1="10.298cm" svg:x2="9.05cm" svg:y2="10.298cm">
          <text:p/>
        </draw:line>
        <draw:polygon draw:style-name="gr5" draw:text-style-name="P2" draw:layer="layout" svg:width="0.1cm" svg:height="0.35cm" svg:x="9.05cm" svg:y="10.298cm" svg:viewBox="0 0 101 351" draw:points="0,0 101,0 101,351 0,351">
          <text:p/>
        </draw:polygon>
        <draw:path draw:style-name="gr4" draw:text-style-name="P1" draw:layer="layout" svg:width="0.103cm" svg:height="0.14cm" svg:x="9.923cm" svg:y="13.158cm" svg:viewBox="0 0 104 141" svg:d="M0 3c37-10 75 5 93 38 19 34 12 74-15 100">
          <text:p/>
        </draw:path>
        <draw:line draw:style-name="gr4" draw:text-style-name="P1" draw:layer="layout" svg:x1="10.05cm" svg:y1="13.448cm" svg:x2="10.05cm" svg:y2="13.548cm">
          <text:p/>
        </draw:line>
        <draw:line draw:style-name="gr4" draw:text-style-name="P1" draw:layer="layout" svg:x1="10.05cm" svg:y1="13.548cm" svg:x2="10.4cm" svg:y2="13.548cm">
          <text:p/>
        </draw:line>
        <draw:line draw:style-name="gr4" draw:text-style-name="P1" draw:layer="layout" svg:x1="10.4cm" svg:y1="13.548cm" svg:x2="10.4cm" svg:y2="13.448cm">
          <text:p/>
        </draw:line>
        <draw:line draw:style-name="gr4" draw:text-style-name="P1" draw:layer="layout" svg:x1="10.4cm" svg:y1="13.448cm" svg:x2="10.05cm" svg:y2="13.448cm">
          <text:p/>
        </draw:line>
        <draw:polygon draw:style-name="gr5" draw:text-style-name="P2" draw:layer="layout" svg:width="0.35cm" svg:height="0.1cm" svg:x="10.05cm" svg:y="13.448cm" svg:viewBox="0 0 351 101" draw:points="0,0 351,0 351,101 0,101">
          <text:p/>
        </draw:polygon>
        <draw:line draw:style-name="gr4" draw:text-style-name="P1" draw:layer="layout" svg:x1="10.15cm" svg:y1="13.448cm" svg:x2="10.15cm" svg:y2="15.448cm">
          <text:p/>
        </draw:line>
        <draw:line draw:style-name="gr4" draw:text-style-name="P1" draw:layer="layout" svg:x1="10.15cm" svg:y1="15.448cm" svg:x2="10.25cm" svg:y2="15.448cm">
          <text:p/>
        </draw:line>
        <draw:line draw:style-name="gr4" draw:text-style-name="P1" draw:layer="layout" svg:x1="10.25cm" svg:y1="15.448cm" svg:x2="10.25cm" svg:y2="13.448cm">
          <text:p/>
        </draw:line>
        <draw:line draw:style-name="gr4" draw:text-style-name="P1" draw:layer="layout" svg:x1="10.25cm" svg:y1="13.448cm" svg:x2="10.15cm" svg:y2="13.448cm">
          <text:p/>
        </draw:line>
        <draw:polygon draw:style-name="gr5" draw:text-style-name="P2" draw:layer="layout" svg:width="0.1cm" svg:height="2cm" svg:x="10.15cm" svg:y="13.448cm" svg:viewBox="0 0 101 2001" draw:points="0,0 101,0 101,2001 0,2001">
          <text:p/>
        </draw:polygon>
        <draw:line draw:style-name="gr4" draw:text-style-name="P1" draw:layer="layout" svg:x1="10.284cm" svg:y1="13.548cm" svg:x2="10.701cm" svg:y2="13.248cm">
          <text:p/>
        </draw:line>
        <draw:line draw:style-name="gr4" draw:text-style-name="P1" draw:layer="layout" svg:x1="9.6cm" svg:y1="13.499cm" svg:x2="10.017cm" svg:y2="13.199cm">
          <text:p/>
        </draw:line>
        <draw:line draw:style-name="gr4" draw:text-style-name="P1" draw:layer="layout" svg:x1="9.103cm" svg:y1="9.163cm" svg:x2="9.303cm" svg:y2="8.813cm">
          <text:p/>
        </draw:line>
        <draw:line draw:style-name="gr4" draw:text-style-name="P1" draw:layer="layout" svg:x1="6.5cm" svg:y1="1.898cm" svg:x2="6.5cm" svg:y2="16.098cm">
          <text:p/>
        </draw:line>
        <draw:line draw:style-name="gr4" draw:text-style-name="P1" draw:layer="layout" svg:x1="6.5cm" svg:y1="16.098cm" svg:x2="6.6cm" svg:y2="16.098cm">
          <text:p/>
        </draw:line>
        <draw:line draw:style-name="gr4" draw:text-style-name="P1" draw:layer="layout" svg:x1="6.6cm" svg:y1="16.098cm" svg:x2="6.6cm" svg:y2="1.898cm">
          <text:p/>
        </draw:line>
        <draw:line draw:style-name="gr4" draw:text-style-name="P1" draw:layer="layout" svg:x1="6.6cm" svg:y1="1.898cm" svg:x2="6.5cm" svg:y2="1.898cm">
          <text:p/>
        </draw:line>
        <draw:polygon draw:style-name="gr5" draw:text-style-name="P2" draw:layer="layout" svg:width="0.1cm" svg:height="14.2cm" svg:x="6.5cm" svg:y="1.898cm" svg:viewBox="0 0 101 14201" draw:points="0,0 101,0 101,14201 0,14201">
          <text:p/>
        </draw:polygon>
        <draw:line draw:style-name="gr4" draw:text-style-name="P1" draw:layer="layout" svg:x1="7.2cm" svg:y1="7.898cm" svg:x2="7.2cm" svg:y2="8.848cm">
          <text:p/>
        </draw:line>
        <draw:line draw:style-name="gr4" draw:text-style-name="P1" draw:layer="layout" svg:x1="7.2cm" svg:y1="8.848cm" svg:x2="7.3cm" svg:y2="8.848cm">
          <text:p/>
        </draw:line>
        <draw:line draw:style-name="gr4" draw:text-style-name="P1" draw:layer="layout" svg:x1="7.3cm" svg:y1="8.848cm" svg:x2="7.3cm" svg:y2="7.898cm">
          <text:p/>
        </draw:line>
        <draw:line draw:style-name="gr4" draw:text-style-name="P1" draw:layer="layout" svg:x1="7.3cm" svg:y1="7.898cm" svg:x2="7.2cm" svg:y2="7.898cm">
          <text:p/>
        </draw:line>
        <draw:polygon draw:style-name="gr5" draw:text-style-name="P2" draw:layer="layout" svg:width="0.1cm" svg:height="0.95cm" svg:x="7.2cm" svg:y="7.898cm" svg:viewBox="0 0 101 951" draw:points="0,0 101,0 101,951 0,951">
          <text:p/>
        </draw:polygon>
        <draw:line draw:style-name="gr4" draw:text-style-name="P1" draw:layer="layout" svg:x1="9.05cm" svg:y1="8.398cm" svg:x2="9.05cm" svg:y2="8.748cm">
          <text:p/>
        </draw:line>
        <draw:line draw:style-name="gr4" draw:text-style-name="P1" draw:layer="layout" svg:x1="9.05cm" svg:y1="8.748cm" svg:x2="9.15cm" svg:y2="8.748cm">
          <text:p/>
        </draw:line>
        <draw:line draw:style-name="gr4" draw:text-style-name="P1" draw:layer="layout" svg:x1="9.15cm" svg:y1="8.748cm" svg:x2="9.15cm" svg:y2="8.398cm">
          <text:p/>
        </draw:line>
        <draw:line draw:style-name="gr4" draw:text-style-name="P1" draw:layer="layout" svg:x1="9.15cm" svg:y1="8.398cm" svg:x2="9.05cm" svg:y2="8.398cm">
          <text:p/>
        </draw:line>
        <draw:polygon draw:style-name="gr5" draw:text-style-name="P2" draw:layer="layout" svg:width="0.1cm" svg:height="0.35cm" svg:x="9.05cm" svg:y="8.398cm" svg:viewBox="0 0 101 351" draw:points="0,0 101,0 101,351 0,351">
          <text:p/>
        </draw:polygon>
        <draw:line draw:style-name="gr4" draw:text-style-name="P1" draw:layer="layout" svg:x1="7.2cm" svg:y1="15.348cm" svg:x2="7.2cm" svg:y2="15.448cm">
          <text:p/>
        </draw:line>
        <draw:line draw:style-name="gr4" draw:text-style-name="P1" draw:layer="layout" svg:x1="7.2cm" svg:y1="15.448cm" svg:x2="7.3cm" svg:y2="15.448cm">
          <text:p/>
        </draw:line>
        <draw:line draw:style-name="gr4" draw:text-style-name="P1" draw:layer="layout" svg:x1="7.3cm" svg:y1="15.448cm" svg:x2="7.3cm" svg:y2="15.348cm">
          <text:p/>
        </draw:line>
        <draw:line draw:style-name="gr4" draw:text-style-name="P1" draw:layer="layout" svg:x1="7.3cm" svg:y1="15.348cm" svg:x2="7.2cm" svg:y2="15.348cm">
          <text:p/>
        </draw:line>
        <draw:polygon draw:style-name="gr5" draw:text-style-name="P2" draw:layer="layout" svg:width="0.1cm" svg:height="0.1cm" svg:x="7.2cm" svg:y="15.348cm" svg:viewBox="0 0 101 101" draw:points="0,0 101,0 101,101 0,101">
          <text:p/>
        </draw:polygon>
        <draw:line draw:style-name="gr4" draw:text-style-name="P1" draw:layer="layout" svg:x1="8.65cm" svg:y1="15.398cm" svg:x2="7.25cm" svg:y2="15.398cm">
          <text:p/>
        </draw:line>
        <draw:line draw:style-name="gr4" draw:text-style-name="P1" draw:layer="layout" svg:x1="7.2cm" svg:y1="12.048cm" svg:x2="7.2cm" svg:y2="12.448cm">
          <text:p/>
        </draw:line>
        <draw:line draw:style-name="gr4" draw:text-style-name="P1" draw:layer="layout" svg:x1="7.2cm" svg:y1="12.448cm" svg:x2="7.3cm" svg:y2="12.448cm">
          <text:p/>
        </draw:line>
        <draw:line draw:style-name="gr4" draw:text-style-name="P1" draw:layer="layout" svg:x1="7.3cm" svg:y1="12.448cm" svg:x2="7.3cm" svg:y2="12.048cm">
          <text:p/>
        </draw:line>
        <draw:line draw:style-name="gr4" draw:text-style-name="P1" draw:layer="layout" svg:x1="7.3cm" svg:y1="12.048cm" svg:x2="7.2cm" svg:y2="12.048cm">
          <text:p/>
        </draw:line>
        <draw:polygon draw:style-name="gr5" draw:text-style-name="P2" draw:layer="layout" svg:width="0.1cm" svg:height="0.4cm" svg:x="7.2cm" svg:y="12.048cm" svg:viewBox="0 0 101 401" draw:points="0,0 101,0 101,401 0,401">
          <text:p/>
        </draw:polygon>
        <draw:line draw:style-name="gr4" draw:text-style-name="P1" draw:layer="layout" svg:x1="7.2cm" svg:y1="14.398cm" svg:x2="7.2cm" svg:y2="14.498cm">
          <text:p/>
        </draw:line>
        <draw:line draw:style-name="gr4" draw:text-style-name="P1" draw:layer="layout" svg:x1="7.2cm" svg:y1="14.498cm" svg:x2="7.3cm" svg:y2="14.498cm">
          <text:p/>
        </draw:line>
        <draw:line draw:style-name="gr4" draw:text-style-name="P1" draw:layer="layout" svg:x1="7.3cm" svg:y1="14.498cm" svg:x2="7.3cm" svg:y2="14.398cm">
          <text:p/>
        </draw:line>
        <draw:line draw:style-name="gr4" draw:text-style-name="P1" draw:layer="layout" svg:x1="7.3cm" svg:y1="14.398cm" svg:x2="7.2cm" svg:y2="14.398cm">
          <text:p/>
        </draw:line>
        <draw:polygon draw:style-name="gr5" draw:text-style-name="P2" draw:layer="layout" svg:width="0.1cm" svg:height="0.1cm" svg:x="7.2cm" svg:y="14.398cm" svg:viewBox="0 0 101 101" draw:points="0,0 101,0 101,101 0,101">
          <text:p/>
        </draw:polygon>
        <draw:line draw:style-name="gr4" draw:text-style-name="P1" draw:layer="layout" svg:x1="7.2cm" svg:y1="13.498cm" svg:x2="7.2cm" svg:y2="13.598cm">
          <text:p/>
        </draw:line>
        <draw:line draw:style-name="gr4" draw:text-style-name="P1" draw:layer="layout" svg:x1="7.2cm" svg:y1="13.598cm" svg:x2="7.3cm" svg:y2="13.598cm">
          <text:p/>
        </draw:line>
        <draw:line draw:style-name="gr4" draw:text-style-name="P1" draw:layer="layout" svg:x1="7.3cm" svg:y1="13.598cm" svg:x2="7.3cm" svg:y2="13.498cm">
          <text:p/>
        </draw:line>
        <draw:line draw:style-name="gr4" draw:text-style-name="P1" draw:layer="layout" svg:x1="7.3cm" svg:y1="13.498cm" svg:x2="7.2cm" svg:y2="13.498cm">
          <text:p/>
        </draw:line>
        <draw:polygon draw:style-name="gr5" draw:text-style-name="P2" draw:layer="layout" svg:width="0.1cm" svg:height="0.1cm" svg:x="7.2cm" svg:y="13.498cm" svg:viewBox="0 0 101 101" draw:points="0,0 101,0 101,101 0,101">
          <text:p/>
        </draw:polygon>
        <draw:line draw:style-name="gr4" draw:text-style-name="P1" draw:layer="layout" svg:x1="7.2cm" svg:y1="8.848cm" svg:x2="7.2cm" svg:y2="9.198cm">
          <text:p/>
        </draw:line>
        <draw:line draw:style-name="gr4" draw:text-style-name="P1" draw:layer="layout" svg:x1="10.35cm" svg:y1="10.098cm" svg:x2="10.35cm" svg:y2="11.248cm">
          <text:p/>
        </draw:line>
        <draw:line draw:style-name="gr4" draw:text-style-name="P1" draw:layer="layout" svg:x1="10.15cm" svg:y1="8.898cm" svg:x2="10.15cm" svg:y2="8.998cm">
          <text:p/>
        </draw:line>
        <draw:line draw:style-name="gr4" draw:text-style-name="P1" draw:layer="layout" svg:x1="10.15cm" svg:y1="8.998cm" svg:x2="10.25cm" svg:y2="8.998cm">
          <text:p/>
        </draw:line>
        <draw:line draw:style-name="gr4" draw:text-style-name="P1" draw:layer="layout" svg:x1="10.25cm" svg:y1="8.998cm" svg:x2="10.25cm" svg:y2="8.898cm">
          <text:p/>
        </draw:line>
        <draw:line draw:style-name="gr4" draw:text-style-name="P1" draw:layer="layout" svg:x1="10.25cm" svg:y1="8.898cm" svg:x2="10.15cm" svg:y2="8.898cm">
          <text:p/>
        </draw:line>
        <draw:polygon draw:style-name="gr5" draw:text-style-name="P2" draw:layer="layout" svg:width="0.1cm" svg:height="0.1cm" svg:x="10.15cm" svg:y="8.898cm" svg:viewBox="0 0 101 101" draw:points="0,0 101,0 101,101 0,101">
          <text:p/>
        </draw:polygon>
        <draw:line draw:style-name="gr4" draw:text-style-name="P1" draw:layer="layout" svg:x1="10.15cm" svg:y1="10.048cm" svg:x2="10.15cm" svg:y2="10.148cm">
          <text:p/>
        </draw:line>
        <draw:line draw:style-name="gr4" draw:text-style-name="P1" draw:layer="layout" svg:x1="10.15cm" svg:y1="10.148cm" svg:x2="10.25cm" svg:y2="10.148cm">
          <text:p/>
        </draw:line>
        <draw:line draw:style-name="gr4" draw:text-style-name="P1" draw:layer="layout" svg:x1="10.25cm" svg:y1="10.148cm" svg:x2="10.25cm" svg:y2="10.048cm">
          <text:p/>
        </draw:line>
        <draw:line draw:style-name="gr4" draw:text-style-name="P1" draw:layer="layout" svg:x1="10.25cm" svg:y1="10.048cm" svg:x2="10.15cm" svg:y2="10.048cm">
          <text:p/>
        </draw:line>
        <draw:polygon draw:style-name="gr5" draw:text-style-name="P2" draw:layer="layout" svg:width="0.1cm" svg:height="0.1cm" svg:x="10.15cm" svg:y="10.048cm" svg:viewBox="0 0 101 101" draw:points="0,0 101,0 101,101 0,101">
          <text:p/>
        </draw:polygon>
        <draw:line draw:style-name="gr4" draw:text-style-name="P1" draw:layer="layout" svg:x1="9.05cm" svg:y1="12.248cm" svg:x2="9.05cm" svg:y2="12.448cm">
          <text:p/>
        </draw:line>
        <draw:line draw:style-name="gr4" draw:text-style-name="P1" draw:layer="layout" svg:x1="9.05cm" svg:y1="12.448cm" svg:x2="9.15cm" svg:y2="12.448cm">
          <text:p/>
        </draw:line>
        <draw:line draw:style-name="gr4" draw:text-style-name="P1" draw:layer="layout" svg:x1="9.15cm" svg:y1="12.448cm" svg:x2="9.15cm" svg:y2="12.248cm">
          <text:p/>
        </draw:line>
        <draw:line draw:style-name="gr4" draw:text-style-name="P1" draw:layer="layout" svg:x1="9.15cm" svg:y1="12.248cm" svg:x2="9.05cm" svg:y2="12.248cm">
          <text:p/>
        </draw:line>
        <draw:polygon draw:style-name="gr5" draw:text-style-name="P2" draw:layer="layout" svg:width="0.1cm" svg:height="0.2cm" svg:x="9.05cm" svg:y="12.248cm" svg:viewBox="0 0 101 201" draw:points="0,0 101,0 101,201 0,201">
          <text:p/>
        </draw:polygon>
        <draw:path draw:style-name="gr4" draw:text-style-name="P1" draw:layer="layout" svg:width="0.145cm" svg:height="0.1cm" svg:x="9.205cm" svg:y="8.798cm" svg:viewBox="0 0 146 101" svg:d="M0 11c31-16 68-14 98 4s48 51 48 86">
          <text:p/>
        </draw:path>
        <draw:line draw:style-name="gr4" draw:text-style-name="P1" draw:layer="layout" svg:x1="6.5cm" svg:y1="1.898cm" svg:x2="6.5cm" svg:y2="1.998cm">
          <text:p/>
        </draw:line>
        <draw:line draw:style-name="gr4" draw:text-style-name="P1" draw:layer="layout" svg:x1="6.5cm" svg:y1="1.998cm" svg:x2="10.85cm" svg:y2="1.998cm">
          <text:p/>
        </draw:line>
        <draw:line draw:style-name="gr4" draw:text-style-name="P1" draw:layer="layout" svg:x1="10.85cm" svg:y1="1.998cm" svg:x2="10.85cm" svg:y2="1.898cm">
          <text:p/>
        </draw:line>
        <draw:line draw:style-name="gr4" draw:text-style-name="P1" draw:layer="layout" svg:x1="10.85cm" svg:y1="1.898cm" svg:x2="6.5cm" svg:y2="1.898cm">
          <text:p/>
        </draw:line>
        <draw:polygon draw:style-name="gr5" draw:text-style-name="P2" draw:layer="layout" svg:width="4.35cm" svg:height="0.1cm" svg:x="6.5cm" svg:y="1.898cm" svg:viewBox="0 0 4351 101" draw:points="0,0 4351,0 4351,101 0,101">
          <text:p/>
        </draw:polygon>
        <draw:line draw:style-name="gr4" draw:text-style-name="P1" draw:layer="layout" svg:x1="9.45cm" svg:y1="3.198cm" svg:x2="10.15cm" svg:y2="3.198cm">
          <text:p/>
        </draw:line>
        <draw:line draw:style-name="gr4" draw:text-style-name="P1" draw:layer="layout" svg:x1="16.78cm" svg:y1="1.898cm" svg:x2="16.78cm" svg:y2="1.998cm">
          <text:p/>
        </draw:line>
        <draw:line draw:style-name="gr4" draw:text-style-name="P1" draw:layer="layout" svg:x1="16.78cm" svg:y1="1.998cm" svg:x2="18.1cm" svg:y2="1.998cm">
          <text:p/>
        </draw:line>
        <draw:line draw:style-name="gr4" draw:text-style-name="P1" draw:layer="layout" svg:x1="18.1cm" svg:y1="1.998cm" svg:x2="18.1cm" svg:y2="1.898cm">
          <text:p/>
        </draw:line>
        <draw:line draw:style-name="gr4" draw:text-style-name="P1" draw:layer="layout" svg:x1="18.1cm" svg:y1="1.898cm" svg:x2="16.78cm" svg:y2="1.898cm">
          <text:p/>
        </draw:line>
        <draw:polygon draw:style-name="gr5" draw:text-style-name="P2" draw:layer="layout" svg:width="1.32cm" svg:height="0.1cm" svg:x="16.78cm" svg:y="1.898cm" svg:viewBox="0 0 1321 101" draw:points="0,0 1321,0 1321,101 0,101">
          <text:p/>
        </draw:polygon>
        <draw:line draw:style-name="gr4" draw:text-style-name="P1" draw:layer="layout" svg:x1="10.15cm" svg:y1="11.198cm" svg:x2="10.15cm" svg:y2="11.298cm">
          <text:p/>
        </draw:line>
        <draw:line draw:style-name="gr4" draw:text-style-name="P1" draw:layer="layout" svg:x1="10.15cm" svg:y1="11.298cm" svg:x2="10.25cm" svg:y2="11.298cm">
          <text:p/>
        </draw:line>
        <draw:line draw:style-name="gr4" draw:text-style-name="P1" draw:layer="layout" svg:x1="10.25cm" svg:y1="11.298cm" svg:x2="10.25cm" svg:y2="11.198cm">
          <text:p/>
        </draw:line>
        <draw:line draw:style-name="gr4" draw:text-style-name="P1" draw:layer="layout" svg:x1="10.25cm" svg:y1="11.198cm" svg:x2="10.15cm" svg:y2="11.198cm">
          <text:p/>
        </draw:line>
        <draw:polygon draw:style-name="gr5" draw:text-style-name="P2" draw:layer="layout" svg:width="0.1cm" svg:height="0.1cm" svg:x="10.15cm" svg:y="11.198cm" svg:viewBox="0 0 101 101" draw:points="0,0 101,0 101,101 0,101">
          <text:p/>
        </draw:polygon>
        <draw:path draw:style-name="gr4" draw:text-style-name="P1" draw:layer="layout" svg:width="0.145cm" svg:height="0.1cm" svg:x="9.205cm" svg:y="10.698cm" svg:viewBox="0 0 146 101" svg:d="M0 10c31-15 68-14 98 5 30 18 48 51 48 86">
          <text:p/>
        </draw:path>
        <draw:line draw:style-name="gr4" draw:text-style-name="P1" draw:layer="layout" svg:x1="10.65cm" svg:y1="10.098cm" svg:x2="10.65cm" svg:y2="11.248cm">
          <text:p/>
        </draw:line>
        <draw:line draw:style-name="gr4" draw:text-style-name="P1" draw:layer="layout" svg:x1="10.5cm" svg:y1="10.098cm" svg:x2="10.5cm" svg:y2="11.248cm">
          <text:p/>
        </draw:line>
        <draw:line draw:style-name="gr4" draw:text-style-name="P1" draw:layer="layout" svg:x1="10.65cm" svg:y1="11.248cm" svg:x2="10.25cm" svg:y2="11.248cm">
          <text:p/>
        </draw:line>
        <draw:line draw:style-name="gr4" draw:text-style-name="P1" draw:layer="layout" svg:x1="10.2cm" svg:y1="10.098cm" svg:x2="10.65cm" svg:y2="10.098cm">
          <text:p/>
        </draw:line>
        <draw:line draw:style-name="gr4" draw:text-style-name="P1" draw:layer="layout" svg:x1="10.2cm" svg:y1="5.448cm" svg:x2="10.2cm" svg:y2="12.398cm">
          <text:p/>
        </draw:line>
        <draw:line draw:style-name="gr4" draw:text-style-name="P1" draw:layer="layout" svg:x1="9.05cm" svg:y1="9.148cm" svg:x2="9.05cm" svg:y2="9.898cm">
          <text:p/>
        </draw:line>
        <draw:line draw:style-name="gr4" draw:text-style-name="P1" draw:layer="layout" svg:x1="9.05cm" svg:y1="9.898cm" svg:x2="9.15cm" svg:y2="9.898cm">
          <text:p/>
        </draw:line>
        <draw:line draw:style-name="gr4" draw:text-style-name="P1" draw:layer="layout" svg:x1="9.15cm" svg:y1="9.898cm" svg:x2="9.15cm" svg:y2="9.148cm">
          <text:p/>
        </draw:line>
        <draw:line draw:style-name="gr4" draw:text-style-name="P1" draw:layer="layout" svg:x1="9.15cm" svg:y1="9.148cm" svg:x2="9.05cm" svg:y2="9.148cm">
          <text:p/>
        </draw:line>
        <draw:polygon draw:style-name="gr5" draw:text-style-name="P2" draw:layer="layout" svg:width="0.1cm" svg:height="0.75cm" svg:x="9.05cm" svg:y="9.148cm" svg:viewBox="0 0 101 751" draw:points="0,0 101,0 101,751 0,751">
          <text:p/>
        </draw:polygon>
        <draw:line draw:style-name="gr4" draw:text-style-name="P1" draw:layer="layout" svg:x1="9.1cm" svg:y1="8.449cm" svg:x2="9.301cm" svg:y2="8.098cm">
          <text:p/>
        </draw:line>
        <draw:line draw:style-name="gr4" draw:text-style-name="P1" draw:layer="layout" svg:x1="9.05cm" svg:y1="7.298cm" svg:x2="9.05cm" svg:y2="8.048cm">
          <text:p/>
        </draw:line>
        <draw:line draw:style-name="gr4" draw:text-style-name="P1" draw:layer="layout" svg:x1="9.05cm" svg:y1="8.048cm" svg:x2="9.15cm" svg:y2="8.048cm">
          <text:p/>
        </draw:line>
        <draw:line draw:style-name="gr4" draw:text-style-name="P1" draw:layer="layout" svg:x1="9.15cm" svg:y1="8.048cm" svg:x2="9.15cm" svg:y2="7.298cm">
          <text:p/>
        </draw:line>
        <draw:line draw:style-name="gr4" draw:text-style-name="P1" draw:layer="layout" svg:x1="9.15cm" svg:y1="7.298cm" svg:x2="9.05cm" svg:y2="7.298cm">
          <text:p/>
        </draw:line>
        <draw:polygon draw:style-name="gr5" draw:text-style-name="P2" draw:layer="layout" svg:width="0.1cm" svg:height="0.75cm" svg:x="9.05cm" svg:y="7.298cm" svg:viewBox="0 0 101 751" draw:points="0,0 101,0 101,751 0,751">
          <text:p/>
        </draw:polygon>
        <draw:line draw:style-name="gr4" draw:text-style-name="P1" draw:layer="layout" svg:x1="9.103cm" svg:y1="12.264cm" svg:x2="9.303cm" svg:y2="11.913cm">
          <text:p/>
        </draw:line>
        <draw:line draw:style-name="gr4" draw:text-style-name="P1" draw:layer="layout" svg:x1="9.103cm" svg:y1="10.314cm" svg:x2="9.303cm" svg:y2="9.963cm">
          <text:p/>
        </draw:line>
        <draw:line draw:style-name="gr4" draw:text-style-name="P1" draw:layer="layout" svg:x1="7.3cm" svg:y1="8.848cm" svg:x2="7.3cm" svg:y2="9.248cm">
          <text:p/>
        </draw:line>
        <draw:path draw:style-name="gr4" draw:text-style-name="P1" draw:layer="layout" svg:width="0.145cm" svg:height="0.1cm" svg:x="9.205cm" svg:y="9.948cm" svg:viewBox="0 0 146 101" svg:d="M0 11c31-16 68-14 98 5 30 18 48 50 48 85">
          <text:p/>
        </draw:path>
        <draw:line draw:style-name="gr4" draw:text-style-name="P1" draw:layer="layout" svg:x1="7.3cm" svg:y1="8.548cm" svg:x2="7.3cm" svg:y2="8.648cm">
          <text:p/>
        </draw:line>
        <draw:line draw:style-name="gr4" draw:text-style-name="P1" draw:layer="layout" svg:x1="7.3cm" svg:y1="8.648cm" svg:x2="9.05cm" svg:y2="8.648cm">
          <text:p/>
        </draw:line>
        <draw:line draw:style-name="gr4" draw:text-style-name="P1" draw:layer="layout" svg:x1="9.05cm" svg:y1="8.648cm" svg:x2="9.05cm" svg:y2="8.548cm">
          <text:p/>
        </draw:line>
        <draw:line draw:style-name="gr4" draw:text-style-name="P1" draw:layer="layout" svg:x1="9.05cm" svg:y1="8.548cm" svg:x2="7.3cm" svg:y2="8.548cm">
          <text:p/>
        </draw:line>
        <draw:polygon draw:style-name="gr5" draw:text-style-name="P2" draw:layer="layout" svg:width="1.75cm" svg:height="0.1cm" svg:x="7.3cm" svg:y="8.548cm" svg:viewBox="0 0 1751 101" draw:points="0,0 1751,0 1751,101 0,101">
          <text:p/>
        </draw:polygon>
        <draw:line draw:style-name="gr4" draw:text-style-name="P1" draw:layer="layout" svg:x1="7.3cm" svg:y1="10.198cm" svg:x2="7.3cm" svg:y2="9.848cm">
          <text:p/>
        </draw:line>
        <draw:line draw:style-name="gr4" draw:text-style-name="P1" draw:layer="layout" svg:x1="7.2cm" svg:y1="9.198cm" svg:x2="7.2cm" svg:y2="9.848cm">
          <text:p/>
        </draw:line>
        <draw:line draw:style-name="gr4" draw:text-style-name="P1" draw:layer="layout" svg:x1="7.2cm" svg:y1="9.848cm" svg:x2="7.3cm" svg:y2="9.848cm">
          <text:p/>
        </draw:line>
        <draw:line draw:style-name="gr4" draw:text-style-name="P1" draw:layer="layout" svg:x1="7.3cm" svg:y1="9.848cm" svg:x2="7.3cm" svg:y2="9.198cm">
          <text:p/>
        </draw:line>
        <draw:line draw:style-name="gr4" draw:text-style-name="P1" draw:layer="layout" svg:x1="7.3cm" svg:y1="9.198cm" svg:x2="7.2cm" svg:y2="9.198cm">
          <text:p/>
        </draw:line>
        <draw:polygon draw:style-name="gr5" draw:text-style-name="P2" draw:layer="layout" svg:width="0.1cm" svg:height="0.65cm" svg:x="7.2cm" svg:y="9.198cm" svg:viewBox="0 0 101 651" draw:points="0,0 101,0 101,651 0,651">
          <text:p/>
        </draw:polygon>
        <draw:line draw:style-name="gr4" draw:text-style-name="P1" draw:layer="layout" svg:x1="7.2cm" svg:y1="9.848cm" svg:x2="7.2cm" svg:y2="10.198cm">
          <text:p/>
        </draw:line>
        <draw:path draw:style-name="gr4" draw:text-style-name="P1" draw:layer="layout" svg:width="0.145cm" svg:height="0.1cm" svg:x="9.205cm" svg:y="11.898cm" svg:viewBox="0 0 146 101" svg:d="M0 10c31-15 68-13 98 5 30 19 48 51 48 86">
          <text:p/>
        </draw:path>
        <draw:line draw:style-name="gr4" draw:text-style-name="P1" draw:layer="layout" svg:x1="9.103cm" svg:y1="11.064cm" svg:x2="9.303cm" svg:y2="10.713cm">
          <text:p/>
        </draw:line>
        <draw:line draw:style-name="gr4" draw:text-style-name="P1" draw:layer="layout" svg:x1="7.3cm" svg:y1="10.448cm" svg:x2="7.3cm" svg:y2="10.548cm">
          <text:p/>
        </draw:line>
        <draw:line draw:style-name="gr4" draw:text-style-name="P1" draw:layer="layout" svg:x1="7.3cm" svg:y1="10.548cm" svg:x2="9.1cm" svg:y2="10.548cm">
          <text:p/>
        </draw:line>
        <draw:line draw:style-name="gr4" draw:text-style-name="P1" draw:layer="layout" svg:x1="9.1cm" svg:y1="10.548cm" svg:x2="9.1cm" svg:y2="10.448cm">
          <text:p/>
        </draw:line>
        <draw:line draw:style-name="gr4" draw:text-style-name="P1" draw:layer="layout" svg:x1="9.1cm" svg:y1="10.448cm" svg:x2="7.3cm" svg:y2="10.448cm">
          <text:p/>
        </draw:line>
        <draw:polygon draw:style-name="gr5" draw:text-style-name="P2" draw:layer="layout" svg:width="1.8cm" svg:height="0.1cm" svg:x="7.3cm" svg:y="10.448cm" svg:viewBox="0 0 1801 101" draw:points="0,0 1801,0 1801,101 0,101">
          <text:p/>
        </draw:polygon>
        <draw:line draw:style-name="gr4" draw:text-style-name="P1" draw:layer="layout" svg:x1="9.05cm" svg:y1="11.048cm" svg:x2="9.05cm" svg:y2="11.848cm">
          <text:p/>
        </draw:line>
        <draw:line draw:style-name="gr4" draw:text-style-name="P1" draw:layer="layout" svg:x1="9.05cm" svg:y1="11.848cm" svg:x2="9.15cm" svg:y2="11.848cm">
          <text:p/>
        </draw:line>
        <draw:line draw:style-name="gr4" draw:text-style-name="P1" draw:layer="layout" svg:x1="9.15cm" svg:y1="11.848cm" svg:x2="9.15cm" svg:y2="11.048cm">
          <text:p/>
        </draw:line>
        <draw:line draw:style-name="gr4" draw:text-style-name="P1" draw:layer="layout" svg:x1="9.15cm" svg:y1="11.048cm" svg:x2="9.05cm" svg:y2="11.048cm">
          <text:p/>
        </draw:line>
        <draw:polygon draw:style-name="gr5" draw:text-style-name="P2" draw:layer="layout" svg:width="0.1cm" svg:height="0.8cm" svg:x="9.05cm" svg:y="11.048cm" svg:viewBox="0 0 101 801" draw:points="0,0 101,0 101,801 0,801">
          <text:p/>
        </draw:polygon>
        <draw:line draw:style-name="gr4" draw:text-style-name="P1" draw:layer="layout" svg:x1="7.2cm" svg:y1="11.148cm" svg:x2="7.2cm" svg:y2="11.748cm">
          <text:p/>
        </draw:line>
        <draw:line draw:style-name="gr4" draw:text-style-name="P1" draw:layer="layout" svg:x1="7.2cm" svg:y1="11.748cm" svg:x2="7.3cm" svg:y2="11.748cm">
          <text:p/>
        </draw:line>
        <draw:line draw:style-name="gr4" draw:text-style-name="P1" draw:layer="layout" svg:x1="7.3cm" svg:y1="11.748cm" svg:x2="7.3cm" svg:y2="11.148cm">
          <text:p/>
        </draw:line>
        <draw:line draw:style-name="gr4" draw:text-style-name="P1" draw:layer="layout" svg:x1="7.3cm" svg:y1="11.148cm" svg:x2="7.2cm" svg:y2="11.148cm">
          <text:p/>
        </draw:line>
        <draw:polygon draw:style-name="gr5" draw:text-style-name="P2" draw:layer="layout" svg:width="0.1cm" svg:height="0.6cm" svg:x="7.2cm" svg:y="11.148cm" svg:viewBox="0 0 101 601" draw:points="0,0 101,0 101,601 0,601">
          <text:p/>
        </draw:polygon>
        <draw:line draw:style-name="gr4" draw:text-style-name="P1" draw:layer="layout" svg:x1="7.3cm" svg:y1="11.148cm" svg:x2="7.3cm" svg:y2="10.848cm">
          <text:p/>
        </draw:line>
        <draw:line draw:style-name="gr4" draw:text-style-name="P1" draw:layer="layout" svg:x1="7.2cm" svg:y1="10.848cm" svg:x2="7.2cm" svg:y2="11.148cm">
          <text:p/>
        </draw:line>
        <draw:line draw:style-name="gr4" draw:text-style-name="P1" draw:layer="layout" svg:x1="7.3cm" svg:y1="11.748cm" svg:x2="7.3cm" svg:y2="12.048cm">
          <text:p/>
        </draw:line>
        <draw:line draw:style-name="gr4" draw:text-style-name="P1" draw:layer="layout" svg:x1="7.2cm" svg:y1="10.198cm" svg:x2="7.2cm" svg:y2="10.848cm">
          <text:p/>
        </draw:line>
        <draw:line draw:style-name="gr4" draw:text-style-name="P1" draw:layer="layout" svg:x1="7.2cm" svg:y1="10.848cm" svg:x2="7.3cm" svg:y2="10.848cm">
          <text:p/>
        </draw:line>
        <draw:line draw:style-name="gr4" draw:text-style-name="P1" draw:layer="layout" svg:x1="7.3cm" svg:y1="10.848cm" svg:x2="7.3cm" svg:y2="10.198cm">
          <text:p/>
        </draw:line>
        <draw:line draw:style-name="gr4" draw:text-style-name="P1" draw:layer="layout" svg:x1="7.3cm" svg:y1="10.198cm" svg:x2="7.2cm" svg:y2="10.198cm">
          <text:p/>
        </draw:line>
        <draw:polygon draw:style-name="gr5" draw:text-style-name="P2" draw:layer="layout" svg:width="0.1cm" svg:height="0.65cm" svg:x="7.2cm" svg:y="10.198cm" svg:viewBox="0 0 101 651" draw:points="0,0 101,0 101,651 0,651">
          <text:p/>
        </draw:polygon>
        <draw:line draw:style-name="gr4" draw:text-style-name="P1" draw:layer="layout" svg:x1="7.2cm" svg:y1="12.048cm" svg:x2="7.2cm" svg:y2="11.748cm">
          <text:p/>
        </draw:line>
        <draw:line draw:style-name="gr4" draw:text-style-name="P1" draw:layer="layout" svg:x1="10.65cm" svg:y1="8.948cm" svg:x2="10.65cm" svg:y2="5.448cm">
          <text:p/>
        </draw:line>
        <draw:line draw:style-name="gr4" draw:text-style-name="P1" draw:layer="layout" svg:x1="10.2cm" svg:y1="8.948cm" svg:x2="10.65cm" svg:y2="8.948cm">
          <text:p/>
        </draw:line>
        <draw:path draw:style-name="gr4" draw:text-style-name="P1" draw:layer="layout" svg:width="0.144cm" svg:height="0.1cm" svg:x="9.203cm" svg:y="8.083cm" svg:viewBox="0 0 145 101" svg:d="M0 11c30-16 67-14 98 4 29 18 47 50 47 86">
          <text:p/>
        </draw:path>
        <draw:line draw:style-name="gr4" draw:text-style-name="P1" draw:layer="layout" svg:x1="13.95cm" svg:y1="5.398cm" svg:x2="13.95cm" svg:y2="5.498cm">
          <text:p/>
        </draw:line>
        <draw:line draw:style-name="gr4" draw:text-style-name="P1" draw:layer="layout" svg:x1="13.95cm" svg:y1="5.498cm" svg:x2="14.05cm" svg:y2="5.498cm">
          <text:p/>
        </draw:line>
        <draw:line draw:style-name="gr4" draw:text-style-name="P1" draw:layer="layout" svg:x1="14.05cm" svg:y1="5.498cm" svg:x2="14.05cm" svg:y2="5.398cm">
          <text:p/>
        </draw:line>
        <draw:line draw:style-name="gr4" draw:text-style-name="P1" draw:layer="layout" svg:x1="14.05cm" svg:y1="5.398cm" svg:x2="13.95cm" svg:y2="5.398cm">
          <text:p/>
        </draw:line>
        <draw:polygon draw:style-name="gr5" draw:text-style-name="P2" draw:layer="layout" svg:width="0.1cm" svg:height="0.1cm" svg:x="13.95cm" svg:y="5.398cm" svg:viewBox="0 0 101 101" draw:points="0,0 101,0 101,101 0,101">
          <text:p/>
        </draw:polygon>
        <draw:path draw:style-name="gr4" draw:text-style-name="P1" draw:layer="layout" svg:width="0.103cm" svg:height="0.14cm" svg:x="12.207cm" svg:y="13.206cm" svg:viewBox="0 0 104 141" svg:d="M0 3c36-11 75 5 93 39 19 32 13 73-15 99">
          <text:p/>
        </draw:path>
        <draw:line draw:style-name="gr4" draw:text-style-name="P1" draw:layer="layout" svg:x1="11.885cm" svg:y1="13.548cm" svg:x2="12.301cm" svg:y2="13.248cm">
          <text:p/>
        </draw:line>
        <draw:line draw:style-name="gr4" draw:text-style-name="P1" draw:layer="layout" svg:x1="11.3cm" svg:y1="12.348cm" svg:x2="11.3cm" svg:y2="12.448cm">
          <text:p/>
        </draw:line>
        <draw:line draw:style-name="gr4" draw:text-style-name="P1" draw:layer="layout" svg:x1="11.3cm" svg:y1="12.448cm" svg:x2="11.4cm" svg:y2="12.448cm">
          <text:p/>
        </draw:line>
        <draw:line draw:style-name="gr4" draw:text-style-name="P1" draw:layer="layout" svg:x1="11.4cm" svg:y1="12.448cm" svg:x2="11.4cm" svg:y2="12.348cm">
          <text:p/>
        </draw:line>
        <draw:line draw:style-name="gr4" draw:text-style-name="P1" draw:layer="layout" svg:x1="11.4cm" svg:y1="12.348cm" svg:x2="11.3cm" svg:y2="12.348cm">
          <text:p/>
        </draw:line>
        <draw:polygon draw:style-name="gr5" draw:text-style-name="P2" draw:layer="layout" svg:width="0.1cm" svg:height="0.1cm" svg:x="11.3cm" svg:y="12.348cm" svg:viewBox="0 0 101 101" draw:points="0,0 101,0 101,101 0,101">
          <text:p/>
        </draw:polygon>
        <draw:line draw:style-name="gr4" draw:text-style-name="P1" draw:layer="layout" svg:x1="7.25cm" svg:y1="12.348cm" svg:x2="7.25cm" svg:y2="12.448cm">
          <text:p/>
        </draw:line>
        <draw:line draw:style-name="gr4" draw:text-style-name="P1" draw:layer="layout" svg:x1="7.25cm" svg:y1="12.448cm" svg:x2="9.1cm" svg:y2="12.448cm">
          <text:p/>
        </draw:line>
        <draw:line draw:style-name="gr4" draw:text-style-name="P1" draw:layer="layout" svg:x1="9.1cm" svg:y1="12.448cm" svg:x2="9.1cm" svg:y2="12.348cm">
          <text:p/>
        </draw:line>
        <draw:line draw:style-name="gr4" draw:text-style-name="P1" draw:layer="layout" svg:x1="9.1cm" svg:y1="12.348cm" svg:x2="7.25cm" svg:y2="12.348cm">
          <text:p/>
        </draw:line>
        <draw:polygon draw:style-name="gr5" draw:text-style-name="P2" draw:layer="layout" svg:width="1.85cm" svg:height="0.1cm" svg:x="7.25cm" svg:y="12.348cm" svg:viewBox="0 0 1851 101" draw:points="0,0 1851,0 1851,101 0,101">
          <text:p/>
        </draw:polygon>
        <draw:line draw:style-name="gr4" draw:text-style-name="P1" draw:layer="layout" svg:x1="10.15cm" svg:y1="12.348cm" svg:x2="10.15cm" svg:y2="12.448cm">
          <text:p/>
        </draw:line>
        <draw:line draw:style-name="gr4" draw:text-style-name="P1" draw:layer="layout" svg:x1="10.15cm" svg:y1="12.448cm" svg:x2="10.25cm" svg:y2="12.448cm">
          <text:p/>
        </draw:line>
        <draw:line draw:style-name="gr4" draw:text-style-name="P1" draw:layer="layout" svg:x1="10.25cm" svg:y1="12.448cm" svg:x2="10.25cm" svg:y2="12.348cm">
          <text:p/>
        </draw:line>
        <draw:line draw:style-name="gr4" draw:text-style-name="P1" draw:layer="layout" svg:x1="10.25cm" svg:y1="12.348cm" svg:x2="10.15cm" svg:y2="12.348cm">
          <text:p/>
        </draw:line>
        <draw:polygon draw:style-name="gr5" draw:text-style-name="P2" draw:layer="layout" svg:width="0.1cm" svg:height="0.1cm" svg:x="10.15cm" svg:y="12.348cm" svg:viewBox="0 0 101 101" draw:points="0,0 101,0 101,101 0,101">
          <text:p/>
        </draw:polygon>
        <draw:line draw:style-name="gr4" draw:text-style-name="P1" draw:layer="layout" svg:x1="7.523cm" svg:y1="17.372cm" svg:x2="7.523cm" svg:y2="17.522cm">
          <text:p/>
        </draw:line>
        <draw:line draw:style-name="gr4" draw:text-style-name="P1" draw:layer="layout" svg:x1="8.6cm" svg:y1="15.348cm" svg:x2="8.6cm" svg:y2="15.448cm">
          <text:p/>
        </draw:line>
        <draw:line draw:style-name="gr4" draw:text-style-name="P1" draw:layer="layout" svg:x1="8.6cm" svg:y1="15.448cm" svg:x2="9.2cm" svg:y2="15.448cm">
          <text:p/>
        </draw:line>
        <draw:line draw:style-name="gr4" draw:text-style-name="P1" draw:layer="layout" svg:x1="9.2cm" svg:y1="15.448cm" svg:x2="9.2cm" svg:y2="15.348cm">
          <text:p/>
        </draw:line>
        <draw:line draw:style-name="gr4" draw:text-style-name="P1" draw:layer="layout" svg:x1="9.2cm" svg:y1="15.348cm" svg:x2="8.6cm" svg:y2="15.348cm">
          <text:p/>
        </draw:line>
        <draw:polygon draw:style-name="gr5" draw:text-style-name="P2" draw:layer="layout" svg:width="0.6cm" svg:height="0.1cm" svg:x="8.6cm" svg:y="15.348cm" svg:viewBox="0 0 601 101" draw:points="0,0 601,0 601,101 0,101">
          <text:p/>
        </draw:polygon>
        <draw:line draw:style-name="gr4" draw:text-style-name="P1" draw:layer="layout" svg:x1="8.6cm" svg:y1="13.448cm" svg:x2="8.6cm" svg:y2="15.448cm">
          <text:p/>
        </draw:line>
        <draw:line draw:style-name="gr4" draw:text-style-name="P1" draw:layer="layout" svg:x1="8.6cm" svg:y1="15.448cm" svg:x2="8.7cm" svg:y2="15.448cm">
          <text:p/>
        </draw:line>
        <draw:line draw:style-name="gr4" draw:text-style-name="P1" draw:layer="layout" svg:x1="8.7cm" svg:y1="15.448cm" svg:x2="8.7cm" svg:y2="13.448cm">
          <text:p/>
        </draw:line>
        <draw:line draw:style-name="gr4" draw:text-style-name="P1" draw:layer="layout" svg:x1="8.7cm" svg:y1="13.448cm" svg:x2="8.6cm" svg:y2="13.448cm">
          <text:p/>
        </draw:line>
        <draw:polygon draw:style-name="gr5" draw:text-style-name="P2" draw:layer="layout" svg:width="0.1cm" svg:height="2cm" svg:x="8.6cm" svg:y="13.448cm" svg:viewBox="0 0 101 2001" draw:points="0,0 101,0 101,2001 0,2001">
          <text:p/>
        </draw:polygon>
        <draw:line draw:style-name="gr4" draw:text-style-name="P1" draw:layer="layout" svg:x1="7.023cm" svg:y1="17.523cm" svg:x2="7.924cm" svg:y2="17.422cm">
          <text:p/>
        </draw:line>
        <draw:line draw:style-name="gr4" draw:text-style-name="P1" draw:layer="layout" svg:x1="7.9cm" svg:y1="15.348cm" svg:x2="7.9cm" svg:y2="15.448cm">
          <text:p/>
        </draw:line>
        <draw:line draw:style-name="gr4" draw:text-style-name="P1" draw:layer="layout" svg:x1="7.9cm" svg:y1="15.448cm" svg:x2="8cm" svg:y2="15.448cm">
          <text:p/>
        </draw:line>
        <draw:line draw:style-name="gr4" draw:text-style-name="P1" draw:layer="layout" svg:x1="8cm" svg:y1="15.448cm" svg:x2="8cm" svg:y2="15.348cm">
          <text:p/>
        </draw:line>
        <draw:line draw:style-name="gr4" draw:text-style-name="P1" draw:layer="layout" svg:x1="8cm" svg:y1="15.348cm" svg:x2="7.9cm" svg:y2="15.348cm">
          <text:p/>
        </draw:line>
        <draw:polygon draw:style-name="gr5" draw:text-style-name="P2" draw:layer="layout" svg:width="0.1cm" svg:height="0.1cm" svg:x="7.9cm" svg:y="15.348cm" svg:viewBox="0 0 101 101" draw:points="0,0 101,0 101,101 0,101">
          <text:p/>
        </draw:polygon>
        <draw:line draw:style-name="gr4" draw:text-style-name="P1" draw:layer="layout" svg:x1="7.273cm" svg:y1="17.422cm" svg:x2="7.273cm" svg:y2="17.572cm">
          <text:p/>
        </draw:line>
        <draw:line draw:style-name="gr4" draw:text-style-name="P1" draw:layer="layout" svg:x1="8.123cm" svg:y1="17.322cm" svg:x2="8.123cm" svg:y2="17.522cm">
          <text:p/>
        </draw:line>
        <draw:line draw:style-name="gr4" draw:text-style-name="P1" draw:layer="layout" svg:x1="8.674cm" svg:y1="17.523cm" svg:x2="7.873cm" svg:y2="17.372cm">
          <text:p/>
        </draw:line>
        <draw:line draw:style-name="gr4" draw:text-style-name="P1" draw:layer="layout" svg:x1="8.323cm" svg:y1="17.098cm" svg:x2="8.524cm" svg:y2="16.747cm">
          <text:p/>
        </draw:line>
        <draw:line draw:style-name="gr4" draw:text-style-name="P1" draw:layer="layout" svg:x1="8.373cm" svg:y1="17.372cm" svg:x2="8.373cm" svg:y2="17.572cm">
          <text:p/>
        </draw:line>
        <draw:path draw:style-name="gr4" draw:text-style-name="P1" draw:layer="layout" svg:width="0.144cm" svg:height="0.1cm" svg:x="8.426cm" svg:y="16.732cm" svg:viewBox="0 0 145 101" svg:d="M0 11c30-16 67-14 98 4 29 18 47 50 47 86">
          <text:p/>
        </draw:path>
        <draw:line draw:style-name="gr4" draw:text-style-name="P1" draw:layer="layout" svg:x1="11.05cm" svg:y1="15.348cm" svg:x2="11.05cm" svg:y2="15.448cm">
          <text:p/>
        </draw:line>
        <draw:line draw:style-name="gr4" draw:text-style-name="P1" draw:layer="layout" svg:x1="11.05cm" svg:y1="15.448cm" svg:x2="11.8cm" svg:y2="15.448cm">
          <text:p/>
        </draw:line>
        <draw:line draw:style-name="gr4" draw:text-style-name="P1" draw:layer="layout" svg:x1="11.8cm" svg:y1="15.448cm" svg:x2="11.8cm" svg:y2="15.348cm">
          <text:p/>
        </draw:line>
        <draw:line draw:style-name="gr4" draw:text-style-name="P1" draw:layer="layout" svg:x1="11.8cm" svg:y1="15.348cm" svg:x2="11.05cm" svg:y2="15.348cm">
          <text:p/>
        </draw:line>
        <draw:polygon draw:style-name="gr5" draw:text-style-name="P2" draw:layer="layout" svg:width="0.75cm" svg:height="0.1cm" svg:x="11.05cm" svg:y="15.348cm" svg:viewBox="0 0 751 101" draw:points="0,0 751,0 751,101 0,101">
          <text:p/>
        </draw:polygon>
        <draw:line draw:style-name="gr4" draw:text-style-name="P1" draw:layer="layout" svg:x1="10.65cm" svg:y1="15.448cm" svg:x2="11.05cm" svg:y2="15.448cm">
          <text:p/>
        </draw:line>
        <draw:path draw:style-name="gr4" draw:text-style-name="P1" draw:layer="layout" svg:width="0.103cm" svg:height="0.14cm" svg:x="10.607cm" svg:y="13.207cm" svg:viewBox="0 0 104 141" svg:d="M0 3c36-11 75 5 94 39 18 32 12 73-16 99">
          <text:p/>
        </draw:path>
        <draw:line draw:style-name="gr4" draw:text-style-name="P1" draw:layer="layout" svg:x1="7.25cm" svg:y1="12.448cm" svg:x2="7.25cm" svg:y2="15.398cm">
          <text:p/>
        </draw:line>
        <draw:line draw:style-name="gr4" draw:text-style-name="P1" draw:layer="layout" svg:x1="8.6cm" svg:y1="13.448cm" svg:x2="8.6cm" svg:y2="13.548cm">
          <text:p/>
        </draw:line>
        <draw:line draw:style-name="gr4" draw:text-style-name="P1" draw:layer="layout" svg:x1="8.6cm" svg:y1="13.548cm" svg:x2="9.65cm" svg:y2="13.548cm">
          <text:p/>
        </draw:line>
        <draw:line draw:style-name="gr4" draw:text-style-name="P1" draw:layer="layout" svg:x1="9.65cm" svg:y1="13.548cm" svg:x2="9.65cm" svg:y2="13.448cm">
          <text:p/>
        </draw:line>
        <draw:line draw:style-name="gr4" draw:text-style-name="P1" draw:layer="layout" svg:x1="9.65cm" svg:y1="13.448cm" svg:x2="8.6cm" svg:y2="13.448cm">
          <text:p/>
        </draw:line>
        <draw:polygon draw:style-name="gr5" draw:text-style-name="P2" draw:layer="layout" svg:width="1.05cm" svg:height="0.1cm" svg:x="8.6cm" svg:y="13.448cm" svg:viewBox="0 0 1051 101" draw:points="0,0 1051,0 1051,101 0,101">
          <text:p/>
        </draw:polygon>
        <draw:line draw:style-name="gr4" draw:text-style-name="P1" draw:layer="layout" svg:x1="7.917cm" svg:y1="17.844cm" svg:x2="7.917cm" svg:y2="17.944cm">
          <text:p/>
        </draw:line>
        <draw:line draw:style-name="gr4" draw:text-style-name="P1" draw:layer="layout" svg:x1="7.917cm" svg:y1="17.944cm" svg:x2="8.067cm" svg:y2="17.944cm">
          <text:p/>
        </draw:line>
        <draw:line draw:style-name="gr4" draw:text-style-name="P1" draw:layer="layout" svg:x1="8.067cm" svg:y1="17.944cm" svg:x2="8.067cm" svg:y2="17.844cm">
          <text:p/>
        </draw:line>
        <draw:line draw:style-name="gr4" draw:text-style-name="P1" draw:layer="layout" svg:x1="8.067cm" svg:y1="17.844cm" svg:x2="7.917cm" svg:y2="17.844cm">
          <text:p/>
        </draw:line>
        <draw:polygon draw:style-name="gr5" draw:text-style-name="P2" draw:layer="layout" svg:width="0.15cm" svg:height="0.1cm" svg:x="7.917cm" svg:y="17.844cm" svg:viewBox="0 0 151 101" draw:points="0,0 151,0 151,101 0,101">
          <text:p/>
        </draw:polygon>
        <draw:line draw:style-name="gr4" draw:text-style-name="P1" draw:layer="layout" svg:x1="6.55cm" svg:y1="15.998cm" svg:x2="6.55cm" svg:y2="16.098cm">
          <text:p/>
        </draw:line>
        <draw:line draw:style-name="gr4" draw:text-style-name="P1" draw:layer="layout" svg:x1="6.55cm" svg:y1="16.098cm" svg:x2="20.3cm" svg:y2="16.098cm">
          <text:p/>
        </draw:line>
        <draw:line draw:style-name="gr4" draw:text-style-name="P1" draw:layer="layout" svg:x1="20.3cm" svg:y1="16.098cm" svg:x2="20.3cm" svg:y2="15.998cm">
          <text:p/>
        </draw:line>
        <draw:line draw:style-name="gr4" draw:text-style-name="P1" draw:layer="layout" svg:x1="20.3cm" svg:y1="15.998cm" svg:x2="6.55cm" svg:y2="15.998cm">
          <text:p/>
        </draw:line>
        <draw:polygon draw:style-name="gr5" draw:text-style-name="P2" draw:layer="layout" svg:width="13.75cm" svg:height="0.1cm" svg:x="6.55cm" svg:y="15.998cm" svg:viewBox="0 0 13751 101" draw:points="0,0 13751,0 13751,101 0,101">
          <text:p/>
        </draw:polygon>
        <draw:line draw:style-name="gr4" draw:text-style-name="P1" draw:layer="layout" svg:x1="18.3cm" svg:y1="12.398cm" svg:x2="10.2cm" svg:y2="12.398cm">
          <text:p/>
        </draw:line>
        <draw:line draw:style-name="gr4" draw:text-style-name="P1" draw:layer="layout" svg:x1="19.35cm" svg:y1="15.348cm" svg:x2="19.35cm" svg:y2="15.448cm">
          <text:p/>
        </draw:line>
        <draw:line draw:style-name="gr4" draw:text-style-name="P1" draw:layer="layout" svg:x1="19.35cm" svg:y1="15.448cm" svg:x2="19.7cm" svg:y2="15.448cm">
          <text:p/>
        </draw:line>
        <draw:line draw:style-name="gr4" draw:text-style-name="P1" draw:layer="layout" svg:x1="19.7cm" svg:y1="15.448cm" svg:x2="19.7cm" svg:y2="15.348cm">
          <text:p/>
        </draw:line>
        <draw:line draw:style-name="gr4" draw:text-style-name="P1" draw:layer="layout" svg:x1="19.7cm" svg:y1="15.348cm" svg:x2="19.35cm" svg:y2="15.348cm">
          <text:p/>
        </draw:line>
        <draw:polygon draw:style-name="gr5" draw:text-style-name="P2" draw:layer="layout" svg:width="0.35cm" svg:height="0.1cm" svg:x="19.35cm" svg:y="15.348cm" svg:viewBox="0 0 351 101" draw:points="0,0 351,0 351,101 0,101">
          <text:p/>
        </draw:polygon>
        <draw:frame draw:style-name="gr7" draw:text-style-name="P3" draw:layer="layout" svg:width="9.525cm" svg:height="0.953cm" svg:x="14.126cm" svg:y="18.06cm">
          <draw:text-box>
            <text:p>ClassRoom Arrangement</text:p>
          </draw:text-box>
        </draw:frame>
        <draw:frame draw:style-name="gr8" draw:text-style-name="P5" draw:layer="layout" svg:width="1.587cm" svg:height="0.952cm" svg:x="14.961cm" svg:y="3.531cm">
          <draw:text-box>
            <text:p text:style-name="P4"><text:span text:style-name="T1">12th</text:span></text:p>
          </draw:text-box>
        </draw:frame>
        <draw:frame draw:style-name="gr9" draw:text-style-name="P5" draw:layer="layout" svg:width="1.587cm" svg:height="0.952cm" svg:x="11.468cm" svg:y="3.531cm">
          <draw:text-box>
            <text:p><text:span text:style-name="T1">5th</text:span></text:p>
          </draw:text-box>
        </draw:frame>
        <draw:frame draw:style-name="gr10" draw:text-style-name="P5" draw:layer="layout" svg:width="3.175cm" svg:height="1.873cm" svg:x="18.136cm" svg:y="3.563cm">
          <draw:text-box>
            <text:p><text:span text:style-name="T1">Office</text:span></text:p>
          </draw:text-box>
        </draw:frame>
        <draw:frame draw:style-name="gr11" draw:text-style-name="P7" draw:layer="layout" svg:width="1.905cm" svg:height="0.906cm" svg:x="7.341cm" svg:y="7.705cm">
          <draw:text-box>
            <text:p text:style-name="P6"><text:span text:style-name="T2">1st-4th</text:span></text:p>
          </draw:text-box>
        </draw:frame>
        <draw:frame draw:style-name="gr11" draw:text-style-name="P7" draw:layer="layout" svg:width="1.905cm" svg:height="0.906cm" svg:x="7.976cm" svg:y="9.563cm">
          <draw:text-box>
            <text:p><text:span text:style-name="T2">10th</text:span></text:p>
          </draw:text-box>
        </draw:frame>
        <draw:frame draw:style-name="gr12" draw:text-style-name="P7" draw:layer="layout" svg:width="1.377cm" svg:height="0.762cm" svg:x="7.869cm" svg:y="11.151cm">
          <draw:text-box>
            <text:p><text:span text:style-name="T2">11th</text:span></text:p>
          </draw:text-box>
        </draw:frame>
        <draw:frame draw:style-name="gr12" draw:text-style-name="P7" draw:layer="layout" svg:width="1.377cm" svg:height="0.762cm" svg:x="10.726cm" svg:y="13.564cm">
          <draw:text-box>
            <text:p><text:span text:style-name="T2">8th</text:span></text:p>
          </draw:text-box>
        </draw:frame>
        <draw:frame draw:style-name="gr12" draw:text-style-name="P7" draw:layer="layout" svg:width="1.377cm" svg:height="0.762cm" svg:x="13.056cm" svg:y="13.564cm">
          <draw:text-box>
            <text:p><text:span text:style-name="T2">9th</text:span></text:p>
          </draw:text-box>
        </draw:frame>
        <draw:frame draw:style-name="gr12" draw:text-style-name="P7" draw:layer="layout" svg:width="1.377cm" svg:height="0.762cm" svg:x="15.489cm" svg:y="13.564cm">
          <draw:text-box>
            <text:p><text:span text:style-name="T2">7th</text:span></text:p>
          </draw:text-box>
        </draw:frame>
        <draw:frame draw:style-name="gr12" draw:text-style-name="P7" draw:layer="layout" svg:width="1.377cm" svg:height="0.762cm" svg:x="17.818cm" svg:y="13.564cm">
          <draw:text-box>
            <text:p><text:span text:style-name="T2">6t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3T08:57:23.122778735</dc:date>
    <meta:editing-duration>PT10M58S</meta:editing-duration>
    <meta:editing-cycles>2</meta:editing-cycles>
    <meta:generator>LibreOffice/25.2.3.2$Linux_X86_64 LibreOffice_project/520$Build-2</meta:generator>
    <meta:document-statistic meta:object-count="1502"/>
  </office:meta>
</office:document-meta>
</file>