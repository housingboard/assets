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solid" svg:stroke-width="0.049cm" svg:stroke-color="#000000" draw:stroke-linejoin="round" svg:stroke-linecap="round" draw:fill="none" fo:padding-top="0.024cm" fo:padding-bottom="0.024cm" fo:padding-left="0.024cm" fo:padding-right="0.024cm" loext:decorative="false"/>
    </style:style>
    <style:style style:name="gr3" style:family="graphic" style:parent-style-name="standard">
      <style:graphic-properties draw:stroke="solid" svg:stroke-width="0.03cm" svg:stroke-color="#000000" draw:stroke-linejoin="round" svg:stroke-linecap="round" draw:fill="none" fo:padding-top="0.015cm" fo:padding-bottom="0.015cm" fo:padding-left="0.015cm" fo:padding-right="0.015cm" loext:decorative="false"/>
    </style:style>
    <style:style style:name="gr4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1cm" svg:stroke-color="#000000" draw:stroke-linejoin="round" svg:stroke-linecap="round" draw:fill="none" fo:padding-top="0.005cm" fo:padding-bottom="0.005cm" fo:padding-left="0.005cm" fo:padding-right="0.005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1.8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76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ff0000" loext:opacity="100%"/>
    </style:style>
    <style:style style:name="P6" style:family="paragraph">
      <loext:graphic-properties draw:fill="none" draw:fill-color="#ffffff"/>
      <style:text-properties fo:color="#ff0000" loext:opacity="100%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8cm" svg:height="3.2cm" svg:x="7.864cm" svg:y="14.98cm" svg:viewBox="0 0 10801 3201" draw:points="0,0 10801,0 10801,3201 0,3201">
          <text:p/>
        </draw:polygon>
        <draw:line draw:style-name="gr1" draw:text-style-name="P1" draw:layer="layout" svg:x1="7.864cm" svg:y1="16.53cm" svg:x2="18.664cm" svg:y2="16.53cm">
          <text:p/>
        </draw:line>
        <draw:line draw:style-name="gr2" draw:text-style-name="P1" draw:layer="layout" svg:x1="6.635cm" svg:y1="16.305cm" svg:x2="6.736cm" svg:y2="16.406cm">
          <text:p/>
        </draw:line>
        <draw:line draw:style-name="gr2" draw:text-style-name="P1" draw:layer="layout" svg:x1="6.385cm" svg:y1="16.155cm" svg:x2="6.385cm" svg:y2="16.655cm">
          <text:p/>
        </draw:line>
        <draw:polyline draw:style-name="gr2" draw:text-style-name="P1" draw:layer="layout" svg:width="0.257cm" svg:height="0.3cm" svg:x="6.253cm" svg:y="15.765cm" svg:viewBox="0 0 258 301" draw:points="0,0 71,301 128,86 186,301 258,0">
          <text:p/>
        </draw:polyline>
        <draw:polyline draw:style-name="gr2" draw:text-style-name="P1" draw:layer="layout" svg:width="0.171cm" svg:height="0.3cm" svg:x="5.817cm" svg:y="16.266cm" svg:viewBox="0 0 172 301" draw:points="0,286 43,301 114,301 143,286 158,272 172,243 172,215 158,185 143,171 114,157 57,142 28,128 14,114 0,85 0,57 14,28 28,14 57,0 128,0 172,14">
          <text:p/>
        </draw:polyline>
        <draw:line draw:style-name="gr2" draw:text-style-name="P1" draw:layer="layout" svg:x1="3.812cm" svg:y1="1.003cm" svg:x2="3.711cm" svg:y2="1.104cm">
          <text:p/>
        </draw:line>
        <draw:line draw:style-name="gr2" draw:text-style-name="P1" draw:layer="layout" svg:x1="4.181cm" svg:y1="1.988cm" svg:x2="4.282cm" svg:y2="2.089cm">
          <text:p/>
        </draw:line>
        <draw:line draw:style-name="gr2" draw:text-style-name="P1" draw:layer="layout" svg:x1="3.336cm" svg:y1="1.003cm" svg:x2="3.811cm" svg:y2="1.003cm">
          <text:p/>
        </draw:line>
        <draw:line draw:style-name="gr2" draw:text-style-name="P1" draw:layer="layout" svg:x1="3.711cm" svg:y1="0.903cm" svg:x2="3.812cm" svg:y2="1.004cm">
          <text:p/>
        </draw:line>
        <draw:line draw:style-name="gr2" draw:text-style-name="P1" draw:layer="layout" svg:x1="4.281cm" svg:y1="1.103cm" svg:x2="4.281cm" svg:y2="2.088cm">
          <text:p/>
        </draw:line>
        <draw:polyline draw:style-name="gr3" draw:text-style-name="P1" draw:layer="layout" svg:width="0.085cm" svg:height="0.15cm" svg:x="2.605cm" svg:y="0.918cm" svg:viewBox="0 0 86 151" draw:points="0,144 22,151 58,151 72,144 79,137 86,123 86,108 79,94 72,87 58,80 29,72 15,65 8,58 0,44 0,28 8,14 15,7 29,0 65,0 86,7">
          <text:p/>
        </draw:polyline>
        <draw:line draw:style-name="gr3" draw:text-style-name="P1" draw:layer="layout" svg:x1="2.733cm" svg:y1="0.968cm" svg:x2="2.79cm" svg:y2="0.968cm">
          <text:p/>
        </draw:line>
        <draw:polyline draw:style-name="gr3" draw:text-style-name="P1" draw:layer="layout" svg:width="0.035cm" svg:height="0.15cm" svg:x="2.755cm" svg:y="0.918cm" svg:viewBox="0 0 36 151" draw:points="0,0 0,129 7,144 22,151 36,151">
          <text:p/>
        </draw:polyline>
        <draw:polyline draw:style-name="gr3" draw:text-style-name="P1" draw:layer="layout" svg:width="0.065cm" svg:height="0.1cm" svg:x="2.84cm" svg:y="0.968cm" svg:viewBox="0 0 66 101" draw:points="66,101 66,21 59,7 44,0 16,0 0,7">
          <text:p/>
        </draw:polyline>
        <draw:polyline draw:style-name="gr3" draw:text-style-name="P1" draw:layer="layout" svg:width="0.073cm" svg:height="0.064cm" svg:x="2.833cm" svg:y="1.004cm" svg:viewBox="0 0 74 65" draw:points="74,58 58,65 23,65 8,58 0,42 0,28 8,14 23,7 58,7 74,0">
          <text:p/>
        </draw:polyline>
        <draw:line draw:style-name="gr3" draw:text-style-name="P1" draw:layer="layout" svg:x1="2.976cm" svg:y1="1.068cm" svg:x2="2.976cm" svg:y2="0.968cm">
          <text:p/>
        </draw:line>
        <draw:polyline draw:style-name="gr3" draw:text-style-name="P1" draw:layer="layout" svg:width="0.014cm" svg:height="0.014cm" svg:x="2.969cm" svg:y="0.918cm" svg:viewBox="0 0 15 15" draw:points="7,0 0,8 7,15 15,8 7,0 7,15">
          <text:p/>
        </draw:polyline>
        <draw:line draw:style-name="gr3" draw:text-style-name="P1" draw:layer="layout" svg:x1="3.047cm" svg:y1="1.068cm" svg:x2="3.047cm" svg:y2="0.968cm">
          <text:p/>
        </draw:line>
        <draw:polyline draw:style-name="gr3" draw:text-style-name="P1" draw:layer="layout" svg:width="0.043cm" svg:height="0.029cm" svg:x="3.047cm" svg:y="0.968cm" svg:viewBox="0 0 44 30" draw:points="0,30 8,15 15,8 29,0 44,0">
          <text:p/>
        </draw:polyline>
        <draw:polyline draw:style-name="gr3" draw:text-style-name="P1" draw:layer="layout" svg:width="0.065cm" svg:height="0.1cm" svg:x="3.133cm" svg:y="0.968cm" svg:viewBox="0 0 66 101" draw:points="0,94 14,101 44,101 58,94 66,79 66,73 58,58 44,51 22,51 8,44 0,29 0,21 8,7 22,0 44,0 58,7">
          <text:p/>
        </draw:polyline>
        <draw:line draw:style-name="gr2" draw:text-style-name="P1" draw:layer="layout" svg:x1="6.085cm" svg:y1="16.405cm" svg:x2="6.735cm" svg:y2="16.405cm">
          <text:p/>
        </draw:line>
        <draw:line draw:style-name="gr2" draw:text-style-name="P1" draw:layer="layout" svg:x1="6.736cm" svg:y1="16.405cm" svg:x2="6.635cm" svg:y2="16.506cm">
          <text:p/>
        </draw:line>
        <draw:line draw:style-name="gr2" draw:text-style-name="P1" draw:layer="layout" svg:x1="6.331cm" svg:y1="16.908cm" svg:x2="6.431cm" svg:y2="16.908cm">
          <text:p/>
        </draw:line>
        <draw:polyline draw:style-name="gr2" draw:text-style-name="P1" draw:layer="layout" svg:width="0.143cm" svg:height="0.3cm" svg:x="6.331cm" svg:y="16.766cm" svg:viewBox="0 0 144 301" draw:points="144,301 0,301 0,0 144,0">
          <text:p/>
        </draw:polyline>
        <draw:polyline draw:style-name="gr3" draw:text-style-name="P1" draw:layer="layout" svg:width="0.151cm" svg:height="0.092cm" svg:x="18.021cm" svg:y="4.737cm" svg:viewBox="0 0 152 93" draw:points="8,7 0,21 0,43 8,65 22,79 36,87 65,93 86,93 116,87 130,79 144,65 152,43 152,29 144,7 137,0 86,0 86,29">
          <text:p/>
        </draw:polyline>
        <draw:line draw:style-name="gr3" draw:text-style-name="P1" draw:layer="layout" svg:x1="18.172cm" svg:y1="4.672cm" svg:x2="18.072cm" svg:y2="4.672cm">
          <text:p/>
        </draw:line>
        <draw:polyline draw:style-name="gr3" draw:text-style-name="P1" draw:layer="layout" svg:width="0.015cm" svg:height="0.015cm" svg:x="18.021cm" svg:y="4.665cm" svg:viewBox="0 0 16 16" draw:points="0,7 8,16 16,7 8,0 0,7 16,7">
          <text:p/>
        </draw:polyline>
        <draw:line draw:style-name="gr3" draw:text-style-name="P1" draw:layer="layout" svg:x1="18.172cm" svg:y1="4.601cm" svg:x2="18.072cm" svg:y2="4.601cm">
          <text:p/>
        </draw:line>
        <draw:polyline draw:style-name="gr3" draw:text-style-name="P1" draw:layer="layout" svg:width="0.028cm" svg:height="0.043cm" svg:x="18.072cm" svg:y="4.558cm" svg:viewBox="0 0 29 44" draw:points="29,44 15,37 6,29 0,14 0,0">
          <text:p/>
        </draw:polyline>
        <draw:polyline draw:style-name="gr3" draw:text-style-name="P1" draw:layer="layout" svg:width="0.151cm" svg:height="0.021cm" svg:x="18.021cm" svg:y="4.487cm" svg:viewBox="0 0 152 22" draw:points="152,0 144,15 130,22 0,22">
          <text:p/>
        </draw:polyline>
        <draw:line draw:style-name="gr3" draw:text-style-name="P1" draw:layer="layout" svg:x1="18.021cm" svg:y1="4.423cm" svg:x2="18.051cm" svg:y2="4.438cm">
          <text:p/>
        </draw:line>
        <draw:polyline draw:style-name="gr3" draw:text-style-name="P1" draw:layer="layout" svg:width="0.1cm" svg:height="0.064cm" svg:x="18.072cm" svg:y="4.301cm" svg:viewBox="0 0 101 65" draw:points="93,65 101,51 101,22 93,7 79,0 72,0 57,7 49,22 49,44 42,58 28,65 21,65 6,58 0,44 0,22 6,7">
          <text:p/>
        </draw:polyline>
        <draw:line draw:style-name="gr3" draw:text-style-name="P1" draw:layer="layout" svg:x1="18.021cm" svg:y1="4.144cm" svg:x2="18.021cm" svg:y2="4.058cm">
          <text:p/>
        </draw:line>
        <draw:line draw:style-name="gr3" draw:text-style-name="P1" draw:layer="layout" svg:x1="18.172cm" svg:y1="4.101cm" svg:x2="18.021cm" svg:y2="4.101cm">
          <text:p/>
        </draw:line>
        <draw:polygon draw:style-name="gr3" draw:text-style-name="P1" draw:layer="layout" svg:width="0.1cm" svg:height="0.078cm" svg:x="18.072cm" svg:y="3.937cm" svg:viewBox="0 0 101 79" draw:points="101,51 93,65 86,72 72,79 28,79 14,72 6,65 0,51 0,29 6,14 14,7 28,0 72,0 86,7 93,14 101,29">
          <text:p/>
        </draw:polygon>
        <draw:line draw:style-name="gr3" draw:text-style-name="P1" draw:layer="layout" svg:x1="18.172cm" svg:y1="3.872cm" svg:x2="18.072cm" svg:y2="3.872cm">
          <text:p/>
        </draw:line>
        <draw:polyline draw:style-name="gr3" draw:text-style-name="P1" draw:layer="layout" svg:width="0.015cm" svg:height="0.015cm" svg:x="18.021cm" svg:y="3.865cm" svg:viewBox="0 0 16 16" draw:points="0,7 8,16 16,7 8,0 0,7 16,7">
          <text:p/>
        </draw:polyline>
        <draw:polyline draw:style-name="gr3" draw:text-style-name="P1" draw:layer="layout" svg:width="0.151cm" svg:height="0.021cm" svg:x="18.021cm" svg:y="3.78cm" svg:viewBox="0 0 152 22" draw:points="152,0 144,15 130,22 0,22">
          <text:p/>
        </draw:polyline>
        <draw:polyline draw:style-name="gr3" draw:text-style-name="P1" draw:layer="layout" svg:width="0.1cm" svg:height="0.071cm" svg:x="18.072cm" svg:y="3.658cm" svg:viewBox="0 0 101 72" draw:points="93,7 101,22 101,50 93,65 79,72 21,72 6,65 0,50 0,22 6,7 21,0 35,0 49,72">
          <text:p/>
        </draw:polyline>
        <draw:line draw:style-name="gr3" draw:text-style-name="P1" draw:layer="layout" svg:x1="18.072cm" svg:y1="3.615cm" svg:x2="18.072cm" svg:y2="3.558cm">
          <text:p/>
        </draw:line>
        <draw:polyline draw:style-name="gr3" draw:text-style-name="P1" draw:layer="layout" svg:width="0.151cm" svg:height="0.036cm" svg:x="18.021cm" svg:y="3.558cm" svg:viewBox="0 0 152 37" draw:points="0,37 130,37 144,28 152,14 152,0">
          <text:p/>
        </draw:polyline>
        <draw:polyline draw:style-name="gr2" draw:text-style-name="P1" draw:layer="layout" svg:width="0.172cm" svg:height="0.3cm" svg:x="6.831cm" svg:y="16.266cm" svg:viewBox="0 0 173 301" draw:points="0,301 0,0 173,301 173,0">
          <text:p/>
        </draw:polyline>
        <draw:polyline draw:style-name="gr3" draw:text-style-name="P1" draw:layer="layout" svg:width="0.15cm" svg:height="0.092cm" svg:x="1.832cm" svg:y="10.785cm" svg:viewBox="0 0 151 93" draw:points="137,0 143,7 151,28 151,43 143,64 129,78 115,87 86,93 65,93 36,87 21,78 7,64 0,43 0,28 7,7 14,0">
          <text:p/>
        </draw:polyline>
        <draw:polyline draw:style-name="gr3" draw:text-style-name="P1" draw:layer="layout" svg:width="0.15cm" svg:height="0.021cm" svg:x="1.832cm" svg:y="10.699cm" svg:viewBox="0 0 151 22" draw:points="151,0 143,15 129,22 0,22">
          <text:p/>
        </draw:polyline>
        <draw:polyline draw:style-name="gr3" draw:text-style-name="P1" draw:layer="layout" svg:width="0.1cm" svg:height="0.065cm" svg:x="1.882cm" svg:y="10.577cm" svg:viewBox="0 0 101 66" draw:points="101,0 22,0 7,9 0,23 0,52 7,66">
          <text:p/>
        </draw:polyline>
        <draw:polyline draw:style-name="gr3" draw:text-style-name="P1" draw:layer="layout" svg:width="0.065cm" svg:height="0.072cm" svg:x="1.917cm" svg:y="10.577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1.882cm" svg:y="10.449cm" svg:viewBox="0 0 101 65" draw:points="93,65 101,51 101,23 93,8 79,0 72,0 58,8 51,23 51,44 44,58 29,65 22,65 7,58 0,44 0,23 7,8">
          <text:p/>
        </draw:polyline>
        <draw:polyline draw:style-name="gr3" draw:text-style-name="P1" draw:layer="layout" svg:width="0.1cm" svg:height="0.064cm" svg:x="1.882cm" svg:y="10.328cm" svg:viewBox="0 0 101 65" draw:points="93,65 101,49 101,21 93,7 79,0 72,0 58,7 51,21 51,42 44,57 29,65 22,65 7,57 0,42 0,21 7,7">
          <text:p/>
        </draw:polyline>
        <draw:line draw:style-name="gr3" draw:text-style-name="P1" draw:layer="layout" svg:x1="1.983cm" svg:y1="10.063cm" svg:x2="1.91cm" svg:y2="10.114cm">
          <text:p/>
        </draw:line>
        <draw:polyline draw:style-name="gr3" draw:text-style-name="P1" draw:layer="layout" svg:width="0.15cm" svg:height="0.086cm" svg:x="1.832cm" svg:y="10.063cm" svg:viewBox="0 0 151 87" draw:points="151,87 0,87 0,29 7,14 14,7 28,0 51,0 65,7 72,14 79,29 79,87">
          <text:p/>
        </draw:polyline>
        <draw:polygon draw:style-name="gr3" draw:text-style-name="P1" draw:layer="layout" svg:width="0.1cm" svg:height="0.078cm" svg:x="1.882cm" svg:y="9.928cm" svg:viewBox="0 0 101 79" draw:points="101,50 93,65 87,72 72,79 29,79 15,72 7,65 0,50 0,28 7,14 15,6 29,0 72,0 87,6 93,14 101,28">
          <text:p/>
        </draw:polygon>
        <draw:polygon draw:style-name="gr3" draw:text-style-name="P1" draw:layer="layout" svg:width="0.1cm" svg:height="0.078cm" svg:x="1.882cm" svg:y="9.792cm" svg:viewBox="0 0 101 79" draw:points="101,51 93,65 87,72 72,79 29,79 15,72 7,65 0,51 0,29 7,14 15,7 29,0 72,0 87,7 93,14 101,29">
          <text:p/>
        </draw:polygon>
        <draw:line draw:style-name="gr3" draw:text-style-name="P1" draw:layer="layout" svg:x1="1.982cm" svg:y1="9.728cm" svg:x2="1.882cm" svg:y2="9.728cm">
          <text:p/>
        </draw:line>
        <draw:polyline draw:style-name="gr3" draw:text-style-name="P1" draw:layer="layout" svg:width="0.1cm" svg:height="0.065cm" svg:x="1.882cm" svg:y="9.663cm" svg:viewBox="0 0 101 66" draw:points="15,66 7,58 0,44 0,23 7,7 22,0 101,0">
          <text:p/>
        </draw:polyline>
        <draw:polyline draw:style-name="gr3" draw:text-style-name="P1" draw:layer="layout" svg:width="0.1cm" svg:height="0.064cm" svg:x="1.882cm" svg:y="9.599cm" svg:viewBox="0 0 101 65" draw:points="22,65 7,58 0,44 0,23 7,7 22,0 101,0">
          <text:p/>
        </draw:polyline>
        <draw:line draw:style-name="gr3" draw:text-style-name="P1" draw:layer="layout" svg:x1="2.223cm" svg:y1="10.792cm" svg:x2="2.223cm" svg:y2="10.877cm">
          <text:p/>
        </draw:line>
        <draw:polyline draw:style-name="gr3" draw:text-style-name="P1" draw:layer="layout" svg:width="0.15cm" svg:height="0.042cm" svg:x="2.073cm" svg:y="10.835cm" svg:viewBox="0 0 151 43" draw:points="151,0 0,0 22,15 36,29 44,43">
          <text:p/>
        </draw:polyline>
        <draw:polyline draw:style-name="gr3" draw:text-style-name="P1" draw:layer="layout" svg:width="0.15cm" svg:height="0.086cm" svg:x="2.073cm" svg:y="10.649cm" svg:viewBox="0 0 151 87" draw:points="0,14 0,43 7,57 15,64 36,80 65,87 123,87 137,80 144,72 151,57 151,28 144,14 137,7 123,0 87,0 73,7 65,14 59,28 59,57 65,72 73,80 87,87">
          <text:p/>
        </draw:polyline>
        <draw:line draw:style-name="gr3" draw:text-style-name="P1" draw:layer="layout" svg:x1="2.224cm" svg:y1="10.6cm" svg:x2="2.123cm" svg:y2="10.52cm">
          <text:p/>
        </draw:line>
        <draw:line draw:style-name="gr3" draw:text-style-name="P1" draw:layer="layout" svg:x1="2.123cm" svg:y1="10.6cm" svg:x2="2.224cm" svg:y2="10.52cm">
          <text:p/>
        </draw:line>
        <draw:line draw:style-name="gr3" draw:text-style-name="P1" draw:layer="layout" svg:x1="2.223cm" svg:y1="10.385cm" svg:x2="2.223cm" svg:y2="10.471cm">
          <text:p/>
        </draw:line>
        <draw:polyline draw:style-name="gr3" draw:text-style-name="P1" draw:layer="layout" svg:width="0.15cm" svg:height="0.044cm" svg:x="2.073cm" svg:y="10.428cm" svg:viewBox="0 0 151 45" draw:points="151,0 0,0 22,15 36,29 44,45">
          <text:p/>
        </draw:polyline>
        <draw:polyline draw:style-name="gr3" draw:text-style-name="P1" draw:layer="layout" svg:width="0.15cm" svg:height="0.086cm" svg:x="2.073cm" svg:y="10.242cm" svg:viewBox="0 0 151 87" draw:points="0,14 0,43 7,58 15,65 36,79 65,87 123,87 137,79 144,72 151,58 151,28 144,14 137,7 123,0 87,0 73,7 65,14 59,28 59,58 65,72 73,79 87,87">
          <text:p/>
        </draw:polyline>
        <draw:polyline draw:style-name="gr3" draw:text-style-name="P1" draw:layer="layout" svg:width="0.15cm" svg:height="0.129cm" svg:x="4.221cm" svg:y="7.858cm" svg:viewBox="0 0 151 130" draw:points="0,130 151,94 43,64 151,36 0,0">
          <text:p/>
        </draw:polyline>
        <draw:line draw:style-name="gr3" draw:text-style-name="P1" draw:layer="layout" svg:x1="4.371cm" svg:y1="7.801cm" svg:x2="4.271cm" svg:y2="7.801cm">
          <text:p/>
        </draw:line>
        <draw:polyline draw:style-name="gr3" draw:text-style-name="P1" draw:layer="layout" svg:width="0.014cm" svg:height="0.014cm" svg:x="4.221cm" svg:y="7.794cm" svg:viewBox="0 0 15 15" draw:points="0,8 9,15 15,8 9,0 0,8 15,8">
          <text:p/>
        </draw:polyline>
        <draw:line draw:style-name="gr3" draw:text-style-name="P1" draw:layer="layout" svg:x1="4.371cm" svg:y1="7.665cm" svg:x2="4.221cm" svg:y2="7.665cm">
          <text:p/>
        </draw:line>
        <draw:polyline draw:style-name="gr3" draw:text-style-name="P1" draw:layer="layout" svg:width="0.1cm" svg:height="0.072cm" svg:x="4.271cm" svg:y="7.665cm" svg:viewBox="0 0 101 73" draw:points="94,0 101,15 101,44 94,58 87,65 73,73 29,73 15,65 7,58 0,44 0,15 7,0">
          <text:p/>
        </draw:polyline>
        <draw:polyline draw:style-name="gr3" draw:text-style-name="P1" draw:layer="layout" svg:width="0.1cm" svg:height="0.071cm" svg:x="4.271cm" svg:y="7.53cm" svg:viewBox="0 0 101 72" draw:points="94,7 101,21 101,51 94,65 80,72 22,72 7,65 0,51 0,21 7,7 22,0 36,0 50,72">
          <text:p/>
        </draw:polyline>
        <draw:polyline draw:style-name="gr3" draw:text-style-name="P1" draw:layer="layout" svg:width="0.15cm" svg:height="0.1cm" svg:x="4.221cm" svg:y="7.273cm" svg:viewBox="0 0 151 101" draw:points="0,101 151,49 0,0">
          <text:p/>
        </draw:polyline>
        <draw:polyline draw:style-name="gr3" draw:text-style-name="P1" draw:layer="layout" svg:width="0.1cm" svg:height="0.072cm" svg:x="4.271cm" svg:y="7.158cm" svg:viewBox="0 0 101 73" draw:points="94,7 101,22 101,51 94,65 80,73 22,73 7,65 0,51 0,22 7,7 22,0 36,0 50,73">
          <text:p/>
        </draw:polyline>
        <draw:line draw:style-name="gr3" draw:text-style-name="P1" draw:layer="layout" svg:x1="4.371cm" svg:y1="7.094cm" svg:x2="4.271cm" svg:y2="7.094cm">
          <text:p/>
        </draw:line>
        <draw:polyline draw:style-name="gr3" draw:text-style-name="P1" draw:layer="layout" svg:width="0.029cm" svg:height="0.043cm" svg:x="4.271cm" svg:y="7.051cm" svg:viewBox="0 0 30 44" draw:points="30,44 16,37 8,30 0,14 0,0">
          <text:p/>
        </draw:polyline>
        <draw:polyline draw:style-name="gr3" draw:text-style-name="P1" draw:layer="layout" svg:width="0.1cm" svg:height="0.064cm" svg:x="4.271cm" svg:y="6.937cm" svg:viewBox="0 0 101 65" draw:points="101,0 22,0 7,7 0,21 0,50 7,65">
          <text:p/>
        </draw:polyline>
        <draw:polyline draw:style-name="gr3" draw:text-style-name="P1" draw:layer="layout" svg:width="0.064cm" svg:height="0.071cm" svg:x="4.307cm" svg:y="6.937cm" svg:viewBox="0 0 65 72" draw:points="58,0 65,14 65,51 58,65 44,72 29,72 15,65 7,51 7,14 0,0">
          <text:p/>
        </draw:polyline>
        <draw:line draw:style-name="gr3" draw:text-style-name="P1" draw:layer="layout" svg:x1="4.271cm" svg:y1="6.865cm" svg:x2="4.371cm" svg:y2="6.865cm">
          <text:p/>
        </draw:line>
        <draw:polyline draw:style-name="gr3" draw:text-style-name="P1" draw:layer="layout" svg:width="0.1cm" svg:height="0.064cm" svg:x="4.271cm" svg:y="6.801cm" svg:viewBox="0 0 101 65" draw:points="15,65 7,58 0,44 0,22 7,8 22,0 101,0">
          <text:p/>
        </draw:polyline>
        <draw:line draw:style-name="gr3" draw:text-style-name="P1" draw:layer="layout" svg:x1="4.371cm" svg:y1="6.665cm" svg:x2="4.221cm" svg:y2="6.665cm">
          <text:p/>
        </draw:line>
        <draw:polyline draw:style-name="gr3" draw:text-style-name="P1" draw:layer="layout" svg:width="0.1cm" svg:height="0.072cm" svg:x="4.271cm" svg:y="6.665cm" svg:viewBox="0 0 101 73" draw:points="94,0 101,14 101,44 94,58 87,66 73,73 29,73 15,66 7,58 0,44 0,14 7,0">
          <text:p/>
        </draw:polyline>
        <draw:line draw:style-name="gr3" draw:text-style-name="P1" draw:layer="layout" svg:x1="4.371cm" svg:y1="6.594cm" svg:x2="4.221cm" svg:y2="6.594cm">
          <text:p/>
        </draw:line>
        <draw:polyline draw:style-name="gr3" draw:text-style-name="P1" draw:layer="layout" svg:width="0.1cm" svg:height="0.064cm" svg:x="4.271cm" svg:y="6.53cm" svg:viewBox="0 0 101 65" draw:points="101,0 22,0 7,7 0,22 0,44 7,58 15,65">
          <text:p/>
        </draw:polyline>
        <draw:polyline draw:style-name="gr3" draw:text-style-name="P1" draw:layer="layout" svg:width="0.1cm" svg:height="0.064cm" svg:x="4.271cm" svg:y="6.394cm" svg:viewBox="0 0 101 65" draw:points="101,0 22,0 7,7 0,21 0,51 7,65">
          <text:p/>
        </draw:polyline>
        <draw:polyline draw:style-name="gr3" draw:text-style-name="P1" draw:layer="layout" svg:width="0.064cm" svg:height="0.071cm" svg:x="4.307cm" svg:y="6.394cm" svg:viewBox="0 0 65 72" draw:points="58,0 65,15 65,51 58,65 44,72 29,72 15,65 7,51 7,15 0,0">
          <text:p/>
        </draw:polyline>
        <draw:line draw:style-name="gr3" draw:text-style-name="P1" draw:layer="layout" svg:x1="4.372cm" svg:y1="6.223cm" svg:x2="4.271cm" svg:y2="6.144cm">
          <text:p/>
        </draw:line>
        <draw:line draw:style-name="gr3" draw:text-style-name="P1" draw:layer="layout" svg:x1="4.271cm" svg:y1="6.223cm" svg:x2="4.372cm" svg:y2="6.144cm">
          <text:p/>
        </draw:line>
        <draw:polyline draw:style-name="gr3" draw:text-style-name="P1" draw:layer="layout" svg:width="0.15cm" svg:height="0.086cm" svg:x="4.221cm" svg:y="6.008cm" svg:viewBox="0 0 151 87" draw:points="151,72 151,44 144,29 137,22 115,7 86,0 29,0 14,7 8,14 0,29 0,58 8,72 14,80 29,87 65,87 79,80 86,72 93,58 93,29 86,14 79,7 65,0">
          <text:p/>
        </draw:polyline>
        <draw:polyline draw:style-name="gr3" draw:text-style-name="P1" draw:layer="layout" svg:width="0.15cm" svg:height="0.093cm" svg:x="1.832cm" svg:y="8.879cm" svg:viewBox="0 0 151 94" draw:points="137,0 143,7 151,29 151,44 143,65 129,79 115,87 86,94 65,94 36,87 21,79 7,65 0,44 0,29 7,7 14,0">
          <text:p/>
        </draw:polyline>
        <draw:polyline draw:style-name="gr3" draw:text-style-name="P1" draw:layer="layout" svg:width="0.15cm" svg:height="0.021cm" svg:x="1.832cm" svg:y="8.793cm" svg:viewBox="0 0 151 22" draw:points="151,0 143,15 129,22 0,22">
          <text:p/>
        </draw:polyline>
        <draw:polyline draw:style-name="gr3" draw:text-style-name="P1" draw:layer="layout" svg:width="0.1cm" svg:height="0.065cm" svg:x="1.882cm" svg:y="8.671cm" svg:viewBox="0 0 101 66" draw:points="101,0 22,0 7,8 0,22 0,52 7,66">
          <text:p/>
        </draw:polyline>
        <draw:polyline draw:style-name="gr3" draw:text-style-name="P1" draw:layer="layout" svg:width="0.065cm" svg:height="0.072cm" svg:x="1.917cm" svg:y="8.671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1.882cm" svg:y="8.543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1.882cm" svg:y="8.422cm" svg:viewBox="0 0 101 65" draw:points="93,65 101,50 101,22 93,8 79,0 72,0 58,8 51,22 51,44 44,58 29,65 22,65 7,58 0,44 0,22 7,8">
          <text:p/>
        </draw:polyline>
        <draw:line draw:style-name="gr3" draw:text-style-name="P1" draw:layer="layout" svg:x1="1.983cm" svg:y1="8.157cm" svg:x2="1.91cm" svg:y2="8.208cm">
          <text:p/>
        </draw:line>
        <draw:polyline draw:style-name="gr3" draw:text-style-name="P1" draw:layer="layout" svg:width="0.15cm" svg:height="0.086cm" svg:x="1.832cm" svg:y="8.157cm" svg:viewBox="0 0 151 87" draw:points="151,87 0,87 0,29 7,14 14,8 28,0 51,0 65,8 72,14 79,29 79,87">
          <text:p/>
        </draw:polyline>
        <draw:polygon draw:style-name="gr3" draw:text-style-name="P1" draw:layer="layout" svg:width="0.1cm" svg:height="0.078cm" svg:x="1.882cm" svg:y="8.022cm" svg:viewBox="0 0 101 79" draw:points="101,50 93,65 87,72 72,79 29,79 15,72 7,65 0,50 0,28 7,14 15,7 29,0 72,0 87,7 93,14 101,28">
          <text:p/>
        </draw:polygon>
        <draw:polygon draw:style-name="gr3" draw:text-style-name="P1" draw:layer="layout" svg:width="0.1cm" svg:height="0.078cm" svg:x="1.882cm" svg:y="7.886cm" svg:viewBox="0 0 101 79" draw:points="101,51 93,65 87,72 72,79 29,79 15,72 7,65 0,51 0,29 7,14 15,7 29,0 72,0 87,7 93,14 101,29">
          <text:p/>
        </draw:polygon>
        <draw:line draw:style-name="gr3" draw:text-style-name="P1" draw:layer="layout" svg:x1="1.982cm" svg:y1="7.822cm" svg:x2="1.882cm" svg:y2="7.822cm">
          <text:p/>
        </draw:line>
        <draw:polyline draw:style-name="gr3" draw:text-style-name="P1" draw:layer="layout" svg:width="0.1cm" svg:height="0.065cm" svg:x="1.882cm" svg:y="7.757cm" svg:viewBox="0 0 101 66" draw:points="15,66 7,58 0,43 0,22 7,7 22,0 101,0">
          <text:p/>
        </draw:polyline>
        <draw:polyline draw:style-name="gr3" draw:text-style-name="P1" draw:layer="layout" svg:width="0.1cm" svg:height="0.064cm" svg:x="1.882cm" svg:y="7.693cm" svg:viewBox="0 0 101 65" draw:points="22,65 7,58 0,43 0,21 7,7 22,0 101,0">
          <text:p/>
        </draw:polyline>
        <draw:line draw:style-name="gr3" draw:text-style-name="P1" draw:layer="layout" svg:x1="2.223cm" svg:y1="8.886cm" svg:x2="2.223cm" svg:y2="8.972cm">
          <text:p/>
        </draw:line>
        <draw:polyline draw:style-name="gr3" draw:text-style-name="P1" draw:layer="layout" svg:width="0.15cm" svg:height="0.043cm" svg:x="2.073cm" svg:y="8.929cm" svg:viewBox="0 0 151 44" draw:points="151,0 0,0 22,14 36,28 44,44">
          <text:p/>
        </draw:polyline>
        <draw:polyline draw:style-name="gr3" draw:text-style-name="P1" draw:layer="layout" svg:width="0.15cm" svg:height="0.086cm" svg:x="2.073cm" svg:y="8.743cm" svg:viewBox="0 0 151 87" draw:points="0,14 0,43 7,57 15,65 36,80 65,87 123,87 137,80 144,72 151,57 151,28 144,14 137,7 123,0 87,0 73,7 65,14 59,28 59,57 65,72 73,80 87,87">
          <text:p/>
        </draw:polyline>
        <draw:line draw:style-name="gr3" draw:text-style-name="P1" draw:layer="layout" svg:x1="2.224cm" svg:y1="8.694cm" svg:x2="2.123cm" svg:y2="8.614cm">
          <text:p/>
        </draw:line>
        <draw:line draw:style-name="gr3" draw:text-style-name="P1" draw:layer="layout" svg:x1="2.123cm" svg:y1="8.694cm" svg:x2="2.224cm" svg:y2="8.614cm">
          <text:p/>
        </draw:line>
        <draw:line draw:style-name="gr3" draw:text-style-name="P1" draw:layer="layout" svg:x1="2.223cm" svg:y1="8.479cm" svg:x2="2.223cm" svg:y2="8.565cm">
          <text:p/>
        </draw:line>
        <draw:polyline draw:style-name="gr3" draw:text-style-name="P1" draw:layer="layout" svg:width="0.15cm" svg:height="0.043cm" svg:x="2.073cm" svg:y="8.522cm" svg:viewBox="0 0 151 44" draw:points="151,0 0,0 22,14 36,29 44,44">
          <text:p/>
        </draw:polyline>
        <draw:polyline draw:style-name="gr3" draw:text-style-name="P1" draw:layer="layout" svg:width="0.15cm" svg:height="0.086cm" svg:x="2.073cm" svg:y="8.336cm" svg:viewBox="0 0 151 87" draw:points="0,14 0,43 7,58 15,65 36,79 65,87 123,87 137,79 144,72 151,58 151,29 144,14 137,7 123,0 87,0 73,7 65,14 59,29 59,58 65,72 73,79 87,87">
          <text:p/>
        </draw:polyline>
        <draw:polyline draw:style-name="gr3" draw:text-style-name="P1" draw:layer="layout" svg:width="0.15cm" svg:height="0.092cm" svg:x="2.38cm" svg:y="6.287cm" svg:viewBox="0 0 151 93" draw:points="136,0 143,7 151,28 151,43 143,64 128,79 114,87 85,93 64,93 36,87 21,79 7,64 0,43 0,28 7,7 14,0">
          <text:p/>
        </draw:polyline>
        <draw:polyline draw:style-name="gr3" draw:text-style-name="P1" draw:layer="layout" svg:width="0.15cm" svg:height="0.021cm" svg:x="2.38cm" svg:y="6.201cm" svg:viewBox="0 0 151 22" draw:points="151,0 143,14 128,22 0,22">
          <text:p/>
        </draw:polyline>
        <draw:polyline draw:style-name="gr3" draw:text-style-name="P1" draw:layer="layout" svg:width="0.1cm" svg:height="0.065cm" svg:x="2.43cm" svg:y="6.079cm" svg:viewBox="0 0 101 66" draw:points="101,0 22,0 7,8 0,22 0,52 7,66">
          <text:p/>
        </draw:polyline>
        <draw:polyline draw:style-name="gr3" draw:text-style-name="P1" draw:layer="layout" svg:width="0.065cm" svg:height="0.072cm" svg:x="2.465cm" svg:y="6.079cm" svg:viewBox="0 0 66 73" draw:points="57,0 66,15 66,52 57,66 43,73 29,73 15,66 8,52 8,15 0,0">
          <text:p/>
        </draw:polyline>
        <draw:polyline draw:style-name="gr3" draw:text-style-name="P1" draw:layer="layout" svg:width="0.1cm" svg:height="0.064cm" svg:x="2.43cm" svg:y="5.951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2.43cm" svg:y="5.83cm" svg:viewBox="0 0 101 65" draw:points="93,65 101,50 101,21 93,7 79,0 72,0 58,7 51,21 51,43 44,58 29,65 22,65 7,58 0,43 0,21 7,7">
          <text:p/>
        </draw:polyline>
        <draw:line draw:style-name="gr3" draw:text-style-name="P1" draw:layer="layout" svg:x1="2.531cm" svg:y1="5.565cm" svg:x2="2.458cm" svg:y2="5.616cm">
          <text:p/>
        </draw:line>
        <draw:polyline draw:style-name="gr3" draw:text-style-name="P1" draw:layer="layout" svg:width="0.15cm" svg:height="0.086cm" svg:x="2.38cm" svg:y="5.565cm" svg:viewBox="0 0 151 87" draw:points="151,87 0,87 0,29 7,14 14,7 28,0 50,0 64,7 71,14 78,29 78,87">
          <text:p/>
        </draw:polyline>
        <draw:polygon draw:style-name="gr3" draw:text-style-name="P1" draw:layer="layout" svg:width="0.1cm" svg:height="0.078cm" svg:x="2.43cm" svg:y="5.43cm" svg:viewBox="0 0 101 79" draw:points="101,50 93,65 87,72 72,79 29,79 15,72 7,65 0,50 0,29 7,15 15,6 29,0 72,0 87,6 93,15 101,29">
          <text:p/>
        </draw:polygon>
        <draw:polygon draw:style-name="gr3" draw:text-style-name="P1" draw:layer="layout" svg:width="0.1cm" svg:height="0.078cm" svg:x="2.43cm" svg:y="5.294cm" svg:viewBox="0 0 101 79" draw:points="101,50 93,64 87,73 72,79 29,79 15,73 7,64 0,50 0,29 7,14 15,7 29,0 72,0 87,7 93,14 101,29">
          <text:p/>
        </draw:polygon>
        <draw:line draw:style-name="gr3" draw:text-style-name="P1" draw:layer="layout" svg:x1="2.53cm" svg:y1="5.23cm" svg:x2="2.43cm" svg:y2="5.23cm">
          <text:p/>
        </draw:line>
        <draw:polyline draw:style-name="gr3" draw:text-style-name="P1" draw:layer="layout" svg:width="0.1cm" svg:height="0.064cm" svg:x="2.43cm" svg:y="5.166cm" svg:viewBox="0 0 101 65" draw:points="15,65 7,58 0,43 0,22 7,7 22,0 101,0">
          <text:p/>
        </draw:polyline>
        <draw:polyline draw:style-name="gr3" draw:text-style-name="P1" draw:layer="layout" svg:width="0.1cm" svg:height="0.065cm" svg:x="2.43cm" svg:y="5.101cm" svg:viewBox="0 0 101 66" draw:points="22,66 7,58 0,44 0,22 7,7 22,0 101,0">
          <text:p/>
        </draw:polyline>
        <draw:polyline draw:style-name="gr3" draw:text-style-name="P1" draw:layer="layout" svg:width="0.15cm" svg:height="0.093cm" svg:x="2.621cm" svg:y="6.294cm" svg:viewBox="0 0 151 94" draw:points="15,86 7,80 0,65 0,28 7,14 15,7 29,0 43,0 64,7 151,94 151,0">
          <text:p/>
        </draw:polyline>
        <draw:polyline draw:style-name="gr3" draw:text-style-name="P1" draw:layer="layout" svg:width="0.15cm" svg:height="0.1cm" svg:x="2.621cm" svg:y="6.144cm" svg:viewBox="0 0 151 101" draw:points="0,101 0,0 151,64">
          <text:p/>
        </draw:polyline>
        <draw:line draw:style-name="gr3" draw:text-style-name="P1" draw:layer="layout" svg:x1="2.772cm" svg:y1="6.102cm" svg:x2="2.671cm" svg:y2="6.022cm">
          <text:p/>
        </draw:line>
        <draw:line draw:style-name="gr3" draw:text-style-name="P1" draw:layer="layout" svg:x1="2.671cm" svg:y1="6.102cm" svg:x2="2.772cm" svg:y2="6.022cm">
          <text:p/>
        </draw:line>
        <draw:line draw:style-name="gr3" draw:text-style-name="P1" draw:layer="layout" svg:x1="2.771cm" svg:y1="5.887cm" svg:x2="2.771cm" svg:y2="5.973cm">
          <text:p/>
        </draw:line>
        <draw:polyline draw:style-name="gr3" draw:text-style-name="P1" draw:layer="layout" svg:width="0.15cm" svg:height="0.043cm" svg:x="2.621cm" svg:y="5.93cm" svg:viewBox="0 0 151 44" draw:points="151,0 0,0 22,15 36,29 43,44">
          <text:p/>
        </draw:polyline>
        <draw:polyline draw:style-name="gr3" draw:text-style-name="P1" draw:layer="layout" svg:width="0.15cm" svg:height="0.086cm" svg:x="2.621cm" svg:y="5.744cm" svg:viewBox="0 0 151 87" draw:points="0,14 0,43 7,58 15,65 36,79 64,87 122,87 136,79 144,72 151,58 151,28 144,14 136,7 122,0 86,0 72,7 64,14 58,28 58,58 64,72 72,79 86,87">
          <text:p/>
        </draw:polyline>
        <draw:line draw:style-name="gr3" draw:text-style-name="P1" draw:layer="layout" svg:x1="4.972cm" svg:y1="5.837cm" svg:x2="4.9cm" svg:y2="5.888cm">
          <text:p/>
        </draw:line>
        <draw:polyline draw:style-name="gr3" draw:text-style-name="P1" draw:layer="layout" svg:width="0.15cm" svg:height="0.085cm" svg:x="4.821cm" svg:y="5.837cm" svg:viewBox="0 0 151 86" draw:points="151,86 0,86 0,28 8,14 14,7 29,0 50,0 65,7 72,14 79,28 79,86">
          <text:p/>
        </draw:polyline>
        <draw:polyline draw:style-name="gr3" draw:text-style-name="P1" draw:layer="layout" svg:width="0.1cm" svg:height="0.064cm" svg:x="4.871cm" svg:y="5.708cm" svg:viewBox="0 0 101 65" draw:points="101,0 22,0 7,7 0,23 0,51 7,65">
          <text:p/>
        </draw:polyline>
        <draw:polyline draw:style-name="gr3" draw:text-style-name="P1" draw:layer="layout" svg:width="0.064cm" svg:height="0.071cm" svg:x="4.907cm" svg:y="5.708cm" svg:viewBox="0 0 65 72" draw:points="58,0 65,14 65,50 58,65 43,72 28,72 14,65 7,50 7,14 0,0">
          <text:p/>
        </draw:polyline>
        <draw:line draw:style-name="gr3" draw:text-style-name="P1" draw:layer="layout" svg:x1="4.971cm" svg:y1="5.636cm" svg:x2="4.871cm" svg:y2="5.636cm">
          <text:p/>
        </draw:line>
        <draw:polyline draw:style-name="gr3" draw:text-style-name="P1" draw:layer="layout" svg:width="0.1cm" svg:height="0.064cm" svg:x="4.871cm" svg:y="5.572cm" svg:viewBox="0 0 101 65" draw:points="15,65 7,59 0,44 0,22 7,7 22,0 101,0">
          <text:p/>
        </draw:polyline>
        <draw:polyline draw:style-name="gr3" draw:text-style-name="P1" draw:layer="layout" svg:width="0.1cm" svg:height="0.064cm" svg:x="4.871cm" svg:y="5.508cm" svg:viewBox="0 0 101 65" draw:points="22,65 7,58 0,44 0,23 7,7 22,0 101,0">
          <text:p/>
        </draw:polyline>
        <draw:line draw:style-name="gr3" draw:text-style-name="P1" draw:layer="layout" svg:x1="4.871cm" svg:y1="5.436cm" svg:x2="5.021cm" svg:y2="5.436cm">
          <text:p/>
        </draw:line>
        <draw:polyline draw:style-name="gr3" draw:text-style-name="P1" draw:layer="layout" svg:width="0.1cm" svg:height="0.07cm" svg:x="4.871cm" svg:y="5.366cm" svg:viewBox="0 0 101 71" draw:points="7,71 0,57 0,29 7,14 15,6 29,0 73,0 87,6 94,14 101,29 101,57 94,71">
          <text:p/>
        </draw:polyline>
        <draw:polyline draw:style-name="gr3" draw:text-style-name="P1" draw:layer="layout" svg:width="0.2cm" svg:height="0.3cm" svg:x="10.25cm" svg:y="15.842cm" svg:viewBox="0 0 201 301" draw:points="0,301 0,0 100,215 201,0 201,301">
          <text:p/>
        </draw:polyline>
        <draw:polyline draw:style-name="gr3" draw:text-style-name="P1" draw:layer="layout" svg:width="0.186cm" svg:height="0.3cm" svg:x="10.578cm" svg:y="15.842cm" svg:viewBox="0 0 187 301" draw:points="173,14 144,0 101,0 59,14 30,42 15,71 0,129 0,172 15,229 30,258 59,286 101,301 130,301 173,286 187,272 187,172 130,172">
          <text:p/>
        </draw:polyline>
        <draw:polyline draw:style-name="gr3" draw:text-style-name="P1" draw:layer="layout" svg:width="0.185cm" svg:height="0.3cm" svg:x="10.879cm" svg:y="15.842cm" svg:viewBox="0 0 186 301" draw:points="172,14 143,0 100,0 57,14 28,42 14,71 0,129 0,172 14,229 28,258 57,286 100,301 129,301 172,286 186,272 186,172 129,172">
          <text:p/>
        </draw:polyline>
        <draw:polyline draw:style-name="gr3" draw:text-style-name="P1" draw:layer="layout" svg:width="0.171cm" svg:height="0.3cm" svg:x="11.179cm" svg:y="15.842cm" svg:viewBox="0 0 172 301" draw:points="0,286 42,301 115,301 143,286 158,272 172,243 172,215 158,186 143,172 115,158 57,144 28,129 14,115 0,85 0,57 14,28 28,14 57,0 129,0 172,14">
          <text:p/>
        </draw:polyline>
        <draw:line draw:style-name="gr3" draw:text-style-name="P1" draw:layer="layout" svg:x1="11.707cm" svg:y1="16.142cm" svg:x2="11.707cm" svg:y2="15.842cm">
          <text:p/>
        </draw:line>
        <draw:line draw:style-name="gr3" draw:text-style-name="P1" draw:layer="layout" svg:x1="11.707cm" svg:y1="15.985cm" svg:x2="11.879cm" svg:y2="15.985cm">
          <text:p/>
        </draw:line>
        <draw:line draw:style-name="gr3" draw:text-style-name="P1" draw:layer="layout" svg:x1="11.879cm" svg:y1="16.142cm" svg:x2="11.879cm" svg:y2="15.842cm">
          <text:p/>
        </draw:line>
        <draw:polygon draw:style-name="gr3" draw:text-style-name="P1" draw:layer="layout" svg:width="0.157cm" svg:height="0.2cm" svg:x="12.007cm" svg:y="15.942cm" svg:viewBox="0 0 158 201" draw:points="57,201 29,186 15,172 0,143 0,57 15,28 29,14 57,0 101,0 130,14 144,28 158,57 158,143 144,172 130,186 101,201">
          <text:p/>
        </draw:polygon>
        <draw:line draw:style-name="gr3" draw:text-style-name="P1" draw:layer="layout" svg:x1="12.422cm" svg:y1="15.942cm" svg:x2="12.422cm" svg:y2="16.142cm">
          <text:p/>
        </draw:line>
        <draw:polyline draw:style-name="gr3" draw:text-style-name="P1" draw:layer="layout" svg:width="0.129cm" svg:height="0.2cm" svg:x="12.293cm" svg:y="15.942cm" svg:viewBox="0 0 130 201" draw:points="0,0 0,158 14,186 43,201 87,201 115,186 130,172">
          <text:p/>
        </draw:polyline>
        <draw:polyline draw:style-name="gr3" draw:text-style-name="P1" draw:layer="layout" svg:width="0.128cm" svg:height="0.2cm" svg:x="12.55cm" svg:y="15.942cm" svg:viewBox="0 0 129 201" draw:points="0,186 29,201 86,201 115,186 129,158 129,143 115,114 86,100 43,100 14,85 0,57 0,43 14,14 43,0 86,0 115,14">
          <text:p/>
        </draw:polyline>
        <draw:line draw:style-name="gr3" draw:text-style-name="P1" draw:layer="layout" svg:x1="12.807cm" svg:y1="16.142cm" svg:x2="12.807cm" svg:y2="15.942cm">
          <text:p/>
        </draw:line>
        <draw:polyline draw:style-name="gr3" draw:text-style-name="P1" draw:layer="layout" svg:width="0.028cm" svg:height="0.028cm" svg:x="12.793cm" svg:y="15.842cm" svg:viewBox="0 0 29 29" draw:points="15,0 0,14 15,29 29,14 15,0 15,29">
          <text:p/>
        </draw:polyline>
        <draw:line draw:style-name="gr3" draw:text-style-name="P1" draw:layer="layout" svg:x1="12.95cm" svg:y1="15.942cm" svg:x2="12.95cm" svg:y2="16.142cm">
          <text:p/>
        </draw:line>
        <draw:polyline draw:style-name="gr3" draw:text-style-name="P1" draw:layer="layout" svg:width="0.128cm" svg:height="0.2cm" svg:x="12.95cm" svg:y="15.942cm" svg:viewBox="0 0 129 201" draw:points="0,28 14,14 42,0 86,0 115,14 129,43 129,201">
          <text:p/>
        </draw:polyline>
        <draw:polyline draw:style-name="gr3" draw:text-style-name="P1" draw:layer="layout" svg:width="0.129cm" svg:height="0.3cm" svg:x="13.221cm" svg:y="15.942cm" svg:viewBox="0 0 130 301" draw:points="130,0 130,243 115,271 101,285 73,301 29,301 0,285">
          <text:p/>
        </draw:polyline>
        <draw:polyline draw:style-name="gr3" draw:text-style-name="P1" draw:layer="layout" svg:width="0.143cm" svg:height="0.2cm" svg:x="13.207cm" svg:y="15.942cm" svg:viewBox="0 0 144 201" draw:points="144,186 115,201 58,201 28,186 14,172 0,143 0,57 14,28 28,14 58,0 115,0 144,14">
          <text:p/>
        </draw:polyline>
        <draw:polyline draw:style-name="gr3" draw:text-style-name="P1" draw:layer="layout" svg:width="0.172cm" svg:height="0.3cm" svg:x="13.721cm" svg:y="15.842cm" svg:viewBox="0 0 173 301" draw:points="100,144 144,158 158,172 173,201 173,243 158,272 144,286 114,301 0,301 0,0 100,0 130,14 144,28 158,57 158,85 144,115 130,129 100,144 0,144">
          <text:p/>
        </draw:polyline>
        <draw:polygon draw:style-name="gr3" draw:text-style-name="P1" draw:layer="layout" svg:width="0.157cm" svg:height="0.2cm" svg:x="14.007cm" svg:y="15.942cm" svg:viewBox="0 0 158 201" draw:points="57,201 29,186 14,172 0,143 0,57 14,28 29,14 57,0 101,0 130,14 144,28 158,57 158,143 144,172 130,186 101,201">
          <text:p/>
        </draw:polygon>
        <draw:polyline draw:style-name="gr3" draw:text-style-name="P1" draw:layer="layout" svg:width="0.128cm" svg:height="0.2cm" svg:x="14.293cm" svg:y="15.942cm" svg:viewBox="0 0 129 201" draw:points="129,201 129,43 114,14 85,0 28,0 0,14">
          <text:p/>
        </draw:polyline>
        <draw:polyline draw:style-name="gr3" draw:text-style-name="P1" draw:layer="layout" svg:width="0.143cm" svg:height="0.129cm" svg:x="14.278cm" svg:y="16.013cm" svg:viewBox="0 0 144 130" draw:points="144,115 116,130 43,130 15,115 0,86 0,57 15,29 43,14 116,14 144,0">
          <text:p/>
        </draw:polyline>
        <draw:line draw:style-name="gr3" draw:text-style-name="P1" draw:layer="layout" svg:x1="14.564cm" svg:y1="16.142cm" svg:x2="14.564cm" svg:y2="15.942cm">
          <text:p/>
        </draw:line>
        <draw:polyline draw:style-name="gr3" draw:text-style-name="P1" draw:layer="layout" svg:width="0.086cm" svg:height="0.057cm" svg:x="14.564cm" svg:y="15.942cm" svg:viewBox="0 0 87 58" draw:points="0,58 14,29 29,14 58,0 87,0">
          <text:p/>
        </draw:polyline>
        <draw:line draw:style-name="gr3" draw:text-style-name="P1" draw:layer="layout" svg:x1="14.878cm" svg:y1="16.142cm" svg:x2="14.878cm" svg:y2="15.842cm">
          <text:p/>
        </draw:line>
        <draw:polyline draw:style-name="gr3" draw:text-style-name="P1" draw:layer="layout" svg:width="0.142cm" svg:height="0.2cm" svg:x="14.736cm" svg:y="15.942cm" svg:viewBox="0 0 143 201" draw:points="143,186 115,201 57,201 28,186 14,172 0,143 0,57 14,28 28,14 57,0 115,0 143,14">
          <text:p/>
        </draw:polyline>
        <draw:polyline draw:style-name="gr3" draw:text-style-name="P1" draw:layer="layout" svg:width="0.171cm" svg:height="0.3cm" svg:x="15.25cm" svg:y="15.842cm" svg:viewBox="0 0 172 301" draw:points="100,144 144,158 158,172 172,201 172,243 158,272 144,286 114,301 0,301 0,0 100,0 129,14 144,28 158,57 158,85 144,115 129,129 100,144 0,144">
          <text:p/>
        </draw:polyline>
        <draw:line draw:style-name="gr3" draw:text-style-name="P1" draw:layer="layout" svg:x1="15.55cm" svg:y1="16.142cm" svg:x2="15.55cm" svg:y2="15.942cm">
          <text:p/>
        </draw:line>
        <draw:polyline draw:style-name="gr3" draw:text-style-name="P1" draw:layer="layout" svg:width="0.028cm" svg:height="0.028cm" svg:x="15.536cm" svg:y="15.842cm" svg:viewBox="0 0 29 29" draw:points="15,0 0,14 15,29 29,14 15,0 15,29">
          <text:p/>
        </draw:polyline>
        <draw:line draw:style-name="gr3" draw:text-style-name="P1" draw:layer="layout" svg:x1="15.693cm" svg:y1="16.142cm" svg:x2="15.693cm" svg:y2="15.842cm">
          <text:p/>
        </draw:line>
        <draw:line draw:style-name="gr3" draw:text-style-name="P1" draw:layer="layout" svg:x1="15.721cm" svg:y1="16.027cm" svg:x2="15.808cm" svg:y2="16.143cm">
          <text:p/>
        </draw:line>
        <draw:line draw:style-name="gr3" draw:text-style-name="P1" draw:layer="layout" svg:x1="15.808cm" svg:y1="15.942cm" svg:x2="15.693cm" svg:y2="16.057cm">
          <text:p/>
        </draw:line>
        <draw:polyline draw:style-name="gr3" draw:text-style-name="P1" draw:layer="layout" svg:width="0.128cm" svg:height="0.2cm" svg:x="15.936cm" svg:y="15.942cm" svg:viewBox="0 0 129 201" draw:points="129,201 129,43 115,14 87,0 29,0 0,14">
          <text:p/>
        </draw:polyline>
        <draw:polyline draw:style-name="gr3" draw:text-style-name="P1" draw:layer="layout" svg:width="0.143cm" svg:height="0.129cm" svg:x="15.921cm" svg:y="16.013cm" svg:viewBox="0 0 144 130" draw:points="144,115 116,130 44,130 15,115 0,86 0,57 15,29 44,14 116,14 144,0">
          <text:p/>
        </draw:polyline>
        <draw:line draw:style-name="gr3" draw:text-style-name="P1" draw:layer="layout" svg:x1="16.207cm" svg:y1="15.942cm" svg:x2="16.207cm" svg:y2="16.142cm">
          <text:p/>
        </draw:line>
        <draw:polyline draw:style-name="gr3" draw:text-style-name="P1" draw:layer="layout" svg:width="0.129cm" svg:height="0.2cm" svg:x="16.207cm" svg:y="15.942cm" svg:viewBox="0 0 130 201" draw:points="0,28 16,14 44,0 87,0 116,14 130,43 130,201">
          <text:p/>
        </draw:polyline>
        <draw:polyline draw:style-name="gr3" draw:text-style-name="P1" draw:layer="layout" svg:width="0.143cm" svg:height="0.2cm" svg:x="16.464cm" svg:y="15.942cm" svg:viewBox="0 0 144 201" draw:points="130,186 101,201 44,201 15,186 0,158 0,43 15,14 44,0 101,0 130,14 144,43 144,71 0,100">
          <text:p/>
        </draw:polyline>
        <draw:line draw:style-name="gr3" draw:text-style-name="P1" draw:layer="layout" svg:x1="16.736cm" svg:y1="16.142cm" svg:x2="16.736cm" svg:y2="15.942cm">
          <text:p/>
        </draw:line>
        <draw:polyline draw:style-name="gr3" draw:text-style-name="P1" draw:layer="layout" svg:width="0.086cm" svg:height="0.057cm" svg:x="16.736cm" svg:y="15.942cm" svg:viewBox="0 0 87 58" draw:points="0,58 14,29 28,14 57,0 87,0">
          <text:p/>
        </draw:polyline>
        <draw:polyline draw:style-name="gr3" draw:text-style-name="P1" draw:layer="layout" svg:width="0.092cm" svg:height="0.149cm" svg:x="12.335cm" svg:y="12.962cm" svg:viewBox="0 0 93 150" draw:points="93,136 87,144 65,150 51,150 28,144 14,129 7,115 0,86 0,65 7,35 14,21 28,7 51,0 65,0 87,7 93,14">
          <text:p/>
        </draw:polyline>
        <draw:polyline draw:style-name="gr3" draw:text-style-name="P1" draw:layer="layout" svg:width="0.021cm" svg:height="0.149cm" svg:x="12.492cm" svg:y="12.962cm" svg:viewBox="0 0 22 150" draw:points="22,150 8,144 0,129 0,0">
          <text:p/>
        </draw:polyline>
        <draw:polyline draw:style-name="gr3" draw:text-style-name="P1" draw:layer="layout" svg:width="0.066cm" svg:height="0.1cm" svg:x="12.57cm" svg:y="13.011cm" svg:viewBox="0 0 67 101" draw:points="67,101 67,23 58,8 44,0 16,0 0,8">
          <text:p/>
        </draw:polyline>
        <draw:polyline draw:style-name="gr3" draw:text-style-name="P1" draw:layer="layout" svg:width="0.072cm" svg:height="0.064cm" svg:x="12.563cm" svg:y="13.047cm" svg:viewBox="0 0 73 65" draw:points="73,59 58,65 22,65 7,59 0,44 0,29 7,15 22,7 58,7 73,0">
          <text:p/>
        </draw:polyline>
        <draw:polyline draw:style-name="gr3" draw:text-style-name="P1" draw:layer="layout" svg:width="0.064cm" svg:height="0.1cm" svg:x="12.699cm" svg:y="13.011cm" svg:viewBox="0 0 65 101" draw:points="0,95 14,101 43,101 57,95 65,80 65,73 57,59 43,52 22,52 7,44 0,30 0,23 7,8 22,0 43,0 57,8">
          <text:p/>
        </draw:polyline>
        <draw:polyline draw:style-name="gr3" draw:text-style-name="P1" draw:layer="layout" svg:width="0.064cm" svg:height="0.1cm" svg:x="12.821cm" svg:y="13.011cm" svg:viewBox="0 0 65 101" draw:points="0,95 14,101 43,101 58,95 65,80 65,73 58,59 43,52 21,52 7,44 0,30 0,23 7,8 21,0 43,0 58,8">
          <text:p/>
        </draw:polyline>
        <draw:line draw:style-name="gr3" draw:text-style-name="P1" draw:layer="layout" svg:x1="13.15cm" svg:y1="13.112cm" svg:x2="13.099cm" svg:y2="13.04cm">
          <text:p/>
        </draw:line>
        <draw:polyline draw:style-name="gr3" draw:text-style-name="P1" draw:layer="layout" svg:width="0.087cm" svg:height="0.149cm" svg:x="13.063cm" svg:y="12.962cm" svg:viewBox="0 0 88 150" draw:points="0,150 0,0 59,0 73,7 80,14 88,28 88,50 80,65 73,72 59,79 0,79">
          <text:p/>
        </draw:polyline>
        <draw:polygon draw:style-name="gr3" draw:text-style-name="P1" draw:layer="layout" svg:width="0.079cm" svg:height="0.1cm" svg:x="13.206cm" svg:y="13.011cm" svg:viewBox="0 0 80 101" draw:points="29,101 15,95 7,87 0,73 0,30 7,16 15,8 29,0 51,0 65,8 73,16 80,30 80,73 73,87 65,95 51,101">
          <text:p/>
        </draw:polygon>
        <draw:polygon draw:style-name="gr3" draw:text-style-name="P1" draw:layer="layout" svg:width="0.079cm" svg:height="0.1cm" svg:x="13.342cm" svg:y="13.011cm" svg:viewBox="0 0 80 101" draw:points="28,101 14,95 7,87 0,73 0,30 7,16 14,8 28,0 50,0 65,8 72,16 80,30 80,73 72,87 65,95 50,101">
          <text:p/>
        </draw:polygon>
        <draw:line draw:style-name="gr3" draw:text-style-name="P1" draw:layer="layout" svg:x1="13.485cm" svg:y1="13.111cm" svg:x2="13.485cm" svg:y2="13.011cm">
          <text:p/>
        </draw:line>
        <draw:polyline draw:style-name="gr3" draw:text-style-name="P1" draw:layer="layout" svg:width="0.064cm" svg:height="0.1cm" svg:x="13.485cm" svg:y="13.011cm" svg:viewBox="0 0 65 101" draw:points="0,16 7,8 21,0 43,0 58,8 65,23 65,101">
          <text:p/>
        </draw:polyline>
        <draw:polyline draw:style-name="gr3" draw:text-style-name="P1" draw:layer="layout" svg:width="0.064cm" svg:height="0.1cm" svg:x="13.549cm" svg:y="13.011cm" svg:viewBox="0 0 65 101" draw:points="0,23 7,8 21,0 43,0 58,8 65,23 65,101">
          <text:p/>
        </draw:polyline>
        <draw:line draw:style-name="gr3" draw:text-style-name="P1" draw:layer="layout" svg:x1="12.421cm" svg:y1="13.353cm" svg:x2="12.335cm" svg:y2="13.353cm">
          <text:p/>
        </draw:line>
        <draw:polyline draw:style-name="gr3" draw:text-style-name="P1" draw:layer="layout" svg:width="0.043cm" svg:height="0.15cm" svg:x="12.335cm" svg:y="13.203cm" svg:viewBox="0 0 44 151" draw:points="44,151 44,0 29,22 14,36 0,43">
          <text:p/>
        </draw:polyline>
        <draw:polyline draw:style-name="gr3" draw:text-style-name="P1" draw:layer="layout" svg:width="0.085cm" svg:height="0.15cm" svg:x="12.478cm" svg:y="13.203cm" svg:viewBox="0 0 86 151" draw:points="71,0 42,0 28,7 21,14 6,36 0,66 0,123 6,137 14,144 28,151 57,151 71,144 79,137 86,123 86,87 79,72 71,66 57,58 28,58 14,66 6,72 0,87">
          <text:p/>
        </draw:polyline>
        <draw:line draw:style-name="gr3" draw:text-style-name="P1" draw:layer="layout" svg:x1="12.613cm" svg:y1="13.354cm" svg:x2="12.693cm" svg:y2="13.253cm">
          <text:p/>
        </draw:line>
        <draw:line draw:style-name="gr3" draw:text-style-name="P1" draw:layer="layout" svg:x1="12.613cm" svg:y1="13.253cm" svg:x2="12.693cm" svg:y2="13.354cm">
          <text:p/>
        </draw:line>
        <draw:polyline draw:style-name="gr3" draw:text-style-name="P1" draw:layer="layout" svg:width="0.093cm" svg:height="0.15cm" svg:x="12.735cm" svg:y="13.203cm" svg:viewBox="0 0 94 151" draw:points="7,14 14,7 29,0 65,0 79,7 87,14 94,29 94,43 87,66 0,151 94,151">
          <text:p/>
        </draw:polyline>
        <draw:polygon draw:style-name="gr3" draw:text-style-name="P1" draw:layer="layout" svg:width="0.085cm" svg:height="0.15cm" svg:x="12.885cm" svg:y="13.203cm" svg:viewBox="0 0 86 151" draw:points="37,0 51,0 65,7 72,14 79,29 86,58 86,94 79,123 72,137 65,144 51,151 37,151 22,144 15,137 7,123 0,94 0,58 7,29 15,14 22,7">
          <text:p/>
        </draw:polygon>
        <draw:polyline draw:style-name="gr3" draw:text-style-name="P1" draw:layer="layout" svg:width="0.15cm" svg:height="0.085cm" svg:x="18.009cm" svg:y="10.437cm" svg:viewBox="0 0 151 86" draw:points="71,37 78,14 85,7 100,0 122,0 137,7 143,14 151,29 151,86 0,86 0,37 7,21 14,14 28,7 42,7 57,14 64,21 71,37 71,86">
          <text:p/>
        </draw:polyline>
        <draw:polygon draw:style-name="gr3" draw:text-style-name="P1" draw:layer="layout" svg:width="0.1cm" svg:height="0.078cm" svg:x="18.059cm" svg:y="10.301cm" svg:viewBox="0 0 101 79" draw:points="101,50 93,65 87,72 71,79 28,79 14,72 7,65 0,50 0,29 7,14 14,7 28,0 71,0 87,7 93,14 101,29">
          <text:p/>
        </draw:polygon>
        <draw:line draw:style-name="gr3" draw:text-style-name="P1" draw:layer="layout" svg:x1="18.059cm" svg:y1="10.252cm" svg:x2="18.16cm" svg:y2="10.215cm">
          <text:p/>
        </draw:line>
        <draw:polyline draw:style-name="gr3" draw:text-style-name="P1" draw:layer="layout" svg:width="0.15cm" svg:height="0.072cm" svg:x="18.059cm" svg:y="10.179cm" svg:viewBox="0 0 151 73" draw:points="0,0 101,36 136,51 144,57 151,73">
          <text:p/>
        </draw:polyline>
        <draw:line draw:style-name="gr3" draw:text-style-name="P1" draw:layer="layout" svg:x1="18.009cm" svg:y1="10.115cm" svg:x2="18.038cm" svg:y2="10.131cm">
          <text:p/>
        </draw:line>
        <draw:polyline draw:style-name="gr3" draw:text-style-name="P1" draw:layer="layout" svg:width="0.1cm" svg:height="0.064cm" svg:x="18.059cm" svg:y="9.994cm" svg:viewBox="0 0 101 65" draw:points="93,65 101,51 101,22 93,7 78,0 71,0 57,7 50,22 50,44 43,58 28,65 21,65 7,58 0,44 0,22 7,7">
          <text:p/>
        </draw:polyline>
        <draw:line draw:style-name="gr3" draw:text-style-name="P1" draw:layer="layout" svg:x1="18.009cm" svg:y1="9.836cm" svg:x2="18.009cm" svg:y2="9.751cm">
          <text:p/>
        </draw:line>
        <draw:line draw:style-name="gr3" draw:text-style-name="P1" draw:layer="layout" svg:x1="18.159cm" svg:y1="9.794cm" svg:x2="18.009cm" svg:y2="9.794cm">
          <text:p/>
        </draw:line>
        <draw:polygon draw:style-name="gr3" draw:text-style-name="P1" draw:layer="layout" svg:width="0.1cm" svg:height="0.078cm" svg:x="18.059cm" svg:y="9.63cm" svg:viewBox="0 0 101 79" draw:points="101,50 93,65 87,72 71,79 28,79 14,72 7,65 0,50 0,29 7,14 14,7 28,0 71,0 87,7 93,14 101,29">
          <text:p/>
        </draw:polygon>
        <draw:line draw:style-name="gr3" draw:text-style-name="P1" draw:layer="layout" svg:x1="18.159cm" svg:y1="9.566cm" svg:x2="18.059cm" svg:y2="9.566cm">
          <text:p/>
        </draw:line>
        <draw:polyline draw:style-name="gr3" draw:text-style-name="P1" draw:layer="layout" svg:width="0.014cm" svg:height="0.014cm" svg:x="18.009cm" svg:y="9.558cm" svg:viewBox="0 0 15 15" draw:points="0,9 7,15 15,9 7,0 0,9 15,9">
          <text:p/>
        </draw:polyline>
        <draw:polyline draw:style-name="gr3" draw:text-style-name="P1" draw:layer="layout" svg:width="0.15cm" svg:height="0.022cm" svg:x="18.009cm" svg:y="9.472cm" svg:viewBox="0 0 151 23" draw:points="151,0 143,16 129,23 0,23">
          <text:p/>
        </draw:polyline>
        <draw:polyline draw:style-name="gr3" draw:text-style-name="P1" draw:layer="layout" svg:width="0.1cm" svg:height="0.072cm" svg:x="18.059cm" svg:y="9.351cm" svg:viewBox="0 0 101 73" draw:points="93,7 101,21 101,51 93,65 78,73 21,73 7,65 0,51 0,21 7,7 21,0 35,0 50,73">
          <text:p/>
        </draw:polyline>
        <draw:line draw:style-name="gr3" draw:text-style-name="P1" draw:layer="layout" svg:x1="18.059cm" svg:y1="9.308cm" svg:x2="18.059cm" svg:y2="9.251cm">
          <text:p/>
        </draw:line>
        <draw:polyline draw:style-name="gr3" draw:text-style-name="P1" draw:layer="layout" svg:width="0.15cm" svg:height="0.036cm" svg:x="18.009cm" svg:y="9.251cm" svg:viewBox="0 0 151 37" draw:points="0,37 129,37 143,30 151,16 151,0">
          <text:p/>
        </draw:polyline>
        <draw:polygon draw:style-name="gr3" draw:text-style-name="P1" draw:layer="layout" svg:width="0.15cm" svg:height="0.086cm" svg:x="17.93cm" svg:y="12.559cm" svg:viewBox="0 0 151 87" draw:points="151,87 0,87 0,51 7,30 21,14 37,7 65,0 86,0 115,7 129,14 144,30 151,51">
          <text:p/>
        </draw:polygon>
        <draw:line draw:style-name="gr3" draw:text-style-name="P1" draw:layer="layout" svg:x1="18.08cm" svg:y1="12.495cm" svg:x2="17.98cm" svg:y2="12.495cm">
          <text:p/>
        </draw:line>
        <draw:polyline draw:style-name="gr3" draw:text-style-name="P1" draw:layer="layout" svg:width="0.029cm" svg:height="0.043cm" svg:x="17.98cm" svg:y="12.452cm" svg:viewBox="0 0 30 44" draw:points="30,44 14,36 7,28 0,14 0,0">
          <text:p/>
        </draw:polyline>
        <draw:line draw:style-name="gr3" draw:text-style-name="P1" draw:layer="layout" svg:x1="18.08cm" svg:y1="12.402cm" svg:x2="17.98cm" svg:y2="12.402cm">
          <text:p/>
        </draw:line>
        <draw:polyline draw:style-name="gr3" draw:text-style-name="P1" draw:layer="layout" svg:width="0.014cm" svg:height="0.015cm" svg:x="17.93cm" svg:y="12.394cm" svg:viewBox="0 0 15 16" draw:points="0,8 8,16 15,8 8,0 0,8 15,8">
          <text:p/>
        </draw:polyline>
        <draw:line draw:style-name="gr3" draw:text-style-name="P1" draw:layer="layout" svg:x1="17.98cm" svg:y1="12.33cm" svg:x2="18.08cm" svg:y2="12.33cm">
          <text:p/>
        </draw:line>
        <draw:polyline draw:style-name="gr3" draw:text-style-name="P1" draw:layer="layout" svg:width="0.1cm" svg:height="0.064cm" svg:x="17.98cm" svg:y="12.266cm" svg:viewBox="0 0 101 65" draw:points="14,65 7,58 0,43 0,22 7,7 21,0 101,0">
          <text:p/>
        </draw:polyline>
        <draw:line draw:style-name="gr3" draw:text-style-name="P1" draw:layer="layout" svg:x1="18.08cm" svg:y1="12.194cm" svg:x2="17.93cm" svg:y2="12.194cm">
          <text:p/>
        </draw:line>
        <draw:line draw:style-name="gr3" draw:text-style-name="P1" draw:layer="layout" svg:x1="18.023cm" svg:y1="12.181cm" svg:x2="18.081cm" svg:y2="12.137cm">
          <text:p/>
        </draw:line>
        <draw:line draw:style-name="gr3" draw:text-style-name="P1" draw:layer="layout" svg:x1="17.98cm" svg:y1="12.137cm" svg:x2="18.038cm" svg:y2="12.195cm">
          <text:p/>
        </draw:line>
        <draw:line draw:style-name="gr3" draw:text-style-name="P1" draw:layer="layout" svg:x1="18.08cm" svg:y1="12.073cm" svg:x2="17.98cm" svg:y2="12.073cm">
          <text:p/>
        </draw:line>
        <draw:polyline draw:style-name="gr3" draw:text-style-name="P1" draw:layer="layout" svg:width="0.014cm" svg:height="0.014cm" svg:x="17.93cm" svg:y="12.066cm" svg:viewBox="0 0 15 15" draw:points="0,8 8,15 15,8 8,0 0,8 15,8">
          <text:p/>
        </draw:polyline>
        <draw:line draw:style-name="gr3" draw:text-style-name="P1" draw:layer="layout" svg:x1="17.98cm" svg:y1="12.002cm" svg:x2="18.08cm" svg:y2="12.002cm">
          <text:p/>
        </draw:line>
        <draw:polyline draw:style-name="gr3" draw:text-style-name="P1" draw:layer="layout" svg:width="0.1cm" svg:height="0.065cm" svg:x="17.98cm" svg:y="11.937cm" svg:viewBox="0 0 101 66" draw:points="14,66 7,58 0,43 0,22 7,8 21,0 101,0">
          <text:p/>
        </draw:polyline>
        <draw:polyline draw:style-name="gr3" draw:text-style-name="P1" draw:layer="layout" svg:width="0.15cm" svg:height="0.064cm" svg:x="17.98cm" svg:y="11.802cm" svg:viewBox="0 0 151 65" draw:points="0,0 121,0 136,7 144,14 151,28 151,50 144,65">
          <text:p/>
        </draw:polyline>
        <draw:polyline draw:style-name="gr3" draw:text-style-name="P1" draw:layer="layout" svg:width="0.1cm" svg:height="0.071cm" svg:x="17.98cm" svg:y="11.802cm" svg:viewBox="0 0 101 72" draw:points="94,0 101,15 101,44 94,58 87,65 72,72 30,72 14,65 7,58 0,44 0,15 7,0">
          <text:p/>
        </draw:polyline>
        <draw:polyline draw:style-name="gr3" draw:text-style-name="P1" draw:layer="layout" svg:width="0.149cm" svg:height="0.129cm" svg:x="18.172cm" svg:y="12.38cm" svg:viewBox="0 0 150 130" draw:points="0,130 150,94 42,66 150,37 0,0">
          <text:p/>
        </draw:polyline>
        <draw:polyline draw:style-name="gr3" draw:text-style-name="P1" draw:layer="layout" svg:width="0.1cm" svg:height="0.064cm" svg:x="18.221cm" svg:y="12.259cm" svg:viewBox="0 0 101 65" draw:points="101,0 22,0 8,7 0,21 0,51 8,65">
          <text:p/>
        </draw:polyline>
        <draw:polyline draw:style-name="gr3" draw:text-style-name="P1" draw:layer="layout" svg:width="0.064cm" svg:height="0.071cm" svg:x="18.257cm" svg:y="12.259cm" svg:viewBox="0 0 65 72" draw:points="58,0 65,14 65,51 58,65 44,72 30,72 15,65 7,51 7,14 0,0">
          <text:p/>
        </draw:polyline>
        <draw:line draw:style-name="gr3" draw:text-style-name="P1" draw:layer="layout" svg:x1="18.221cm" svg:y1="12.209cm" svg:x2="18.221cm" svg:y2="12.152cm">
          <text:p/>
        </draw:line>
        <draw:polyline draw:style-name="gr3" draw:text-style-name="P1" draw:layer="layout" svg:width="0.149cm" svg:height="0.035cm" svg:x="18.172cm" svg:y="12.152cm" svg:viewBox="0 0 150 36" draw:points="0,36 129,36 143,29 150,15 150,0">
          <text:p/>
        </draw:polyline>
        <draw:polyline draw:style-name="gr3" draw:text-style-name="P1" draw:layer="layout" svg:width="0.1cm" svg:height="0.072cm" svg:x="18.221cm" svg:y="12.037cm" svg:viewBox="0 0 101 73" draw:points="94,8 101,22 101,52 94,66 79,73 22,73 8,66 0,52 0,22 8,8 22,0 36,0 51,73">
          <text:p/>
        </draw:polyline>
        <draw:line draw:style-name="gr3" draw:text-style-name="P1" draw:layer="layout" svg:x1="18.321cm" svg:y1="11.973cm" svg:x2="18.221cm" svg:y2="11.973cm">
          <text:p/>
        </draw:line>
        <draw:polyline draw:style-name="gr3" draw:text-style-name="P1" draw:layer="layout" svg:width="0.029cm" svg:height="0.043cm" svg:x="18.221cm" svg:y="11.93cm" svg:viewBox="0 0 30 44" draw:points="30,44 14,37 8,30 0,16 0,0">
          <text:p/>
        </draw:polyline>
        <draw:polyline draw:style-name="gr3" draw:text-style-name="P1" draw:layer="layout" svg:width="0.094cm" svg:height="0.151cm" svg:x="10.034cm" svg:y="13.011cm" svg:viewBox="0 0 95 152" draw:points="95,137 87,144 66,152 52,152 29,144 15,130 8,116 0,86 0,65 8,36 15,22 29,8 52,0 66,0 87,8 95,15">
          <text:p/>
        </draw:polyline>
        <draw:polyline draw:style-name="gr3" draw:text-style-name="P1" draw:layer="layout" svg:width="0.021cm" svg:height="0.151cm" svg:x="10.192cm" svg:y="13.011cm" svg:viewBox="0 0 22 152" draw:points="22,152 7,144 0,130 0,0">
          <text:p/>
        </draw:polyline>
        <draw:polyline draw:style-name="gr3" draw:text-style-name="P1" draw:layer="layout" svg:width="0.063cm" svg:height="0.1cm" svg:x="10.271cm" svg:y="13.062cm" svg:viewBox="0 0 64 101" draw:points="64,101 64,21 58,7 43,0 15,0 0,7">
          <text:p/>
        </draw:polyline>
        <draw:polyline draw:style-name="gr3" draw:text-style-name="P1" draw:layer="layout" svg:width="0.071cm" svg:height="0.065cm" svg:x="10.263cm" svg:y="13.097cm" svg:viewBox="0 0 72 66" draw:points="72,58 58,66 22,66 8,58 0,43 0,29 8,14 22,8 58,8 72,0">
          <text:p/>
        </draw:polyline>
        <draw:polyline draw:style-name="gr3" draw:text-style-name="P1" draw:layer="layout" svg:width="0.064cm" svg:height="0.1cm" svg:x="10.399cm" svg:y="13.062cm" svg:viewBox="0 0 65 101" draw:points="0,93 14,101 43,101 57,93 65,79 65,72 57,57 43,49 21,49 7,43 0,28 0,21 7,7 21,0 43,0 57,7">
          <text:p/>
        </draw:polyline>
        <draw:polyline draw:style-name="gr3" draw:text-style-name="P1" draw:layer="layout" svg:width="0.065cm" svg:height="0.1cm" svg:x="10.52cm" svg:y="13.062cm" svg:viewBox="0 0 66 101" draw:points="0,93 16,101 44,101 58,93 66,79 66,72 58,57 44,49 23,49 9,43 0,28 0,21 9,7 23,0 44,0 58,7">
          <text:p/>
        </draw:polyline>
        <draw:line draw:style-name="gr3" draw:text-style-name="P1" draw:layer="layout" svg:x1="10.85cm" svg:y1="13.163cm" svg:x2="10.799cm" svg:y2="13.09cm">
          <text:p/>
        </draw:line>
        <draw:polyline draw:style-name="gr3" draw:text-style-name="P1" draw:layer="layout" svg:width="0.086cm" svg:height="0.151cm" svg:x="10.763cm" svg:y="13.011cm" svg:viewBox="0 0 87 152" draw:points="0,152 0,0 58,0 73,8 80,15 87,29 87,51 80,65 73,72 58,79 0,79">
          <text:p/>
        </draw:polyline>
        <draw:polygon draw:style-name="gr3" draw:text-style-name="P1" draw:layer="layout" svg:width="0.079cm" svg:height="0.1cm" svg:x="10.906cm" svg:y="13.062cm" svg:viewBox="0 0 80 101" draw:points="30,101 15,93 8,86 0,72 0,28 8,14 15,7 30,0 51,0 66,7 72,14 80,28 80,72 72,86 66,93 51,101">
          <text:p/>
        </draw:polygon>
        <draw:polygon draw:style-name="gr3" draw:text-style-name="P1" draw:layer="layout" svg:width="0.078cm" svg:height="0.1cm" svg:x="11.042cm" svg:y="13.062cm" svg:viewBox="0 0 79 101" draw:points="30,101 14,93 7,86 0,72 0,28 7,14 14,7 30,0 51,0 65,7 72,14 79,28 79,72 72,86 65,93 51,101">
          <text:p/>
        </draw:polygon>
        <draw:line draw:style-name="gr3" draw:text-style-name="P1" draw:layer="layout" svg:x1="11.185cm" svg:y1="13.162cm" svg:x2="11.185cm" svg:y2="13.062cm">
          <text:p/>
        </draw:line>
        <draw:polyline draw:style-name="gr3" draw:text-style-name="P1" draw:layer="layout" svg:width="0.064cm" svg:height="0.1cm" svg:x="11.185cm" svg:y="13.062cm" svg:viewBox="0 0 65 101" draw:points="0,14 7,7 21,0 44,0 58,7 65,21 65,101">
          <text:p/>
        </draw:polyline>
        <draw:polyline draw:style-name="gr3" draw:text-style-name="P1" draw:layer="layout" svg:width="0.064cm" svg:height="0.1cm" svg:x="11.249cm" svg:y="13.062cm" svg:viewBox="0 0 65 101" draw:points="0,21 7,7 22,0 44,0 58,7 65,21 65,101">
          <text:p/>
        </draw:polyline>
        <draw:line draw:style-name="gr3" draw:text-style-name="P1" draw:layer="layout" svg:x1="10.12cm" svg:y1="13.403cm" svg:x2="10.034cm" svg:y2="13.403cm">
          <text:p/>
        </draw:line>
        <draw:polyline draw:style-name="gr3" draw:text-style-name="P1" draw:layer="layout" svg:width="0.043cm" svg:height="0.15cm" svg:x="10.034cm" svg:y="13.253cm" svg:viewBox="0 0 44 151" draw:points="44,151 44,0 30,21 15,36 0,43">
          <text:p/>
        </draw:polyline>
        <draw:polyline draw:style-name="gr3" draw:text-style-name="P1" draw:layer="layout" svg:width="0.086cm" svg:height="0.15cm" svg:x="10.177cm" svg:y="13.253cm" svg:viewBox="0 0 87 151" draw:points="72,0 43,0 29,7 22,15 8,36 0,65 0,123 8,137 15,144 29,151 58,151 72,144 79,137 87,123 87,87 79,73 72,65 58,58 29,58 15,65 8,73 0,87">
          <text:p/>
        </draw:polyline>
        <draw:line draw:style-name="gr3" draw:text-style-name="P1" draw:layer="layout" svg:x1="10.313cm" svg:y1="13.404cm" svg:x2="10.393cm" svg:y2="13.303cm">
          <text:p/>
        </draw:line>
        <draw:line draw:style-name="gr3" draw:text-style-name="P1" draw:layer="layout" svg:x1="10.313cm" svg:y1="13.303cm" svg:x2="10.393cm" svg:y2="13.404cm">
          <text:p/>
        </draw:line>
        <draw:polyline draw:style-name="gr3" draw:text-style-name="P1" draw:layer="layout" svg:width="0.093cm" svg:height="0.15cm" svg:x="10.435cm" svg:y="13.253cm" svg:viewBox="0 0 94 151" draw:points="8,15 15,7 29,0 65,0 79,7 86,15 94,29 94,43 86,65 0,151 94,151">
          <text:p/>
        </draw:polyline>
        <draw:polygon draw:style-name="gr3" draw:text-style-name="P1" draw:layer="layout" svg:width="0.086cm" svg:height="0.15cm" svg:x="10.585cm" svg:y="13.253cm" svg:viewBox="0 0 87 151" draw:points="36,0 51,0 65,7 72,15 79,29 87,58 87,94 79,123 72,137 65,144 51,151 36,151 22,144 15,137 7,123 0,94 0,58 7,29 15,15 22,7">
          <text:p/>
        </draw:polygon>
        <draw:polyline draw:style-name="gr3" draw:text-style-name="P1" draw:layer="layout" svg:width="0.086cm" svg:height="0.15cm" svg:x="13.135cm" svg:y="11.37cm" svg:viewBox="0 0 87 151" draw:points="0,144 22,151 58,151 72,144 79,137 87,123 87,108 79,94 72,87 58,79 29,71 15,65 7,57 0,43 0,29 7,14 15,7 29,0 65,0 87,7">
          <text:p/>
        </draw:polyline>
        <draw:line draw:style-name="gr3" draw:text-style-name="P1" draw:layer="layout" svg:x1="13.263cm" svg:y1="11.42cm" svg:x2="13.321cm" svg:y2="11.42cm">
          <text:p/>
        </draw:line>
        <draw:polyline draw:style-name="gr3" draw:text-style-name="P1" draw:layer="layout" svg:width="0.036cm" svg:height="0.15cm" svg:x="13.285cm" svg:y="11.37cm" svg:viewBox="0 0 37 151" draw:points="0,0 0,130 7,144 22,151 37,151">
          <text:p/>
        </draw:polyline>
        <draw:polygon draw:style-name="gr3" draw:text-style-name="P1" draw:layer="layout" svg:width="0.078cm" svg:height="0.1cm" svg:x="13.364cm" svg:y="11.42cm" svg:viewBox="0 0 79 101" draw:points="28,101 14,94 6,87 0,73 0,30 6,16 14,8 28,0 50,0 65,8 72,16 79,30 79,73 72,87 65,94 50,101">
          <text:p/>
        </draw:polygon>
        <draw:line draw:style-name="gr3" draw:text-style-name="P1" draw:layer="layout" svg:x1="13.506cm" svg:y1="11.52cm" svg:x2="13.506cm" svg:y2="11.42cm">
          <text:p/>
        </draw:line>
        <draw:polyline draw:style-name="gr3" draw:text-style-name="P1" draw:layer="layout" svg:width="0.043cm" svg:height="0.029cm" svg:x="13.506cm" svg:y="11.42cm" svg:viewBox="0 0 44 30" draw:points="0,30 7,15 15,7 29,0 44,0">
          <text:p/>
        </draw:polyline>
        <draw:polyline draw:style-name="gr3" draw:text-style-name="P1" draw:layer="layout" svg:width="0.072cm" svg:height="0.1cm" svg:x="13.592cm" svg:y="11.42cm" svg:viewBox="0 0 73 101" draw:points="65,94 51,101 21,101 7,94 0,80 0,22 7,8 21,0 51,0 65,8 73,22 73,37 0,51">
          <text:p/>
        </draw:polyline>
        <draw:line draw:style-name="gr3" draw:text-style-name="P1" draw:layer="layout" svg:x1="13.229cm" svg:y1="11.763cm" svg:x2="13.178cm" svg:y2="11.69cm">
          <text:p/>
        </draw:line>
        <draw:polyline draw:style-name="gr3" draw:text-style-name="P1" draw:layer="layout" svg:width="0.086cm" svg:height="0.15cm" svg:x="13.142cm" svg:y="11.612cm" svg:viewBox="0 0 87 151" draw:points="0,151 0,0 58,0 72,7 80,14 87,28 87,50 80,65 72,72 58,79 0,79">
          <text:p/>
        </draw:polyline>
        <draw:polygon draw:style-name="gr3" draw:text-style-name="P1" draw:layer="layout" svg:width="0.079cm" svg:height="0.1cm" svg:x="13.285cm" svg:y="11.662cm" svg:viewBox="0 0 80 101" draw:points="28,101 14,94 7,86 0,72 0,28 7,14 14,7 28,0 51,0 65,7 72,14 80,28 80,72 72,86 65,94 51,101">
          <text:p/>
        </draw:polygon>
        <draw:polygon draw:style-name="gr3" draw:text-style-name="P1" draw:layer="layout" svg:width="0.078cm" svg:height="0.1cm" svg:x="13.421cm" svg:y="11.662cm" svg:viewBox="0 0 79 101" draw:points="28,101 14,94 7,86 0,72 0,28 7,14 14,7 28,0 49,0 65,7 72,14 79,28 79,72 72,86 65,94 49,101">
          <text:p/>
        </draw:polygon>
        <draw:line draw:style-name="gr3" draw:text-style-name="P1" draw:layer="layout" svg:x1="13.564cm" svg:y1="11.762cm" svg:x2="13.564cm" svg:y2="11.662cm">
          <text:p/>
        </draw:line>
        <draw:polyline draw:style-name="gr3" draw:text-style-name="P1" draw:layer="layout" svg:width="0.064cm" svg:height="0.1cm" svg:x="13.564cm" svg:y="11.662cm" svg:viewBox="0 0 65 101" draw:points="0,14 6,7 21,0 43,0 58,7 65,21 65,101">
          <text:p/>
        </draw:polyline>
        <draw:polyline draw:style-name="gr3" draw:text-style-name="P1" draw:layer="layout" svg:width="0.064cm" svg:height="0.1cm" svg:x="13.628cm" svg:y="11.662cm" svg:viewBox="0 0 65 101" draw:points="0,21 7,7 21,0 42,0 58,7 65,21 65,101">
          <text:p/>
        </draw:polyline>
        <draw:line draw:style-name="gr3" draw:text-style-name="P1" draw:layer="layout" svg:x1="13.221cm" svg:y1="12.003cm" svg:x2="13.135cm" svg:y2="12.003cm">
          <text:p/>
        </draw:line>
        <draw:polyline draw:style-name="gr3" draw:text-style-name="P1" draw:layer="layout" svg:width="0.043cm" svg:height="0.15cm" svg:x="13.135cm" svg:y="11.853cm" svg:viewBox="0 0 44 151" draw:points="44,151 44,0 29,22 14,36 0,43">
          <text:p/>
        </draw:polyline>
        <draw:polygon draw:style-name="gr3" draw:text-style-name="P1" draw:layer="layout" svg:width="0.086cm" svg:height="0.15cm" svg:x="13.278cm" svg:y="11.853cm" svg:viewBox="0 0 87 151" draw:points="35,0 50,0 65,7 72,14 79,29 87,58 87,94 79,123 72,137 65,144 50,151 35,151 21,144 14,137 7,123 0,94 0,58 7,29 14,14 21,7">
          <text:p/>
        </draw:polygon>
        <draw:line draw:style-name="gr3" draw:text-style-name="P1" draw:layer="layout" svg:x1="13.413cm" svg:y1="12.004cm" svg:x2="13.493cm" svg:y2="11.903cm">
          <text:p/>
        </draw:line>
        <draw:line draw:style-name="gr3" draw:text-style-name="P1" draw:layer="layout" svg:x1="13.413cm" svg:y1="11.903cm" svg:x2="13.493cm" svg:y2="12.004cm">
          <text:p/>
        </draw:line>
        <draw:line draw:style-name="gr3" draw:text-style-name="P1" draw:layer="layout" svg:x1="13.628cm" svg:y1="12.003cm" svg:x2="13.542cm" svg:y2="12.003cm">
          <text:p/>
        </draw:line>
        <draw:polyline draw:style-name="gr3" draw:text-style-name="P1" draw:layer="layout" svg:width="0.043cm" svg:height="0.15cm" svg:x="13.542cm" svg:y="11.853cm" svg:viewBox="0 0 44 151" draw:points="44,151 44,0 28,22 14,36 0,43">
          <text:p/>
        </draw:polyline>
        <draw:line draw:style-name="gr3" draw:text-style-name="P1" draw:layer="layout" svg:x1="13.77cm" svg:y1="12.003cm" svg:x2="13.685cm" svg:y2="12.003cm">
          <text:p/>
        </draw:line>
        <draw:polyline draw:style-name="gr3" draw:text-style-name="P1" draw:layer="layout" svg:width="0.043cm" svg:height="0.15cm" svg:x="13.685cm" svg:y="11.853cm" svg:viewBox="0 0 44 151" draw:points="44,151 44,0 29,22 14,36 0,43">
          <text:p/>
        </draw:polyline>
        <draw:line draw:style-name="gr3" draw:text-style-name="P1" draw:layer="layout" svg:x1="9.47cm" svg:y1="9.703cm" svg:x2="9.556cm" svg:y2="9.703cm">
          <text:p/>
        </draw:line>
        <draw:line draw:style-name="gr3" draw:text-style-name="P1" draw:layer="layout" svg:x1="9.513cm" svg:y1="9.853cm" svg:x2="9.513cm" svg:y2="9.703cm">
          <text:p/>
        </draw:line>
        <draw:line draw:style-name="gr3" draw:text-style-name="P1" draw:layer="layout" svg:x1="9.606cm" svg:y1="9.853cm" svg:x2="9.606cm" svg:y2="9.753cm">
          <text:p/>
        </draw:line>
        <draw:polyline draw:style-name="gr3" draw:text-style-name="P1" draw:layer="layout" svg:width="0.014cm" svg:height="0.014cm" svg:x="9.599cm" svg:y="9.703cm" svg:viewBox="0 0 15 15" draw:points="8,0 0,7 8,15 15,7 8,0 8,15">
          <text:p/>
        </draw:polyline>
        <draw:line draw:style-name="gr3" draw:text-style-name="P1" draw:layer="layout" svg:x1="9.677cm" svg:y1="9.753cm" svg:x2="9.677cm" svg:y2="9.853cm">
          <text:p/>
        </draw:line>
        <draw:polyline draw:style-name="gr3" draw:text-style-name="P1" draw:layer="layout" svg:width="0.065cm" svg:height="0.1cm" svg:x="9.677cm" svg:y="9.753cm" svg:viewBox="0 0 66 101" draw:points="0,15 8,7 23,0 44,0 58,7 66,22 66,101">
          <text:p/>
        </draw:polyline>
        <draw:polyline draw:style-name="gr3" draw:text-style-name="P1" draw:layer="layout" svg:width="0.086cm" svg:height="0.15cm" svg:x="9.92cm" svg:y="9.703cm" svg:viewBox="0 0 87 151" draw:points="0,144 22,151 57,151 72,144 79,137 87,123 87,109 79,93 72,86 57,79 29,72 14,65 8,57 0,43 0,29 8,14 14,7 29,0 65,0 87,7">
          <text:p/>
        </draw:polyline>
        <draw:line draw:style-name="gr3" draw:text-style-name="P1" draw:layer="layout" svg:x1="10.07cm" svg:y1="9.853cm" svg:x2="10.07cm" svg:y2="9.703cm">
          <text:p/>
        </draw:line>
        <draw:polyline draw:style-name="gr3" draw:text-style-name="P1" draw:layer="layout" svg:width="0.065cm" svg:height="0.1cm" svg:x="10.07cm" svg:y="9.753cm" svg:viewBox="0 0 66 101" draw:points="66,101 66,22 59,7 44,0 23,0 8,7 0,15">
          <text:p/>
        </draw:polyline>
        <draw:polyline draw:style-name="gr3" draw:text-style-name="P1" draw:layer="layout" svg:width="0.065cm" svg:height="0.1cm" svg:x="10.206cm" svg:y="9.753cm" svg:viewBox="0 0 66 101" draw:points="66,101 66,22 57,7 43,0 14,0 0,7">
          <text:p/>
        </draw:polyline>
        <draw:polyline draw:style-name="gr3" draw:text-style-name="P1" draw:layer="layout" svg:width="0.072cm" svg:height="0.064cm" svg:x="10.199cm" svg:y="9.789cm" svg:viewBox="0 0 73 65" draw:points="73,58 58,65 22,65 7,58 0,44 0,29 7,14 22,7 58,7 73,0">
          <text:p/>
        </draw:polyline>
        <draw:line draw:style-name="gr3" draw:text-style-name="P1" draw:layer="layout" svg:x1="10.406cm" svg:y1="9.853cm" svg:x2="10.406cm" svg:y2="9.703cm">
          <text:p/>
        </draw:line>
        <draw:polyline draw:style-name="gr3" draw:text-style-name="P1" draw:layer="layout" svg:width="0.072cm" svg:height="0.1cm" svg:x="10.334cm" svg:y="9.753cm" svg:viewBox="0 0 73 101" draw:points="73,94 59,101 30,101 15,94 8,87 0,73 0,29 8,15 15,7 30,0 59,0 73,7">
          <text:p/>
        </draw:polyline>
        <draw:polyline draw:style-name="gr3" draw:text-style-name="P1" draw:layer="layout" svg:width="0.071cm" svg:height="0.1cm" svg:x="10.471cm" svg:y="9.753cm" svg:viewBox="0 0 72 101" draw:points="65,94 50,101 21,101 6,94 0,80 0,22 6,7 21,0 50,0 65,7 72,22 72,36 0,50">
          <text:p/>
        </draw:polyline>
        <draw:line draw:style-name="gr3" draw:text-style-name="P1" draw:layer="layout" svg:x1="10.713cm" svg:y1="9.811cm" svg:x2="10.785cm" svg:y2="9.811cm">
          <text:p/>
        </draw:line>
        <draw:polyline draw:style-name="gr3" draw:text-style-name="P1" draw:layer="layout" svg:width="0.1cm" svg:height="0.15cm" svg:x="10.699cm" svg:y="9.703cm" svg:viewBox="0 0 101 151" draw:points="0,151 51,0 101,151">
          <text:p/>
        </draw:polyline>
        <draw:line draw:style-name="gr3" draw:text-style-name="P1" draw:layer="layout" svg:x1="10.849cm" svg:y1="9.853cm" svg:x2="10.849cm" svg:y2="9.753cm">
          <text:p/>
        </draw:line>
        <draw:polyline draw:style-name="gr3" draw:text-style-name="P1" draw:layer="layout" svg:width="0.044cm" svg:height="0.029cm" svg:x="10.849cm" svg:y="9.753cm" svg:viewBox="0 0 45 30" draw:points="0,30 8,16 15,7 29,0 45,0">
          <text:p/>
        </draw:polyline>
        <draw:polyline draw:style-name="gr3" draw:text-style-name="P1" draw:layer="layout" svg:width="0.071cm" svg:height="0.1cm" svg:x="10.935cm" svg:y="9.753cm" svg:viewBox="0 0 72 101" draw:points="65,94 50,101 21,101 7,94 0,80 0,22 7,7 21,0 50,0 65,7 72,22 72,36 0,50">
          <text:p/>
        </draw:polyline>
        <draw:polyline draw:style-name="gr3" draw:text-style-name="P1" draw:layer="layout" svg:width="0.064cm" svg:height="0.1cm" svg:x="11.071cm" svg:y="9.753cm" svg:viewBox="0 0 65 101" draw:points="65,101 65,22 58,7 43,0 14,0 0,7">
          <text:p/>
        </draw:polyline>
        <draw:polyline draw:style-name="gr3" draw:text-style-name="P1" draw:layer="layout" svg:width="0.072cm" svg:height="0.064cm" svg:x="11.063cm" svg:y="9.789cm" svg:viewBox="0 0 73 65" draw:points="73,58 58,65 23,65 9,58 0,44 0,29 9,14 23,7 58,7 73,0">
          <text:p/>
        </draw:polyline>
        <draw:polygon draw:style-name="gr3" draw:text-style-name="P1" draw:layer="layout" svg:width="0.1cm" svg:height="0.151cm" svg:x="1.935cm" svg:y="12.711cm" svg:viewBox="0 0 101 152" draw:points="36,0 65,0 79,8 94,22 101,51 101,101 94,130 79,144 65,152 36,152 22,144 8,130 0,101 0,51 8,22 22,8">
          <text:p/>
        </draw:polygon>
        <draw:line draw:style-name="gr3" draw:text-style-name="P1" draw:layer="layout" svg:x1="2.099cm" svg:y1="12.762cm" svg:x2="2.099cm" svg:y2="12.912cm">
          <text:p/>
        </draw:line>
        <draw:polyline draw:style-name="gr3" draw:text-style-name="P1" draw:layer="layout" svg:width="0.072cm" svg:height="0.1cm" svg:x="2.099cm" svg:y="12.762cm" svg:viewBox="0 0 73 101" draw:points="0,7 14,0 44,0 58,7 65,14 73,28 73,72 65,86 58,93 44,101 14,101 0,93">
          <text:p/>
        </draw:polyline>
        <draw:polyline draw:style-name="gr3" draw:text-style-name="P1" draw:layer="layout" svg:width="0.071cm" svg:height="0.1cm" svg:x="2.228cm" svg:y="12.762cm" svg:viewBox="0 0 72 101" draw:points="65,93 51,101 21,101 7,93 0,79 0,21 7,7 21,0 51,0 65,7 72,21 72,35 0,49">
          <text:p/>
        </draw:polyline>
        <draw:line draw:style-name="gr3" draw:text-style-name="P1" draw:layer="layout" svg:x1="2.363cm" svg:y1="12.762cm" svg:x2="2.363cm" svg:y2="12.862cm">
          <text:p/>
        </draw:line>
        <draw:polyline draw:style-name="gr3" draw:text-style-name="P1" draw:layer="layout" svg:width="0.065cm" svg:height="0.1cm" svg:x="2.363cm" svg:y="12.762cm" svg:viewBox="0 0 66 101" draw:points="0,14 8,7 22,0 44,0 58,7 66,21 66,101">
          <text:p/>
        </draw:polyline>
        <draw:polyline draw:style-name="gr3" draw:text-style-name="P1" draw:layer="layout" svg:width="0.1cm" svg:height="0.15cm" svg:x="1.92cm" svg:y="12.953cm" svg:viewBox="0 0 101 151" draw:points="0,0 51,151 101,0">
          <text:p/>
        </draw:polyline>
        <draw:polyline draw:style-name="gr3" draw:text-style-name="P1" draw:layer="layout" svg:width="0.072cm" svg:height="0.1cm" svg:x="2.063cm" svg:y="13.003cm" svg:viewBox="0 0 73 101" draw:points="66,94 50,101 22,101 8,94 0,80 0,23 8,7 22,0 50,0 66,7 73,23 73,37 0,51">
          <text:p/>
        </draw:polyline>
        <draw:line draw:style-name="gr3" draw:text-style-name="P1" draw:layer="layout" svg:x1="2.199cm" svg:y1="13.103cm" svg:x2="2.199cm" svg:y2="13.003cm">
          <text:p/>
        </draw:line>
        <draw:polyline draw:style-name="gr3" draw:text-style-name="P1" draw:layer="layout" svg:width="0.043cm" svg:height="0.029cm" svg:x="2.199cm" svg:y="13.003cm" svg:viewBox="0 0 44 30" draw:points="0,30 7,15 14,7 29,0 44,0">
          <text:p/>
        </draw:polyline>
        <draw:polyline draw:style-name="gr3" draw:text-style-name="P1" draw:layer="layout" svg:width="0.064cm" svg:height="0.1cm" svg:x="2.292cm" svg:y="13.003cm" svg:viewBox="0 0 65 101" draw:points="65,101 65,23 58,7 44,0 14,0 0,7">
          <text:p/>
        </draw:polyline>
        <draw:polyline draw:style-name="gr3" draw:text-style-name="P1" draw:layer="layout" svg:width="0.071cm" svg:height="0.064cm" svg:x="2.285cm" svg:y="13.039cm" svg:viewBox="0 0 72 65" draw:points="72,58 58,65 21,65 7,58 0,44 0,29 7,14 21,7 58,7 72,0">
          <text:p/>
        </draw:polyline>
        <draw:line draw:style-name="gr3" draw:text-style-name="P1" draw:layer="layout" svg:x1="2.428cm" svg:y1="13.003cm" svg:x2="2.428cm" svg:y2="13.103cm">
          <text:p/>
        </draw:line>
        <draw:polyline draw:style-name="gr3" draw:text-style-name="P1" draw:layer="layout" svg:width="0.064cm" svg:height="0.1cm" svg:x="2.428cm" svg:y="13.003cm" svg:viewBox="0 0 65 101" draw:points="0,14 7,7 21,0 44,0 58,7 65,23 65,101">
          <text:p/>
        </draw:polyline>
        <draw:line draw:style-name="gr3" draw:text-style-name="P1" draw:layer="layout" svg:x1="2.628cm" svg:y1="13.103cm" svg:x2="2.628cm" svg:y2="12.953cm">
          <text:p/>
        </draw:line>
        <draw:polyline draw:style-name="gr3" draw:text-style-name="P1" draw:layer="layout" svg:width="0.072cm" svg:height="0.1cm" svg:x="2.556cm" svg:y="13.003cm" svg:viewBox="0 0 73 101" draw:points="73,94 57,101 29,101 15,94 7,87 0,72 0,30 7,14 15,7 29,0 57,0 73,7">
          <text:p/>
        </draw:polyline>
        <draw:line draw:style-name="gr3" draw:text-style-name="P1" draw:layer="layout" svg:x1="2.699cm" svg:y1="13.103cm" svg:x2="2.699cm" svg:y2="12.953cm">
          <text:p/>
        </draw:line>
        <draw:polyline draw:style-name="gr3" draw:text-style-name="P1" draw:layer="layout" svg:width="0.064cm" svg:height="0.1cm" svg:x="2.699cm" svg:y="13.003cm" svg:viewBox="0 0 65 101" draw:points="65,101 65,23 58,7 44,0 22,0 7,7 0,14">
          <text:p/>
        </draw:polyline>
        <draw:polyline draw:style-name="gr3" draw:text-style-name="P1" draw:layer="layout" svg:width="0.064cm" svg:height="0.1cm" svg:x="2.835cm" svg:y="13.003cm" svg:viewBox="0 0 65 101" draw:points="65,101 65,23 58,7 44,0 15,0 0,7">
          <text:p/>
        </draw:polyline>
        <draw:polyline draw:style-name="gr3" draw:text-style-name="P1" draw:layer="layout" svg:width="0.071cm" svg:height="0.064cm" svg:x="2.828cm" svg:y="13.039cm" svg:viewBox="0 0 72 65" draw:points="72,58 58,65 22,65 8,58 0,44 0,29 8,14 22,7 58,7 72,0">
          <text:p/>
        </draw:polyline>
        <draw:polyline draw:style-name="gr3" draw:text-style-name="P1" draw:layer="layout" svg:width="0.085cm" svg:height="0.15cm" svg:x="3.535cm" svg:y="12.82cm" svg:viewBox="0 0 86 151" draw:points="0,144 22,151 58,151 72,144 79,137 86,123 86,108 79,94 72,87 58,80 29,72 15,66 7,58 0,44 0,29 7,14 15,7 29,0 65,0 86,7">
          <text:p/>
        </draw:polyline>
        <draw:line draw:style-name="gr3" draw:text-style-name="P1" draw:layer="layout" svg:x1="3.663cm" svg:y1="12.87cm" svg:x2="3.72cm" svg:y2="12.87cm">
          <text:p/>
        </draw:line>
        <draw:polyline draw:style-name="gr3" draw:text-style-name="P1" draw:layer="layout" svg:width="0.036cm" svg:height="0.15cm" svg:x="3.684cm" svg:y="12.82cm" svg:viewBox="0 0 37 151" draw:points="0,0 0,129 8,144 22,151 37,151">
          <text:p/>
        </draw:polyline>
        <draw:polygon draw:style-name="gr3" draw:text-style-name="P1" draw:layer="layout" svg:width="0.079cm" svg:height="0.1cm" svg:x="3.763cm" svg:y="12.87cm" svg:viewBox="0 0 80 101" draw:points="29,101 15,94 7,87 0,73 0,29 7,15 15,7 29,0 51,0 65,7 73,15 80,29 80,73 73,87 65,94 51,101">
          <text:p/>
        </draw:polygon>
        <draw:line draw:style-name="gr3" draw:text-style-name="P1" draw:layer="layout" svg:x1="3.906cm" svg:y1="12.97cm" svg:x2="3.906cm" svg:y2="12.87cm">
          <text:p/>
        </draw:line>
        <draw:polyline draw:style-name="gr3" draw:text-style-name="P1" draw:layer="layout" svg:width="0.043cm" svg:height="0.029cm" svg:x="3.906cm" svg:y="12.87cm" svg:viewBox="0 0 44 30" draw:points="0,30 7,16 16,8 30,0 44,0">
          <text:p/>
        </draw:polyline>
        <draw:polyline draw:style-name="gr3" draw:text-style-name="P1" draw:layer="layout" svg:width="0.071cm" svg:height="0.1cm" svg:x="3.992cm" svg:y="12.87cm" svg:viewBox="0 0 72 101" draw:points="65,94 51,101 21,101 7,94 0,79 0,21 7,7 21,0 51,0 65,7 72,21 72,36 0,50">
          <text:p/>
        </draw:polyline>
        <draw:line draw:style-name="gr3" draw:text-style-name="P1" draw:layer="layout" svg:x1="3.628cm" svg:y1="13.213cm" svg:x2="3.578cm" svg:y2="13.14cm">
          <text:p/>
        </draw:line>
        <draw:polyline draw:style-name="gr3" draw:text-style-name="P1" draw:layer="layout" svg:width="0.085cm" svg:height="0.15cm" svg:x="3.542cm" svg:y="13.062cm" svg:viewBox="0 0 86 151" draw:points="0,151 0,0 58,0 72,7 79,14 86,28 86,49 79,64 72,71 58,78 0,78">
          <text:p/>
        </draw:polyline>
        <draw:polygon draw:style-name="gr3" draw:text-style-name="P1" draw:layer="layout" svg:width="0.079cm" svg:height="0.101cm" svg:x="3.684cm" svg:y="13.111cm" svg:viewBox="0 0 80 102" draw:points="29,102 15,95 8,87 0,73 0,30 8,16 15,8 29,0 52,0 66,8 73,16 80,30 80,73 73,87 66,95 52,102">
          <text:p/>
        </draw:polygon>
        <draw:polygon draw:style-name="gr3" draw:text-style-name="P1" draw:layer="layout" svg:width="0.078cm" svg:height="0.101cm" svg:x="3.821cm" svg:y="13.111cm" svg:viewBox="0 0 79 102" draw:points="28,102 14,95 6,87 0,73 0,30 6,16 14,8 28,0 49,0 64,8 72,16 79,30 79,73 72,87 64,95 49,102">
          <text:p/>
        </draw:polygon>
        <draw:line draw:style-name="gr3" draw:text-style-name="P1" draw:layer="layout" svg:x1="3.963cm" svg:y1="13.212cm" svg:x2="3.963cm" svg:y2="13.111cm">
          <text:p/>
        </draw:line>
        <draw:polyline draw:style-name="gr3" draw:text-style-name="P1" draw:layer="layout" svg:width="0.064cm" svg:height="0.101cm" svg:x="3.963cm" svg:y="13.111cm" svg:viewBox="0 0 65 102" draw:points="0,16 7,8 22,0 44,0 58,8 65,23 65,102">
          <text:p/>
        </draw:polyline>
        <draw:polyline draw:style-name="gr3" draw:text-style-name="P1" draw:layer="layout" svg:width="0.065cm" svg:height="0.101cm" svg:x="4.027cm" svg:y="13.111cm" svg:viewBox="0 0 66 102" draw:points="0,23 8,8 22,0 44,0 59,8 66,23 66,102">
          <text:p/>
        </draw:polyline>
        <draw:line draw:style-name="gr3" draw:text-style-name="P1" draw:layer="layout" svg:x1="3.62cm" svg:y1="13.453cm" svg:x2="3.535cm" svg:y2="13.453cm">
          <text:p/>
        </draw:line>
        <draw:polyline draw:style-name="gr3" draw:text-style-name="P1" draw:layer="layout" svg:width="0.043cm" svg:height="0.15cm" svg:x="3.535cm" svg:y="13.303cm" svg:viewBox="0 0 44 151" draw:points="44,151 44,0 29,22 15,36 0,43">
          <text:p/>
        </draw:polyline>
        <draw:polyline draw:style-name="gr3" draw:text-style-name="P1" draw:layer="layout" svg:width="0.085cm" svg:height="0.15cm" svg:x="3.678cm" svg:y="13.303cm" svg:viewBox="0 0 86 151" draw:points="72,0 43,0 28,7 21,14 6,36 0,65 0,123 6,137 14,144 28,151 58,151 72,144 79,137 86,123 86,86 79,72 72,65 58,57 28,57 14,65 6,72 0,86">
          <text:p/>
        </draw:polyline>
        <draw:line draw:style-name="gr3" draw:text-style-name="P1" draw:layer="layout" svg:x1="3.813cm" svg:y1="13.454cm" svg:x2="3.893cm" svg:y2="13.353cm">
          <text:p/>
        </draw:line>
        <draw:line draw:style-name="gr3" draw:text-style-name="P1" draw:layer="layout" svg:x1="3.813cm" svg:y1="13.353cm" svg:x2="3.893cm" svg:y2="13.454cm">
          <text:p/>
        </draw:line>
        <draw:line draw:style-name="gr3" draw:text-style-name="P1" draw:layer="layout" svg:x1="4.027cm" svg:y1="13.453cm" svg:x2="3.942cm" svg:y2="13.453cm">
          <text:p/>
        </draw:line>
        <draw:polyline draw:style-name="gr3" draw:text-style-name="P1" draw:layer="layout" svg:width="0.042cm" svg:height="0.15cm" svg:x="3.942cm" svg:y="13.303cm" svg:viewBox="0 0 43 151" draw:points="43,151 43,0 29,22 14,36 0,43">
          <text:p/>
        </draw:polyline>
        <draw:polyline draw:style-name="gr3" draw:text-style-name="P1" draw:layer="layout" svg:width="0.092cm" svg:height="0.15cm" svg:x="4.078cm" svg:y="13.303cm" svg:viewBox="0 0 93 151" draw:points="0,0 93,0 44,57 65,57 79,65 86,72 93,86 93,123 86,137 79,144 65,151 21,151 7,144 0,137">
          <text:p/>
        </draw:polyline>
        <draw:polyline draw:style-name="gr3" draw:text-style-name="P1" draw:layer="layout" svg:width="0.086cm" svg:height="0.15cm" svg:x="2.065cm" svg:y="17.077cm" svg:viewBox="0 0 87 151" draw:points="0,151 0,0 87,151 87,0">
          <text:p/>
        </draw:polyline>
        <draw:polygon draw:style-name="gr3" draw:text-style-name="P1" draw:layer="layout" svg:width="0.079cm" svg:height="0.1cm" svg:x="2.215cm" svg:y="17.127cm" svg:viewBox="0 0 80 101" draw:points="28,101 14,94 7,87 0,72 0,30 7,14 14,7 28,0 51,0 65,7 72,14 80,30 80,72 72,87 65,94 51,101">
          <text:p/>
        </draw:polygon>
        <draw:line draw:style-name="gr3" draw:text-style-name="P1" draw:layer="layout" svg:x1="2.336cm" svg:y1="17.127cm" svg:x2="2.393cm" svg:y2="17.127cm">
          <text:p/>
        </draw:line>
        <draw:polyline draw:style-name="gr3" draw:text-style-name="P1" draw:layer="layout" svg:width="0.035cm" svg:height="0.15cm" svg:x="2.358cm" svg:y="17.077cm" svg:viewBox="0 0 36 151" draw:points="0,0 0,130 7,144 22,151 36,151">
          <text:p/>
        </draw:polyline>
        <draw:polyline draw:style-name="gr3" draw:text-style-name="P1" draw:layer="layout" svg:width="0.071cm" svg:height="0.1cm" svg:x="2.436cm" svg:y="17.127cm" svg:viewBox="0 0 72 101" draw:points="66,94 51,101 22,101 7,94 0,80 0,23 7,7 22,0 51,0 66,7 72,23 72,37 0,51">
          <text:p/>
        </draw:polyline>
        <draw:polyline draw:style-name="gr3" draw:text-style-name="P1" draw:layer="layout" svg:width="0.014cm" svg:height="0.014cm" svg:x="2.679cm" svg:y="17.213cm" svg:viewBox="0 0 15 15" draw:points="8,0 15,8 8,15 0,8 8,0 8,15">
          <text:p/>
        </draw:polyline>
        <draw:polyline draw:style-name="gr3" draw:text-style-name="P1" draw:layer="layout" svg:width="0.014cm" svg:height="0.015cm" svg:x="2.679cm" svg:y="17.134cm" svg:viewBox="0 0 15 16" draw:points="8,0 15,7 8,16 0,7 8,0 8,16">
          <text:p/>
        </draw:polyline>
        <draw:polyline draw:style-name="gr3" draw:text-style-name="P1" draw:layer="layout" svg:width="0.086cm" svg:height="0.15cm" svg:x="2.872cm" svg:y="17.077cm" svg:viewBox="0 0 87 151" draw:points="0,0 0,122 7,137 14,144 29,151 57,151 72,144 79,137 87,122 87,0">
          <text:p/>
        </draw:polyline>
        <draw:line draw:style-name="gr3" draw:text-style-name="P1" draw:layer="layout" svg:x1="3.029cm" svg:y1="17.127cm" svg:x2="3.029cm" svg:y2="17.227cm">
          <text:p/>
        </draw:line>
        <draw:polyline draw:style-name="gr3" draw:text-style-name="P1" draw:layer="layout" svg:width="0.064cm" svg:height="0.1cm" svg:x="3.029cm" svg:y="17.127cm" svg:viewBox="0 0 65 101" draw:points="0,14 7,7 21,0 43,0 57,7 65,23 65,101">
          <text:p/>
        </draw:polyline>
        <draw:line draw:style-name="gr3" draw:text-style-name="P1" draw:layer="layout" svg:x1="3.165cm" svg:y1="17.227cm" svg:x2="3.165cm" svg:y2="17.127cm">
          <text:p/>
        </draw:line>
        <draw:polyline draw:style-name="gr3" draw:text-style-name="P1" draw:layer="layout" svg:width="0.014cm" svg:height="0.014cm" svg:x="3.158cm" svg:y="17.077cm" svg:viewBox="0 0 15 15" draw:points="7,0 0,8 7,15 15,8 7,0 7,15">
          <text:p/>
        </draw:polyline>
        <draw:line draw:style-name="gr3" draw:text-style-name="P1" draw:layer="layout" svg:x1="3.215cm" svg:y1="17.127cm" svg:x2="3.272cm" svg:y2="17.127cm">
          <text:p/>
        </draw:line>
        <draw:polyline draw:style-name="gr3" draw:text-style-name="P1" draw:layer="layout" svg:width="0.036cm" svg:height="0.15cm" svg:x="3.236cm" svg:y="17.077cm" svg:viewBox="0 0 37 151" draw:points="0,0 0,130 7,144 23,151 37,151">
          <text:p/>
        </draw:polyline>
        <draw:polyline draw:style-name="gr3" draw:text-style-name="P1" draw:layer="layout" svg:width="0.064cm" svg:height="0.1cm" svg:x="3.315cm" svg:y="17.127cm" svg:viewBox="0 0 65 101" draw:points="0,94 14,101 44,101 58,94 65,80 65,72 58,58 44,51 21,51 7,44 0,30 0,23 7,7 21,0 44,0 58,7">
          <text:p/>
        </draw:polyline>
        <draw:polyline draw:style-name="gr3" draw:text-style-name="P1" draw:layer="layout" svg:width="0.064cm" svg:height="0.1cm" svg:x="3.558cm" svg:y="17.127cm" svg:viewBox="0 0 65 101" draw:points="65,101 65,23 58,7 43,0 14,0 0,7">
          <text:p/>
        </draw:polyline>
        <draw:polyline draw:style-name="gr3" draw:text-style-name="P1" draw:layer="layout" svg:width="0.072cm" svg:height="0.064cm" svg:x="3.55cm" svg:y="17.163cm" svg:viewBox="0 0 73 65" draw:points="73,58 58,65 22,65 8,58 0,44 0,29 8,14 22,7 58,7 73,0">
          <text:p/>
        </draw:polyline>
        <draw:line draw:style-name="gr3" draw:text-style-name="P1" draw:layer="layout" svg:x1="3.693cm" svg:y1="17.227cm" svg:x2="3.693cm" svg:y2="17.127cm">
          <text:p/>
        </draw:line>
        <draw:polyline draw:style-name="gr3" draw:text-style-name="P1" draw:layer="layout" svg:width="0.043cm" svg:height="0.029cm" svg:x="3.693cm" svg:y="17.127cm" svg:viewBox="0 0 44 30" draw:points="0,30 8,15 15,7 29,0 44,0">
          <text:p/>
        </draw:polyline>
        <draw:polyline draw:style-name="gr3" draw:text-style-name="P1" draw:layer="layout" svg:width="0.071cm" svg:height="0.1cm" svg:x="3.779cm" svg:y="17.127cm" svg:viewBox="0 0 72 101" draw:points="66,94 50,101 22,101 7,94 0,80 0,23 7,7 22,0 50,0 66,7 72,23 72,37 0,51">
          <text:p/>
        </draw:polyline>
        <draw:line draw:style-name="gr3" draw:text-style-name="P1" draw:layer="layout" svg:x1="4.029cm" svg:y1="17.227cm" svg:x2="4.029cm" svg:y2="17.127cm">
          <text:p/>
        </draw:line>
        <draw:polyline draw:style-name="gr3" draw:text-style-name="P1" draw:layer="layout" svg:width="0.014cm" svg:height="0.014cm" svg:x="4.022cm" svg:y="17.077cm" svg:viewBox="0 0 15 15" draw:points="8,0 0,8 8,15 15,8 8,0 8,15">
          <text:p/>
        </draw:polyline>
        <draw:line draw:style-name="gr3" draw:text-style-name="P1" draw:layer="layout" svg:x1="4.101cm" svg:y1="17.127cm" svg:x2="4.101cm" svg:y2="17.227cm">
          <text:p/>
        </draw:line>
        <draw:polyline draw:style-name="gr3" draw:text-style-name="P1" draw:layer="layout" svg:width="0.064cm" svg:height="0.1cm" svg:x="4.101cm" svg:y="17.127cm" svg:viewBox="0 0 65 101" draw:points="0,14 7,7 22,0 44,0 58,7 65,23 65,101">
          <text:p/>
        </draw:polyline>
        <draw:line draw:style-name="gr3" draw:text-style-name="P1" draw:layer="layout" svg:x1="4.329cm" svg:y1="17.127cm" svg:x2="4.387cm" svg:y2="17.127cm">
          <text:p/>
        </draw:line>
        <draw:polyline draw:style-name="gr3" draw:text-style-name="P1" draw:layer="layout" svg:width="0.036cm" svg:height="0.15cm" svg:x="4.351cm" svg:y="17.077cm" svg:viewBox="0 0 37 151" draw:points="0,151 0,21 7,7 22,0 37,0">
          <text:p/>
        </draw:polyline>
        <draw:polygon draw:style-name="gr3" draw:text-style-name="P1" draw:layer="layout" svg:width="0.079cm" svg:height="0.1cm" svg:x="4.429cm" svg:y="17.127cm" svg:viewBox="0 0 80 101" draw:points="29,101 15,94 7,87 0,72 0,30 7,14 15,7 29,0 51,0 65,7 72,14 80,30 80,72 72,87 65,94 51,101">
          <text:p/>
        </draw:polygon>
        <draw:polygon draw:style-name="gr3" draw:text-style-name="P1" draw:layer="layout" svg:width="0.078cm" svg:height="0.1cm" svg:x="4.565cm" svg:y="17.127cm" svg:viewBox="0 0 79 101" draw:points="28,101 14,94 7,87 0,72 0,30 7,14 14,7 28,0 51,0 65,7 72,14 79,30 79,72 72,87 65,94 51,101">
          <text:p/>
        </draw:polygon>
        <draw:line draw:style-name="gr3" draw:text-style-name="P1" draw:layer="layout" svg:x1="4.686cm" svg:y1="17.127cm" svg:x2="4.743cm" svg:y2="17.127cm">
          <text:p/>
        </draw:line>
        <draw:polyline draw:style-name="gr3" draw:text-style-name="P1" draw:layer="layout" svg:width="0.035cm" svg:height="0.15cm" svg:x="4.708cm" svg:y="17.077cm" svg:viewBox="0 0 36 151" draw:points="0,0 0,130 7,144 22,151 36,151">
          <text:p/>
        </draw:polyline>
        <draw:line draw:style-name="gr3" draw:text-style-name="P1" draw:layer="layout" svg:x1="3.515cm" svg:y1="16.249cm" svg:x2="3.629cm" svg:y2="16.249cm">
          <text:p/>
        </draw:line>
        <draw:line draw:style-name="gr3" draw:text-style-name="P1" draw:layer="layout" svg:x1="3.629cm" svg:y1="16.291cm" svg:x2="3.515cm" svg:y2="16.291cm">
          <text:p/>
        </draw:line>
        <draw:polygon draw:style-name="gr3" draw:text-style-name="P1" draw:layer="layout" svg:width="0.1cm" svg:height="0.15cm" svg:x="3.808cm" svg:y="16.177cm" svg:viewBox="0 0 101 151" draw:points="36,0 65,0 79,7 94,22 101,51 101,101 94,130 79,144 65,151 36,151 21,144 7,130 0,101 0,51 7,22 21,7">
          <text:p/>
        </draw:polygon>
        <draw:line draw:style-name="gr3" draw:text-style-name="P1" draw:layer="layout" svg:x1="4.036cm" svg:y1="16.227cm" svg:x2="4.036cm" svg:y2="16.327cm">
          <text:p/>
        </draw:line>
        <draw:polyline draw:style-name="gr3" draw:text-style-name="P1" draw:layer="layout" svg:width="0.064cm" svg:height="0.1cm" svg:x="3.972cm" svg:y="16.227cm" svg:viewBox="0 0 65 101" draw:points="0,0 0,80 7,94 22,101 44,101 58,94 65,87">
          <text:p/>
        </draw:polyline>
        <draw:line draw:style-name="gr3" draw:text-style-name="P1" draw:layer="layout" svg:x1="4.087cm" svg:y1="16.227cm" svg:x2="4.144cm" svg:y2="16.227cm">
          <text:p/>
        </draw:line>
        <draw:polyline draw:style-name="gr3" draw:text-style-name="P1" draw:layer="layout" svg:width="0.036cm" svg:height="0.15cm" svg:x="4.108cm" svg:y="16.177cm" svg:viewBox="0 0 37 151" draw:points="0,0 0,130 7,144 22,151 37,151">
          <text:p/>
        </draw:polyline>
        <draw:line draw:style-name="gr3" draw:text-style-name="P1" draw:layer="layout" svg:x1="4.258cm" svg:y1="16.327cm" svg:x2="4.258cm" svg:y2="16.177cm">
          <text:p/>
        </draw:line>
        <draw:polyline draw:style-name="gr3" draw:text-style-name="P1" draw:layer="layout" svg:width="0.073cm" svg:height="0.1cm" svg:x="4.186cm" svg:y="16.227cm" svg:viewBox="0 0 74 101" draw:points="74,94 59,101 30,101 16,94 8,87 0,73 0,30 8,15 16,7 30,0 59,0 74,7">
          <text:p/>
        </draw:polyline>
        <draw:polygon draw:style-name="gr3" draw:text-style-name="P1" draw:layer="layout" svg:width="0.079cm" svg:height="0.1cm" svg:x="4.322cm" svg:y="16.227cm" svg:viewBox="0 0 80 101" draw:points="29,101 14,94 7,87 0,73 0,30 7,15 14,7 29,0 51,0 66,7 72,15 80,30 80,73 72,87 66,94 51,101">
          <text:p/>
        </draw:polygon>
        <draw:polygon draw:style-name="gr3" draw:text-style-name="P1" draw:layer="layout" svg:width="0.079cm" svg:height="0.1cm" svg:x="4.457cm" svg:y="16.227cm" svg:viewBox="0 0 80 101" draw:points="29,101 15,94 8,87 0,73 0,30 8,15 15,7 29,0 51,0 66,7 73,15 80,30 80,73 73,87 66,94 51,101">
          <text:p/>
        </draw:polygon>
        <draw:line draw:style-name="gr3" draw:text-style-name="P1" draw:layer="layout" svg:x1="4.6cm" svg:y1="16.327cm" svg:x2="4.6cm" svg:y2="16.227cm">
          <text:p/>
        </draw:line>
        <draw:polyline draw:style-name="gr3" draw:text-style-name="P1" draw:layer="layout" svg:width="0.043cm" svg:height="0.029cm" svg:x="4.6cm" svg:y="16.227cm" svg:viewBox="0 0 44 30" draw:points="0,30 8,15 16,7 30,0 44,0">
          <text:p/>
        </draw:polyline>
        <draw:polyline draw:style-name="gr3" draw:text-style-name="P1" draw:layer="layout" svg:width="0.094cm" svg:height="0.15cm" svg:x="4.8cm" svg:y="16.177cm" svg:viewBox="0 0 95 151" draw:points="87,7 73,0 52,0 30,7 15,22 8,36 0,66 0,87 8,115 15,130 30,144 52,151 66,151 87,144 95,137 95,87 66,87">
          <text:p/>
        </draw:polyline>
        <draw:polyline draw:style-name="gr3" draw:text-style-name="P1" draw:layer="layout" svg:width="0.065cm" svg:height="0.1cm" svg:x="4.957cm" svg:y="16.227cm" svg:viewBox="0 0 66 101" draw:points="66,101 66,23 59,7 43,0 15,0 0,7">
          <text:p/>
        </draw:polyline>
        <draw:polyline draw:style-name="gr3" draw:text-style-name="P1" draw:layer="layout" svg:width="0.071cm" svg:height="0.064cm" svg:x="4.951cm" svg:y="16.263cm" svg:viewBox="0 0 72 65" draw:points="72,58 58,65 22,65 6,58 0,44 0,29 6,15 22,7 58,7 72,0">
          <text:p/>
        </draw:polyline>
        <draw:line draw:style-name="gr3" draw:text-style-name="P1" draw:layer="layout" svg:x1="5.072cm" svg:y1="16.227cm" svg:x2="5.129cm" svg:y2="16.227cm">
          <text:p/>
        </draw:line>
        <draw:polyline draw:style-name="gr3" draw:text-style-name="P1" draw:layer="layout" svg:width="0.036cm" svg:height="0.15cm" svg:x="5.093cm" svg:y="16.177cm" svg:viewBox="0 0 37 151" draw:points="0,0 0,130 7,144 23,151 37,151">
          <text:p/>
        </draw:polyline>
        <draw:polyline draw:style-name="gr3" draw:text-style-name="P1" draw:layer="layout" svg:width="0.071cm" svg:height="0.1cm" svg:x="5.172cm" svg:y="16.227cm" svg:viewBox="0 0 72 101" draw:points="65,94 51,101 23,101 7,94 0,80 0,23 7,7 23,0 51,0 65,7 72,23 72,37 0,51">
          <text:p/>
        </draw:polyline>
        <draw:line draw:style-name="gr3" draw:text-style-name="P1" draw:layer="layout" svg:x1="3.515cm" svg:y1="15.648cm" svg:x2="3.629cm" svg:y2="15.648cm">
          <text:p/>
        </draw:line>
        <draw:line draw:style-name="gr3" draw:text-style-name="P1" draw:layer="layout" svg:x1="3.629cm" svg:y1="15.691cm" svg:x2="3.515cm" svg:y2="15.691cm">
          <text:p/>
        </draw:line>
        <draw:line draw:style-name="gr3" draw:text-style-name="P1" draw:layer="layout" svg:x1="3.902cm" svg:y1="15.728cm" svg:x2="3.85cm" svg:y2="15.656cm">
          <text:p/>
        </draw:line>
        <draw:polyline draw:style-name="gr3" draw:text-style-name="P1" draw:layer="layout" svg:width="0.086cm" svg:height="0.15cm" svg:x="3.815cm" svg:y="15.577cm" svg:viewBox="0 0 87 151" draw:points="0,151 0,0 58,0 72,7 79,14 87,29 87,51 79,66 72,72 58,80 0,80">
          <text:p/>
        </draw:polyline>
        <draw:polygon draw:style-name="gr3" draw:text-style-name="P1" draw:layer="layout" svg:width="0.078cm" svg:height="0.1cm" svg:x="3.958cm" svg:y="15.627cm" svg:viewBox="0 0 79 101" draw:points="29,101 15,94 7,87 0,73 0,30 7,15 15,7 29,0 51,0 65,7 72,15 79,30 79,73 72,87 65,94 51,101">
          <text:p/>
        </draw:polygon>
        <draw:polygon draw:style-name="gr3" draw:text-style-name="P1" draw:layer="layout" svg:width="0.079cm" svg:height="0.1cm" svg:x="4.093cm" svg:y="15.627cm" svg:viewBox="0 0 80 101" draw:points="29,101 15,94 8,87 0,73 0,30 8,15 15,7 29,0 52,0 66,7 73,15 80,30 80,73 73,87 66,94 52,101">
          <text:p/>
        </draw:polygon>
        <draw:line draw:style-name="gr3" draw:text-style-name="P1" draw:layer="layout" svg:x1="4.236cm" svg:y1="15.727cm" svg:x2="4.236cm" svg:y2="15.627cm">
          <text:p/>
        </draw:line>
        <draw:polyline draw:style-name="gr3" draw:text-style-name="P1" draw:layer="layout" svg:width="0.065cm" svg:height="0.1cm" svg:x="4.236cm" svg:y="15.627cm" svg:viewBox="0 0 66 101" draw:points="0,15 9,7 23,0 44,0 58,7 66,21 66,101">
          <text:p/>
        </draw:polyline>
        <draw:polyline draw:style-name="gr3" draw:text-style-name="P1" draw:layer="layout" svg:width="0.064cm" svg:height="0.1cm" svg:x="4.301cm" svg:y="15.627cm" svg:viewBox="0 0 65 101" draw:points="0,21 7,7 21,0 44,0 58,7 65,21 65,101">
          <text:p/>
        </draw:polyline>
        <draw:polygon draw:style-name="gr3" draw:text-style-name="P1" draw:layer="layout" svg:width="0.085cm" svg:height="0.15cm" svg:x="4.551cm" svg:y="15.577cm" svg:viewBox="0 0 86 151" draw:points="0,151 0,0 36,0 58,7 72,22 79,36 86,66 86,87 79,115 72,130 58,144 36,151">
          <text:p/>
        </draw:polygon>
        <draw:polygon draw:style-name="gr3" draw:text-style-name="P1" draw:layer="layout" svg:width="0.079cm" svg:height="0.1cm" svg:x="4.693cm" svg:y="15.627cm" svg:viewBox="0 0 80 101" draw:points="29,101 15,94 7,87 0,73 0,30 7,15 15,7 29,0 50,0 66,7 73,15 80,30 80,73 73,87 66,94 50,101">
          <text:p/>
        </draw:polygon>
        <draw:polygon draw:style-name="gr3" draw:text-style-name="P1" draw:layer="layout" svg:width="0.079cm" svg:height="0.1cm" svg:x="4.829cm" svg:y="15.627cm" svg:viewBox="0 0 80 101" draw:points="28,101 14,94 7,87 0,73 0,30 7,15 14,7 28,0 50,0 65,7 71,15 80,30 80,73 71,87 65,94 50,101">
          <text:p/>
        </draw:polygon>
        <draw:line draw:style-name="gr3" draw:text-style-name="P1" draw:layer="layout" svg:x1="4.972cm" svg:y1="15.727cm" svg:x2="4.972cm" svg:y2="15.627cm">
          <text:p/>
        </draw:line>
        <draw:polyline draw:style-name="gr3" draw:text-style-name="P1" draw:layer="layout" svg:width="0.043cm" svg:height="0.029cm" svg:x="4.972cm" svg:y="15.627cm" svg:viewBox="0 0 44 30" draw:points="0,30 7,16 14,8 29,0 44,0">
          <text:p/>
        </draw:polyline>
        <draw:polyline draw:style-name="gr3" draw:text-style-name="P1" draw:layer="layout" svg:width="0.128cm" svg:height="0.15cm" svg:x="7.478cm" svg:y="11.553cm" svg:viewBox="0 0 129 151" draw:points="0,0 36,151 65,43 93,151 129,0">
          <text:p/>
        </draw:polyline>
        <draw:line draw:style-name="gr3" draw:text-style-name="P1" draw:layer="layout" svg:x1="7.663cm" svg:y1="11.703cm" svg:x2="7.663cm" svg:y2="11.603cm">
          <text:p/>
        </draw:line>
        <draw:polyline draw:style-name="gr3" draw:text-style-name="P1" draw:layer="layout" svg:width="0.014cm" svg:height="0.014cm" svg:x="7.656cm" svg:y="11.553cm" svg:viewBox="0 0 15 15" draw:points="8,0 0,8 8,15 15,8 8,0 8,15">
          <text:p/>
        </draw:polyline>
        <draw:line draw:style-name="gr3" draw:text-style-name="P1" draw:layer="layout" svg:x1="7.799cm" svg:y1="11.703cm" svg:x2="7.799cm" svg:y2="11.553cm">
          <text:p/>
        </draw:line>
        <draw:polyline draw:style-name="gr3" draw:text-style-name="P1" draw:layer="layout" svg:width="0.072cm" svg:height="0.1cm" svg:x="7.727cm" svg:y="11.603cm" svg:viewBox="0 0 73 101" draw:points="73,94 58,101 30,101 16,94 9,87 0,73 0,30 9,15 16,7 30,0 58,0 73,7">
          <text:p/>
        </draw:polyline>
        <draw:polyline draw:style-name="gr3" draw:text-style-name="P1" draw:layer="layout" svg:width="0.072cm" svg:height="0.1cm" svg:x="7.863cm" svg:y="11.603cm" svg:viewBox="0 0 73 101" draw:points="65,94 51,101 22,101 7,94 0,80 0,23 7,7 22,0 51,0 65,7 73,23 73,37 0,51">
          <text:p/>
        </draw:polyline>
        <draw:polyline draw:style-name="gr3" draw:text-style-name="P1" draw:layer="layout" svg:width="0.1cm" svg:height="0.15cm" svg:x="8.092cm" svg:y="11.553cm" svg:viewBox="0 0 101 151" draw:points="0,0 51,151 101,0">
          <text:p/>
        </draw:polyline>
        <draw:polyline draw:style-name="gr3" draw:text-style-name="P1" draw:layer="layout" svg:width="0.071cm" svg:height="0.1cm" svg:x="8.235cm" svg:y="11.603cm" svg:viewBox="0 0 72 101" draw:points="64,94 50,101 21,101 7,94 0,80 0,23 7,7 21,0 50,0 64,7 72,23 72,37 0,51">
          <text:p/>
        </draw:polyline>
        <draw:line draw:style-name="gr3" draw:text-style-name="P1" draw:layer="layout" svg:x1="8.37cm" svg:y1="11.703cm" svg:x2="8.37cm" svg:y2="11.603cm">
          <text:p/>
        </draw:line>
        <draw:polyline draw:style-name="gr3" draw:text-style-name="P1" draw:layer="layout" svg:width="0.043cm" svg:height="0.029cm" svg:x="8.37cm" svg:y="11.603cm" svg:viewBox="0 0 44 30" draw:points="0,30 9,16 16,7 30,0 44,0">
          <text:p/>
        </draw:polyline>
        <draw:polyline draw:style-name="gr3" draw:text-style-name="P1" draw:layer="layout" svg:width="0.064cm" svg:height="0.1cm" svg:x="8.463cm" svg:y="11.603cm" svg:viewBox="0 0 65 101" draw:points="65,101 65,23 59,7 44,0 16,0 0,7">
          <text:p/>
        </draw:polyline>
        <draw:polyline draw:style-name="gr3" draw:text-style-name="P1" draw:layer="layout" svg:width="0.071cm" svg:height="0.064cm" svg:x="8.456cm" svg:y="11.639cm" svg:viewBox="0 0 72 65" draw:points="72,58 57,65 22,65 7,58 0,44 0,28 7,14 22,7 57,7 72,0">
          <text:p/>
        </draw:polyline>
        <draw:line draw:style-name="gr3" draw:text-style-name="P1" draw:layer="layout" svg:x1="8.599cm" svg:y1="11.603cm" svg:x2="8.599cm" svg:y2="11.703cm">
          <text:p/>
        </draw:line>
        <draw:polyline draw:style-name="gr3" draw:text-style-name="P1" draw:layer="layout" svg:width="0.064cm" svg:height="0.1cm" svg:x="8.599cm" svg:y="11.603cm" svg:viewBox="0 0 65 101" draw:points="0,15 8,7 23,0 44,0 58,7 65,23 65,101">
          <text:p/>
        </draw:polyline>
        <draw:line draw:style-name="gr3" draw:text-style-name="P1" draw:layer="layout" svg:x1="8.799cm" svg:y1="11.703cm" svg:x2="8.799cm" svg:y2="11.553cm">
          <text:p/>
        </draw:line>
        <draw:polyline draw:style-name="gr3" draw:text-style-name="P1" draw:layer="layout" svg:width="0.072cm" svg:height="0.1cm" svg:x="8.727cm" svg:y="11.603cm" svg:viewBox="0 0 73 101" draw:points="73,94 58,101 29,101 15,94 8,87 0,73 0,30 8,15 15,7 29,0 58,0 73,7">
          <text:p/>
        </draw:polyline>
        <draw:line draw:style-name="gr3" draw:text-style-name="P1" draw:layer="layout" svg:x1="8.87cm" svg:y1="11.703cm" svg:x2="8.87cm" svg:y2="11.553cm">
          <text:p/>
        </draw:line>
        <draw:polyline draw:style-name="gr3" draw:text-style-name="P1" draw:layer="layout" svg:width="0.065cm" svg:height="0.1cm" svg:x="8.87cm" svg:y="11.603cm" svg:viewBox="0 0 66 101" draw:points="66,101 66,23 59,7 43,0 22,0 8,7 0,15">
          <text:p/>
        </draw:polyline>
        <draw:polyline draw:style-name="gr3" draw:text-style-name="P1" draw:layer="layout" svg:width="0.064cm" svg:height="0.1cm" svg:x="9.006cm" svg:y="11.603cm" svg:viewBox="0 0 65 101" draw:points="65,101 65,23 59,7 43,0 15,0 0,7">
          <text:p/>
        </draw:polyline>
        <draw:polyline draw:style-name="gr3" draw:text-style-name="P1" draw:layer="layout" svg:width="0.071cm" svg:height="0.064cm" svg:x="8.999cm" svg:y="11.639cm" svg:viewBox="0 0 72 65" draw:points="72,58 58,65 23,65 7,58 0,44 0,28 7,14 23,7 58,7 72,0">
          <text:p/>
        </draw:polyline>
        <draw:line draw:style-name="gr3" draw:text-style-name="P1" draw:layer="layout" svg:x1="9.242cm" svg:y1="11.704cm" svg:x2="9.322cm" svg:y2="11.603cm">
          <text:p/>
        </draw:line>
        <draw:line draw:style-name="gr3" draw:text-style-name="P1" draw:layer="layout" svg:x1="9.242cm" svg:y1="11.603cm" svg:x2="9.322cm" svg:y2="11.704cm">
          <text:p/>
        </draw:line>
        <draw:polyline draw:style-name="gr3" draw:text-style-name="P1" draw:layer="layout" svg:width="0.086cm" svg:height="0.15cm" svg:x="9.37cm" svg:y="11.553cm" svg:viewBox="0 0 87 151" draw:points="15,151 44,151 59,144 66,137 80,115 87,87 87,29 80,14 73,8 59,0 29,0 15,8 8,14 0,29 0,66 8,80 15,87 29,94 59,94 73,87 80,80 87,66">
          <text:p/>
        </draw:polyline>
        <draw:line draw:style-name="gr3" draw:text-style-name="P1" draw:layer="layout" svg:x1="3.509cm" svg:y1="16.67cm" svg:x2="3.623cm" svg:y2="16.67cm">
          <text:p/>
        </draw:line>
        <draw:line draw:style-name="gr3" draw:text-style-name="P1" draw:layer="layout" svg:x1="3.623cm" svg:y1="16.713cm" svg:x2="3.509cm" svg:y2="16.713cm">
          <text:p/>
        </draw:line>
        <draw:polyline draw:style-name="gr3" draw:text-style-name="P1" draw:layer="layout" svg:width="0.128cm" svg:height="0.15cm" svg:x="3.795cm" svg:y="16.599cm" svg:viewBox="0 0 129 151" draw:points="0,0 35,151 64,43 92,151 129,0">
          <text:p/>
        </draw:polyline>
        <draw:line draw:style-name="gr3" draw:text-style-name="P1" draw:layer="layout" svg:x1="3.98cm" svg:y1="16.749cm" svg:x2="3.98cm" svg:y2="16.649cm">
          <text:p/>
        </draw:line>
        <draw:polyline draw:style-name="gr3" draw:text-style-name="P1" draw:layer="layout" svg:width="0.014cm" svg:height="0.014cm" svg:x="3.973cm" svg:y="16.599cm" svg:viewBox="0 0 15 15" draw:points="8,0 0,8 8,15 15,8 8,0 8,15">
          <text:p/>
        </draw:polyline>
        <draw:line draw:style-name="gr3" draw:text-style-name="P1" draw:layer="layout" svg:x1="4.052cm" svg:y1="16.649cm" svg:x2="4.052cm" svg:y2="16.749cm">
          <text:p/>
        </draw:line>
        <draw:polyline draw:style-name="gr3" draw:text-style-name="P1" draw:layer="layout" svg:width="0.064cm" svg:height="0.1cm" svg:x="4.052cm" svg:y="16.649cm" svg:viewBox="0 0 65 101" draw:points="0,15 7,7 22,0 44,0 58,7 65,21 65,101">
          <text:p/>
        </draw:polyline>
        <draw:line draw:style-name="gr3" draw:text-style-name="P1" draw:layer="layout" svg:x1="4.252cm" svg:y1="16.749cm" svg:x2="4.252cm" svg:y2="16.599cm">
          <text:p/>
        </draw:line>
        <draw:polyline draw:style-name="gr3" draw:text-style-name="P1" draw:layer="layout" svg:width="0.072cm" svg:height="0.1cm" svg:x="4.18cm" svg:y="16.649cm" svg:viewBox="0 0 73 101" draw:points="73,94 58,101 29,101 15,94 7,87 0,73 0,30 7,15 15,7 29,0 58,0 73,7">
          <text:p/>
        </draw:polyline>
        <draw:polygon draw:style-name="gr3" draw:text-style-name="P1" draw:layer="layout" svg:width="0.079cm" svg:height="0.1cm" svg:x="4.316cm" svg:y="16.649cm" svg:viewBox="0 0 80 101" draw:points="29,101 14,94 7,87 0,73 0,30 7,15 14,7 29,0 50,0 66,7 72,15 80,30 80,73 72,87 66,94 50,101">
          <text:p/>
        </draw:polygon>
        <draw:polyline draw:style-name="gr3" draw:text-style-name="P1" draw:layer="layout" svg:width="0.114cm" svg:height="0.1cm" svg:x="4.445cm" svg:y="16.649cm" svg:viewBox="0 0 115 101" draw:points="0,0 28,101 58,30 86,101 115,0">
          <text:p/>
        </draw:polyline>
        <draw:polyline draw:style-name="gr3" draw:text-style-name="P1" draw:layer="layout" svg:width="0.093cm" svg:height="0.149cm" svg:x="7.685cm" svg:y="12.962cm" svg:viewBox="0 0 94 150" draw:points="94,136 86,144 65,150 50,150 28,144 14,129 7,115 0,86 0,65 7,35 14,21 28,7 50,0 65,0 86,7 94,14">
          <text:p/>
        </draw:polyline>
        <draw:polyline draw:style-name="gr3" draw:text-style-name="P1" draw:layer="layout" svg:width="0.021cm" svg:height="0.149cm" svg:x="7.842cm" svg:y="12.962cm" svg:viewBox="0 0 22 150" draw:points="22,150 7,144 0,129 0,0">
          <text:p/>
        </draw:polyline>
        <draw:polyline draw:style-name="gr3" draw:text-style-name="P1" draw:layer="layout" svg:width="0.065cm" svg:height="0.1cm" svg:x="7.92cm" svg:y="13.011cm" svg:viewBox="0 0 66 101" draw:points="66,101 66,23 59,8 44,0 15,0 0,8">
          <text:p/>
        </draw:polyline>
        <draw:polyline draw:style-name="gr3" draw:text-style-name="P1" draw:layer="layout" svg:width="0.072cm" svg:height="0.064cm" svg:x="7.913cm" svg:y="13.047cm" svg:viewBox="0 0 73 65" draw:points="73,59 58,65 22,65 7,59 0,44 0,29 7,15 22,7 58,7 73,0">
          <text:p/>
        </draw:polyline>
        <draw:polyline draw:style-name="gr3" draw:text-style-name="P1" draw:layer="layout" svg:width="0.064cm" svg:height="0.1cm" svg:x="8.049cm" svg:y="13.011cm" svg:viewBox="0 0 65 101" draw:points="0,95 14,101 44,101 58,95 65,80 65,73 58,59 44,52 21,52 7,44 0,30 0,23 7,8 21,0 44,0 58,8">
          <text:p/>
        </draw:polyline>
        <draw:polyline draw:style-name="gr3" draw:text-style-name="P1" draw:layer="layout" svg:width="0.065cm" svg:height="0.1cm" svg:x="8.17cm" svg:y="13.011cm" svg:viewBox="0 0 66 101" draw:points="0,95 14,101 43,101 58,95 66,80 66,73 58,59 43,52 22,52 8,44 0,30 0,23 8,8 22,0 43,0 58,8">
          <text:p/>
        </draw:polyline>
        <draw:line draw:style-name="gr3" draw:text-style-name="P1" draw:layer="layout" svg:x1="8.5cm" svg:y1="13.112cm" svg:x2="8.449cm" svg:y2="13.04cm">
          <text:p/>
        </draw:line>
        <draw:polyline draw:style-name="gr3" draw:text-style-name="P1" draw:layer="layout" svg:width="0.086cm" svg:height="0.149cm" svg:x="8.413cm" svg:y="12.962cm" svg:viewBox="0 0 87 150" draw:points="0,150 0,0 57,0 73,7 80,14 87,28 87,50 80,65 73,72 57,79 0,79">
          <text:p/>
        </draw:polyline>
        <draw:polygon draw:style-name="gr3" draw:text-style-name="P1" draw:layer="layout" svg:width="0.079cm" svg:height="0.1cm" svg:x="8.556cm" svg:y="13.011cm" svg:viewBox="0 0 80 101" draw:points="30,101 15,95 7,87 0,73 0,30 7,16 15,8 30,0 51,0 66,8 73,16 80,30 80,73 73,87 66,95 51,101">
          <text:p/>
        </draw:polygon>
        <draw:polygon draw:style-name="gr3" draw:text-style-name="P1" draw:layer="layout" svg:width="0.078cm" svg:height="0.1cm" svg:x="8.692cm" svg:y="13.011cm" svg:viewBox="0 0 79 101" draw:points="29,101 14,95 7,87 0,73 0,30 7,16 14,8 29,0 51,0 65,8 72,16 79,30 79,73 72,87 65,95 51,101">
          <text:p/>
        </draw:polygon>
        <draw:line draw:style-name="gr3" draw:text-style-name="P1" draw:layer="layout" svg:x1="8.835cm" svg:y1="13.111cm" svg:x2="8.835cm" svg:y2="13.011cm">
          <text:p/>
        </draw:line>
        <draw:polyline draw:style-name="gr3" draw:text-style-name="P1" draw:layer="layout" svg:width="0.064cm" svg:height="0.1cm" svg:x="8.835cm" svg:y="13.011cm" svg:viewBox="0 0 65 101" draw:points="0,16 7,8 21,0 43,0 58,8 65,23 65,101">
          <text:p/>
        </draw:polyline>
        <draw:polyline draw:style-name="gr3" draw:text-style-name="P1" draw:layer="layout" svg:width="0.064cm" svg:height="0.1cm" svg:x="8.899cm" svg:y="13.011cm" svg:viewBox="0 0 65 101" draw:points="0,23 7,8 22,0 44,0 58,8 65,23 65,101">
          <text:p/>
        </draw:polyline>
        <draw:line draw:style-name="gr3" draw:text-style-name="P1" draw:layer="layout" svg:x1="7.77cm" svg:y1="13.353cm" svg:x2="7.685cm" svg:y2="13.353cm">
          <text:p/>
        </draw:line>
        <draw:polyline draw:style-name="gr3" draw:text-style-name="P1" draw:layer="layout" svg:width="0.042cm" svg:height="0.15cm" svg:x="7.685cm" svg:y="13.203cm" svg:viewBox="0 0 43 151" draw:points="43,151 43,0 29,22 14,36 0,43">
          <text:p/>
        </draw:polyline>
        <draw:polyline draw:style-name="gr3" draw:text-style-name="P1" draw:layer="layout" svg:width="0.086cm" svg:height="0.15cm" svg:x="7.827cm" svg:y="13.203cm" svg:viewBox="0 0 87 151" draw:points="73,0 43,0 29,7 22,14 8,36 0,66 0,123 8,137 15,144 29,151 58,151 73,144 80,137 87,123 87,87 80,72 73,66 58,58 29,58 15,66 8,72 0,87">
          <text:p/>
        </draw:polyline>
        <draw:line draw:style-name="gr3" draw:text-style-name="P1" draw:layer="layout" svg:x1="7.963cm" svg:y1="13.354cm" svg:x2="8.043cm" svg:y2="13.253cm">
          <text:p/>
        </draw:line>
        <draw:line draw:style-name="gr3" draw:text-style-name="P1" draw:layer="layout" svg:x1="7.963cm" svg:y1="13.253cm" svg:x2="8.043cm" svg:y2="13.354cm">
          <text:p/>
        </draw:line>
        <draw:polyline draw:style-name="gr3" draw:text-style-name="P1" draw:layer="layout" svg:width="0.093cm" svg:height="0.15cm" svg:x="8.085cm" svg:y="13.203cm" svg:viewBox="0 0 94 151" draw:points="7,14 14,7 28,0 65,0 79,7 86,14 94,29 94,43 86,66 0,151 94,151">
          <text:p/>
        </draw:polyline>
        <draw:polygon draw:style-name="gr3" draw:text-style-name="P1" draw:layer="layout" svg:width="0.085cm" svg:height="0.15cm" svg:x="8.235cm" svg:y="13.203cm" svg:viewBox="0 0 86 151" draw:points="35,0 50,0 64,7 72,14 79,29 86,58 86,94 79,123 72,137 64,144 50,151 35,151 21,144 14,137 7,123 0,94 0,58 7,29 14,14 21,7">
          <text:p/>
        </draw:polygon>
        <draw:polyline draw:style-name="gr3" draw:text-style-name="P1" draw:layer="layout" svg:width="0.094cm" svg:height="0.151cm" svg:x="5.334cm" svg:y="13.011cm" svg:viewBox="0 0 95 152" draw:points="95,137 87,144 65,152 51,152 29,144 15,130 8,116 0,86 0,65 8,36 15,22 29,8 51,0 65,0 87,8 95,15">
          <text:p/>
        </draw:polyline>
        <draw:polyline draw:style-name="gr3" draw:text-style-name="P1" draw:layer="layout" svg:width="0.021cm" svg:height="0.151cm" svg:x="5.492cm" svg:y="13.011cm" svg:viewBox="0 0 22 152" draw:points="22,152 7,144 0,130 0,0">
          <text:p/>
        </draw:polyline>
        <draw:polyline draw:style-name="gr3" draw:text-style-name="P1" draw:layer="layout" svg:width="0.064cm" svg:height="0.1cm" svg:x="5.57cm" svg:y="13.062cm" svg:viewBox="0 0 65 101" draw:points="65,101 65,21 59,7 44,0 15,0 0,7">
          <text:p/>
        </draw:polyline>
        <draw:polyline draw:style-name="gr3" draw:text-style-name="P1" draw:layer="layout" svg:width="0.071cm" svg:height="0.065cm" svg:x="5.563cm" svg:y="13.097cm" svg:viewBox="0 0 72 66" draw:points="72,58 58,66 22,66 7,58 0,43 0,29 7,14 22,8 58,8 72,0">
          <text:p/>
        </draw:polyline>
        <draw:polyline draw:style-name="gr3" draw:text-style-name="P1" draw:layer="layout" svg:width="0.064cm" svg:height="0.1cm" svg:x="5.699cm" svg:y="13.062cm" svg:viewBox="0 0 65 101" draw:points="0,93 14,101 44,101 58,93 65,79 65,72 58,57 44,49 21,49 7,43 0,28 0,21 7,7 21,0 44,0 58,7">
          <text:p/>
        </draw:polyline>
        <draw:polyline draw:style-name="gr3" draw:text-style-name="P1" draw:layer="layout" svg:width="0.065cm" svg:height="0.1cm" svg:x="5.82cm" svg:y="13.062cm" svg:viewBox="0 0 66 101" draw:points="0,93 14,101 44,101 58,93 66,79 66,72 58,57 44,49 22,49 8,43 0,28 0,21 8,7 22,0 44,0 58,7">
          <text:p/>
        </draw:polyline>
        <draw:line draw:style-name="gr3" draw:text-style-name="P1" draw:layer="layout" svg:x1="6.15cm" svg:y1="13.163cm" svg:x2="6.099cm" svg:y2="13.09cm">
          <text:p/>
        </draw:line>
        <draw:polyline draw:style-name="gr3" draw:text-style-name="P1" draw:layer="layout" svg:width="0.086cm" svg:height="0.151cm" svg:x="6.063cm" svg:y="13.011cm" svg:viewBox="0 0 87 152" draw:points="0,152 0,0 58,0 72,8 80,15 87,29 87,51 80,65 72,72 58,79 0,79">
          <text:p/>
        </draw:polyline>
        <draw:polygon draw:style-name="gr3" draw:text-style-name="P1" draw:layer="layout" svg:width="0.079cm" svg:height="0.1cm" svg:x="6.206cm" svg:y="13.062cm" svg:viewBox="0 0 80 101" draw:points="30,101 14,93 7,86 0,72 0,28 7,14 14,7 30,0 51,0 66,7 72,14 80,28 80,72 72,86 66,93 51,101">
          <text:p/>
        </draw:polygon>
        <draw:polygon draw:style-name="gr3" draw:text-style-name="P1" draw:layer="layout" svg:width="0.078cm" svg:height="0.1cm" svg:x="6.342cm" svg:y="13.062cm" svg:viewBox="0 0 79 101" draw:points="29,101 14,93 7,86 0,72 0,28 7,14 14,7 29,0 51,0 65,7 72,14 79,28 79,72 72,86 65,93 51,101">
          <text:p/>
        </draw:polygon>
        <draw:line draw:style-name="gr3" draw:text-style-name="P1" draw:layer="layout" svg:x1="6.485cm" svg:y1="13.162cm" svg:x2="6.485cm" svg:y2="13.062cm">
          <text:p/>
        </draw:line>
        <draw:polyline draw:style-name="gr3" draw:text-style-name="P1" draw:layer="layout" svg:width="0.064cm" svg:height="0.1cm" svg:x="6.485cm" svg:y="13.062cm" svg:viewBox="0 0 65 101" draw:points="0,14 8,7 22,0 44,0 58,7 65,21 65,101">
          <text:p/>
        </draw:polyline>
        <draw:polyline draw:style-name="gr3" draw:text-style-name="P1" draw:layer="layout" svg:width="0.064cm" svg:height="0.1cm" svg:x="6.549cm" svg:y="13.062cm" svg:viewBox="0 0 65 101" draw:points="0,21 8,7 23,0 44,0 58,7 65,21 65,101">
          <text:p/>
        </draw:polyline>
        <draw:line draw:style-name="gr3" draw:text-style-name="P1" draw:layer="layout" svg:x1="5.42cm" svg:y1="13.403cm" svg:x2="5.334cm" svg:y2="13.403cm">
          <text:p/>
        </draw:line>
        <draw:polyline draw:style-name="gr3" draw:text-style-name="P1" draw:layer="layout" svg:width="0.043cm" svg:height="0.15cm" svg:x="5.334cm" svg:y="13.253cm" svg:viewBox="0 0 44 151" draw:points="44,151 44,0 30,21 16,36 0,43">
          <text:p/>
        </draw:polyline>
        <draw:polyline draw:style-name="gr3" draw:text-style-name="P1" draw:layer="layout" svg:width="0.086cm" svg:height="0.15cm" svg:x="5.477cm" svg:y="13.253cm" svg:viewBox="0 0 87 151" draw:points="73,0 44,0 30,7 23,15 8,36 0,65 0,123 8,137 15,144 30,151 59,151 73,144 80,137 87,123 87,87 80,73 73,65 59,58 30,58 15,65 8,73 0,87">
          <text:p/>
        </draw:polyline>
        <draw:line draw:style-name="gr3" draw:text-style-name="P1" draw:layer="layout" svg:x1="5.613cm" svg:y1="13.404cm" svg:x2="5.693cm" svg:y2="13.303cm">
          <text:p/>
        </draw:line>
        <draw:line draw:style-name="gr3" draw:text-style-name="P1" draw:layer="layout" svg:x1="5.613cm" svg:y1="13.303cm" svg:x2="5.693cm" svg:y2="13.404cm">
          <text:p/>
        </draw:line>
        <draw:polyline draw:style-name="gr3" draw:text-style-name="P1" draw:layer="layout" svg:width="0.094cm" svg:height="0.15cm" svg:x="5.734cm" svg:y="13.253cm" svg:viewBox="0 0 95 151" draw:points="8,15 15,7 29,0 66,0 80,7 87,15 95,29 95,43 87,65 0,151 95,151">
          <text:p/>
        </draw:polyline>
        <draw:polygon draw:style-name="gr3" draw:text-style-name="P1" draw:layer="layout" svg:width="0.086cm" svg:height="0.15cm" svg:x="5.885cm" svg:y="13.253cm" svg:viewBox="0 0 87 151" draw:points="35,0 51,0 65,7 72,15 79,29 87,58 87,94 79,123 72,137 65,144 51,151 35,151 21,144 14,137 7,123 0,94 0,58 7,29 14,15 21,7">
          <text:p/>
        </draw:polygon>
        <draw:line draw:style-name="gr2" draw:text-style-name="P1" draw:layer="layout" svg:x1="4.281cm" svg:y1="2.089cm" svg:x2="4.377cm" svg:y2="1.988cm">
          <text:p/>
        </draw:line>
        <draw:line draw:style-name="gr3" draw:text-style-name="P1" draw:layer="layout" svg:x1="7.92cm" svg:y1="7.753cm" svg:x2="8.006cm" svg:y2="7.753cm">
          <text:p/>
        </draw:line>
        <draw:line draw:style-name="gr3" draw:text-style-name="P1" draw:layer="layout" svg:x1="7.963cm" svg:y1="7.903cm" svg:x2="7.963cm" svg:y2="7.753cm">
          <text:p/>
        </draw:line>
        <draw:line draw:style-name="gr3" draw:text-style-name="P1" draw:layer="layout" svg:x1="8.056cm" svg:y1="7.903cm" svg:x2="8.056cm" svg:y2="7.803cm">
          <text:p/>
        </draw:line>
        <draw:polyline draw:style-name="gr3" draw:text-style-name="P1" draw:layer="layout" svg:width="0.014cm" svg:height="0.014cm" svg:x="8.049cm" svg:y="7.753cm" svg:viewBox="0 0 15 15" draw:points="8,0 0,9 8,15 15,9 8,0 8,15">
          <text:p/>
        </draw:polyline>
        <draw:line draw:style-name="gr3" draw:text-style-name="P1" draw:layer="layout" svg:x1="8.127cm" svg:y1="7.803cm" svg:x2="8.127cm" svg:y2="7.903cm">
          <text:p/>
        </draw:line>
        <draw:polyline draw:style-name="gr3" draw:text-style-name="P1" draw:layer="layout" svg:width="0.065cm" svg:height="0.1cm" svg:x="8.127cm" svg:y="7.803cm" svg:viewBox="0 0 66 101" draw:points="0,15 8,7 22,0 44,0 58,7 66,22 66,101">
          <text:p/>
        </draw:polyline>
        <draw:polyline draw:style-name="gr3" draw:text-style-name="P1" draw:layer="layout" svg:width="0.086cm" svg:height="0.15cm" svg:x="8.37cm" svg:y="7.753cm" svg:viewBox="0 0 87 151" draw:points="0,144 23,151 58,151 73,144 80,137 87,123 87,109 80,94 73,87 58,80 30,73 15,66 8,58 0,44 0,29 8,14 15,8 30,0 66,0 87,8">
          <text:p/>
        </draw:polyline>
        <draw:line draw:style-name="gr3" draw:text-style-name="P1" draw:layer="layout" svg:x1="8.521cm" svg:y1="7.903cm" svg:x2="8.521cm" svg:y2="7.753cm">
          <text:p/>
        </draw:line>
        <draw:polyline draw:style-name="gr3" draw:text-style-name="P1" draw:layer="layout" svg:width="0.064cm" svg:height="0.1cm" svg:x="8.521cm" svg:y="7.803cm" svg:viewBox="0 0 65 101" draw:points="65,101 65,22 58,7 42,0 21,0 6,7 0,15">
          <text:p/>
        </draw:polyline>
        <draw:polyline draw:style-name="gr3" draw:text-style-name="P1" draw:layer="layout" svg:width="0.065cm" svg:height="0.1cm" svg:x="8.656cm" svg:y="7.803cm" svg:viewBox="0 0 66 101" draw:points="66,101 66,22 58,7 44,0 15,0 0,7">
          <text:p/>
        </draw:polyline>
        <draw:polyline draw:style-name="gr3" draw:text-style-name="P1" draw:layer="layout" svg:width="0.072cm" svg:height="0.064cm" svg:x="8.649cm" svg:y="7.839cm" svg:viewBox="0 0 73 65" draw:points="73,58 58,65 22,65 8,58 0,43 0,28 8,14 22,7 58,7 73,0">
          <text:p/>
        </draw:polyline>
        <draw:line draw:style-name="gr3" draw:text-style-name="P1" draw:layer="layout" svg:x1="8.856cm" svg:y1="7.903cm" svg:x2="8.856cm" svg:y2="7.753cm">
          <text:p/>
        </draw:line>
        <draw:polyline draw:style-name="gr3" draw:text-style-name="P1" draw:layer="layout" svg:width="0.071cm" svg:height="0.1cm" svg:x="8.785cm" svg:y="7.803cm" svg:viewBox="0 0 72 101" draw:points="72,94 58,101 29,101 15,94 7,87 0,73 0,29 7,15 15,7 29,0 58,0 72,7">
          <text:p/>
        </draw:polyline>
        <draw:polyline draw:style-name="gr3" draw:text-style-name="P1" draw:layer="layout" svg:width="0.071cm" svg:height="0.1cm" svg:x="8.921cm" svg:y="7.803cm" svg:viewBox="0 0 72 101" draw:points="65,94 50,101 22,101 7,94 0,80 0,22 7,7 22,0 50,0 65,7 72,22 72,37 0,51">
          <text:p/>
        </draw:polyline>
        <draw:line draw:style-name="gr3" draw:text-style-name="P1" draw:layer="layout" svg:x1="9.163cm" svg:y1="7.861cm" svg:x2="9.235cm" svg:y2="7.861cm">
          <text:p/>
        </draw:line>
        <draw:polyline draw:style-name="gr3" draw:text-style-name="P1" draw:layer="layout" svg:width="0.1cm" svg:height="0.15cm" svg:x="9.149cm" svg:y="7.753cm" svg:viewBox="0 0 101 151" draw:points="0,151 50,0 101,151">
          <text:p/>
        </draw:polyline>
        <draw:line draw:style-name="gr3" draw:text-style-name="P1" draw:layer="layout" svg:x1="9.299cm" svg:y1="7.903cm" svg:x2="9.299cm" svg:y2="7.803cm">
          <text:p/>
        </draw:line>
        <draw:polyline draw:style-name="gr3" draw:text-style-name="P1" draw:layer="layout" svg:width="0.043cm" svg:height="0.029cm" svg:x="9.299cm" svg:y="7.803cm" svg:viewBox="0 0 44 30" draw:points="0,30 7,16 14,8 29,0 44,0">
          <text:p/>
        </draw:polyline>
        <draw:polyline draw:style-name="gr3" draw:text-style-name="P1" draw:layer="layout" svg:width="0.071cm" svg:height="0.1cm" svg:x="9.385cm" svg:y="7.803cm" svg:viewBox="0 0 72 101" draw:points="65,94 50,101 21,101 7,94 0,80 0,22 7,7 21,0 50,0 65,7 72,22 72,37 0,51">
          <text:p/>
        </draw:polyline>
        <draw:polyline draw:style-name="gr3" draw:text-style-name="P1" draw:layer="layout" svg:width="0.065cm" svg:height="0.1cm" svg:x="9.52cm" svg:y="7.803cm" svg:viewBox="0 0 66 101" draw:points="66,101 66,22 58,7 44,0 14,0 0,7">
          <text:p/>
        </draw:polyline>
        <draw:polyline draw:style-name="gr3" draw:text-style-name="P1" draw:layer="layout" svg:width="0.072cm" svg:height="0.064cm" svg:x="9.513cm" svg:y="7.839cm" svg:viewBox="0 0 73 65" draw:points="73,58 57,65 21,65 7,58 0,43 0,28 7,14 21,7 57,7 73,0">
          <text:p/>
        </draw:polyline>
        <draw:polyline draw:style-name="gr3" draw:text-style-name="P1" draw:layer="layout" svg:width="0.092cm" svg:height="0.15cm" svg:x="5.985cm" svg:y="1.712cm" svg:viewBox="0 0 93 151" draw:points="93,136 87,144 65,151 50,151 28,144 14,128 7,114 0,85 0,64 7,36 14,21 28,7 50,0 65,0 87,7 93,14">
          <text:p/>
        </draw:polyline>
        <draw:polyline draw:style-name="gr3" draw:text-style-name="P1" draw:layer="layout" svg:width="0.021cm" svg:height="0.15cm" svg:x="6.142cm" svg:y="1.712cm" svg:viewBox="0 0 22 151" draw:points="22,151 7,144 0,128 0,0">
          <text:p/>
        </draw:polyline>
        <draw:polyline draw:style-name="gr3" draw:text-style-name="P1" draw:layer="layout" svg:width="0.065cm" svg:height="0.1cm" svg:x="6.22cm" svg:y="1.762cm" svg:viewBox="0 0 66 101" draw:points="66,101 66,21 58,7 44,0 16,0 0,7">
          <text:p/>
        </draw:polyline>
        <draw:polyline draw:style-name="gr3" draw:text-style-name="P1" draw:layer="layout" svg:width="0.072cm" svg:height="0.065cm" svg:x="6.213cm" svg:y="1.797cm" svg:viewBox="0 0 73 66" draw:points="73,59 59,66 22,66 7,59 0,44 0,30 7,15 22,8 59,8 73,0">
          <text:p/>
        </draw:polyline>
        <draw:polyline draw:style-name="gr3" draw:text-style-name="P1" draw:layer="layout" svg:width="0.064cm" svg:height="0.1cm" svg:x="6.349cm" svg:y="1.762cm" svg:viewBox="0 0 65 101" draw:points="0,94 15,101 44,101 58,94 65,79 65,72 58,58 44,51 23,51 7,44 0,28 0,21 7,7 23,0 44,0 58,7">
          <text:p/>
        </draw:polyline>
        <draw:polyline draw:style-name="gr3" draw:text-style-name="P1" draw:layer="layout" svg:width="0.064cm" svg:height="0.1cm" svg:x="6.471cm" svg:y="1.762cm" svg:viewBox="0 0 65 101" draw:points="0,94 14,101 43,101 58,94 65,79 65,72 58,58 43,51 21,51 7,44 0,28 0,21 7,7 21,0 43,0 58,7">
          <text:p/>
        </draw:polyline>
        <draw:line draw:style-name="gr3" draw:text-style-name="P1" draw:layer="layout" svg:x1="6.8cm" svg:y1="1.863cm" svg:x2="6.749cm" svg:y2="1.79cm">
          <text:p/>
        </draw:line>
        <draw:polyline draw:style-name="gr3" draw:text-style-name="P1" draw:layer="layout" svg:width="0.086cm" svg:height="0.15cm" svg:x="6.713cm" svg:y="1.712cm" svg:viewBox="0 0 87 151" draw:points="0,151 0,0 58,0 73,7 80,14 87,28 87,50 80,64 73,71 58,78 0,78">
          <text:p/>
        </draw:polyline>
        <draw:polygon draw:style-name="gr3" draw:text-style-name="P1" draw:layer="layout" svg:width="0.079cm" svg:height="0.1cm" svg:x="6.856cm" svg:y="1.762cm" svg:viewBox="0 0 80 101" draw:points="29,101 15,94 7,87 0,72 0,28 7,14 15,7 29,0 50,0 64,7 72,14 80,28 80,72 72,87 64,94 50,101">
          <text:p/>
        </draw:polygon>
        <draw:polygon draw:style-name="gr3" draw:text-style-name="P1" draw:layer="layout" svg:width="0.079cm" svg:height="0.1cm" svg:x="6.992cm" svg:y="1.762cm" svg:viewBox="0 0 80 101" draw:points="29,101 14,94 7,87 0,72 0,28 7,14 14,7 29,0 51,0 65,7 72,14 80,28 80,72 72,87 65,94 51,101">
          <text:p/>
        </draw:polygon>
        <draw:line draw:style-name="gr3" draw:text-style-name="P1" draw:layer="layout" svg:x1="7.135cm" svg:y1="1.862cm" svg:x2="7.135cm" svg:y2="1.762cm">
          <text:p/>
        </draw:line>
        <draw:polyline draw:style-name="gr3" draw:text-style-name="P1" draw:layer="layout" svg:width="0.064cm" svg:height="0.1cm" svg:x="7.135cm" svg:y="1.762cm" svg:viewBox="0 0 65 101" draw:points="0,14 7,7 21,0 43,0 57,7 65,21 65,101">
          <text:p/>
        </draw:polyline>
        <draw:polyline draw:style-name="gr3" draw:text-style-name="P1" draw:layer="layout" svg:width="0.064cm" svg:height="0.1cm" svg:x="7.199cm" svg:y="1.762cm" svg:viewBox="0 0 65 101" draw:points="0,21 7,7 21,0 43,0 57,7 65,21 65,101">
          <text:p/>
        </draw:polyline>
        <draw:polyline draw:style-name="gr3" draw:text-style-name="P1" draw:layer="layout" svg:width="0.094cm" svg:height="0.15cm" svg:x="5.977cm" svg:y="1.953cm" svg:viewBox="0 0 95 151" draw:points="8,14 15,7 29,0 65,0 79,7 86,14 95,28 95,43 86,65 0,151 95,151">
          <text:p/>
        </draw:polyline>
        <draw:polygon draw:style-name="gr3" draw:text-style-name="P1" draw:layer="layout" svg:width="0.085cm" svg:height="0.15cm" svg:x="6.128cm" svg:y="1.953cm" svg:viewBox="0 0 86 151" draw:points="35,0 49,0 65,7 72,14 79,28 86,58 86,94 79,123 72,137 65,144 49,151 35,151 21,144 14,137 6,123 0,94 0,58 6,28 14,14 21,7">
          <text:p/>
        </draw:polygon>
        <draw:line draw:style-name="gr3" draw:text-style-name="P1" draw:layer="layout" svg:x1="6.263cm" svg:y1="2.104cm" svg:x2="6.343cm" svg:y2="2.003cm">
          <text:p/>
        </draw:line>
        <draw:line draw:style-name="gr3" draw:text-style-name="P1" draw:layer="layout" svg:x1="6.263cm" svg:y1="2.003cm" svg:x2="6.343cm" svg:y2="2.104cm">
          <text:p/>
        </draw:line>
        <draw:polyline draw:style-name="gr3" draw:text-style-name="P1" draw:layer="layout" svg:width="0.093cm" svg:height="0.15cm" svg:x="6.385cm" svg:y="1.953cm" svg:viewBox="0 0 94 151" draw:points="7,14 14,7 29,0 65,0 79,7 87,14 94,28 94,43 87,65 0,151 94,151">
          <text:p/>
        </draw:polyline>
        <draw:polyline draw:style-name="gr3" draw:text-style-name="P1" draw:layer="layout" svg:width="0.085cm" svg:height="0.15cm" svg:x="6.535cm" svg:y="1.953cm" svg:viewBox="0 0 86 151" draw:points="28,65 14,58 7,51 0,36 0,28 7,14 14,7 28,0 57,0 72,7 79,14 86,28 86,36 79,51 72,58 57,65 28,65 14,72 7,80 0,94 0,123 7,137 14,144 28,151 57,151 72,144 79,137 86,123 86,94 79,80 72,72 57,65">
          <text:p/>
        </draw:polyline>
        <draw:polygon draw:style-name="gr3" draw:text-style-name="P1" draw:layer="layout" svg:width="0.1cm" svg:height="0.15cm" svg:x="13.235cm" svg:y="1.662cm" svg:viewBox="0 0 101 151" draw:points="36,0 65,0 79,7 93,22 101,51 101,101 93,129 79,144 65,151 36,151 22,144 8,129 0,101 0,51 8,22 22,7">
          <text:p/>
        </draw:polygon>
        <draw:line draw:style-name="gr3" draw:text-style-name="P1" draw:layer="layout" svg:x1="13.378cm" svg:y1="1.712cm" svg:x2="13.435cm" svg:y2="1.712cm">
          <text:p/>
        </draw:line>
        <draw:polyline draw:style-name="gr3" draw:text-style-name="P1" draw:layer="layout" svg:width="0.036cm" svg:height="0.15cm" svg:x="13.399cm" svg:y="1.662cm" svg:viewBox="0 0 37 151" draw:points="0,151 0,22 7,7 23,0 37,0">
          <text:p/>
        </draw:polyline>
        <draw:line draw:style-name="gr3" draw:text-style-name="P1" draw:layer="layout" svg:x1="13.463cm" svg:y1="1.712cm" svg:x2="13.521cm" svg:y2="1.712cm">
          <text:p/>
        </draw:line>
        <draw:polyline draw:style-name="gr3" draw:text-style-name="P1" draw:layer="layout" svg:width="0.036cm" svg:height="0.15cm" svg:x="13.485cm" svg:y="1.662cm" svg:viewBox="0 0 37 151" draw:points="0,151 0,22 7,7 21,0 37,0">
          <text:p/>
        </draw:polyline>
        <draw:line draw:style-name="gr3" draw:text-style-name="P1" draw:layer="layout" svg:x1="13.57cm" svg:y1="1.812cm" svg:x2="13.57cm" svg:y2="1.712cm">
          <text:p/>
        </draw:line>
        <draw:polyline draw:style-name="gr3" draw:text-style-name="P1" draw:layer="layout" svg:width="0.014cm" svg:height="0.014cm" svg:x="13.564cm" svg:y="1.662cm" svg:viewBox="0 0 15 15" draw:points="7,0 0,8 7,15 15,8 7,0 7,15">
          <text:p/>
        </draw:polyline>
        <draw:polyline draw:style-name="gr3" draw:text-style-name="P1" draw:layer="layout" svg:width="0.072cm" svg:height="0.1cm" svg:x="13.635cm" svg:y="1.712cm" svg:viewBox="0 0 73 101" draw:points="73,94 58,101 30,101 15,94 8,86 0,72 0,29 8,15 15,7 30,0 58,0 73,7">
          <text:p/>
        </draw:polyline>
        <draw:polyline draw:style-name="gr3" draw:text-style-name="P1" draw:layer="layout" svg:width="0.071cm" svg:height="0.1cm" svg:x="13.763cm" svg:y="1.712cm" svg:viewBox="0 0 72 101" draw:points="66,94 51,101 23,101 8,94 0,79 0,22 8,7 23,0 51,0 66,7 72,22 72,37 0,51">
          <text:p/>
        </draw:polyline>
        <draw:line draw:style-name="gr3" draw:text-style-name="P1" draw:layer="layout" svg:x1="14.1cm" svg:y1="1.813cm" svg:x2="14.049cm" svg:y2="1.74cm">
          <text:p/>
        </draw:line>
        <draw:polyline draw:style-name="gr3" draw:text-style-name="P1" draw:layer="layout" svg:width="0.086cm" svg:height="0.15cm" svg:x="14.013cm" svg:y="1.662cm" svg:viewBox="0 0 87 151" draw:points="0,151 0,0 57,0 73,7 80,14 87,29 87,51 80,65 73,72 57,79 0,79">
          <text:p/>
        </draw:polyline>
        <draw:polygon draw:style-name="gr3" draw:text-style-name="P1" draw:layer="layout" svg:width="0.078cm" svg:height="0.1cm" svg:x="14.156cm" svg:y="1.712cm" svg:viewBox="0 0 79 101" draw:points="29,101 15,94 7,86 0,72 0,29 7,15 15,7 29,0 51,0 65,7 73,15 79,29 79,72 73,86 65,94 51,101">
          <text:p/>
        </draw:polygon>
        <draw:polygon draw:style-name="gr3" draw:text-style-name="P1" draw:layer="layout" svg:width="0.078cm" svg:height="0.1cm" svg:x="14.292cm" svg:y="1.712cm" svg:viewBox="0 0 79 101" draw:points="28,101 14,94 7,86 0,72 0,29 7,15 14,7 28,0 51,0 65,7 72,15 79,29 79,72 72,86 65,94 51,101">
          <text:p/>
        </draw:polygon>
        <draw:line draw:style-name="gr3" draw:text-style-name="P1" draw:layer="layout" svg:x1="14.435cm" svg:y1="1.812cm" svg:x2="14.435cm" svg:y2="1.712cm">
          <text:p/>
        </draw:line>
        <draw:polyline draw:style-name="gr3" draw:text-style-name="P1" draw:layer="layout" svg:width="0.064cm" svg:height="0.1cm" svg:x="14.435cm" svg:y="1.712cm" svg:viewBox="0 0 65 101" draw:points="0,15 7,7 21,0 42,0 58,7 65,22 65,101">
          <text:p/>
        </draw:polyline>
        <draw:polyline draw:style-name="gr3" draw:text-style-name="P1" draw:layer="layout" svg:width="0.064cm" svg:height="0.1cm" svg:x="14.499cm" svg:y="1.712cm" svg:viewBox="0 0 65 101" draw:points="0,22 7,7 21,0 43,0 58,7 65,22 65,101">
          <text:p/>
        </draw:polyline>
        <draw:polyline draw:style-name="gr3" draw:text-style-name="P1" draw:layer="layout" svg:width="0.093cm" svg:height="0.15cm" svg:x="13.228cm" svg:y="1.903cm" svg:viewBox="0 0 94 151" draw:points="8,15 15,7 29,0 65,0 79,7 86,15 94,29 94,43 86,64 0,151 94,151">
          <text:p/>
        </draw:polyline>
        <draw:polygon draw:style-name="gr3" draw:text-style-name="P1" draw:layer="layout" svg:width="0.085cm" svg:height="0.15cm" svg:x="13.378cm" svg:y="1.903cm" svg:viewBox="0 0 86 151" draw:points="36,0 51,0 65,7 72,15 79,29 86,57 86,94 79,122 72,137 65,144 51,151 36,151 21,144 14,137 7,122 0,94 0,57 7,29 14,15 21,7">
          <text:p/>
        </draw:polygon>
        <draw:line draw:style-name="gr3" draw:text-style-name="P1" draw:layer="layout" svg:x1="13.513cm" svg:y1="2.054cm" svg:x2="13.593cm" svg:y2="1.953cm">
          <text:p/>
        </draw:line>
        <draw:line draw:style-name="gr3" draw:text-style-name="P1" draw:layer="layout" svg:x1="13.513cm" svg:y1="1.953cm" svg:x2="13.593cm" svg:y2="2.054cm">
          <text:p/>
        </draw:line>
        <draw:polyline draw:style-name="gr3" draw:text-style-name="P1" draw:layer="layout" svg:width="0.093cm" svg:height="0.15cm" svg:x="13.635cm" svg:y="1.903cm" svg:viewBox="0 0 94 151" draw:points="7,15 14,7 29,0 65,0 79,7 86,15 94,29 94,43 86,64 0,151 94,151">
          <text:p/>
        </draw:polyline>
        <draw:polyline draw:style-name="gr3" draw:text-style-name="P1" draw:layer="layout" svg:width="0.085cm" svg:height="0.15cm" svg:x="13.785cm" svg:y="1.903cm" svg:viewBox="0 0 86 151" draw:points="28,64 14,57 7,50 0,36 0,29 7,15 14,7 28,0 58,0 72,7 79,15 86,29 86,36 79,50 72,57 58,64 28,64 14,72 7,79 0,94 0,122 7,137 14,144 28,151 58,151 72,144 79,137 86,122 86,94 79,79 72,72 58,64">
          <text:p/>
        </draw:polyline>
        <draw:polyline draw:style-name="gr3" draw:text-style-name="P1" draw:layer="layout" svg:width="0.129cm" svg:height="0.15cm" svg:x="9.204cm" svg:y="3.803cm" svg:viewBox="0 0 130 151" draw:points="0,0 36,151 65,43 94,151 130,0">
          <text:p/>
        </draw:polyline>
        <draw:line draw:style-name="gr3" draw:text-style-name="P1" draw:layer="layout" svg:x1="9.39cm" svg:y1="3.953cm" svg:x2="9.39cm" svg:y2="3.853cm">
          <text:p/>
        </draw:line>
        <draw:polyline draw:style-name="gr3" draw:text-style-name="P1" draw:layer="layout" svg:width="0.014cm" svg:height="0.014cm" svg:x="9.383cm" svg:y="3.803cm" svg:viewBox="0 0 15 15" draw:points="7,0 0,8 7,15 15,8 7,0 7,15">
          <text:p/>
        </draw:polyline>
        <draw:line draw:style-name="gr3" draw:text-style-name="P1" draw:layer="layout" svg:x1="9.526cm" svg:y1="3.953cm" svg:x2="9.526cm" svg:y2="3.803cm">
          <text:p/>
        </draw:line>
        <draw:polyline draw:style-name="gr3" draw:text-style-name="P1" draw:layer="layout" svg:width="0.072cm" svg:height="0.1cm" svg:x="9.454cm" svg:y="3.853cm" svg:viewBox="0 0 73 101" draw:points="73,94 59,101 29,101 15,94 7,87 0,73 0,29 7,14 15,7 29,0 59,0 73,7">
          <text:p/>
        </draw:polyline>
        <draw:polyline draw:style-name="gr3" draw:text-style-name="P1" draw:layer="layout" svg:width="0.071cm" svg:height="0.1cm" svg:x="9.59cm" svg:y="3.853cm" svg:viewBox="0 0 72 101" draw:points="66,94 50,101 22,101 7,94 0,80 0,21 7,7 22,0 50,0 66,7 72,21 72,36 0,50">
          <text:p/>
        </draw:polyline>
        <draw:polyline draw:style-name="gr3" draw:text-style-name="P1" draw:layer="layout" svg:width="0.1cm" svg:height="0.15cm" svg:x="9.819cm" svg:y="3.803cm" svg:viewBox="0 0 101 151" draw:points="0,0 51,151 101,0">
          <text:p/>
        </draw:polyline>
        <draw:polyline draw:style-name="gr3" draw:text-style-name="P1" draw:layer="layout" svg:width="0.072cm" svg:height="0.1cm" svg:x="9.961cm" svg:y="3.853cm" svg:viewBox="0 0 73 101" draw:points="66,94 52,101 22,101 8,94 0,80 0,21 8,7 22,0 52,0 66,7 73,21 73,36 0,50">
          <text:p/>
        </draw:polyline>
        <draw:line draw:style-name="gr3" draw:text-style-name="P1" draw:layer="layout" svg:x1="10.097cm" svg:y1="3.953cm" svg:x2="10.097cm" svg:y2="3.853cm">
          <text:p/>
        </draw:line>
        <draw:polyline draw:style-name="gr3" draw:text-style-name="P1" draw:layer="layout" svg:width="0.043cm" svg:height="0.029cm" svg:x="10.097cm" svg:y="3.853cm" svg:viewBox="0 0 44 30" draw:points="0,30 7,15 15,8 29,0 44,0">
          <text:p/>
        </draw:polyline>
        <draw:polyline draw:style-name="gr3" draw:text-style-name="P1" draw:layer="layout" svg:width="0.064cm" svg:height="0.1cm" svg:x="10.19cm" svg:y="3.853cm" svg:viewBox="0 0 65 101" draw:points="65,101 65,21 58,7 44,0 15,0 0,7">
          <text:p/>
        </draw:polyline>
        <draw:polyline draw:style-name="gr3" draw:text-style-name="P1" draw:layer="layout" svg:width="0.071cm" svg:height="0.064cm" svg:x="10.183cm" svg:y="3.889cm" svg:viewBox="0 0 72 65" draw:points="72,58 58,65 21,65 7,58 0,44 0,28 7,14 21,7 58,7 72,0">
          <text:p/>
        </draw:polyline>
        <draw:line draw:style-name="gr3" draw:text-style-name="P1" draw:layer="layout" svg:x1="10.326cm" svg:y1="3.853cm" svg:x2="10.326cm" svg:y2="3.953cm">
          <text:p/>
        </draw:line>
        <draw:polyline draw:style-name="gr3" draw:text-style-name="P1" draw:layer="layout" svg:width="0.064cm" svg:height="0.1cm" svg:x="10.326cm" svg:y="3.853cm" svg:viewBox="0 0 65 101" draw:points="0,14 8,7 22,0 43,0 58,7 65,21 65,101">
          <text:p/>
        </draw:polyline>
        <draw:line draw:style-name="gr3" draw:text-style-name="P1" draw:layer="layout" svg:x1="10.526cm" svg:y1="3.953cm" svg:x2="10.526cm" svg:y2="3.803cm">
          <text:p/>
        </draw:line>
        <draw:polyline draw:style-name="gr3" draw:text-style-name="P1" draw:layer="layout" svg:width="0.072cm" svg:height="0.1cm" svg:x="10.454cm" svg:y="3.853cm" svg:viewBox="0 0 73 101" draw:points="73,94 58,101 29,101 14,94 8,87 0,73 0,29 8,14 14,7 29,0 58,0 73,7">
          <text:p/>
        </draw:polyline>
        <draw:line draw:style-name="gr3" draw:text-style-name="P1" draw:layer="layout" svg:x1="10.597cm" svg:y1="3.953cm" svg:x2="10.597cm" svg:y2="3.803cm">
          <text:p/>
        </draw:line>
        <draw:polyline draw:style-name="gr3" draw:text-style-name="P1" draw:layer="layout" svg:width="0.065cm" svg:height="0.1cm" svg:x="10.597cm" svg:y="3.853cm" svg:viewBox="0 0 66 101" draw:points="66,101 66,21 58,7 43,0 22,0 7,7 0,14">
          <text:p/>
        </draw:polyline>
        <draw:polyline draw:style-name="gr3" draw:text-style-name="P1" draw:layer="layout" svg:width="0.064cm" svg:height="0.1cm" svg:x="10.733cm" svg:y="3.853cm" svg:viewBox="0 0 65 101" draw:points="65,101 65,21 58,7 43,0 14,0 0,7">
          <text:p/>
        </draw:polyline>
        <draw:polyline draw:style-name="gr3" draw:text-style-name="P1" draw:layer="layout" svg:width="0.071cm" svg:height="0.064cm" svg:x="10.726cm" svg:y="3.889cm" svg:viewBox="0 0 72 65" draw:points="72,58 57,65 21,65 7,58 0,44 0,28 7,14 21,7 57,7 72,0">
          <text:p/>
        </draw:polyline>
        <draw:line draw:style-name="gr3" draw:text-style-name="P1" draw:layer="layout" svg:x1="10.969cm" svg:y1="3.954cm" svg:x2="11.048cm" svg:y2="3.853cm">
          <text:p/>
        </draw:line>
        <draw:line draw:style-name="gr3" draw:text-style-name="P1" draw:layer="layout" svg:x1="10.969cm" svg:y1="3.853cm" svg:x2="11.048cm" svg:y2="3.954cm">
          <text:p/>
        </draw:line>
        <draw:polyline draw:style-name="gr3" draw:text-style-name="P1" draw:layer="layout" svg:width="0.086cm" svg:height="0.15cm" svg:x="11.097cm" svg:y="3.803cm" svg:viewBox="0 0 87 151" draw:points="15,151 44,151 58,143 66,136 80,114 87,86 87,28 80,14 72,7 58,0 30,0 15,7 8,14 0,28 0,64 8,79 15,86 30,93 58,93 72,86 80,79 87,64">
          <text:p/>
        </draw:polyline>
        <draw:polyline draw:style-name="gr3" draw:text-style-name="P1" draw:layer="layout" svg:width="0.093cm" svg:height="0.15cm" svg:x="9.365cm" svg:y="1.662cm" svg:viewBox="0 0 94 151" draw:points="94,136 86,144 65,151 50,151 28,144 14,129 7,115 0,87 0,65 7,36 14,22 28,7 50,0 65,0 86,7 94,14">
          <text:p/>
        </draw:polyline>
        <draw:polyline draw:style-name="gr3" draw:text-style-name="P1" draw:layer="layout" svg:width="0.021cm" svg:height="0.15cm" svg:x="9.522cm" svg:y="1.662cm" svg:viewBox="0 0 22 151" draw:points="22,151 7,144 0,129 0,0">
          <text:p/>
        </draw:polyline>
        <draw:polyline draw:style-name="gr3" draw:text-style-name="P1" draw:layer="layout" svg:width="0.064cm" svg:height="0.1cm" svg:x="9.601cm" svg:y="1.712cm" svg:viewBox="0 0 65 101" draw:points="65,101 65,22 58,7 43,0 14,0 0,7">
          <text:p/>
        </draw:polyline>
        <draw:polyline draw:style-name="gr3" draw:text-style-name="P1" draw:layer="layout" svg:width="0.072cm" svg:height="0.064cm" svg:x="9.593cm" svg:y="1.748cm" svg:viewBox="0 0 73 65" draw:points="73,58 58,65 22,65 8,58 0,43 0,29 8,15 22,8 58,8 73,0">
          <text:p/>
        </draw:polyline>
        <draw:polyline draw:style-name="gr3" draw:text-style-name="P1" draw:layer="layout" svg:width="0.064cm" svg:height="0.1cm" svg:x="9.729cm" svg:y="1.712cm" svg:viewBox="0 0 65 101" draw:points="0,94 14,101 44,101 58,94 65,79 65,72 58,58 44,51 21,51 7,44 0,29 0,22 7,7 21,0 44,0 58,7">
          <text:p/>
        </draw:polyline>
        <draw:polyline draw:style-name="gr3" draw:text-style-name="P1" draw:layer="layout" svg:width="0.065cm" svg:height="0.1cm" svg:x="9.85cm" svg:y="1.712cm" svg:viewBox="0 0 66 101" draw:points="0,94 15,101 44,101 58,94 66,79 66,72 58,58 44,51 22,51 8,44 0,29 0,22 8,7 22,0 44,0 58,7">
          <text:p/>
        </draw:polyline>
        <draw:line draw:style-name="gr3" draw:text-style-name="P1" draw:layer="layout" svg:x1="10.18cm" svg:y1="1.813cm" svg:x2="10.129cm" svg:y2="1.74cm">
          <text:p/>
        </draw:line>
        <draw:polyline draw:style-name="gr3" draw:text-style-name="P1" draw:layer="layout" svg:width="0.086cm" svg:height="0.15cm" svg:x="10.093cm" svg:y="1.662cm" svg:viewBox="0 0 87 151" draw:points="0,151 0,0 57,0 72,7 79,14 87,29 87,51 79,65 72,72 57,79 0,79">
          <text:p/>
        </draw:polyline>
        <draw:polygon draw:style-name="gr3" draw:text-style-name="P1" draw:layer="layout" svg:width="0.078cm" svg:height="0.1cm" svg:x="10.236cm" svg:y="1.712cm" svg:viewBox="0 0 79 101" draw:points="29,101 14,94 8,86 0,72 0,29 8,15 14,7 29,0 51,0 65,7 73,15 79,29 79,72 73,86 65,94 51,101">
          <text:p/>
        </draw:polygon>
        <draw:polygon draw:style-name="gr3" draw:text-style-name="P1" draw:layer="layout" svg:width="0.078cm" svg:height="0.1cm" svg:x="10.372cm" svg:y="1.712cm" svg:viewBox="0 0 79 101" draw:points="28,101 14,94 7,86 0,72 0,29 7,15 14,7 28,0 50,0 64,7 72,15 79,29 79,72 72,86 64,94 50,101">
          <text:p/>
        </draw:polygon>
        <draw:line draw:style-name="gr3" draw:text-style-name="P1" draw:layer="layout" svg:x1="10.514cm" svg:y1="1.812cm" svg:x2="10.514cm" svg:y2="1.712cm">
          <text:p/>
        </draw:line>
        <draw:polyline draw:style-name="gr3" draw:text-style-name="P1" draw:layer="layout" svg:width="0.065cm" svg:height="0.1cm" svg:x="10.514cm" svg:y="1.712cm" svg:viewBox="0 0 66 101" draw:points="0,15 8,7 23,0 44,0 59,7 66,22 66,101">
          <text:p/>
        </draw:polyline>
        <draw:polyline draw:style-name="gr3" draw:text-style-name="P1" draw:layer="layout" svg:width="0.064cm" svg:height="0.1cm" svg:x="10.579cm" svg:y="1.712cm" svg:viewBox="0 0 65 101" draw:points="0,22 7,7 22,0 44,0 58,7 65,22 65,101">
          <text:p/>
        </draw:polyline>
        <draw:polyline draw:style-name="gr3" draw:text-style-name="P1" draw:layer="layout" svg:width="0.092cm" svg:height="0.15cm" svg:x="9.358cm" svg:y="1.903cm" svg:viewBox="0 0 93 151" draw:points="7,15 14,7 28,0 64,0 78,7 86,15 93,29 93,43 86,64 0,151 93,151">
          <text:p/>
        </draw:polyline>
        <draw:polygon draw:style-name="gr3" draw:text-style-name="P1" draw:layer="layout" svg:width="0.086cm" svg:height="0.15cm" svg:x="9.507cm" svg:y="1.903cm" svg:viewBox="0 0 87 151" draw:points="36,0 51,0 65,7 73,15 80,29 87,57 87,94 80,122 73,137 65,144 51,151 36,151 22,144 15,137 8,122 0,94 0,57 8,29 15,15 22,7">
          <text:p/>
        </draw:polygon>
        <draw:line draw:style-name="gr3" draw:text-style-name="P1" draw:layer="layout" svg:x1="9.643cm" svg:y1="2.054cm" svg:x2="9.723cm" svg:y2="1.953cm">
          <text:p/>
        </draw:line>
        <draw:line draw:style-name="gr3" draw:text-style-name="P1" draw:layer="layout" svg:x1="9.643cm" svg:y1="1.953cm" svg:x2="9.723cm" svg:y2="2.054cm">
          <text:p/>
        </draw:line>
        <draw:polyline draw:style-name="gr3" draw:text-style-name="P1" draw:layer="layout" svg:width="0.093cm" svg:height="0.15cm" svg:x="9.765cm" svg:y="1.903cm" svg:viewBox="0 0 94 151" draw:points="7,15 14,7 29,0 65,0 79,7 86,15 94,29 94,43 86,64 0,151 94,151">
          <text:p/>
        </draw:polyline>
        <draw:polyline draw:style-name="gr3" draw:text-style-name="P1" draw:layer="layout" svg:width="0.086cm" svg:height="0.15cm" svg:x="9.915cm" svg:y="1.903cm" svg:viewBox="0 0 87 151" draw:points="30,64 15,57 8,50 0,36 0,29 8,15 15,7 30,0 58,0 72,7 79,15 87,29 87,36 79,50 72,57 58,64 30,64 15,72 8,79 0,94 0,122 8,137 15,144 30,151 58,151 72,144 79,137 87,122 87,94 79,79 72,72 58,64">
          <text:p/>
        </draw:polyline>
        <draw:line draw:style-name="gr4" draw:text-style-name="P1" draw:layer="layout" svg:x1="14.191cm" svg:y1="13.873cm" svg:x2="14.191cm" svg:y2="13.523cm">
          <text:p/>
        </draw:line>
        <draw:line draw:style-name="gr4" draw:text-style-name="P1" draw:layer="layout" svg:x1="14.091cm" svg:y1="12.873cm" svg:x2="14.091cm" svg:y2="13.523cm">
          <text:p/>
        </draw:line>
        <draw:line draw:style-name="gr4" draw:text-style-name="P1" draw:layer="layout" svg:x1="14.091cm" svg:y1="13.523cm" svg:x2="14.191cm" svg:y2="13.523cm">
          <text:p/>
        </draw:line>
        <draw:line draw:style-name="gr4" draw:text-style-name="P1" draw:layer="layout" svg:x1="14.191cm" svg:y1="13.523cm" svg:x2="14.191cm" svg:y2="12.873cm">
          <text:p/>
        </draw:line>
        <draw:line draw:style-name="gr4" draw:text-style-name="P1" draw:layer="layout" svg:x1="14.191cm" svg:y1="12.873cm" svg:x2="14.091cm" svg:y2="12.873cm">
          <text:p/>
        </draw:line>
        <draw:polygon draw:style-name="gr5" draw:text-style-name="P2" draw:layer="layout" svg:width="0.1cm" svg:height="0.65cm" svg:x="14.091cm" svg:y="12.873cm" svg:viewBox="0 0 101 651" draw:points="0,0 101,0 101,651 0,651">
          <text:p/>
        </draw:polygon>
        <draw:line draw:style-name="gr4" draw:text-style-name="P1" draw:layer="layout" svg:x1="14.091cm" svg:y1="13.523cm" svg:x2="14.091cm" svg:y2="13.873cm">
          <text:p/>
        </draw:line>
        <draw:line draw:style-name="gr4" draw:text-style-name="P1" draw:layer="layout" svg:x1="14.091cm" svg:y1="13.873cm" svg:x2="14.091cm" svg:y2="14.223cm">
          <text:p/>
        </draw:line>
        <draw:line draw:style-name="gr4" draw:text-style-name="P1" draw:layer="layout" svg:x1="14.091cm" svg:y1="14.223cm" svg:x2="14.191cm" svg:y2="14.223cm">
          <text:p/>
        </draw:line>
        <draw:line draw:style-name="gr4" draw:text-style-name="P1" draw:layer="layout" svg:x1="14.191cm" svg:y1="14.223cm" svg:x2="14.191cm" svg:y2="13.873cm">
          <text:p/>
        </draw:line>
        <draw:line draw:style-name="gr4" draw:text-style-name="P1" draw:layer="layout" svg:x1="14.191cm" svg:y1="13.873cm" svg:x2="14.091cm" svg:y2="13.873cm">
          <text:p/>
        </draw:line>
        <draw:polygon draw:style-name="gr5" draw:text-style-name="P2" draw:layer="layout" svg:width="0.1cm" svg:height="0.35cm" svg:x="14.091cm" svg:y="13.873cm" svg:viewBox="0 0 101 351" draw:points="0,0 101,0 101,351 0,351">
          <text:p/>
        </draw:polygon>
        <draw:line draw:style-name="gr4" draw:text-style-name="P1" draw:layer="layout" svg:x1="14.141cm" svg:y1="11.173cm" svg:x2="14.141cm" svg:y2="6.623cm">
          <text:p/>
        </draw:line>
        <draw:line draw:style-name="gr4" draw:text-style-name="P1" draw:layer="layout" svg:x1="13.591cm" svg:y1="11.223cm" svg:x2="13.241cm" svg:y2="11.223cm">
          <text:p/>
        </draw:line>
        <draw:line draw:style-name="gr4" draw:text-style-name="P1" draw:layer="layout" svg:x1="12.741cm" svg:y1="11.123cm" svg:x2="12.741cm" svg:y2="11.223cm">
          <text:p/>
        </draw:line>
        <draw:line draw:style-name="gr4" draw:text-style-name="P1" draw:layer="layout" svg:x1="12.741cm" svg:y1="11.223cm" svg:x2="13.241cm" svg:y2="11.223cm">
          <text:p/>
        </draw:line>
        <draw:line draw:style-name="gr4" draw:text-style-name="P1" draw:layer="layout" svg:x1="13.241cm" svg:y1="11.223cm" svg:x2="13.241cm" svg:y2="11.123cm">
          <text:p/>
        </draw:line>
        <draw:line draw:style-name="gr4" draw:text-style-name="P1" draw:layer="layout" svg:x1="13.241cm" svg:y1="11.123cm" svg:x2="12.741cm" svg:y2="11.123cm">
          <text:p/>
        </draw:line>
        <draw:polygon draw:style-name="gr5" draw:text-style-name="P2" draw:layer="layout" svg:width="0.5cm" svg:height="0.1cm" svg:x="12.741cm" svg:y="11.123cm" svg:viewBox="0 0 501 101" draw:points="0,0 501,0 501,101 0,101">
          <text:p/>
        </draw:polygon>
        <draw:line draw:style-name="gr4" draw:text-style-name="P1" draw:layer="layout" svg:x1="12.291cm" svg:y1="12.223cm" svg:x2="12.291cm" svg:y2="12.323cm">
          <text:p/>
        </draw:line>
        <draw:line draw:style-name="gr4" draw:text-style-name="P1" draw:layer="layout" svg:x1="12.291cm" svg:y1="12.323cm" svg:x2="14.141cm" svg:y2="12.323cm">
          <text:p/>
        </draw:line>
        <draw:line draw:style-name="gr4" draw:text-style-name="P1" draw:layer="layout" svg:x1="14.141cm" svg:y1="12.323cm" svg:x2="14.141cm" svg:y2="12.223cm">
          <text:p/>
        </draw:line>
        <draw:line draw:style-name="gr4" draw:text-style-name="P1" draw:layer="layout" svg:x1="14.141cm" svg:y1="12.223cm" svg:x2="12.291cm" svg:y2="12.223cm">
          <text:p/>
        </draw:line>
        <draw:polygon draw:style-name="gr5" draw:text-style-name="P2" draw:layer="layout" svg:width="1.85cm" svg:height="0.1cm" svg:x="12.291cm" svg:y="12.223cm" svg:viewBox="0 0 1851 101" draw:points="0,0 1851,0 1851,101 0,101">
          <text:p/>
        </draw:polygon>
        <draw:line draw:style-name="gr4" draw:text-style-name="P1" draw:layer="layout" svg:x1="12.826cm" svg:y1="12.167cm" svg:x2="12.58cm" svg:y2="11.837cm">
          <text:p/>
        </draw:line>
        <draw:line draw:style-name="gr4" draw:text-style-name="P1" draw:layer="layout" svg:x1="13.591cm" svg:y1="11.123cm" svg:x2="13.591cm" svg:y2="11.223cm">
          <text:p/>
        </draw:line>
        <draw:line draw:style-name="gr4" draw:text-style-name="P1" draw:layer="layout" svg:x1="13.591cm" svg:y1="11.223cm" svg:x2="14.191cm" svg:y2="11.223cm">
          <text:p/>
        </draw:line>
        <draw:line draw:style-name="gr4" draw:text-style-name="P1" draw:layer="layout" svg:x1="14.191cm" svg:y1="11.223cm" svg:x2="14.191cm" svg:y2="11.123cm">
          <text:p/>
        </draw:line>
        <draw:line draw:style-name="gr4" draw:text-style-name="P1" draw:layer="layout" svg:x1="14.191cm" svg:y1="11.123cm" svg:x2="13.591cm" svg:y2="11.123cm">
          <text:p/>
        </draw:line>
        <draw:polygon draw:style-name="gr5" draw:text-style-name="P2" draw:layer="layout" svg:width="0.6cm" svg:height="0.1cm" svg:x="13.591cm" svg:y="11.123cm" svg:viewBox="0 0 601 101" draw:points="0,0 601,0 601,101 0,101">
          <text:p/>
        </draw:polygon>
        <draw:line draw:style-name="gr4" draw:text-style-name="P1" draw:layer="layout" svg:x1="14.091cm" svg:y1="11.123cm" svg:x2="14.091cm" svg:y2="11.373cm">
          <text:p/>
        </draw:line>
        <draw:line draw:style-name="gr4" draw:text-style-name="P1" draw:layer="layout" svg:x1="14.091cm" svg:y1="11.373cm" svg:x2="14.191cm" svg:y2="11.373cm">
          <text:p/>
        </draw:line>
        <draw:line draw:style-name="gr4" draw:text-style-name="P1" draw:layer="layout" svg:x1="14.191cm" svg:y1="11.373cm" svg:x2="14.191cm" svg:y2="11.123cm">
          <text:p/>
        </draw:line>
        <draw:line draw:style-name="gr4" draw:text-style-name="P1" draw:layer="layout" svg:x1="14.191cm" svg:y1="11.123cm" svg:x2="14.091cm" svg:y2="11.123cm">
          <text:p/>
        </draw:line>
        <draw:polygon draw:style-name="gr5" draw:text-style-name="P2" draw:layer="layout" svg:width="0.1cm" svg:height="0.25cm" svg:x="14.091cm" svg:y="11.123cm" svg:viewBox="0 0 101 251" draw:points="0,0 101,0 101,251 0,251">
          <text:p/>
        </draw:polygon>
        <draw:line draw:style-name="gr4" draw:text-style-name="P1" draw:layer="layout" svg:x1="17.641cm" svg:y1="13.123cm" svg:x2="18.691cm" svg:y2="13.123cm">
          <text:p/>
        </draw:line>
        <draw:line draw:style-name="gr4" draw:text-style-name="P1" draw:layer="layout" svg:x1="17.641cm" svg:y1="11.323cm" svg:x2="17.641cm" svg:y2="13.123cm">
          <text:p/>
        </draw:line>
        <draw:line draw:style-name="gr4" draw:text-style-name="P1" draw:layer="layout" svg:x1="17.492cm" svg:y1="14.849cm" svg:x2="16.691cm" svg:y2="14.698cm">
          <text:p/>
        </draw:line>
        <draw:line draw:style-name="gr4" draw:text-style-name="P1" draw:layer="layout" svg:x1="17.191cm" svg:y1="14.698cm" svg:x2="17.191cm" svg:y2="14.898cm">
          <text:p/>
        </draw:line>
        <draw:line draw:style-name="gr4" draw:text-style-name="P1" draw:layer="layout" svg:x1="17.641cm" svg:y1="11.323cm" svg:x2="18.691cm" svg:y2="11.323cm">
          <text:p/>
        </draw:line>
        <draw:line draw:style-name="gr4" draw:text-style-name="P1" draw:layer="layout" svg:x1="15.841cm" svg:y1="14.623cm" svg:x2="15.841cm" svg:y2="14.823cm">
          <text:p/>
        </draw:line>
        <draw:line draw:style-name="gr4" draw:text-style-name="P1" draw:layer="layout" svg:x1="16.392cm" svg:y1="14.824cm" svg:x2="15.591cm" svg:y2="14.673cm">
          <text:p/>
        </draw:line>
        <draw:line draw:style-name="gr4" draw:text-style-name="P1" draw:layer="layout" svg:x1="16.341cm" svg:y1="14.773cm" svg:x2="16.341cm" svg:y2="14.873cm">
          <text:p/>
        </draw:line>
        <draw:line draw:style-name="gr4" draw:text-style-name="P1" draw:layer="layout" svg:x1="16.029cm" svg:y1="14.847cm" svg:x2="16.329cm" svg:y2="14.847cm">
          <text:p/>
        </draw:line>
        <draw:line draw:style-name="gr4" draw:text-style-name="P1" draw:layer="layout" svg:x1="16.641cm" svg:y1="14.873cm" svg:x2="16.641cm" svg:y2="14.773cm">
          <text:p/>
        </draw:line>
        <draw:line draw:style-name="gr4" draw:text-style-name="P1" draw:layer="layout" svg:x1="16.641cm" svg:y1="14.773cm" svg:x2="16.341cm" svg:y2="14.773cm">
          <text:p/>
        </draw:line>
        <draw:polygon draw:style-name="gr5" draw:text-style-name="P2" draw:layer="layout" svg:width="0.3cm" svg:height="0.1cm" svg:x="16.341cm" svg:y="14.773cm" svg:viewBox="0 0 301 101" draw:points="0,0 301,0 301,101 0,101">
          <text:p/>
        </draw:polygon>
        <draw:line draw:style-name="gr4" draw:text-style-name="P1" draw:layer="layout" svg:x1="16.091cm" svg:y1="14.673cm" svg:x2="16.091cm" svg:y2="14.873cm">
          <text:p/>
        </draw:line>
        <draw:line draw:style-name="gr4" draw:text-style-name="P1" draw:layer="layout" svg:x1="16.941cm" svg:y1="14.648cm" svg:x2="16.941cm" svg:y2="14.848cm">
          <text:p/>
        </draw:line>
        <draw:line draw:style-name="gr4" draw:text-style-name="P1" draw:layer="layout" svg:x1="14.741cm" svg:y1="14.824cm" svg:x2="15.642cm" svg:y2="14.723cm">
          <text:p/>
        </draw:line>
        <draw:line draw:style-name="gr4" draw:text-style-name="P1" draw:layer="layout" svg:x1="15.241cm" svg:y1="14.673cm" svg:x2="15.241cm" svg:y2="14.823cm">
          <text:p/>
        </draw:line>
        <draw:line draw:style-name="gr4" draw:text-style-name="P1" draw:layer="layout" svg:x1="14.991cm" svg:y1="14.723cm" svg:x2="14.991cm" svg:y2="14.873cm">
          <text:p/>
        </draw:line>
        <draw:line draw:style-name="gr4" draw:text-style-name="P1" draw:layer="layout" svg:x1="14.091cm" svg:y1="12.523cm" svg:x2="14.091cm" svg:y2="12.873cm">
          <text:p/>
        </draw:line>
        <draw:line draw:style-name="gr4" draw:text-style-name="P1" draw:layer="layout" svg:x1="14.191cm" svg:y1="11.373cm" svg:x2="14.191cm" svg:y2="11.723cm">
          <text:p/>
        </draw:line>
        <draw:line draw:style-name="gr4" draw:text-style-name="P1" draw:layer="layout" svg:x1="14.191cm" svg:y1="12.873cm" svg:x2="14.191cm" svg:y2="12.523cm">
          <text:p/>
        </draw:line>
        <draw:line draw:style-name="gr4" draw:text-style-name="P1" draw:layer="layout" svg:x1="14.091cm" svg:y1="11.723cm" svg:x2="14.091cm" svg:y2="12.523cm">
          <text:p/>
        </draw:line>
        <draw:line draw:style-name="gr4" draw:text-style-name="P1" draw:layer="layout" svg:x1="14.091cm" svg:y1="12.523cm" svg:x2="14.191cm" svg:y2="12.523cm">
          <text:p/>
        </draw:line>
        <draw:line draw:style-name="gr4" draw:text-style-name="P1" draw:layer="layout" svg:x1="14.191cm" svg:y1="12.523cm" svg:x2="14.191cm" svg:y2="11.723cm">
          <text:p/>
        </draw:line>
        <draw:line draw:style-name="gr4" draw:text-style-name="P1" draw:layer="layout" svg:x1="14.191cm" svg:y1="11.723cm" svg:x2="14.091cm" svg:y2="11.723cm">
          <text:p/>
        </draw:line>
        <draw:polygon draw:style-name="gr5" draw:text-style-name="P2" draw:layer="layout" svg:width="0.1cm" svg:height="0.8cm" svg:x="14.091cm" svg:y="11.723cm" svg:viewBox="0 0 101 801" draw:points="0,0 101,0 101,801 0,801">
          <text:p/>
        </draw:polygon>
        <draw:line draw:style-name="gr4" draw:text-style-name="P1" draw:layer="layout" svg:x1="14.091cm" svg:y1="11.723cm" svg:x2="14.091cm" svg:y2="11.373cm">
          <text:p/>
        </draw:line>
        <draw:line draw:style-name="gr4" draw:text-style-name="P1" draw:layer="layout" svg:x1="17.742cm" svg:y1="0.723cm" svg:x2="16.541cm" svg:y2="0.974cm">
          <text:p/>
        </draw:line>
        <draw:path draw:style-name="gr4" draw:text-style-name="P1" draw:layer="layout" svg:width="0.092cm" svg:height="0.128cm" svg:x="14.741cm" svg:y="3.445cm" svg:viewBox="0 0 93 129" svg:d="M87 0c11 28 8 61-9 87s-47 42-78 42">
          <text:p/>
        </draw:path>
        <draw:line draw:style-name="gr4" draw:text-style-name="P1" draw:layer="layout" svg:x1="16.291cm" svg:y1="0.698cm" svg:x2="16.291cm" svg:y2="0.873cm">
          <text:p/>
        </draw:line>
        <draw:line draw:style-name="gr4" draw:text-style-name="P1" draw:layer="layout" svg:x1="12.931cm" svg:y1="3.223cm" svg:x2="12.931cm" svg:y2="3.323cm">
          <text:p/>
        </draw:line>
        <draw:line draw:style-name="gr4" draw:text-style-name="P1" draw:layer="layout" svg:x1="12.931cm" svg:y1="3.323cm" svg:x2="14.491cm" svg:y2="3.323cm">
          <text:p/>
        </draw:line>
        <draw:line draw:style-name="gr4" draw:text-style-name="P1" draw:layer="layout" svg:x1="14.491cm" svg:y1="3.323cm" svg:x2="14.491cm" svg:y2="3.223cm">
          <text:p/>
        </draw:line>
        <draw:line draw:style-name="gr4" draw:text-style-name="P1" draw:layer="layout" svg:x1="14.491cm" svg:y1="3.223cm" svg:x2="12.931cm" svg:y2="3.223cm">
          <text:p/>
        </draw:line>
        <draw:polygon draw:style-name="gr5" draw:text-style-name="P2" draw:layer="layout" svg:width="1.56cm" svg:height="0.1cm" svg:x="12.931cm" svg:y="3.223cm" svg:viewBox="0 0 1561 101" draw:points="0,0 1561,0 1561,101 0,101">
          <text:p/>
        </draw:polygon>
        <draw:line draw:style-name="gr4" draw:text-style-name="P1" draw:layer="layout" svg:x1="14.791cm" svg:y1="0.673cm" svg:x2="14.791cm" svg:y2="0.773cm">
          <text:p/>
        </draw:line>
        <draw:line draw:style-name="gr4" draw:text-style-name="P1" draw:layer="layout" svg:x1="14.791cm" svg:y1="0.773cm" svg:x2="15.441cm" svg:y2="0.773cm">
          <text:p/>
        </draw:line>
        <draw:line draw:style-name="gr4" draw:text-style-name="P1" draw:layer="layout" svg:x1="15.441cm" svg:y1="0.773cm" svg:x2="15.441cm" svg:y2="0.673cm">
          <text:p/>
        </draw:line>
        <draw:line draw:style-name="gr4" draw:text-style-name="P1" draw:layer="layout" svg:x1="15.441cm" svg:y1="0.673cm" svg:x2="14.791cm" svg:y2="0.673cm">
          <text:p/>
        </draw:line>
        <draw:polygon draw:style-name="gr5" draw:text-style-name="P2" draw:layer="layout" svg:width="0.65cm" svg:height="0.1cm" svg:x="14.791cm" svg:y="0.673cm" svg:viewBox="0 0 651 101" draw:points="0,0 651,0 651,101 0,101">
          <text:p/>
        </draw:polygon>
        <draw:line draw:style-name="gr4" draw:text-style-name="P1" draw:layer="layout" svg:x1="14.791cm" svg:y1="0.673cm" svg:x2="14.341cm" svg:y2="0.673cm">
          <text:p/>
        </draw:line>
        <draw:line draw:style-name="gr4" draw:text-style-name="P1" draw:layer="layout" svg:x1="14.941cm" svg:y1="3.223cm" svg:x2="14.941cm" svg:y2="3.323cm">
          <text:p/>
        </draw:line>
        <draw:line draw:style-name="gr4" draw:text-style-name="P1" draw:layer="layout" svg:x1="14.941cm" svg:y1="3.323cm" svg:x2="15.441cm" svg:y2="3.323cm">
          <text:p/>
        </draw:line>
        <draw:line draw:style-name="gr4" draw:text-style-name="P1" draw:layer="layout" svg:x1="15.441cm" svg:y1="3.323cm" svg:x2="15.441cm" svg:y2="3.223cm">
          <text:p/>
        </draw:line>
        <draw:line draw:style-name="gr4" draw:text-style-name="P1" draw:layer="layout" svg:x1="15.441cm" svg:y1="3.223cm" svg:x2="14.941cm" svg:y2="3.223cm">
          <text:p/>
        </draw:line>
        <draw:polygon draw:style-name="gr5" draw:text-style-name="P2" draw:layer="layout" svg:width="0.5cm" svg:height="0.1cm" svg:x="14.941cm" svg:y="3.223cm" svg:viewBox="0 0 501 101" draw:points="0,0 501,0 501,101 0,101">
          <text:p/>
        </draw:polygon>
        <draw:line draw:style-name="gr4" draw:text-style-name="P1" draw:layer="layout" svg:x1="18.641cm" svg:y1="0.673cm" svg:x2="18.641cm" svg:y2="14.873cm">
          <text:p/>
        </draw:line>
        <draw:line draw:style-name="gr4" draw:text-style-name="P1" draw:layer="layout" svg:x1="18.329cm" svg:y1="14.847cm" svg:x2="18.429cm" svg:y2="14.847cm">
          <text:p/>
        </draw:line>
        <draw:line draw:style-name="gr4" draw:text-style-name="P1" draw:layer="layout" svg:x1="18.741cm" svg:y1="14.873cm" svg:x2="18.741cm" svg:y2="0.673cm">
          <text:p/>
        </draw:line>
        <draw:line draw:style-name="gr4" draw:text-style-name="P1" draw:layer="layout" svg:x1="18.741cm" svg:y1="0.673cm" svg:x2="18.641cm" svg:y2="0.673cm">
          <text:p/>
        </draw:line>
        <draw:polygon draw:style-name="gr5" draw:text-style-name="P2" draw:layer="layout" svg:width="0.1cm" svg:height="14.2cm" svg:x="18.641cm" svg:y="0.673cm" svg:viewBox="0 0 101 14201" draw:points="0,0 101,0 101,14201 0,14201">
          <text:p/>
        </draw:polygon>
        <draw:line draw:style-name="gr4" draw:text-style-name="P1" draw:layer="layout" svg:x1="17.641cm" svg:y1="9.023cm" svg:x2="17.641cm" svg:y2="10.823cm">
          <text:p/>
        </draw:line>
        <draw:line draw:style-name="gr4" draw:text-style-name="P1" draw:layer="layout" svg:x1="18.716cm" svg:y1="10.823cm" svg:x2="17.641cm" svg:y2="10.823cm">
          <text:p/>
        </draw:line>
        <draw:line draw:style-name="gr4" draw:text-style-name="P1" draw:layer="layout" svg:x1="18.691cm" svg:y1="9.023cm" svg:x2="17.641cm" svg:y2="9.023cm">
          <text:p/>
        </draw:line>
        <draw:line draw:style-name="gr4" draw:text-style-name="P1" draw:layer="layout" svg:x1="17.391cm" svg:y1="14.773cm" svg:x2="17.391cm" svg:y2="14.873cm">
          <text:p/>
        </draw:line>
        <draw:line draw:style-name="gr4" draw:text-style-name="P1" draw:layer="layout" svg:x1="17.079cm" svg:y1="14.847cm" svg:x2="18.429cm" svg:y2="14.847cm">
          <text:p/>
        </draw:line>
        <draw:line draw:style-name="gr4" draw:text-style-name="P1" draw:layer="layout" svg:x1="18.741cm" svg:y1="14.873cm" svg:x2="18.741cm" svg:y2="14.773cm">
          <text:p/>
        </draw:line>
        <draw:line draw:style-name="gr4" draw:text-style-name="P1" draw:layer="layout" svg:x1="18.741cm" svg:y1="14.773cm" svg:x2="17.391cm" svg:y2="14.773cm">
          <text:p/>
        </draw:line>
        <draw:polygon draw:style-name="gr5" draw:text-style-name="P2" draw:layer="layout" svg:width="1.35cm" svg:height="0.1cm" svg:x="17.391cm" svg:y="14.773cm" svg:viewBox="0 0 1351 101" draw:points="0,0 1351,0 1351,101 0,101">
          <text:p/>
        </draw:polygon>
        <draw:line draw:style-name="gr4" draw:text-style-name="P1" draw:layer="layout" svg:x1="13.791cm" svg:y1="4.173cm" svg:x2="13.791cm" svg:y2="4.273cm">
          <text:p/>
        </draw:line>
        <draw:line draw:style-name="gr4" draw:text-style-name="P1" draw:layer="layout" svg:x1="13.791cm" svg:y1="4.273cm" svg:x2="13.891cm" svg:y2="4.273cm">
          <text:p/>
        </draw:line>
        <draw:line draw:style-name="gr4" draw:text-style-name="P1" draw:layer="layout" svg:x1="13.891cm" svg:y1="4.273cm" svg:x2="13.891cm" svg:y2="4.173cm">
          <text:p/>
        </draw:line>
        <draw:line draw:style-name="gr4" draw:text-style-name="P1" draw:layer="layout" svg:x1="13.891cm" svg:y1="4.173cm" svg:x2="13.791cm" svg:y2="4.173cm">
          <text:p/>
        </draw:line>
        <draw:polygon draw:style-name="gr5" draw:text-style-name="P2" draw:layer="layout" svg:width="0.1cm" svg:height="0.1cm" svg:x="13.791cm" svg:y="4.173cm" svg:viewBox="0 0 101 101" draw:points="0,0 101,0 101,101 0,101">
          <text:p/>
        </draw:polygon>
        <draw:line draw:style-name="gr4" draw:text-style-name="P1" draw:layer="layout" svg:x1="11.313cm" svg:y1="3.228cm" svg:x2="11.313cm" svg:y2="3.328cm">
          <text:p/>
        </draw:line>
        <draw:line draw:style-name="gr4" draw:text-style-name="P1" draw:layer="layout" svg:x1="11.313cm" svg:y1="3.328cm" svg:x2="12.378cm" svg:y2="3.328cm">
          <text:p/>
        </draw:line>
        <draw:line draw:style-name="gr4" draw:text-style-name="P1" draw:layer="layout" svg:x1="12.378cm" svg:y1="3.328cm" svg:x2="12.378cm" svg:y2="3.228cm">
          <text:p/>
        </draw:line>
        <draw:line draw:style-name="gr4" draw:text-style-name="P1" draw:layer="layout" svg:x1="12.378cm" svg:y1="3.228cm" svg:x2="11.313cm" svg:y2="3.228cm">
          <text:p/>
        </draw:line>
        <draw:polygon draw:style-name="gr5" draw:text-style-name="P2" draw:layer="layout" svg:width="1.065cm" svg:height="0.1cm" svg:x="11.313cm" svg:y="3.228cm" svg:viewBox="0 0 1066 101" draw:points="0,0 1066,0 1066,101 0,101">
          <text:p/>
        </draw:polygon>
        <draw:line draw:style-name="gr4" draw:text-style-name="P1" draw:layer="layout" svg:x1="12.336cm" svg:y1="3.278cm" svg:x2="12.787cm" svg:y2="3.579cm">
          <text:p/>
        </draw:line>
        <draw:path draw:style-name="gr4" draw:text-style-name="P1" draw:layer="layout" svg:width="0.092cm" svg:height="0.128cm" svg:x="12.709cm" svg:y="3.491cm" svg:viewBox="0 0 93 129" svg:d="M87 0c11 29 8 62-9 88-17 25-47 41-78 41">
          <text:p/>
        </draw:path>
        <draw:line draw:style-name="gr4" draw:text-style-name="P1" draw:layer="layout" svg:x1="12.241cm" svg:y1="4.173cm" svg:x2="12.241cm" svg:y2="4.273cm">
          <text:p/>
        </draw:line>
        <draw:line draw:style-name="gr4" draw:text-style-name="P1" draw:layer="layout" svg:x1="12.241cm" svg:y1="4.273cm" svg:x2="12.341cm" svg:y2="4.273cm">
          <text:p/>
        </draw:line>
        <draw:line draw:style-name="gr4" draw:text-style-name="P1" draw:layer="layout" svg:x1="12.341cm" svg:y1="4.273cm" svg:x2="12.341cm" svg:y2="4.173cm">
          <text:p/>
        </draw:line>
        <draw:line draw:style-name="gr4" draw:text-style-name="P1" draw:layer="layout" svg:x1="12.341cm" svg:y1="4.173cm" svg:x2="12.241cm" svg:y2="4.173cm">
          <text:p/>
        </draw:line>
        <draw:polygon draw:style-name="gr5" draw:text-style-name="P2" draw:layer="layout" svg:width="0.1cm" svg:height="0.1cm" svg:x="12.241cm" svg:y="4.173cm" svg:viewBox="0 0 101 101" draw:points="0,0 101,0 101,101 0,101">
          <text:p/>
        </draw:polygon>
        <draw:path draw:style-name="gr4" draw:text-style-name="P1" draw:layer="layout" svg:width="0.092cm" svg:height="0.128cm" svg:x="9.091cm" svg:y="3.495cm" svg:viewBox="0 0 93 129" svg:d="M86 0c12 29 9 62-8 88-19 26-47 41-78 41">
          <text:p/>
        </draw:path>
        <draw:line draw:style-name="gr4" draw:text-style-name="P1" draw:layer="layout" svg:x1="11.271cm" svg:y1="0.673cm" svg:x2="10.671cm" svg:y2="0.673cm">
          <text:p/>
        </draw:line>
        <draw:path draw:style-name="gr4" draw:text-style-name="P1" draw:layer="layout" svg:width="0.092cm" svg:height="0.128cm" svg:x="11.121cm" svg:y="3.495cm" svg:viewBox="0 0 93 129" svg:d="M86 0c12 29 9 62-8 88-18 25-47 41-78 41">
          <text:p/>
        </draw:path>
        <draw:line draw:style-name="gr4" draw:text-style-name="P1" draw:layer="layout" svg:x1="9.641cm" svg:y1="0.673cm" svg:x2="8.891cm" svg:y2="0.673cm">
          <text:p/>
        </draw:line>
        <draw:line draw:style-name="gr4" draw:text-style-name="P1" draw:layer="layout" svg:x1="10.491cm" svg:y1="4.173cm" svg:x2="10.491cm" svg:y2="4.273cm">
          <text:p/>
        </draw:line>
        <draw:line draw:style-name="gr4" draw:text-style-name="P1" draw:layer="layout" svg:x1="10.491cm" svg:y1="4.273cm" svg:x2="10.591cm" svg:y2="4.273cm">
          <text:p/>
        </draw:line>
        <draw:line draw:style-name="gr4" draw:text-style-name="P1" draw:layer="layout" svg:x1="10.591cm" svg:y1="4.273cm" svg:x2="10.591cm" svg:y2="4.173cm">
          <text:p/>
        </draw:line>
        <draw:line draw:style-name="gr4" draw:text-style-name="P1" draw:layer="layout" svg:x1="10.591cm" svg:y1="4.173cm" svg:x2="10.491cm" svg:y2="4.173cm">
          <text:p/>
        </draw:line>
        <draw:polygon draw:style-name="gr5" draw:text-style-name="P2" draw:layer="layout" svg:width="0.1cm" svg:height="0.1cm" svg:x="10.491cm" svg:y="4.173cm" svg:viewBox="0 0 101 101" draw:points="0,0 101,0 101,101 0,101">
          <text:p/>
        </draw:polygon>
        <draw:line draw:style-name="gr4" draw:text-style-name="P1" draw:layer="layout" svg:x1="15.341cm" svg:y1="4.173cm" svg:x2="15.341cm" svg:y2="4.273cm">
          <text:p/>
        </draw:line>
        <draw:line draw:style-name="gr4" draw:text-style-name="P1" draw:layer="layout" svg:x1="15.341cm" svg:y1="4.273cm" svg:x2="15.441cm" svg:y2="4.273cm">
          <text:p/>
        </draw:line>
        <draw:line draw:style-name="gr4" draw:text-style-name="P1" draw:layer="layout" svg:x1="15.441cm" svg:y1="4.273cm" svg:x2="15.441cm" svg:y2="4.173cm">
          <text:p/>
        </draw:line>
        <draw:line draw:style-name="gr4" draw:text-style-name="P1" draw:layer="layout" svg:x1="15.441cm" svg:y1="4.173cm" svg:x2="15.341cm" svg:y2="4.173cm">
          <text:p/>
        </draw:line>
        <draw:polygon draw:style-name="gr5" draw:text-style-name="P2" draw:layer="layout" svg:width="0.1cm" svg:height="0.1cm" svg:x="15.341cm" svg:y="4.173cm" svg:viewBox="0 0 101 101" draw:points="0,0 101,0 101,101 0,101">
          <text:p/>
        </draw:polygon>
        <draw:line draw:style-name="gr4" draw:text-style-name="P1" draw:layer="layout" svg:x1="18.691cm" svg:y1="3.323cm" svg:x2="17.641cm" svg:y2="3.323cm">
          <text:p/>
        </draw:line>
        <draw:line draw:style-name="gr4" draw:text-style-name="P1" draw:layer="layout" svg:x1="17.641cm" svg:y1="3.323cm" svg:x2="17.641cm" svg:y2="5.123cm">
          <text:p/>
        </draw:line>
        <draw:line draw:style-name="gr4" draw:text-style-name="P1" draw:layer="layout" svg:x1="17.641cm" svg:y1="5.123cm" svg:x2="18.691cm" svg:y2="5.123cm">
          <text:p/>
        </draw:line>
        <draw:line draw:style-name="gr4" draw:text-style-name="P1" draw:layer="layout" svg:x1="17.691cm" svg:y1="0.673cm" svg:x2="17.691cm" svg:y2="0.773cm">
          <text:p/>
        </draw:line>
        <draw:line draw:style-name="gr4" draw:text-style-name="P1" draw:layer="layout" svg:x1="17.691cm" svg:y1="0.773cm" svg:x2="18.741cm" svg:y2="0.773cm">
          <text:p/>
        </draw:line>
        <draw:line draw:style-name="gr4" draw:text-style-name="P1" draw:layer="layout" svg:x1="18.741cm" svg:y1="0.773cm" svg:x2="18.741cm" svg:y2="0.673cm">
          <text:p/>
        </draw:line>
        <draw:line draw:style-name="gr4" draw:text-style-name="P1" draw:layer="layout" svg:x1="18.741cm" svg:y1="0.673cm" svg:x2="17.691cm" svg:y2="0.673cm">
          <text:p/>
        </draw:line>
        <draw:polygon draw:style-name="gr5" draw:text-style-name="P2" draw:layer="layout" svg:width="1.05cm" svg:height="0.1cm" svg:x="17.691cm" svg:y="0.673cm" svg:viewBox="0 0 1051 101" draw:points="0,0 1051,0 1051,101 0,101">
          <text:p/>
        </draw:polygon>
        <draw:line draw:style-name="gr4" draw:text-style-name="P1" draw:layer="layout" svg:x1="16.991cm" svg:y1="0.773cm" svg:x2="16.991cm" svg:y2="0.973cm">
          <text:p/>
        </draw:line>
        <draw:line draw:style-name="gr4" draw:text-style-name="P1" draw:layer="layout" svg:x1="15.391cm" svg:y1="0.723cm" svg:x2="16.792cm" svg:y2="0.824cm">
          <text:p/>
        </draw:line>
        <draw:line draw:style-name="gr4" draw:text-style-name="P1" draw:layer="layout" svg:x1="15.341cm" svg:y1="0.673cm" svg:x2="15.341cm" svg:y2="3.323cm">
          <text:p/>
        </draw:line>
        <draw:line draw:style-name="gr4" draw:text-style-name="P1" draw:layer="layout" svg:x1="15.341cm" svg:y1="3.323cm" svg:x2="15.441cm" svg:y2="3.323cm">
          <text:p/>
        </draw:line>
        <draw:line draw:style-name="gr4" draw:text-style-name="P1" draw:layer="layout" svg:x1="15.441cm" svg:y1="3.323cm" svg:x2="15.441cm" svg:y2="0.673cm">
          <text:p/>
        </draw:line>
        <draw:line draw:style-name="gr4" draw:text-style-name="P1" draw:layer="layout" svg:x1="15.441cm" svg:y1="0.673cm" svg:x2="15.341cm" svg:y2="0.673cm">
          <text:p/>
        </draw:line>
        <draw:polygon draw:style-name="gr5" draw:text-style-name="P2" draw:layer="layout" svg:width="0.1cm" svg:height="2.65cm" svg:x="15.341cm" svg:y="0.673cm" svg:viewBox="0 0 101 2651" draw:points="0,0 101,0 101,2651 0,2651">
          <text:p/>
        </draw:polygon>
        <draw:line draw:style-name="gr4" draw:text-style-name="P1" draw:layer="layout" svg:x1="17.341cm" svg:y1="0.723cm" svg:x2="17.341cm" svg:y2="0.923cm">
          <text:p/>
        </draw:line>
        <draw:line draw:style-name="gr4" draw:text-style-name="P1" draw:layer="layout" svg:x1="15.841cm" svg:y1="0.673cm" svg:x2="15.841cm" svg:y2="0.848cm">
          <text:p/>
        </draw:line>
        <draw:line draw:style-name="gr4" draw:text-style-name="P1" draw:layer="layout" svg:x1="5.341cm" svg:y1="0.673cm" svg:x2="5.791cm" svg:y2="0.673cm">
          <text:p/>
        </draw:line>
        <draw:line draw:style-name="gr4" draw:text-style-name="P1" draw:layer="layout" svg:x1="5.741cm" svg:y1="3.223cm" svg:x2="5.741cm" svg:y2="3.323cm">
          <text:p/>
        </draw:line>
        <draw:line draw:style-name="gr4" draw:text-style-name="P1" draw:layer="layout" svg:x1="5.741cm" svg:y1="3.323cm" svg:x2="7.091cm" svg:y2="3.323cm">
          <text:p/>
        </draw:line>
        <draw:line draw:style-name="gr4" draw:text-style-name="P1" draw:layer="layout" svg:x1="7.091cm" svg:y1="3.323cm" svg:x2="7.091cm" svg:y2="3.223cm">
          <text:p/>
        </draw:line>
        <draw:line draw:style-name="gr4" draw:text-style-name="P1" draw:layer="layout" svg:x1="7.091cm" svg:y1="3.223cm" svg:x2="5.741cm" svg:y2="3.223cm">
          <text:p/>
        </draw:line>
        <draw:polygon draw:style-name="gr5" draw:text-style-name="P2" draw:layer="layout" svg:width="1.35cm" svg:height="0.1cm" svg:x="5.741cm" svg:y="3.223cm" svg:viewBox="0 0 1351 101" draw:points="0,0 1351,0 1351,101 0,101">
          <text:p/>
        </draw:polygon>
        <draw:line draw:style-name="gr4" draw:text-style-name="P1" draw:layer="layout" svg:x1="5.791cm" svg:y1="0.773cm" svg:x2="5.341cm" svg:y2="0.773cm">
          <text:p/>
        </draw:line>
        <draw:line draw:style-name="gr4" draw:text-style-name="P1" draw:layer="layout" svg:x1="4.641cm" svg:y1="3.223cm" svg:x2="4.641cm" svg:y2="3.323cm">
          <text:p/>
        </draw:line>
        <draw:line draw:style-name="gr4" draw:text-style-name="P1" draw:layer="layout" svg:x1="4.641cm" svg:y1="3.323cm" svg:x2="5.191cm" svg:y2="3.323cm">
          <text:p/>
        </draw:line>
        <draw:line draw:style-name="gr4" draw:text-style-name="P1" draw:layer="layout" svg:x1="5.191cm" svg:y1="3.323cm" svg:x2="5.191cm" svg:y2="3.223cm">
          <text:p/>
        </draw:line>
        <draw:line draw:style-name="gr4" draw:text-style-name="P1" draw:layer="layout" svg:x1="5.191cm" svg:y1="3.223cm" svg:x2="4.641cm" svg:y2="3.223cm">
          <text:p/>
        </draw:line>
        <draw:polygon draw:style-name="gr5" draw:text-style-name="P2" draw:layer="layout" svg:width="0.55cm" svg:height="0.1cm" svg:x="4.641cm" svg:y="3.223cm" svg:viewBox="0 0 551 101" draw:points="0,0 551,0 551,101 0,101">
          <text:p/>
        </draw:polygon>
        <draw:line draw:style-name="gr4" draw:text-style-name="P1" draw:layer="layout" svg:x1="5.791cm" svg:y1="0.673cm" svg:x2="5.791cm" svg:y2="0.773cm">
          <text:p/>
        </draw:line>
        <draw:line draw:style-name="gr4" draw:text-style-name="P1" draw:layer="layout" svg:x1="5.791cm" svg:y1="0.773cm" svg:x2="6.941cm" svg:y2="0.773cm">
          <text:p/>
        </draw:line>
        <draw:line draw:style-name="gr4" draw:text-style-name="P1" draw:layer="layout" svg:x1="6.941cm" svg:y1="0.773cm" svg:x2="6.941cm" svg:y2="0.673cm">
          <text:p/>
        </draw:line>
        <draw:line draw:style-name="gr4" draw:text-style-name="P1" draw:layer="layout" svg:x1="6.941cm" svg:y1="0.673cm" svg:x2="5.791cm" svg:y2="0.673cm">
          <text:p/>
        </draw:line>
        <draw:polygon draw:style-name="gr5" draw:text-style-name="P2" draw:layer="layout" svg:width="1.15cm" svg:height="0.1cm" svg:x="5.791cm" svg:y="0.673cm" svg:viewBox="0 0 1151 101" draw:points="0,0 1151,0 1151,101 0,101">
          <text:p/>
        </draw:polygon>
        <draw:line draw:style-name="gr4" draw:text-style-name="P1" draw:layer="layout" svg:x1="4.691cm" svg:y1="4.223cm" svg:x2="15.391cm" svg:y2="4.223cm">
          <text:p/>
        </draw:line>
        <draw:line draw:style-name="gr4" draw:text-style-name="P1" draw:layer="layout" svg:x1="5.891cm" svg:y1="4.173cm" svg:x2="5.891cm" svg:y2="4.273cm">
          <text:p/>
        </draw:line>
        <draw:line draw:style-name="gr4" draw:text-style-name="P1" draw:layer="layout" svg:x1="5.891cm" svg:y1="4.273cm" svg:x2="5.991cm" svg:y2="4.273cm">
          <text:p/>
        </draw:line>
        <draw:line draw:style-name="gr4" draw:text-style-name="P1" draw:layer="layout" svg:x1="5.991cm" svg:y1="4.273cm" svg:x2="5.991cm" svg:y2="4.173cm">
          <text:p/>
        </draw:line>
        <draw:line draw:style-name="gr4" draw:text-style-name="P1" draw:layer="layout" svg:x1="5.991cm" svg:y1="4.173cm" svg:x2="5.891cm" svg:y2="4.173cm">
          <text:p/>
        </draw:line>
        <draw:polygon draw:style-name="gr5" draw:text-style-name="P2" draw:layer="layout" svg:width="0.1cm" svg:height="0.1cm" svg:x="5.891cm" svg:y="4.173cm" svg:viewBox="0 0 101 101" draw:points="0,0 101,0 101,101 0,101">
          <text:p/>
        </draw:polygon>
        <draw:line draw:style-name="gr6" draw:text-style-name="P1" draw:layer="layout" svg:x1="5.141cm" svg:y1="8.873cm" svg:x2="5.143cm" svg:y2="8.873cm">
          <text:p/>
        </draw:line>
        <draw:line draw:style-name="gr6" draw:text-style-name="P1" draw:layer="layout" svg:x1="5.183cm" svg:y1="8.873cm" svg:x2="5.185cm" svg:y2="8.873cm">
          <text:p/>
        </draw:line>
        <draw:line draw:style-name="gr6" draw:text-style-name="P1" draw:layer="layout" svg:x1="5.225cm" svg:y1="8.873cm" svg:x2="5.227cm" svg:y2="8.873cm">
          <text:p/>
        </draw:line>
        <draw:line draw:style-name="gr6" draw:text-style-name="P1" draw:layer="layout" svg:x1="5.267cm" svg:y1="8.873cm" svg:x2="5.269cm" svg:y2="8.873cm">
          <text:p/>
        </draw:line>
        <draw:line draw:style-name="gr6" draw:text-style-name="P1" draw:layer="layout" svg:x1="5.309cm" svg:y1="8.873cm" svg:x2="5.311cm" svg:y2="8.873cm">
          <text:p/>
        </draw:line>
        <draw:line draw:style-name="gr6" draw:text-style-name="P1" draw:layer="layout" svg:x1="5.351cm" svg:y1="8.873cm" svg:x2="5.353cm" svg:y2="8.873cm">
          <text:p/>
        </draw:line>
        <draw:line draw:style-name="gr6" draw:text-style-name="P1" draw:layer="layout" svg:x1="5.393cm" svg:y1="8.873cm" svg:x2="5.395cm" svg:y2="8.873cm">
          <text:p/>
        </draw:line>
        <draw:line draw:style-name="gr6" draw:text-style-name="P1" draw:layer="layout" svg:x1="5.435cm" svg:y1="8.873cm" svg:x2="5.437cm" svg:y2="8.873cm">
          <text:p/>
        </draw:line>
        <draw:line draw:style-name="gr6" draw:text-style-name="P1" draw:layer="layout" svg:x1="5.477cm" svg:y1="8.873cm" svg:x2="5.479cm" svg:y2="8.873cm">
          <text:p/>
        </draw:line>
        <draw:line draw:style-name="gr6" draw:text-style-name="P1" draw:layer="layout" svg:x1="5.519cm" svg:y1="8.873cm" svg:x2="5.521cm" svg:y2="8.873cm">
          <text:p/>
        </draw:line>
        <draw:line draw:style-name="gr6" draw:text-style-name="P1" draw:layer="layout" svg:x1="5.561cm" svg:y1="8.873cm" svg:x2="5.563cm" svg:y2="8.873cm">
          <text:p/>
        </draw:line>
        <draw:line draw:style-name="gr6" draw:text-style-name="P1" draw:layer="layout" svg:x1="5.603cm" svg:y1="8.873cm" svg:x2="5.605cm" svg:y2="8.873cm">
          <text:p/>
        </draw:line>
        <draw:line draw:style-name="gr6" draw:text-style-name="P1" draw:layer="layout" svg:x1="5.645cm" svg:y1="8.873cm" svg:x2="5.647cm" svg:y2="8.873cm">
          <text:p/>
        </draw:line>
        <draw:line draw:style-name="gr6" draw:text-style-name="P1" draw:layer="layout" svg:x1="5.687cm" svg:y1="8.873cm" svg:x2="5.689cm" svg:y2="8.873cm">
          <text:p/>
        </draw:line>
        <draw:line draw:style-name="gr6" draw:text-style-name="P1" draw:layer="layout" svg:x1="5.729cm" svg:y1="8.873cm" svg:x2="5.731cm" svg:y2="8.873cm">
          <text:p/>
        </draw:line>
        <draw:line draw:style-name="gr6" draw:text-style-name="P1" draw:layer="layout" svg:x1="5.771cm" svg:y1="8.873cm" svg:x2="5.773cm" svg:y2="8.873cm">
          <text:p/>
        </draw:line>
        <draw:line draw:style-name="gr6" draw:text-style-name="P1" draw:layer="layout" svg:x1="5.813cm" svg:y1="8.873cm" svg:x2="5.815cm" svg:y2="8.873cm">
          <text:p/>
        </draw:line>
        <draw:line draw:style-name="gr6" draw:text-style-name="P1" draw:layer="layout" svg:x1="5.855cm" svg:y1="8.873cm" svg:x2="5.857cm" svg:y2="8.873cm">
          <text:p/>
        </draw:line>
        <draw:line draw:style-name="gr6" draw:text-style-name="P1" draw:layer="layout" svg:x1="5.897cm" svg:y1="8.873cm" svg:x2="5.899cm" svg:y2="8.873cm">
          <text:p/>
        </draw:line>
        <draw:line draw:style-name="gr6" draw:text-style-name="P1" draw:layer="layout" svg:x1="5.939cm" svg:y1="8.873cm" svg:x2="5.941cm" svg:y2="8.873cm">
          <text:p/>
        </draw:line>
        <draw:line draw:style-name="gr6" draw:text-style-name="P1" draw:layer="layout" svg:x1="5.981cm" svg:y1="8.873cm" svg:x2="5.983cm" svg:y2="8.873cm">
          <text:p/>
        </draw:line>
        <draw:line draw:style-name="gr6" draw:text-style-name="P1" draw:layer="layout" svg:x1="6.023cm" svg:y1="8.873cm" svg:x2="6.025cm" svg:y2="8.873cm">
          <text:p/>
        </draw:line>
        <draw:line draw:style-name="gr6" draw:text-style-name="P1" draw:layer="layout" svg:x1="6.065cm" svg:y1="8.873cm" svg:x2="6.067cm" svg:y2="8.873cm">
          <text:p/>
        </draw:line>
        <draw:line draw:style-name="gr6" draw:text-style-name="P1" draw:layer="layout" svg:x1="6.107cm" svg:y1="8.873cm" svg:x2="6.109cm" svg:y2="8.873cm">
          <text:p/>
        </draw:line>
        <draw:line draw:style-name="gr6" draw:text-style-name="P1" draw:layer="layout" svg:x1="6.149cm" svg:y1="8.873cm" svg:x2="6.151cm" svg:y2="8.873cm">
          <text:p/>
        </draw:line>
        <draw:line draw:style-name="gr6" draw:text-style-name="P1" draw:layer="layout" svg:x1="6.191cm" svg:y1="8.873cm" svg:x2="6.193cm" svg:y2="8.873cm">
          <text:p/>
        </draw:line>
        <draw:line draw:style-name="gr6" draw:text-style-name="P1" draw:layer="layout" svg:x1="6.233cm" svg:y1="8.873cm" svg:x2="6.235cm" svg:y2="8.873cm">
          <text:p/>
        </draw:line>
        <draw:line draw:style-name="gr6" draw:text-style-name="P1" draw:layer="layout" svg:x1="6.275cm" svg:y1="8.873cm" svg:x2="6.277cm" svg:y2="8.873cm">
          <text:p/>
        </draw:line>
        <draw:line draw:style-name="gr6" draw:text-style-name="P1" draw:layer="layout" svg:x1="6.317cm" svg:y1="8.873cm" svg:x2="6.319cm" svg:y2="8.873cm">
          <text:p/>
        </draw:line>
        <draw:line draw:style-name="gr6" draw:text-style-name="P1" draw:layer="layout" svg:x1="6.359cm" svg:y1="8.873cm" svg:x2="6.361cm" svg:y2="8.873cm">
          <text:p/>
        </draw:line>
        <draw:line draw:style-name="gr6" draw:text-style-name="P1" draw:layer="layout" svg:x1="6.401cm" svg:y1="8.873cm" svg:x2="6.403cm" svg:y2="8.873cm">
          <text:p/>
        </draw:line>
        <draw:line draw:style-name="gr6" draw:text-style-name="P1" draw:layer="layout" svg:x1="6.443cm" svg:y1="8.873cm" svg:x2="6.445cm" svg:y2="8.873cm">
          <text:p/>
        </draw:line>
        <draw:line draw:style-name="gr6" draw:text-style-name="P1" draw:layer="layout" svg:x1="6.485cm" svg:y1="8.873cm" svg:x2="6.487cm" svg:y2="8.873cm">
          <text:p/>
        </draw:line>
        <draw:line draw:style-name="gr6" draw:text-style-name="P1" draw:layer="layout" svg:x1="6.527cm" svg:y1="8.873cm" svg:x2="6.529cm" svg:y2="8.873cm">
          <text:p/>
        </draw:line>
        <draw:line draw:style-name="gr6" draw:text-style-name="P1" draw:layer="layout" svg:x1="6.569cm" svg:y1="8.873cm" svg:x2="6.571cm" svg:y2="8.873cm">
          <text:p/>
        </draw:line>
        <draw:line draw:style-name="gr6" draw:text-style-name="P1" draw:layer="layout" svg:x1="6.611cm" svg:y1="8.873cm" svg:x2="6.613cm" svg:y2="8.873cm">
          <text:p/>
        </draw:line>
        <draw:line draw:style-name="gr6" draw:text-style-name="P1" draw:layer="layout" svg:x1="6.653cm" svg:y1="8.873cm" svg:x2="6.655cm" svg:y2="8.873cm">
          <text:p/>
        </draw:line>
        <draw:line draw:style-name="gr6" draw:text-style-name="P1" draw:layer="layout" svg:x1="6.695cm" svg:y1="8.873cm" svg:x2="6.697cm" svg:y2="8.873cm">
          <text:p/>
        </draw:line>
        <draw:line draw:style-name="gr6" draw:text-style-name="P1" draw:layer="layout" svg:x1="6.737cm" svg:y1="8.873cm" svg:x2="6.739cm" svg:y2="8.873cm">
          <text:p/>
        </draw:line>
        <draw:line draw:style-name="gr6" draw:text-style-name="P1" draw:layer="layout" svg:x1="6.779cm" svg:y1="8.873cm" svg:x2="6.781cm" svg:y2="8.873cm">
          <text:p/>
        </draw:line>
        <draw:line draw:style-name="gr6" draw:text-style-name="P1" draw:layer="layout" svg:x1="6.821cm" svg:y1="8.873cm" svg:x2="6.823cm" svg:y2="8.873cm">
          <text:p/>
        </draw:line>
        <draw:line draw:style-name="gr6" draw:text-style-name="P1" draw:layer="layout" svg:x1="6.863cm" svg:y1="8.873cm" svg:x2="6.865cm" svg:y2="8.873cm">
          <text:p/>
        </draw:line>
        <draw:line draw:style-name="gr6" draw:text-style-name="P1" draw:layer="layout" svg:x1="6.905cm" svg:y1="8.873cm" svg:x2="6.907cm" svg:y2="8.873cm">
          <text:p/>
        </draw:line>
        <draw:line draw:style-name="gr6" draw:text-style-name="P1" draw:layer="layout" svg:x1="6.947cm" svg:y1="8.873cm" svg:x2="6.949cm" svg:y2="8.873cm">
          <text:p/>
        </draw:line>
        <draw:line draw:style-name="gr6" draw:text-style-name="P1" draw:layer="layout" svg:x1="6.989cm" svg:y1="8.873cm" svg:x2="6.991cm" svg:y2="8.873cm">
          <text:p/>
        </draw:line>
        <draw:line draw:style-name="gr6" draw:text-style-name="P1" draw:layer="layout" svg:x1="7.031cm" svg:y1="8.873cm" svg:x2="7.033cm" svg:y2="8.873cm">
          <text:p/>
        </draw:line>
        <draw:line draw:style-name="gr6" draw:text-style-name="P1" draw:layer="layout" svg:x1="7.073cm" svg:y1="8.873cm" svg:x2="7.075cm" svg:y2="8.873cm">
          <text:p/>
        </draw:line>
        <draw:line draw:style-name="gr6" draw:text-style-name="P1" draw:layer="layout" svg:x1="7.115cm" svg:y1="8.873cm" svg:x2="7.117cm" svg:y2="8.873cm">
          <text:p/>
        </draw:line>
        <draw:line draw:style-name="gr6" draw:text-style-name="P1" draw:layer="layout" svg:x1="7.157cm" svg:y1="8.873cm" svg:x2="7.159cm" svg:y2="8.873cm">
          <text:p/>
        </draw:line>
        <draw:line draw:style-name="gr6" draw:text-style-name="P1" draw:layer="layout" svg:x1="7.199cm" svg:y1="8.873cm" svg:x2="7.201cm" svg:y2="8.873cm">
          <text:p/>
        </draw:line>
        <draw:line draw:style-name="gr6" draw:text-style-name="P1" draw:layer="layout" svg:x1="7.241cm" svg:y1="8.873cm" svg:x2="7.243cm" svg:y2="8.873cm">
          <text:p/>
        </draw:line>
        <draw:line draw:style-name="gr6" draw:text-style-name="P1" draw:layer="layout" svg:x1="7.283cm" svg:y1="8.873cm" svg:x2="7.285cm" svg:y2="8.873cm">
          <text:p/>
        </draw:line>
        <draw:line draw:style-name="gr6" draw:text-style-name="P1" draw:layer="layout" svg:x1="7.325cm" svg:y1="8.873cm" svg:x2="7.327cm" svg:y2="8.873cm">
          <text:p/>
        </draw:line>
        <draw:line draw:style-name="gr6" draw:text-style-name="P1" draw:layer="layout" svg:x1="7.367cm" svg:y1="8.873cm" svg:x2="7.369cm" svg:y2="8.873cm">
          <text:p/>
        </draw:line>
        <draw:line draw:style-name="gr6" draw:text-style-name="P1" draw:layer="layout" svg:x1="7.409cm" svg:y1="8.873cm" svg:x2="7.411cm" svg:y2="8.873cm">
          <text:p/>
        </draw:line>
        <draw:line draw:style-name="gr6" draw:text-style-name="P1" draw:layer="layout" svg:x1="7.451cm" svg:y1="8.873cm" svg:x2="7.453cm" svg:y2="8.873cm">
          <text:p/>
        </draw:line>
        <draw:line draw:style-name="gr6" draw:text-style-name="P1" draw:layer="layout" svg:x1="7.493cm" svg:y1="8.873cm" svg:x2="7.495cm" svg:y2="8.873cm">
          <text:p/>
        </draw:line>
        <draw:line draw:style-name="gr6" draw:text-style-name="P1" draw:layer="layout" svg:x1="7.535cm" svg:y1="8.873cm" svg:x2="7.537cm" svg:y2="8.873cm">
          <text:p/>
        </draw:line>
        <draw:line draw:style-name="gr6" draw:text-style-name="P1" draw:layer="layout" svg:x1="7.577cm" svg:y1="8.873cm" svg:x2="7.579cm" svg:y2="8.873cm">
          <text:p/>
        </draw:line>
        <draw:line draw:style-name="gr6" draw:text-style-name="P1" draw:layer="layout" svg:x1="7.619cm" svg:y1="8.873cm" svg:x2="7.621cm" svg:y2="8.873cm">
          <text:p/>
        </draw:line>
        <draw:line draw:style-name="gr6" draw:text-style-name="P1" draw:layer="layout" svg:x1="7.661cm" svg:y1="8.873cm" svg:x2="7.663cm" svg:y2="8.873cm">
          <text:p/>
        </draw:line>
        <draw:line draw:style-name="gr6" draw:text-style-name="P1" draw:layer="layout" svg:x1="7.703cm" svg:y1="8.873cm" svg:x2="7.705cm" svg:y2="8.873cm">
          <text:p/>
        </draw:line>
        <draw:line draw:style-name="gr6" draw:text-style-name="P1" draw:layer="layout" svg:x1="7.745cm" svg:y1="8.873cm" svg:x2="7.748cm" svg:y2="8.873cm">
          <text:p/>
        </draw:line>
        <draw:line draw:style-name="gr6" draw:text-style-name="P1" draw:layer="layout" svg:x1="7.787cm" svg:y1="8.873cm" svg:x2="7.789cm" svg:y2="8.873cm">
          <text:p/>
        </draw:line>
        <draw:line draw:style-name="gr6" draw:text-style-name="P1" draw:layer="layout" svg:x1="7.829cm" svg:y1="8.873cm" svg:x2="7.831cm" svg:y2="8.873cm">
          <text:p/>
        </draw:line>
        <draw:line draw:style-name="gr6" draw:text-style-name="P1" draw:layer="layout" svg:x1="7.871cm" svg:y1="8.873cm" svg:x2="7.873cm" svg:y2="8.873cm">
          <text:p/>
        </draw:line>
        <draw:line draw:style-name="gr6" draw:text-style-name="P1" draw:layer="layout" svg:x1="7.913cm" svg:y1="8.873cm" svg:x2="7.915cm" svg:y2="8.873cm">
          <text:p/>
        </draw:line>
        <draw:line draw:style-name="gr6" draw:text-style-name="P1" draw:layer="layout" svg:x1="7.955cm" svg:y1="8.873cm" svg:x2="7.957cm" svg:y2="8.873cm">
          <text:p/>
        </draw:line>
        <draw:line draw:style-name="gr6" draw:text-style-name="P1" draw:layer="layout" svg:x1="7.997cm" svg:y1="8.873cm" svg:x2="7.999cm" svg:y2="8.873cm">
          <text:p/>
        </draw:line>
        <draw:line draw:style-name="gr6" draw:text-style-name="P1" draw:layer="layout" svg:x1="8.039cm" svg:y1="8.873cm" svg:x2="8.041cm" svg:y2="8.873cm">
          <text:p/>
        </draw:line>
        <draw:line draw:style-name="gr6" draw:text-style-name="P1" draw:layer="layout" svg:x1="8.081cm" svg:y1="8.873cm" svg:x2="8.083cm" svg:y2="8.873cm">
          <text:p/>
        </draw:line>
        <draw:line draw:style-name="gr6" draw:text-style-name="P1" draw:layer="layout" svg:x1="8.123cm" svg:y1="8.873cm" svg:x2="8.125cm" svg:y2="8.873cm">
          <text:p/>
        </draw:line>
        <draw:line draw:style-name="gr6" draw:text-style-name="P1" draw:layer="layout" svg:x1="8.165cm" svg:y1="8.873cm" svg:x2="8.167cm" svg:y2="8.873cm">
          <text:p/>
        </draw:line>
        <draw:line draw:style-name="gr6" draw:text-style-name="P1" draw:layer="layout" svg:x1="8.207cm" svg:y1="8.873cm" svg:x2="8.209cm" svg:y2="8.873cm">
          <text:p/>
        </draw:line>
        <draw:line draw:style-name="gr6" draw:text-style-name="P1" draw:layer="layout" svg:x1="8.249cm" svg:y1="8.873cm" svg:x2="8.251cm" svg:y2="8.873cm">
          <text:p/>
        </draw:line>
        <draw:line draw:style-name="gr6" draw:text-style-name="P1" draw:layer="layout" svg:x1="8.291cm" svg:y1="8.873cm" svg:x2="8.293cm" svg:y2="8.873cm">
          <text:p/>
        </draw:line>
        <draw:line draw:style-name="gr6" draw:text-style-name="P1" draw:layer="layout" svg:x1="8.333cm" svg:y1="8.873cm" svg:x2="8.335cm" svg:y2="8.873cm">
          <text:p/>
        </draw:line>
        <draw:line draw:style-name="gr6" draw:text-style-name="P1" draw:layer="layout" svg:x1="8.375cm" svg:y1="8.873cm" svg:x2="8.377cm" svg:y2="8.873cm">
          <text:p/>
        </draw:line>
        <draw:line draw:style-name="gr6" draw:text-style-name="P1" draw:layer="layout" svg:x1="8.417cm" svg:y1="8.873cm" svg:x2="8.419cm" svg:y2="8.873cm">
          <text:p/>
        </draw:line>
        <draw:line draw:style-name="gr6" draw:text-style-name="P1" draw:layer="layout" svg:x1="8.459cm" svg:y1="8.873cm" svg:x2="8.461cm" svg:y2="8.873cm">
          <text:p/>
        </draw:line>
        <draw:line draw:style-name="gr6" draw:text-style-name="P1" draw:layer="layout" svg:x1="8.501cm" svg:y1="8.873cm" svg:x2="8.503cm" svg:y2="8.873cm">
          <text:p/>
        </draw:line>
        <draw:line draw:style-name="gr6" draw:text-style-name="P1" draw:layer="layout" svg:x1="8.543cm" svg:y1="8.873cm" svg:x2="8.545cm" svg:y2="8.873cm">
          <text:p/>
        </draw:line>
        <draw:line draw:style-name="gr6" draw:text-style-name="P1" draw:layer="layout" svg:x1="8.585cm" svg:y1="8.873cm" svg:x2="8.587cm" svg:y2="8.873cm">
          <text:p/>
        </draw:line>
        <draw:line draw:style-name="gr6" draw:text-style-name="P1" draw:layer="layout" svg:x1="8.628cm" svg:y1="8.873cm" svg:x2="8.629cm" svg:y2="8.873cm">
          <text:p/>
        </draw:line>
        <draw:line draw:style-name="gr6" draw:text-style-name="P1" draw:layer="layout" svg:x1="8.669cm" svg:y1="8.873cm" svg:x2="8.671cm" svg:y2="8.873cm">
          <text:p/>
        </draw:line>
        <draw:line draw:style-name="gr6" draw:text-style-name="P1" draw:layer="layout" svg:x1="8.711cm" svg:y1="8.873cm" svg:x2="8.713cm" svg:y2="8.873cm">
          <text:p/>
        </draw:line>
        <draw:line draw:style-name="gr6" draw:text-style-name="P1" draw:layer="layout" svg:x1="8.753cm" svg:y1="8.873cm" svg:x2="8.755cm" svg:y2="8.873cm">
          <text:p/>
        </draw:line>
        <draw:line draw:style-name="gr6" draw:text-style-name="P1" draw:layer="layout" svg:x1="8.795cm" svg:y1="8.873cm" svg:x2="8.797cm" svg:y2="8.873cm">
          <text:p/>
        </draw:line>
        <draw:line draw:style-name="gr6" draw:text-style-name="P1" draw:layer="layout" svg:x1="8.837cm" svg:y1="8.873cm" svg:x2="8.839cm" svg:y2="8.873cm">
          <text:p/>
        </draw:line>
        <draw:line draw:style-name="gr6" draw:text-style-name="P1" draw:layer="layout" svg:x1="8.879cm" svg:y1="8.873cm" svg:x2="8.882cm" svg:y2="8.873cm">
          <text:p/>
        </draw:line>
        <draw:line draw:style-name="gr6" draw:text-style-name="P1" draw:layer="layout" svg:x1="8.921cm" svg:y1="8.873cm" svg:x2="8.923cm" svg:y2="8.873cm">
          <text:p/>
        </draw:line>
        <draw:line draw:style-name="gr6" draw:text-style-name="P1" draw:layer="layout" svg:x1="8.963cm" svg:y1="8.873cm" svg:x2="8.965cm" svg:y2="8.873cm">
          <text:p/>
        </draw:line>
        <draw:line draw:style-name="gr6" draw:text-style-name="P1" draw:layer="layout" svg:x1="9.005cm" svg:y1="8.873cm" svg:x2="9.007cm" svg:y2="8.873cm">
          <text:p/>
        </draw:line>
        <draw:line draw:style-name="gr6" draw:text-style-name="P1" draw:layer="layout" svg:x1="9.047cm" svg:y1="8.873cm" svg:x2="9.049cm" svg:y2="8.873cm">
          <text:p/>
        </draw:line>
        <draw:line draw:style-name="gr6" draw:text-style-name="P1" draw:layer="layout" svg:x1="9.089cm" svg:y1="8.873cm" svg:x2="9.091cm" svg:y2="8.873cm">
          <text:p/>
        </draw:line>
        <draw:line draw:style-name="gr6" draw:text-style-name="P1" draw:layer="layout" svg:x1="9.131cm" svg:y1="8.873cm" svg:x2="9.133cm" svg:y2="8.873cm">
          <text:p/>
        </draw:line>
        <draw:line draw:style-name="gr6" draw:text-style-name="P1" draw:layer="layout" svg:x1="9.173cm" svg:y1="8.873cm" svg:x2="9.175cm" svg:y2="8.873cm">
          <text:p/>
        </draw:line>
        <draw:line draw:style-name="gr6" draw:text-style-name="P1" draw:layer="layout" svg:x1="9.215cm" svg:y1="8.873cm" svg:x2="9.217cm" svg:y2="8.873cm">
          <text:p/>
        </draw:line>
        <draw:line draw:style-name="gr6" draw:text-style-name="P1" draw:layer="layout" svg:x1="9.257cm" svg:y1="8.873cm" svg:x2="9.259cm" svg:y2="8.873cm">
          <text:p/>
        </draw:line>
        <draw:line draw:style-name="gr6" draw:text-style-name="P1" draw:layer="layout" svg:x1="9.299cm" svg:y1="8.873cm" svg:x2="9.301cm" svg:y2="8.873cm">
          <text:p/>
        </draw:line>
        <draw:line draw:style-name="gr6" draw:text-style-name="P1" draw:layer="layout" svg:x1="9.341cm" svg:y1="8.873cm" svg:x2="9.343cm" svg:y2="8.873cm">
          <text:p/>
        </draw:line>
        <draw:line draw:style-name="gr6" draw:text-style-name="P1" draw:layer="layout" svg:x1="9.383cm" svg:y1="8.873cm" svg:x2="9.385cm" svg:y2="8.873cm">
          <text:p/>
        </draw:line>
        <draw:line draw:style-name="gr6" draw:text-style-name="P1" draw:layer="layout" svg:x1="9.425cm" svg:y1="8.873cm" svg:x2="9.427cm" svg:y2="8.873cm">
          <text:p/>
        </draw:line>
        <draw:line draw:style-name="gr6" draw:text-style-name="P1" draw:layer="layout" svg:x1="9.467cm" svg:y1="8.873cm" svg:x2="9.469cm" svg:y2="8.873cm">
          <text:p/>
        </draw:line>
        <draw:line draw:style-name="gr6" draw:text-style-name="P1" draw:layer="layout" svg:x1="9.509cm" svg:y1="8.873cm" svg:x2="9.511cm" svg:y2="8.873cm">
          <text:p/>
        </draw:line>
        <draw:line draw:style-name="gr6" draw:text-style-name="P1" draw:layer="layout" svg:x1="9.551cm" svg:y1="8.873cm" svg:x2="9.553cm" svg:y2="8.873cm">
          <text:p/>
        </draw:line>
        <draw:line draw:style-name="gr6" draw:text-style-name="P1" draw:layer="layout" svg:x1="9.593cm" svg:y1="8.873cm" svg:x2="9.595cm" svg:y2="8.873cm">
          <text:p/>
        </draw:line>
        <draw:line draw:style-name="gr6" draw:text-style-name="P1" draw:layer="layout" svg:x1="9.635cm" svg:y1="8.873cm" svg:x2="9.637cm" svg:y2="8.873cm">
          <text:p/>
        </draw:line>
        <draw:line draw:style-name="gr6" draw:text-style-name="P1" draw:layer="layout" svg:x1="9.677cm" svg:y1="8.873cm" svg:x2="9.679cm" svg:y2="8.873cm">
          <text:p/>
        </draw:line>
        <draw:line draw:style-name="gr6" draw:text-style-name="P1" draw:layer="layout" svg:x1="9.719cm" svg:y1="8.873cm" svg:x2="9.721cm" svg:y2="8.873cm">
          <text:p/>
        </draw:line>
        <draw:line draw:style-name="gr6" draw:text-style-name="P1" draw:layer="layout" svg:x1="9.761cm" svg:y1="8.873cm" svg:x2="9.763cm" svg:y2="8.873cm">
          <text:p/>
        </draw:line>
        <draw:line draw:style-name="gr6" draw:text-style-name="P1" draw:layer="layout" svg:x1="9.803cm" svg:y1="8.873cm" svg:x2="9.805cm" svg:y2="8.873cm">
          <text:p/>
        </draw:line>
        <draw:line draw:style-name="gr6" draw:text-style-name="P1" draw:layer="layout" svg:x1="9.845cm" svg:y1="8.873cm" svg:x2="9.847cm" svg:y2="8.873cm">
          <text:p/>
        </draw:line>
        <draw:line draw:style-name="gr6" draw:text-style-name="P1" draw:layer="layout" svg:x1="9.887cm" svg:y1="8.873cm" svg:x2="9.889cm" svg:y2="8.873cm">
          <text:p/>
        </draw:line>
        <draw:line draw:style-name="gr6" draw:text-style-name="P1" draw:layer="layout" svg:x1="9.929cm" svg:y1="8.873cm" svg:x2="9.931cm" svg:y2="8.873cm">
          <text:p/>
        </draw:line>
        <draw:line draw:style-name="gr6" draw:text-style-name="P1" draw:layer="layout" svg:x1="9.971cm" svg:y1="8.873cm" svg:x2="9.973cm" svg:y2="8.873cm">
          <text:p/>
        </draw:line>
        <draw:line draw:style-name="gr6" draw:text-style-name="P1" draw:layer="layout" svg:x1="10.013cm" svg:y1="8.873cm" svg:x2="10.015cm" svg:y2="8.873cm">
          <text:p/>
        </draw:line>
        <draw:line draw:style-name="gr6" draw:text-style-name="P1" draw:layer="layout" svg:x1="10.055cm" svg:y1="8.873cm" svg:x2="10.057cm" svg:y2="8.873cm">
          <text:p/>
        </draw:line>
        <draw:line draw:style-name="gr6" draw:text-style-name="P1" draw:layer="layout" svg:x1="10.097cm" svg:y1="8.873cm" svg:x2="10.099cm" svg:y2="8.873cm">
          <text:p/>
        </draw:line>
        <draw:line draw:style-name="gr6" draw:text-style-name="P1" draw:layer="layout" svg:x1="10.139cm" svg:y1="8.873cm" svg:x2="10.141cm" svg:y2="8.873cm">
          <text:p/>
        </draw:line>
        <draw:line draw:style-name="gr6" draw:text-style-name="P1" draw:layer="layout" svg:x1="10.181cm" svg:y1="8.873cm" svg:x2="10.183cm" svg:y2="8.873cm">
          <text:p/>
        </draw:line>
        <draw:line draw:style-name="gr6" draw:text-style-name="P1" draw:layer="layout" svg:x1="10.223cm" svg:y1="8.873cm" svg:x2="10.225cm" svg:y2="8.873cm">
          <text:p/>
        </draw:line>
        <draw:line draw:style-name="gr6" draw:text-style-name="P1" draw:layer="layout" svg:x1="10.265cm" svg:y1="8.873cm" svg:x2="10.267cm" svg:y2="8.873cm">
          <text:p/>
        </draw:line>
        <draw:line draw:style-name="gr6" draw:text-style-name="P1" draw:layer="layout" svg:x1="10.307cm" svg:y1="8.873cm" svg:x2="10.309cm" svg:y2="8.873cm">
          <text:p/>
        </draw:line>
        <draw:line draw:style-name="gr6" draw:text-style-name="P1" draw:layer="layout" svg:x1="10.349cm" svg:y1="8.873cm" svg:x2="10.351cm" svg:y2="8.873cm">
          <text:p/>
        </draw:line>
        <draw:line draw:style-name="gr6" draw:text-style-name="P1" draw:layer="layout" svg:x1="10.391cm" svg:y1="8.873cm" svg:x2="10.393cm" svg:y2="8.873cm">
          <text:p/>
        </draw:line>
        <draw:line draw:style-name="gr6" draw:text-style-name="P1" draw:layer="layout" svg:x1="10.433cm" svg:y1="8.873cm" svg:x2="10.435cm" svg:y2="8.873cm">
          <text:p/>
        </draw:line>
        <draw:line draw:style-name="gr6" draw:text-style-name="P1" draw:layer="layout" svg:x1="10.475cm" svg:y1="8.873cm" svg:x2="10.477cm" svg:y2="8.873cm">
          <text:p/>
        </draw:line>
        <draw:line draw:style-name="gr6" draw:text-style-name="P1" draw:layer="layout" svg:x1="10.517cm" svg:y1="8.873cm" svg:x2="10.519cm" svg:y2="8.873cm">
          <text:p/>
        </draw:line>
        <draw:line draw:style-name="gr6" draw:text-style-name="P1" draw:layer="layout" svg:x1="10.559cm" svg:y1="8.873cm" svg:x2="10.561cm" svg:y2="8.873cm">
          <text:p/>
        </draw:line>
        <draw:line draw:style-name="gr6" draw:text-style-name="P1" draw:layer="layout" svg:x1="10.601cm" svg:y1="8.873cm" svg:x2="10.603cm" svg:y2="8.873cm">
          <text:p/>
        </draw:line>
        <draw:line draw:style-name="gr6" draw:text-style-name="P1" draw:layer="layout" svg:x1="10.643cm" svg:y1="8.873cm" svg:x2="10.645cm" svg:y2="8.873cm">
          <text:p/>
        </draw:line>
        <draw:line draw:style-name="gr6" draw:text-style-name="P1" draw:layer="layout" svg:x1="10.685cm" svg:y1="8.873cm" svg:x2="10.687cm" svg:y2="8.873cm">
          <text:p/>
        </draw:line>
        <draw:line draw:style-name="gr6" draw:text-style-name="P1" draw:layer="layout" svg:x1="10.727cm" svg:y1="8.873cm" svg:x2="10.729cm" svg:y2="8.873cm">
          <text:p/>
        </draw:line>
        <draw:line draw:style-name="gr6" draw:text-style-name="P1" draw:layer="layout" svg:x1="10.769cm" svg:y1="8.873cm" svg:x2="10.771cm" svg:y2="8.873cm">
          <text:p/>
        </draw:line>
        <draw:line draw:style-name="gr6" draw:text-style-name="P1" draw:layer="layout" svg:x1="10.811cm" svg:y1="8.873cm" svg:x2="10.813cm" svg:y2="8.873cm">
          <text:p/>
        </draw:line>
        <draw:line draw:style-name="gr6" draw:text-style-name="P1" draw:layer="layout" svg:x1="10.853cm" svg:y1="8.873cm" svg:x2="10.855cm" svg:y2="8.873cm">
          <text:p/>
        </draw:line>
        <draw:line draw:style-name="gr6" draw:text-style-name="P1" draw:layer="layout" svg:x1="10.895cm" svg:y1="8.873cm" svg:x2="10.897cm" svg:y2="8.873cm">
          <text:p/>
        </draw:line>
        <draw:line draw:style-name="gr6" draw:text-style-name="P1" draw:layer="layout" svg:x1="10.937cm" svg:y1="8.873cm" svg:x2="10.939cm" svg:y2="8.873cm">
          <text:p/>
        </draw:line>
        <draw:line draw:style-name="gr6" draw:text-style-name="P1" draw:layer="layout" svg:x1="10.979cm" svg:y1="8.873cm" svg:x2="10.981cm" svg:y2="8.873cm">
          <text:p/>
        </draw:line>
        <draw:line draw:style-name="gr6" draw:text-style-name="P1" draw:layer="layout" svg:x1="11.021cm" svg:y1="8.873cm" svg:x2="11.023cm" svg:y2="8.873cm">
          <text:p/>
        </draw:line>
        <draw:line draw:style-name="gr6" draw:text-style-name="P1" draw:layer="layout" svg:x1="11.063cm" svg:y1="8.873cm" svg:x2="11.065cm" svg:y2="8.873cm">
          <text:p/>
        </draw:line>
        <draw:line draw:style-name="gr6" draw:text-style-name="P1" draw:layer="layout" svg:x1="11.105cm" svg:y1="8.873cm" svg:x2="11.107cm" svg:y2="8.873cm">
          <text:p/>
        </draw:line>
        <draw:line draw:style-name="gr6" draw:text-style-name="P1" draw:layer="layout" svg:x1="11.147cm" svg:y1="8.873cm" svg:x2="11.149cm" svg:y2="8.873cm">
          <text:p/>
        </draw:line>
        <draw:line draw:style-name="gr6" draw:text-style-name="P1" draw:layer="layout" svg:x1="11.189cm" svg:y1="8.873cm" svg:x2="11.191cm" svg:y2="8.873cm">
          <text:p/>
        </draw:line>
        <draw:line draw:style-name="gr6" draw:text-style-name="P1" draw:layer="layout" svg:x1="11.231cm" svg:y1="8.873cm" svg:x2="11.233cm" svg:y2="8.873cm">
          <text:p/>
        </draw:line>
        <draw:line draw:style-name="gr6" draw:text-style-name="P1" draw:layer="layout" svg:x1="11.273cm" svg:y1="8.873cm" svg:x2="11.275cm" svg:y2="8.873cm">
          <text:p/>
        </draw:line>
        <draw:line draw:style-name="gr6" draw:text-style-name="P1" draw:layer="layout" svg:x1="11.315cm" svg:y1="8.873cm" svg:x2="11.317cm" svg:y2="8.873cm">
          <text:p/>
        </draw:line>
        <draw:line draw:style-name="gr6" draw:text-style-name="P1" draw:layer="layout" svg:x1="11.357cm" svg:y1="8.873cm" svg:x2="11.359cm" svg:y2="8.873cm">
          <text:p/>
        </draw:line>
        <draw:line draw:style-name="gr6" draw:text-style-name="P1" draw:layer="layout" svg:x1="11.399cm" svg:y1="8.873cm" svg:x2="11.401cm" svg:y2="8.873cm">
          <text:p/>
        </draw:line>
        <draw:line draw:style-name="gr6" draw:text-style-name="P1" draw:layer="layout" svg:x1="11.441cm" svg:y1="8.873cm" svg:x2="11.443cm" svg:y2="8.873cm">
          <text:p/>
        </draw:line>
        <draw:line draw:style-name="gr6" draw:text-style-name="P1" draw:layer="layout" svg:x1="11.483cm" svg:y1="8.873cm" svg:x2="11.485cm" svg:y2="8.873cm">
          <text:p/>
        </draw:line>
        <draw:line draw:style-name="gr6" draw:text-style-name="P1" draw:layer="layout" svg:x1="11.525cm" svg:y1="8.873cm" svg:x2="11.527cm" svg:y2="8.873cm">
          <text:p/>
        </draw:line>
        <draw:line draw:style-name="gr6" draw:text-style-name="P1" draw:layer="layout" svg:x1="11.567cm" svg:y1="8.873cm" svg:x2="11.569cm" svg:y2="8.873cm">
          <text:p/>
        </draw:line>
        <draw:line draw:style-name="gr6" draw:text-style-name="P1" draw:layer="layout" svg:x1="11.609cm" svg:y1="8.873cm" svg:x2="11.611cm" svg:y2="8.873cm">
          <text:p/>
        </draw:line>
        <draw:line draw:style-name="gr6" draw:text-style-name="P1" draw:layer="layout" svg:x1="11.651cm" svg:y1="8.873cm" svg:x2="11.653cm" svg:y2="8.873cm">
          <text:p/>
        </draw:line>
        <draw:line draw:style-name="gr6" draw:text-style-name="P1" draw:layer="layout" svg:x1="11.693cm" svg:y1="8.873cm" svg:x2="11.695cm" svg:y2="8.873cm">
          <text:p/>
        </draw:line>
        <draw:line draw:style-name="gr6" draw:text-style-name="P1" draw:layer="layout" svg:x1="11.735cm" svg:y1="8.873cm" svg:x2="11.737cm" svg:y2="8.873cm">
          <text:p/>
        </draw:line>
        <draw:line draw:style-name="gr6" draw:text-style-name="P1" draw:layer="layout" svg:x1="11.777cm" svg:y1="8.873cm" svg:x2="11.779cm" svg:y2="8.873cm">
          <text:p/>
        </draw:line>
        <draw:line draw:style-name="gr6" draw:text-style-name="P1" draw:layer="layout" svg:x1="11.819cm" svg:y1="8.873cm" svg:x2="11.821cm" svg:y2="8.873cm">
          <text:p/>
        </draw:line>
        <draw:line draw:style-name="gr6" draw:text-style-name="P1" draw:layer="layout" svg:x1="11.861cm" svg:y1="8.873cm" svg:x2="11.863cm" svg:y2="8.873cm">
          <text:p/>
        </draw:line>
        <draw:line draw:style-name="gr6" draw:text-style-name="P1" draw:layer="layout" svg:x1="11.903cm" svg:y1="8.873cm" svg:x2="11.905cm" svg:y2="8.873cm">
          <text:p/>
        </draw:line>
        <draw:line draw:style-name="gr6" draw:text-style-name="P1" draw:layer="layout" svg:x1="11.945cm" svg:y1="8.873cm" svg:x2="11.947cm" svg:y2="8.873cm">
          <text:p/>
        </draw:line>
        <draw:line draw:style-name="gr6" draw:text-style-name="P1" draw:layer="layout" svg:x1="11.987cm" svg:y1="8.873cm" svg:x2="11.989cm" svg:y2="8.873cm">
          <text:p/>
        </draw:line>
        <draw:line draw:style-name="gr6" draw:text-style-name="P1" draw:layer="layout" svg:x1="12.029cm" svg:y1="8.873cm" svg:x2="12.031cm" svg:y2="8.873cm">
          <text:p/>
        </draw:line>
        <draw:line draw:style-name="gr6" draw:text-style-name="P1" draw:layer="layout" svg:x1="12.071cm" svg:y1="8.873cm" svg:x2="12.073cm" svg:y2="8.873cm">
          <text:p/>
        </draw:line>
        <draw:line draw:style-name="gr6" draw:text-style-name="P1" draw:layer="layout" svg:x1="12.113cm" svg:y1="8.873cm" svg:x2="12.115cm" svg:y2="8.873cm">
          <text:p/>
        </draw:line>
        <draw:line draw:style-name="gr6" draw:text-style-name="P1" draw:layer="layout" svg:x1="12.155cm" svg:y1="8.873cm" svg:x2="12.157cm" svg:y2="8.873cm">
          <text:p/>
        </draw:line>
        <draw:line draw:style-name="gr6" draw:text-style-name="P1" draw:layer="layout" svg:x1="12.197cm" svg:y1="8.873cm" svg:x2="12.199cm" svg:y2="8.873cm">
          <text:p/>
        </draw:line>
        <draw:line draw:style-name="gr6" draw:text-style-name="P1" draw:layer="layout" svg:x1="12.239cm" svg:y1="8.873cm" svg:x2="12.241cm" svg:y2="8.873cm">
          <text:p/>
        </draw:line>
        <draw:line draw:style-name="gr6" draw:text-style-name="P1" draw:layer="layout" svg:x1="12.281cm" svg:y1="8.873cm" svg:x2="12.283cm" svg:y2="8.873cm">
          <text:p/>
        </draw:line>
        <draw:line draw:style-name="gr6" draw:text-style-name="P1" draw:layer="layout" svg:x1="12.323cm" svg:y1="8.873cm" svg:x2="12.325cm" svg:y2="8.873cm">
          <text:p/>
        </draw:line>
        <draw:line draw:style-name="gr6" draw:text-style-name="P1" draw:layer="layout" svg:x1="12.365cm" svg:y1="8.873cm" svg:x2="12.367cm" svg:y2="8.873cm">
          <text:p/>
        </draw:line>
        <draw:line draw:style-name="gr6" draw:text-style-name="P1" draw:layer="layout" svg:x1="12.407cm" svg:y1="8.873cm" svg:x2="12.409cm" svg:y2="8.873cm">
          <text:p/>
        </draw:line>
        <draw:line draw:style-name="gr6" draw:text-style-name="P1" draw:layer="layout" svg:x1="12.449cm" svg:y1="8.873cm" svg:x2="12.451cm" svg:y2="8.873cm">
          <text:p/>
        </draw:line>
        <draw:line draw:style-name="gr6" draw:text-style-name="P1" draw:layer="layout" svg:x1="12.491cm" svg:y1="8.873cm" svg:x2="12.493cm" svg:y2="8.873cm">
          <text:p/>
        </draw:line>
        <draw:line draw:style-name="gr6" draw:text-style-name="P1" draw:layer="layout" svg:x1="12.533cm" svg:y1="8.873cm" svg:x2="12.535cm" svg:y2="8.873cm">
          <text:p/>
        </draw:line>
        <draw:line draw:style-name="gr6" draw:text-style-name="P1" draw:layer="layout" svg:x1="12.575cm" svg:y1="8.873cm" svg:x2="12.577cm" svg:y2="8.873cm">
          <text:p/>
        </draw:line>
        <draw:line draw:style-name="gr6" draw:text-style-name="P1" draw:layer="layout" svg:x1="12.617cm" svg:y1="8.873cm" svg:x2="12.619cm" svg:y2="8.873cm">
          <text:p/>
        </draw:line>
        <draw:line draw:style-name="gr6" draw:text-style-name="P1" draw:layer="layout" svg:x1="12.659cm" svg:y1="8.873cm" svg:x2="12.661cm" svg:y2="8.873cm">
          <text:p/>
        </draw:line>
        <draw:line draw:style-name="gr6" draw:text-style-name="P1" draw:layer="layout" svg:x1="12.701cm" svg:y1="8.873cm" svg:x2="12.703cm" svg:y2="8.873cm">
          <text:p/>
        </draw:line>
        <draw:line draw:style-name="gr6" draw:text-style-name="P1" draw:layer="layout" svg:x1="12.743cm" svg:y1="8.873cm" svg:x2="12.745cm" svg:y2="8.873cm">
          <text:p/>
        </draw:line>
        <draw:line draw:style-name="gr6" draw:text-style-name="P1" draw:layer="layout" svg:x1="12.785cm" svg:y1="8.873cm" svg:x2="12.787cm" svg:y2="8.873cm">
          <text:p/>
        </draw:line>
        <draw:line draw:style-name="gr6" draw:text-style-name="P1" draw:layer="layout" svg:x1="12.828cm" svg:y1="8.873cm" svg:x2="12.829cm" svg:y2="8.873cm">
          <text:p/>
        </draw:line>
        <draw:line draw:style-name="gr6" draw:text-style-name="P1" draw:layer="layout" svg:x1="12.869cm" svg:y1="8.873cm" svg:x2="12.871cm" svg:y2="8.873cm">
          <text:p/>
        </draw:line>
        <draw:line draw:style-name="gr6" draw:text-style-name="P1" draw:layer="layout" svg:x1="12.911cm" svg:y1="8.873cm" svg:x2="12.913cm" svg:y2="8.873cm">
          <text:p/>
        </draw:line>
        <draw:line draw:style-name="gr6" draw:text-style-name="P1" draw:layer="layout" svg:x1="12.953cm" svg:y1="8.873cm" svg:x2="12.955cm" svg:y2="8.873cm">
          <text:p/>
        </draw:line>
        <draw:line draw:style-name="gr6" draw:text-style-name="P1" draw:layer="layout" svg:x1="12.995cm" svg:y1="8.873cm" svg:x2="12.997cm" svg:y2="8.873cm">
          <text:p/>
        </draw:line>
        <draw:line draw:style-name="gr6" draw:text-style-name="P1" draw:layer="layout" svg:x1="13.037cm" svg:y1="8.873cm" svg:x2="13.039cm" svg:y2="8.873cm">
          <text:p/>
        </draw:line>
        <draw:line draw:style-name="gr6" draw:text-style-name="P1" draw:layer="layout" svg:x1="13.079cm" svg:y1="8.873cm" svg:x2="13.081cm" svg:y2="8.873cm">
          <text:p/>
        </draw:line>
        <draw:line draw:style-name="gr6" draw:text-style-name="P1" draw:layer="layout" svg:x1="13.121cm" svg:y1="8.873cm" svg:x2="13.123cm" svg:y2="8.873cm">
          <text:p/>
        </draw:line>
        <draw:line draw:style-name="gr6" draw:text-style-name="P1" draw:layer="layout" svg:x1="13.163cm" svg:y1="8.873cm" svg:x2="13.165cm" svg:y2="8.873cm">
          <text:p/>
        </draw:line>
        <draw:line draw:style-name="gr6" draw:text-style-name="P1" draw:layer="layout" svg:x1="13.205cm" svg:y1="8.873cm" svg:x2="13.207cm" svg:y2="8.873cm">
          <text:p/>
        </draw:line>
        <draw:line draw:style-name="gr6" draw:text-style-name="P1" draw:layer="layout" svg:x1="13.247cm" svg:y1="8.873cm" svg:x2="13.249cm" svg:y2="8.873cm">
          <text:p/>
        </draw:line>
        <draw:line draw:style-name="gr6" draw:text-style-name="P1" draw:layer="layout" svg:x1="13.289cm" svg:y1="8.873cm" svg:x2="13.291cm" svg:y2="8.873cm">
          <text:p/>
        </draw:line>
        <draw:line draw:style-name="gr6" draw:text-style-name="P1" draw:layer="layout" svg:x1="13.331cm" svg:y1="8.873cm" svg:x2="13.333cm" svg:y2="8.873cm">
          <text:p/>
        </draw:line>
        <draw:line draw:style-name="gr6" draw:text-style-name="P1" draw:layer="layout" svg:x1="13.373cm" svg:y1="8.873cm" svg:x2="13.375cm" svg:y2="8.873cm">
          <text:p/>
        </draw:line>
        <draw:line draw:style-name="gr6" draw:text-style-name="P1" draw:layer="layout" svg:x1="13.415cm" svg:y1="8.873cm" svg:x2="13.417cm" svg:y2="8.873cm">
          <text:p/>
        </draw:line>
        <draw:line draw:style-name="gr6" draw:text-style-name="P1" draw:layer="layout" svg:x1="13.457cm" svg:y1="8.873cm" svg:x2="13.459cm" svg:y2="8.873cm">
          <text:p/>
        </draw:line>
        <draw:line draw:style-name="gr6" draw:text-style-name="P1" draw:layer="layout" svg:x1="13.499cm" svg:y1="8.873cm" svg:x2="13.501cm" svg:y2="8.873cm">
          <text:p/>
        </draw:line>
        <draw:line draw:style-name="gr6" draw:text-style-name="P1" draw:layer="layout" svg:x1="13.541cm" svg:y1="8.873cm" svg:x2="13.543cm" svg:y2="8.873cm">
          <text:p/>
        </draw:line>
        <draw:line draw:style-name="gr6" draw:text-style-name="P1" draw:layer="layout" svg:x1="13.583cm" svg:y1="8.873cm" svg:x2="13.585cm" svg:y2="8.873cm">
          <text:p/>
        </draw:line>
        <draw:line draw:style-name="gr6" draw:text-style-name="P1" draw:layer="layout" svg:x1="13.625cm" svg:y1="8.873cm" svg:x2="13.627cm" svg:y2="8.873cm">
          <text:p/>
        </draw:line>
        <draw:line draw:style-name="gr6" draw:text-style-name="P1" draw:layer="layout" svg:x1="13.667cm" svg:y1="8.873cm" svg:x2="13.669cm" svg:y2="8.873cm">
          <text:p/>
        </draw:line>
        <draw:line draw:style-name="gr6" draw:text-style-name="P1" draw:layer="layout" svg:x1="13.709cm" svg:y1="8.873cm" svg:x2="13.711cm" svg:y2="8.873cm">
          <text:p/>
        </draw:line>
        <draw:line draw:style-name="gr6" draw:text-style-name="P1" draw:layer="layout" svg:x1="13.751cm" svg:y1="8.873cm" svg:x2="13.753cm" svg:y2="8.873cm">
          <text:p/>
        </draw:line>
        <draw:line draw:style-name="gr6" draw:text-style-name="P1" draw:layer="layout" svg:x1="13.793cm" svg:y1="8.873cm" svg:x2="13.795cm" svg:y2="8.873cm">
          <text:p/>
        </draw:line>
        <draw:line draw:style-name="gr6" draw:text-style-name="P1" draw:layer="layout" svg:x1="13.835cm" svg:y1="8.873cm" svg:x2="13.837cm" svg:y2="8.873cm">
          <text:p/>
        </draw:line>
        <draw:line draw:style-name="gr6" draw:text-style-name="P1" draw:layer="layout" svg:x1="13.877cm" svg:y1="8.873cm" svg:x2="13.879cm" svg:y2="8.873cm">
          <text:p/>
        </draw:line>
        <draw:line draw:style-name="gr6" draw:text-style-name="P1" draw:layer="layout" svg:x1="13.919cm" svg:y1="8.873cm" svg:x2="13.921cm" svg:y2="8.873cm">
          <text:p/>
        </draw:line>
        <draw:line draw:style-name="gr6" draw:text-style-name="P1" draw:layer="layout" svg:x1="13.962cm" svg:y1="8.873cm" svg:x2="13.963cm" svg:y2="8.873cm">
          <text:p/>
        </draw:line>
        <draw:line draw:style-name="gr6" draw:text-style-name="P1" draw:layer="layout" svg:x1="14.003cm" svg:y1="8.873cm" svg:x2="14.005cm" svg:y2="8.873cm">
          <text:p/>
        </draw:line>
        <draw:line draw:style-name="gr6" draw:text-style-name="P1" draw:layer="layout" svg:x1="14.045cm" svg:y1="8.873cm" svg:x2="14.047cm" svg:y2="8.873cm">
          <text:p/>
        </draw:line>
        <draw:line draw:style-name="gr6" draw:text-style-name="P1" draw:layer="layout" svg:x1="14.087cm" svg:y1="8.873cm" svg:x2="14.089cm" svg:y2="8.873cm">
          <text:p/>
        </draw:line>
        <draw:line draw:style-name="gr6" draw:text-style-name="P1" draw:layer="layout" svg:x1="14.129cm" svg:y1="8.873cm" svg:x2="14.131cm" svg:y2="8.873cm">
          <text:p/>
        </draw:line>
        <draw:path draw:style-name="gr4" draw:text-style-name="P1" draw:layer="layout" svg:width="0.092cm" svg:height="0.128cm" svg:x="5.514cm" svg:y="3.486cm" svg:viewBox="0 0 93 129" svg:d="M86 0c12 29 9 62-8 88-18 25-47 41-78 41">
          <text:p/>
        </draw:path>
        <draw:line draw:style-name="gr4" draw:text-style-name="P1" draw:layer="layout" svg:x1="5.141cm" svg:y1="3.273cm" svg:x2="5.592cm" svg:y2="3.574cm">
          <text:p/>
        </draw:line>
        <draw:line draw:style-name="gr4" draw:text-style-name="P1" draw:layer="layout" svg:x1="8.718cm" svg:y1="3.282cm" svg:x2="9.169cm" svg:y2="3.583cm">
          <text:p/>
        </draw:line>
        <draw:line draw:style-name="gr4" draw:text-style-name="P1" draw:layer="layout" svg:x1="4.691cm" svg:y1="6.623cm" svg:x2="14.141cm" svg:y2="6.623cm">
          <text:p/>
        </draw:line>
        <draw:line draw:style-name="gr4" draw:text-style-name="P1" draw:layer="layout" svg:x1="10.747cm" svg:y1="3.282cm" svg:x2="11.199cm" svg:y2="3.583cm">
          <text:p/>
        </draw:line>
        <draw:line draw:style-name="gr4" draw:text-style-name="P1" draw:layer="layout" svg:x1="7.541cm" svg:y1="0.773cm" svg:x2="7.541cm" svg:y2="0.673cm">
          <text:p/>
        </draw:line>
        <draw:line draw:style-name="gr4" draw:text-style-name="P1" draw:layer="layout" svg:x1="7.541cm" svg:y1="0.673cm" svg:x2="7.541cm" svg:y2="0.773cm">
          <text:p/>
        </draw:line>
        <draw:line draw:style-name="gr4" draw:text-style-name="P1" draw:layer="layout" svg:x1="7.541cm" svg:y1="0.773cm" svg:x2="8.891cm" svg:y2="0.773cm">
          <text:p/>
        </draw:line>
        <draw:line draw:style-name="gr4" draw:text-style-name="P1" draw:layer="layout" svg:x1="8.891cm" svg:y1="0.773cm" svg:x2="8.891cm" svg:y2="0.673cm">
          <text:p/>
        </draw:line>
        <draw:line draw:style-name="gr4" draw:text-style-name="P1" draw:layer="layout" svg:x1="8.891cm" svg:y1="0.673cm" svg:x2="7.541cm" svg:y2="0.673cm">
          <text:p/>
        </draw:line>
        <draw:polygon draw:style-name="gr5" draw:text-style-name="P2" draw:layer="layout" svg:width="1.35cm" svg:height="0.1cm" svg:x="7.541cm" svg:y="0.673cm" svg:viewBox="0 0 1351 101" draw:points="0,0 1351,0 1351,101 0,101">
          <text:p/>
        </draw:polygon>
        <draw:line draw:style-name="gr4" draw:text-style-name="P1" draw:layer="layout" svg:x1="6.941cm" svg:y1="0.773cm" svg:x2="7.541cm" svg:y2="0.773cm">
          <text:p/>
        </draw:line>
        <draw:line draw:style-name="gr4" draw:text-style-name="P1" draw:layer="layout" svg:x1="8.191cm" svg:y1="0.673cm" svg:x2="8.191cm" svg:y2="3.323cm">
          <text:p/>
        </draw:line>
        <draw:line draw:style-name="gr4" draw:text-style-name="P1" draw:layer="layout" svg:x1="8.191cm" svg:y1="3.323cm" svg:x2="8.291cm" svg:y2="3.323cm">
          <text:p/>
        </draw:line>
        <draw:line draw:style-name="gr4" draw:text-style-name="P1" draw:layer="layout" svg:x1="8.291cm" svg:y1="3.323cm" svg:x2="8.291cm" svg:y2="0.673cm">
          <text:p/>
        </draw:line>
        <draw:line draw:style-name="gr4" draw:text-style-name="P1" draw:layer="layout" svg:x1="8.291cm" svg:y1="0.673cm" svg:x2="8.191cm" svg:y2="0.673cm">
          <text:p/>
        </draw:line>
        <draw:polygon draw:style-name="gr5" draw:text-style-name="P2" draw:layer="layout" svg:width="0.1cm" svg:height="2.65cm" svg:x="8.191cm" svg:y="0.673cm" svg:viewBox="0 0 101 2651" draw:points="0,0 101,0 101,2651 0,2651">
          <text:p/>
        </draw:polygon>
        <draw:line draw:style-name="gr4" draw:text-style-name="P1" draw:layer="layout" svg:x1="7.541cm" svg:y1="0.673cm" svg:x2="6.941cm" svg:y2="0.673cm">
          <text:p/>
        </draw:line>
        <draw:line draw:style-name="gr4" draw:text-style-name="P1" draw:layer="layout" svg:x1="3.941cm" svg:y1="1.773cm" svg:x2="4.641cm" svg:y2="1.773cm">
          <text:p/>
        </draw:line>
        <draw:line draw:style-name="gr4" draw:text-style-name="P1" draw:layer="layout" svg:x1="3.941cm" svg:y1="1.174cm" svg:x2="4.641cm" svg:y2="0.773cm">
          <text:p/>
        </draw:line>
        <draw:line draw:style-name="gr4" draw:text-style-name="P1" draw:layer="layout" svg:x1="3.941cm" svg:y1="1.173cm" svg:x2="4.641cm" svg:y2="1.173cm">
          <text:p/>
        </draw:line>
        <draw:line draw:style-name="gr4" draw:text-style-name="P1" draw:layer="layout" svg:x1="3.941cm" svg:y1="1.373cm" svg:x2="4.641cm" svg:y2="1.373cm">
          <text:p/>
        </draw:line>
        <draw:line draw:style-name="gr4" draw:text-style-name="P1" draw:layer="layout" svg:x1="3.941cm" svg:y1="1.573cm" svg:x2="4.641cm" svg:y2="1.573cm">
          <text:p/>
        </draw:line>
        <draw:line draw:style-name="gr4" draw:text-style-name="P1" draw:layer="layout" svg:x1="15.391cm" svg:y1="4.223cm" svg:x2="15.391cm" svg:y2="3.273cm">
          <text:p/>
        </draw:line>
        <draw:line draw:style-name="gr4" draw:text-style-name="P1" draw:layer="layout" svg:x1="12.591cm" svg:y1="0.773cm" svg:x2="13.091cm" svg:y2="0.773cm">
          <text:p/>
        </draw:line>
        <draw:line draw:style-name="gr4" draw:text-style-name="P1" draw:layer="layout" svg:x1="13.091cm" svg:y1="0.673cm" svg:x2="12.591cm" svg:y2="0.673cm">
          <text:p/>
        </draw:line>
        <draw:line draw:style-name="gr4" draw:text-style-name="P1" draw:layer="layout" svg:x1="13.091cm" svg:y1="0.673cm" svg:x2="13.091cm" svg:y2="0.773cm">
          <text:p/>
        </draw:line>
        <draw:line draw:style-name="gr4" draw:text-style-name="P1" draw:layer="layout" svg:x1="13.091cm" svg:y1="0.773cm" svg:x2="14.341cm" svg:y2="0.773cm">
          <text:p/>
        </draw:line>
        <draw:line draw:style-name="gr4" draw:text-style-name="P1" draw:layer="layout" svg:x1="14.341cm" svg:y1="0.773cm" svg:x2="14.341cm" svg:y2="0.673cm">
          <text:p/>
        </draw:line>
        <draw:line draw:style-name="gr4" draw:text-style-name="P1" draw:layer="layout" svg:x1="14.341cm" svg:y1="0.673cm" svg:x2="13.091cm" svg:y2="0.673cm">
          <text:p/>
        </draw:line>
        <draw:polygon draw:style-name="gr5" draw:text-style-name="P2" draw:layer="layout" svg:width="1.25cm" svg:height="0.1cm" svg:x="13.091cm" svg:y="0.673cm" svg:viewBox="0 0 1251 101" draw:points="0,0 1251,0 1251,101 0,101">
          <text:p/>
        </draw:polygon>
        <draw:line draw:style-name="gr4" draw:text-style-name="P1" draw:layer="layout" svg:x1="14.341cm" svg:y1="0.773cm" svg:x2="14.791cm" svg:y2="0.773cm">
          <text:p/>
        </draw:line>
        <draw:line draw:style-name="gr4" draw:text-style-name="P1" draw:layer="layout" svg:x1="14.368cm" svg:y1="3.232cm" svg:x2="14.819cm" svg:y2="3.533cm">
          <text:p/>
        </draw:line>
        <draw:line draw:style-name="gr4" draw:text-style-name="P1" draw:layer="layout" svg:x1="10.671cm" svg:y1="0.773cm" svg:x2="11.271cm" svg:y2="0.773cm">
          <text:p/>
        </draw:line>
        <draw:line draw:style-name="gr4" draw:text-style-name="P1" draw:layer="layout" svg:x1="9.371cm" svg:y1="3.223cm" svg:x2="9.371cm" svg:y2="3.323cm">
          <text:p/>
        </draw:line>
        <draw:line draw:style-name="gr4" draw:text-style-name="P1" draw:layer="layout" svg:x1="9.371cm" svg:y1="3.323cm" svg:x2="10.721cm" svg:y2="3.323cm">
          <text:p/>
        </draw:line>
        <draw:line draw:style-name="gr4" draw:text-style-name="P1" draw:layer="layout" svg:x1="10.721cm" svg:y1="3.323cm" svg:x2="10.721cm" svg:y2="3.223cm">
          <text:p/>
        </draw:line>
        <draw:line draw:style-name="gr4" draw:text-style-name="P1" draw:layer="layout" svg:x1="10.721cm" svg:y1="3.223cm" svg:x2="9.371cm" svg:y2="3.223cm">
          <text:p/>
        </draw:line>
        <draw:polygon draw:style-name="gr5" draw:text-style-name="P2" draw:layer="layout" svg:width="1.35cm" svg:height="0.1cm" svg:x="9.371cm" svg:y="3.223cm" svg:viewBox="0 0 1351 101" draw:points="0,0 1351,0 1351,101 0,101">
          <text:p/>
        </draw:polygon>
        <draw:line draw:style-name="gr4" draw:text-style-name="P1" draw:layer="layout" svg:x1="9.621cm" svg:y1="0.673cm" svg:x2="9.621cm" svg:y2="0.773cm">
          <text:p/>
        </draw:line>
        <draw:line draw:style-name="gr4" draw:text-style-name="P1" draw:layer="layout" svg:x1="9.621cm" svg:y1="0.773cm" svg:x2="10.671cm" svg:y2="0.773cm">
          <text:p/>
        </draw:line>
        <draw:line draw:style-name="gr4" draw:text-style-name="P1" draw:layer="layout" svg:x1="10.671cm" svg:y1="0.773cm" svg:x2="10.671cm" svg:y2="0.673cm">
          <text:p/>
        </draw:line>
        <draw:line draw:style-name="gr4" draw:text-style-name="P1" draw:layer="layout" svg:x1="10.671cm" svg:y1="0.673cm" svg:x2="9.621cm" svg:y2="0.673cm">
          <text:p/>
        </draw:line>
        <draw:polygon draw:style-name="gr5" draw:text-style-name="P2" draw:layer="layout" svg:width="1.05cm" svg:height="0.1cm" svg:x="9.621cm" svg:y="0.673cm" svg:viewBox="0 0 1051 101" draw:points="0,0 1051,0 1051,101 0,101">
          <text:p/>
        </draw:polygon>
        <draw:line draw:style-name="gr4" draw:text-style-name="P1" draw:layer="layout" svg:x1="11.866cm" svg:y1="0.673cm" svg:x2="11.866cm" svg:y2="3.323cm">
          <text:p/>
        </draw:line>
        <draw:line draw:style-name="gr4" draw:text-style-name="P1" draw:layer="layout" svg:x1="11.866cm" svg:y1="3.323cm" svg:x2="11.966cm" svg:y2="3.323cm">
          <text:p/>
        </draw:line>
        <draw:line draw:style-name="gr4" draw:text-style-name="P1" draw:layer="layout" svg:x1="11.966cm" svg:y1="3.323cm" svg:x2="11.966cm" svg:y2="0.673cm">
          <text:p/>
        </draw:line>
        <draw:line draw:style-name="gr4" draw:text-style-name="P1" draw:layer="layout" svg:x1="11.966cm" svg:y1="0.673cm" svg:x2="11.866cm" svg:y2="0.673cm">
          <text:p/>
        </draw:line>
        <draw:polygon draw:style-name="gr5" draw:text-style-name="P2" draw:layer="layout" svg:width="0.1cm" svg:height="2.65cm" svg:x="11.866cm" svg:y="0.673cm" svg:viewBox="0 0 101 2651" draw:points="0,0 101,0 101,2651 0,2651">
          <text:p/>
        </draw:polygon>
        <draw:line draw:style-name="gr4" draw:text-style-name="P1" draw:layer="layout" svg:x1="8.891cm" svg:y1="0.773cm" svg:x2="9.691cm" svg:y2="0.773cm">
          <text:p/>
        </draw:line>
        <draw:line draw:style-name="gr4" draw:text-style-name="P1" draw:layer="layout" svg:x1="3.941cm" svg:y1="2.173cm" svg:x2="4.641cm" svg:y2="2.173cm">
          <text:p/>
        </draw:line>
        <draw:line draw:style-name="gr4" draw:text-style-name="P1" draw:layer="layout" svg:x1="3.941cm" svg:y1="2.373cm" svg:x2="4.641cm" svg:y2="2.373cm">
          <text:p/>
        </draw:line>
        <draw:line draw:style-name="gr4" draw:text-style-name="P1" draw:layer="layout" svg:x1="4.641cm" svg:y1="0.673cm" svg:x2="4.641cm" svg:y2="3.323cm">
          <text:p/>
        </draw:line>
        <draw:line draw:style-name="gr4" draw:text-style-name="P1" draw:layer="layout" svg:x1="4.641cm" svg:y1="3.323cm" svg:x2="4.741cm" svg:y2="3.323cm">
          <text:p/>
        </draw:line>
        <draw:line draw:style-name="gr4" draw:text-style-name="P1" draw:layer="layout" svg:x1="4.741cm" svg:y1="3.323cm" svg:x2="4.741cm" svg:y2="0.673cm">
          <text:p/>
        </draw:line>
        <draw:line draw:style-name="gr4" draw:text-style-name="P1" draw:layer="layout" svg:x1="4.741cm" svg:y1="0.673cm" svg:x2="4.641cm" svg:y2="0.673cm">
          <text:p/>
        </draw:line>
        <draw:polygon draw:style-name="gr5" draw:text-style-name="P2" draw:layer="layout" svg:width="0.1cm" svg:height="2.65cm" svg:x="4.641cm" svg:y="0.673cm" svg:viewBox="0 0 101 2651" draw:points="0,0 101,0 101,2651 0,2651">
          <text:p/>
        </draw:polygon>
        <draw:line draw:style-name="gr4" draw:text-style-name="P1" draw:layer="layout" svg:x1="3.941cm" svg:y1="2.573cm" svg:x2="4.641cm" svg:y2="2.573cm">
          <text:p/>
        </draw:line>
        <draw:line draw:style-name="gr4" draw:text-style-name="P1" draw:layer="layout" svg:x1="3.941cm" svg:y1="2.973cm" svg:x2="4.641cm" svg:y2="2.973cm">
          <text:p/>
        </draw:line>
        <draw:line draw:style-name="gr4" draw:text-style-name="P1" draw:layer="layout" svg:x1="3.941cm" svg:y1="2.773cm" svg:x2="4.641cm" svg:y2="2.773cm">
          <text:p/>
        </draw:line>
        <draw:line draw:style-name="gr4" draw:text-style-name="P1" draw:layer="layout" svg:x1="3.941cm" svg:y1="0.723cm" svg:x2="3.941cm" svg:y2="4.173cm">
          <text:p/>
        </draw:line>
        <draw:line draw:style-name="gr4" draw:text-style-name="P1" draw:layer="layout" svg:x1="3.941cm" svg:y1="3.173cm" svg:x2="4.641cm" svg:y2="3.173cm">
          <text:p/>
        </draw:line>
        <draw:line draw:style-name="gr4" draw:text-style-name="P1" draw:layer="layout" svg:x1="7.091cm" svg:y1="4.173cm" svg:x2="7.091cm" svg:y2="4.273cm">
          <text:p/>
        </draw:line>
        <draw:line draw:style-name="gr4" draw:text-style-name="P1" draw:layer="layout" svg:x1="7.091cm" svg:y1="4.273cm" svg:x2="7.191cm" svg:y2="4.273cm">
          <text:p/>
        </draw:line>
        <draw:line draw:style-name="gr4" draw:text-style-name="P1" draw:layer="layout" svg:x1="7.191cm" svg:y1="4.273cm" svg:x2="7.191cm" svg:y2="4.173cm">
          <text:p/>
        </draw:line>
        <draw:line draw:style-name="gr4" draw:text-style-name="P1" draw:layer="layout" svg:x1="7.191cm" svg:y1="4.173cm" svg:x2="7.091cm" svg:y2="4.173cm">
          <text:p/>
        </draw:line>
        <draw:polygon draw:style-name="gr5" draw:text-style-name="P2" draw:layer="layout" svg:width="0.1cm" svg:height="0.1cm" svg:x="7.091cm" svg:y="4.173cm" svg:viewBox="0 0 101 101" draw:points="0,0 101,0 101,101 0,101">
          <text:p/>
        </draw:polygon>
        <draw:line draw:style-name="gr4" draw:text-style-name="P1" draw:layer="layout" svg:x1="7.068cm" svg:y1="3.282cm" svg:x2="7.519cm" svg:y2="3.583cm">
          <text:p/>
        </draw:line>
        <draw:line draw:style-name="gr4" draw:text-style-name="P1" draw:layer="layout" svg:x1="7.691cm" svg:y1="3.223cm" svg:x2="7.691cm" svg:y2="3.323cm">
          <text:p/>
        </draw:line>
        <draw:line draw:style-name="gr4" draw:text-style-name="P1" draw:layer="layout" svg:x1="7.691cm" svg:y1="3.323cm" svg:x2="8.741cm" svg:y2="3.323cm">
          <text:p/>
        </draw:line>
        <draw:line draw:style-name="gr4" draw:text-style-name="P1" draw:layer="layout" svg:x1="8.741cm" svg:y1="3.323cm" svg:x2="8.741cm" svg:y2="3.223cm">
          <text:p/>
        </draw:line>
        <draw:line draw:style-name="gr4" draw:text-style-name="P1" draw:layer="layout" svg:x1="8.741cm" svg:y1="3.223cm" svg:x2="7.691cm" svg:y2="3.223cm">
          <text:p/>
        </draw:line>
        <draw:polygon draw:style-name="gr5" draw:text-style-name="P2" draw:layer="layout" svg:width="1.05cm" svg:height="0.1cm" svg:x="7.691cm" svg:y="3.223cm" svg:viewBox="0 0 1051 101" draw:points="0,0 1051,0 1051,101 0,101">
          <text:p/>
        </draw:polygon>
        <draw:path draw:style-name="gr4" draw:text-style-name="P1" draw:layer="layout" svg:width="0.092cm" svg:height="0.128cm" svg:x="7.441cm" svg:y="3.495cm" svg:viewBox="0 0 93 129" svg:d="M86 0c12 29 9 62-8 88-18 26-47 41-78 41">
          <text:p/>
        </draw:path>
        <draw:line draw:style-name="gr4" draw:text-style-name="P1" draw:layer="layout" svg:x1="2.958cm" svg:y1="16.619cm" svg:x2="2.958cm" svg:y2="16.719cm">
          <text:p/>
        </draw:line>
        <draw:line draw:style-name="gr4" draw:text-style-name="P1" draw:layer="layout" svg:x1="2.958cm" svg:y1="16.719cm" svg:x2="3.108cm" svg:y2="16.719cm">
          <text:p/>
        </draw:line>
        <draw:line draw:style-name="gr4" draw:text-style-name="P1" draw:layer="layout" svg:x1="3.108cm" svg:y1="16.719cm" svg:x2="3.108cm" svg:y2="16.619cm">
          <text:p/>
        </draw:line>
        <draw:line draw:style-name="gr4" draw:text-style-name="P1" draw:layer="layout" svg:x1="3.108cm" svg:y1="16.619cm" svg:x2="2.958cm" svg:y2="16.619cm">
          <text:p/>
        </draw:line>
        <draw:polygon draw:style-name="gr5" draw:text-style-name="P2" draw:layer="layout" svg:width="0.15cm" svg:height="0.1cm" svg:x="2.958cm" svg:y="16.619cm" svg:viewBox="0 0 151 101" draw:points="0,0 151,0 151,101 0,101">
          <text:p/>
        </draw:polygon>
        <draw:line draw:style-name="gr4" draw:text-style-name="P1" draw:layer="layout" svg:x1="8.741cm" svg:y1="14.123cm" svg:x2="9.091cm" svg:y2="14.123cm">
          <text:p/>
        </draw:line>
        <draw:line draw:style-name="gr4" draw:text-style-name="P1" draw:layer="layout" svg:x1="9.091cm" svg:y1="14.123cm" svg:x2="9.091cm" svg:y2="14.223cm">
          <text:p/>
        </draw:line>
        <draw:line draw:style-name="gr4" draw:text-style-name="P1" draw:layer="layout" svg:x1="9.091cm" svg:y1="14.223cm" svg:x2="9.741cm" svg:y2="14.223cm">
          <text:p/>
        </draw:line>
        <draw:line draw:style-name="gr4" draw:text-style-name="P1" draw:layer="layout" svg:x1="9.741cm" svg:y1="14.223cm" svg:x2="9.741cm" svg:y2="14.123cm">
          <text:p/>
        </draw:line>
        <draw:line draw:style-name="gr4" draw:text-style-name="P1" draw:layer="layout" svg:x1="9.741cm" svg:y1="14.123cm" svg:x2="9.091cm" svg:y2="14.123cm">
          <text:p/>
        </draw:line>
        <draw:polygon draw:style-name="gr5" draw:text-style-name="P2" draw:layer="layout" svg:width="0.65cm" svg:height="0.1cm" svg:x="9.091cm" svg:y="14.123cm" svg:viewBox="0 0 651 101" draw:points="0,0 651,0 651,101 0,101">
          <text:p/>
        </draw:polygon>
        <draw:line draw:style-name="gr4" draw:text-style-name="P1" draw:layer="layout" svg:x1="8.741cm" svg:y1="14.223cm" svg:x2="9.091cm" svg:y2="14.223cm">
          <text:p/>
        </draw:line>
        <draw:line draw:style-name="gr4" draw:text-style-name="P1" draw:layer="layout" svg:x1="9.241cm" svg:y1="12.223cm" svg:x2="9.241cm" svg:y2="12.323cm">
          <text:p/>
        </draw:line>
        <draw:line draw:style-name="gr4" draw:text-style-name="P1" draw:layer="layout" svg:x1="9.241cm" svg:y1="12.323cm" svg:x2="9.541cm" svg:y2="12.323cm">
          <text:p/>
        </draw:line>
        <draw:line draw:style-name="gr4" draw:text-style-name="P1" draw:layer="layout" svg:x1="9.541cm" svg:y1="12.323cm" svg:x2="9.541cm" svg:y2="12.223cm">
          <text:p/>
        </draw:line>
        <draw:line draw:style-name="gr4" draw:text-style-name="P1" draw:layer="layout" svg:x1="9.541cm" svg:y1="12.223cm" svg:x2="9.241cm" svg:y2="12.223cm">
          <text:p/>
        </draw:line>
        <draw:polygon draw:style-name="gr5" draw:text-style-name="P2" draw:layer="layout" svg:width="0.3cm" svg:height="0.1cm" svg:x="9.241cm" svg:y="12.223cm" svg:viewBox="0 0 301 101" draw:points="0,0 301,0 301,101 0,101">
          <text:p/>
        </draw:polygon>
        <draw:line draw:style-name="gr4" draw:text-style-name="P1" draw:layer="layout" svg:x1="9.426cm" svg:y1="12.323cm" svg:x2="9.842cm" svg:y2="12.023cm">
          <text:p/>
        </draw:line>
        <draw:line draw:style-name="gr4" draw:text-style-name="P1" draw:layer="layout" svg:x1="8.726cm" svg:y1="12.323cm" svg:x2="9.142cm" svg:y2="12.023cm">
          <text:p/>
        </draw:line>
        <draw:path draw:style-name="gr4" draw:text-style-name="P1" draw:layer="layout" svg:width="0.104cm" svg:height="0.14cm" svg:x="9.048cm" svg:y="11.981cm" svg:viewBox="0 0 105 141" svg:d="M0 3c37-11 76 5 94 39 19 32 12 73-15 99">
          <text:p/>
        </draw:path>
        <draw:path draw:style-name="gr4" draw:text-style-name="P1" draw:layer="layout" svg:width="0.103cm" svg:height="0.14cm" svg:x="9.748cm" svg:y="11.982cm" svg:viewBox="0 0 104 141" svg:d="M0 3c36-11 76 5 94 38s12 74-15 100">
          <text:p/>
        </draw:path>
        <draw:line draw:style-name="gr4" draw:text-style-name="P1" draw:layer="layout" svg:x1="9.341cm" svg:y1="12.223cm" svg:x2="9.341cm" svg:y2="14.223cm">
          <text:p/>
        </draw:line>
        <draw:line draw:style-name="gr4" draw:text-style-name="P1" draw:layer="layout" svg:x1="9.341cm" svg:y1="14.223cm" svg:x2="9.441cm" svg:y2="14.223cm">
          <text:p/>
        </draw:line>
        <draw:line draw:style-name="gr4" draw:text-style-name="P1" draw:layer="layout" svg:x1="9.441cm" svg:y1="14.223cm" svg:x2="9.441cm" svg:y2="12.223cm">
          <text:p/>
        </draw:line>
        <draw:line draw:style-name="gr4" draw:text-style-name="P1" draw:layer="layout" svg:x1="9.441cm" svg:y1="12.223cm" svg:x2="9.341cm" svg:y2="12.223cm">
          <text:p/>
        </draw:line>
        <draw:polygon draw:style-name="gr5" draw:text-style-name="P2" draw:layer="layout" svg:width="0.1cm" svg:height="2cm" svg:x="9.341cm" svg:y="12.223cm" svg:viewBox="0 0 101 2001" draw:points="0,0 101,0 101,2001 0,2001">
          <text:p/>
        </draw:polygon>
        <draw:line draw:style-name="gr4" draw:text-style-name="P1" draw:layer="layout" svg:x1="9.191cm" svg:y1="11.123cm" svg:x2="9.191cm" svg:y2="11.223cm">
          <text:p/>
        </draw:line>
        <draw:line draw:style-name="gr4" draw:text-style-name="P1" draw:layer="layout" svg:x1="9.191cm" svg:y1="11.223cm" svg:x2="9.291cm" svg:y2="11.223cm">
          <text:p/>
        </draw:line>
        <draw:line draw:style-name="gr4" draw:text-style-name="P1" draw:layer="layout" svg:x1="9.291cm" svg:y1="11.223cm" svg:x2="9.291cm" svg:y2="11.123cm">
          <text:p/>
        </draw:line>
        <draw:line draw:style-name="gr4" draw:text-style-name="P1" draw:layer="layout" svg:x1="9.291cm" svg:y1="11.123cm" svg:x2="9.191cm" svg:y2="11.123cm">
          <text:p/>
        </draw:line>
        <draw:polygon draw:style-name="gr5" draw:text-style-name="P2" draw:layer="layout" svg:width="0.1cm" svg:height="0.1cm" svg:x="9.191cm" svg:y="11.123cm" svg:viewBox="0 0 101 101" draw:points="0,0 101,0 101,101 0,101">
          <text:p/>
        </draw:polygon>
        <draw:line draw:style-name="gr4" draw:text-style-name="P1" draw:layer="layout" svg:x1="8.041cm" svg:y1="11.123cm" svg:x2="8.041cm" svg:y2="11.223cm">
          <text:p/>
        </draw:line>
        <draw:line draw:style-name="gr4" draw:text-style-name="P1" draw:layer="layout" svg:x1="8.041cm" svg:y1="11.223cm" svg:x2="8.141cm" svg:y2="11.223cm">
          <text:p/>
        </draw:line>
        <draw:line draw:style-name="gr4" draw:text-style-name="P1" draw:layer="layout" svg:x1="8.141cm" svg:y1="11.223cm" svg:x2="8.141cm" svg:y2="11.123cm">
          <text:p/>
        </draw:line>
        <draw:line draw:style-name="gr4" draw:text-style-name="P1" draw:layer="layout" svg:x1="8.141cm" svg:y1="11.123cm" svg:x2="8.041cm" svg:y2="11.123cm">
          <text:p/>
        </draw:line>
        <draw:polygon draw:style-name="gr5" draw:text-style-name="P2" draw:layer="layout" svg:width="0.1cm" svg:height="0.1cm" svg:x="8.041cm" svg:y="11.123cm" svg:viewBox="0 0 101 101" draw:points="0,0 101,0 101,101 0,101">
          <text:p/>
        </draw:polygon>
        <draw:line draw:style-name="gr4" draw:text-style-name="P1" draw:layer="layout" svg:x1="8.041cm" svg:y1="12.323cm" svg:x2="8.441cm" svg:y2="12.323cm">
          <text:p/>
        </draw:line>
        <draw:line draw:style-name="gr4" draw:text-style-name="P1" draw:layer="layout" svg:x1="8.441cm" svg:y1="12.223cm" svg:x2="8.441cm" svg:y2="12.323cm">
          <text:p/>
        </draw:line>
        <draw:line draw:style-name="gr4" draw:text-style-name="P1" draw:layer="layout" svg:x1="8.441cm" svg:y1="12.323cm" svg:x2="8.841cm" svg:y2="12.323cm">
          <text:p/>
        </draw:line>
        <draw:line draw:style-name="gr4" draw:text-style-name="P1" draw:layer="layout" svg:x1="8.841cm" svg:y1="12.323cm" svg:x2="8.841cm" svg:y2="12.223cm">
          <text:p/>
        </draw:line>
        <draw:line draw:style-name="gr4" draw:text-style-name="P1" draw:layer="layout" svg:x1="8.841cm" svg:y1="12.223cm" svg:x2="8.441cm" svg:y2="12.223cm">
          <text:p/>
        </draw:line>
        <draw:polygon draw:style-name="gr5" draw:text-style-name="P2" draw:layer="layout" svg:width="0.4cm" svg:height="0.1cm" svg:x="8.441cm" svg:y="12.223cm" svg:viewBox="0 0 401 101" draw:points="0,0 401,0 401,101 0,101">
          <text:p/>
        </draw:polygon>
        <draw:line draw:style-name="gr4" draw:text-style-name="P1" draw:layer="layout" svg:x1="8.441cm" svg:y1="12.223cm" svg:x2="8.041cm" svg:y2="12.223cm">
          <text:p/>
        </draw:line>
        <draw:line draw:style-name="gr4" draw:text-style-name="P1" draw:layer="layout" svg:x1="9.741cm" svg:y1="14.223cm" svg:x2="10.091cm" svg:y2="14.223cm">
          <text:p/>
        </draw:line>
        <draw:line draw:style-name="gr4" draw:text-style-name="P1" draw:layer="layout" svg:x1="11.441cm" svg:y1="14.123cm" svg:x2="11.091cm" svg:y2="14.123cm">
          <text:p/>
        </draw:line>
        <draw:line draw:style-name="gr4" draw:text-style-name="P1" draw:layer="layout" svg:x1="11.091cm" svg:y1="14.223cm" svg:x2="11.441cm" svg:y2="14.223cm">
          <text:p/>
        </draw:line>
        <draw:line draw:style-name="gr4" draw:text-style-name="P1" draw:layer="layout" svg:x1="10.091cm" svg:y1="14.123cm" svg:x2="9.741cm" svg:y2="14.123cm">
          <text:p/>
        </draw:line>
        <draw:line draw:style-name="gr4" draw:text-style-name="P1" draw:layer="layout" svg:x1="10.091cm" svg:y1="14.123cm" svg:x2="10.091cm" svg:y2="14.223cm">
          <text:p/>
        </draw:line>
        <draw:line draw:style-name="gr4" draw:text-style-name="P1" draw:layer="layout" svg:x1="10.091cm" svg:y1="14.223cm" svg:x2="11.091cm" svg:y2="14.223cm">
          <text:p/>
        </draw:line>
        <draw:line draw:style-name="gr4" draw:text-style-name="P1" draw:layer="layout" svg:x1="11.091cm" svg:y1="14.223cm" svg:x2="11.091cm" svg:y2="14.123cm">
          <text:p/>
        </draw:line>
        <draw:line draw:style-name="gr4" draw:text-style-name="P1" draw:layer="layout" svg:x1="11.091cm" svg:y1="14.123cm" svg:x2="10.091cm" svg:y2="14.123cm">
          <text:p/>
        </draw:line>
        <draw:polygon draw:style-name="gr5" draw:text-style-name="P2" draw:layer="layout" svg:width="1cm" svg:height="0.1cm" svg:x="10.091cm" svg:y="14.123cm" svg:viewBox="0 0 1001 101" draw:points="0,0 1001,0 1001,101 0,101">
          <text:p/>
        </draw:polygon>
        <draw:line draw:style-name="gr4" draw:text-style-name="P1" draw:layer="layout" svg:x1="11.591cm" svg:y1="12.223cm" svg:x2="11.591cm" svg:y2="12.323cm">
          <text:p/>
        </draw:line>
        <draw:line draw:style-name="gr4" draw:text-style-name="P1" draw:layer="layout" svg:x1="11.591cm" svg:y1="12.323cm" svg:x2="11.941cm" svg:y2="12.323cm">
          <text:p/>
        </draw:line>
        <draw:line draw:style-name="gr4" draw:text-style-name="P1" draw:layer="layout" svg:x1="11.941cm" svg:y1="12.323cm" svg:x2="11.941cm" svg:y2="12.223cm">
          <text:p/>
        </draw:line>
        <draw:line draw:style-name="gr4" draw:text-style-name="P1" draw:layer="layout" svg:x1="11.941cm" svg:y1="12.223cm" svg:x2="11.591cm" svg:y2="12.223cm">
          <text:p/>
        </draw:line>
        <draw:polygon draw:style-name="gr5" draw:text-style-name="P2" draw:layer="layout" svg:width="0.35cm" svg:height="0.1cm" svg:x="11.591cm" svg:y="12.223cm" svg:viewBox="0 0 351 101" draw:points="0,0 351,0 351,101 0,101">
          <text:p/>
        </draw:polygon>
        <draw:line draw:style-name="gr4" draw:text-style-name="P1" draw:layer="layout" svg:x1="11.776cm" svg:y1="12.323cm" svg:x2="12.192cm" svg:y2="12.023cm">
          <text:p/>
        </draw:line>
        <draw:line draw:style-name="gr4" draw:text-style-name="P1" draw:layer="layout" svg:x1="11.741cm" svg:y1="12.223cm" svg:x2="11.741cm" svg:y2="14.223cm">
          <text:p/>
        </draw:line>
        <draw:line draw:style-name="gr4" draw:text-style-name="P1" draw:layer="layout" svg:x1="11.741cm" svg:y1="14.223cm" svg:x2="11.841cm" svg:y2="14.223cm">
          <text:p/>
        </draw:line>
        <draw:line draw:style-name="gr4" draw:text-style-name="P1" draw:layer="layout" svg:x1="11.841cm" svg:y1="14.223cm" svg:x2="11.841cm" svg:y2="12.223cm">
          <text:p/>
        </draw:line>
        <draw:line draw:style-name="gr4" draw:text-style-name="P1" draw:layer="layout" svg:x1="11.841cm" svg:y1="12.223cm" svg:x2="11.741cm" svg:y2="12.223cm">
          <text:p/>
        </draw:line>
        <draw:polygon draw:style-name="gr5" draw:text-style-name="P2" draw:layer="layout" svg:width="0.1cm" svg:height="2cm" svg:x="11.741cm" svg:y="12.223cm" svg:viewBox="0 0 101 2001" draw:points="0,0 101,0 101,2001 0,2001">
          <text:p/>
        </draw:polygon>
        <draw:line draw:style-name="gr4" draw:text-style-name="P1" draw:layer="layout" svg:x1="11.441cm" svg:y1="14.123cm" svg:x2="11.441cm" svg:y2="14.223cm">
          <text:p/>
        </draw:line>
        <draw:line draw:style-name="gr4" draw:text-style-name="P1" draw:layer="layout" svg:x1="11.441cm" svg:y1="14.223cm" svg:x2="12.141cm" svg:y2="14.223cm">
          <text:p/>
        </draw:line>
        <draw:line draw:style-name="gr4" draw:text-style-name="P1" draw:layer="layout" svg:x1="12.141cm" svg:y1="14.223cm" svg:x2="12.141cm" svg:y2="14.123cm">
          <text:p/>
        </draw:line>
        <draw:line draw:style-name="gr4" draw:text-style-name="P1" draw:layer="layout" svg:x1="12.141cm" svg:y1="14.123cm" svg:x2="11.441cm" svg:y2="14.123cm">
          <text:p/>
        </draw:line>
        <draw:polygon draw:style-name="gr5" draw:text-style-name="P2" draw:layer="layout" svg:width="0.7cm" svg:height="0.1cm" svg:x="11.441cm" svg:y="14.123cm" svg:viewBox="0 0 701 101" draw:points="0,0 701,0 701,101 0,101">
          <text:p/>
        </draw:polygon>
        <draw:path draw:style-name="gr4" draw:text-style-name="P1" draw:layer="layout" svg:width="0.103cm" svg:height="0.14cm" svg:x="12.098cm" svg:y="11.982cm" svg:viewBox="0 0 104 141" svg:d="M0 3c36-11 76 5 94 38s12 74-15 100">
          <text:p/>
        </draw:path>
        <draw:line draw:style-name="gr4" draw:text-style-name="P1" draw:layer="layout" svg:x1="10.391cm" svg:y1="12.223cm" svg:x2="10.791cm" svg:y2="12.223cm">
          <text:p/>
        </draw:line>
        <draw:line draw:style-name="gr4" draw:text-style-name="P1" draw:layer="layout" svg:x1="11.076cm" svg:y1="12.323cm" svg:x2="11.492cm" svg:y2="12.023cm">
          <text:p/>
        </draw:line>
        <draw:line draw:style-name="gr4" draw:text-style-name="P1" draw:layer="layout" svg:x1="10.791cm" svg:y1="12.323cm" svg:x2="10.391cm" svg:y2="12.323cm">
          <text:p/>
        </draw:line>
        <draw:line draw:style-name="gr4" draw:text-style-name="P1" draw:layer="layout" svg:x1="10.791cm" svg:y1="12.223cm" svg:x2="10.791cm" svg:y2="12.323cm">
          <text:p/>
        </draw:line>
        <draw:line draw:style-name="gr4" draw:text-style-name="P1" draw:layer="layout" svg:x1="10.791cm" svg:y1="12.323cm" svg:x2="11.191cm" svg:y2="12.323cm">
          <text:p/>
        </draw:line>
        <draw:line draw:style-name="gr4" draw:text-style-name="P1" draw:layer="layout" svg:x1="11.191cm" svg:y1="12.323cm" svg:x2="11.191cm" svg:y2="12.223cm">
          <text:p/>
        </draw:line>
        <draw:line draw:style-name="gr4" draw:text-style-name="P1" draw:layer="layout" svg:x1="11.191cm" svg:y1="12.223cm" svg:x2="10.791cm" svg:y2="12.223cm">
          <text:p/>
        </draw:line>
        <draw:polygon draw:style-name="gr5" draw:text-style-name="P2" draw:layer="layout" svg:width="0.4cm" svg:height="0.1cm" svg:x="10.791cm" svg:y="12.223cm" svg:viewBox="0 0 401 101" draw:points="0,0 401,0 401,101 0,101">
          <text:p/>
        </draw:polygon>
        <draw:path draw:style-name="gr4" draw:text-style-name="P1" draw:layer="layout" svg:width="0.104cm" svg:height="0.14cm" svg:x="11.398cm" svg:y="11.981cm" svg:viewBox="0 0 105 141" svg:d="M0 3c36-11 76 5 94 39 19 32 12 73-15 99">
          <text:p/>
        </draw:path>
        <draw:line draw:style-name="gr4" draw:text-style-name="P1" draw:layer="layout" svg:x1="9.941cm" svg:y1="12.223cm" svg:x2="9.941cm" svg:y2="12.323cm">
          <text:p/>
        </draw:line>
        <draw:line draw:style-name="gr4" draw:text-style-name="P1" draw:layer="layout" svg:x1="9.941cm" svg:y1="12.323cm" svg:x2="10.391cm" svg:y2="12.323cm">
          <text:p/>
        </draw:line>
        <draw:line draw:style-name="gr4" draw:text-style-name="P1" draw:layer="layout" svg:x1="10.391cm" svg:y1="12.323cm" svg:x2="10.391cm" svg:y2="12.223cm">
          <text:p/>
        </draw:line>
        <draw:line draw:style-name="gr4" draw:text-style-name="P1" draw:layer="layout" svg:x1="10.391cm" svg:y1="12.223cm" svg:x2="9.941cm" svg:y2="12.223cm">
          <text:p/>
        </draw:line>
        <draw:polygon draw:style-name="gr5" draw:text-style-name="P2" draw:layer="layout" svg:width="0.45cm" svg:height="0.1cm" svg:x="9.941cm" svg:y="12.223cm" svg:viewBox="0 0 451 101" draw:points="0,0 451,0 451,101 0,101">
          <text:p/>
        </draw:polygon>
        <draw:line draw:style-name="gr4" draw:text-style-name="P1" draw:layer="layout" svg:x1="10.341cm" svg:y1="11.023cm" svg:x2="11.541cm" svg:y2="11.023cm">
          <text:p/>
        </draw:line>
        <draw:line draw:style-name="gr4" draw:text-style-name="P1" draw:layer="layout" svg:x1="10.341cm" svg:y1="10.723cm" svg:x2="11.541cm" svg:y2="10.723cm">
          <text:p/>
        </draw:line>
        <draw:line draw:style-name="gr4" draw:text-style-name="P1" draw:layer="layout" svg:x1="11.541cm" svg:y1="10.723cm" svg:x2="11.541cm" svg:y2="11.173cm">
          <text:p/>
        </draw:line>
        <draw:line draw:style-name="gr4" draw:text-style-name="P1" draw:layer="layout" svg:x1="10.341cm" svg:y1="10.873cm" svg:x2="11.541cm" svg:y2="10.873cm">
          <text:p/>
        </draw:line>
        <draw:line draw:style-name="gr4" draw:text-style-name="P1" draw:layer="layout" svg:x1="10.291cm" svg:y1="11.123cm" svg:x2="10.291cm" svg:y2="11.223cm">
          <text:p/>
        </draw:line>
        <draw:line draw:style-name="gr4" draw:text-style-name="P1" draw:layer="layout" svg:x1="10.291cm" svg:y1="11.223cm" svg:x2="10.391cm" svg:y2="11.223cm">
          <text:p/>
        </draw:line>
        <draw:line draw:style-name="gr4" draw:text-style-name="P1" draw:layer="layout" svg:x1="10.391cm" svg:y1="11.223cm" svg:x2="10.391cm" svg:y2="11.123cm">
          <text:p/>
        </draw:line>
        <draw:line draw:style-name="gr4" draw:text-style-name="P1" draw:layer="layout" svg:x1="10.391cm" svg:y1="11.123cm" svg:x2="10.291cm" svg:y2="11.123cm">
          <text:p/>
        </draw:line>
        <draw:polygon draw:style-name="gr5" draw:text-style-name="P2" draw:layer="layout" svg:width="0.1cm" svg:height="0.1cm" svg:x="10.291cm" svg:y="11.123cm" svg:viewBox="0 0 101 101" draw:points="0,0 101,0 101,101 0,101">
          <text:p/>
        </draw:polygon>
        <draw:line draw:style-name="gr4" draw:text-style-name="P1" draw:layer="layout" svg:x1="10.341cm" svg:y1="11.173cm" svg:x2="10.341cm" svg:y2="10.723cm">
          <text:p/>
        </draw:line>
        <draw:line draw:style-name="gr4" draw:text-style-name="P1" draw:layer="layout" svg:x1="11.491cm" svg:y1="11.123cm" svg:x2="11.491cm" svg:y2="11.223cm">
          <text:p/>
        </draw:line>
        <draw:line draw:style-name="gr4" draw:text-style-name="P1" draw:layer="layout" svg:x1="11.491cm" svg:y1="11.223cm" svg:x2="11.591cm" svg:y2="11.223cm">
          <text:p/>
        </draw:line>
        <draw:line draw:style-name="gr4" draw:text-style-name="P1" draw:layer="layout" svg:x1="11.591cm" svg:y1="11.223cm" svg:x2="11.591cm" svg:y2="11.123cm">
          <text:p/>
        </draw:line>
        <draw:line draw:style-name="gr4" draw:text-style-name="P1" draw:layer="layout" svg:x1="11.591cm" svg:y1="11.123cm" svg:x2="11.491cm" svg:y2="11.123cm">
          <text:p/>
        </draw:line>
        <draw:polygon draw:style-name="gr5" draw:text-style-name="P2" draw:layer="layout" svg:width="0.1cm" svg:height="0.1cm" svg:x="11.491cm" svg:y="11.123cm" svg:viewBox="0 0 101 101" draw:points="0,0 101,0 101,101 0,101">
          <text:p/>
        </draw:polygon>
        <draw:line draw:style-name="gr4" draw:text-style-name="P1" draw:layer="layout" svg:x1="12.491cm" svg:y1="14.123cm" svg:x2="12.141cm" svg:y2="14.123cm">
          <text:p/>
        </draw:line>
        <draw:line draw:style-name="gr4" draw:text-style-name="P1" draw:layer="layout" svg:x1="12.491cm" svg:y1="14.123cm" svg:x2="12.491cm" svg:y2="14.223cm">
          <text:p/>
        </draw:line>
        <draw:line draw:style-name="gr4" draw:text-style-name="P1" draw:layer="layout" svg:x1="12.491cm" svg:y1="14.223cm" svg:x2="13.491cm" svg:y2="14.223cm">
          <text:p/>
        </draw:line>
        <draw:line draw:style-name="gr4" draw:text-style-name="P1" draw:layer="layout" svg:x1="13.491cm" svg:y1="14.223cm" svg:x2="13.491cm" svg:y2="14.123cm">
          <text:p/>
        </draw:line>
        <draw:line draw:style-name="gr4" draw:text-style-name="P1" draw:layer="layout" svg:x1="13.491cm" svg:y1="14.123cm" svg:x2="12.491cm" svg:y2="14.123cm">
          <text:p/>
        </draw:line>
        <draw:polygon draw:style-name="gr5" draw:text-style-name="P2" draw:layer="layout" svg:width="1cm" svg:height="0.1cm" svg:x="12.491cm" svg:y="14.123cm" svg:viewBox="0 0 1001 101" draw:points="0,0 1001,0 1001,101 0,101">
          <text:p/>
        </draw:polygon>
        <draw:line draw:style-name="gr4" draw:text-style-name="P1" draw:layer="layout" svg:x1="13.491cm" svg:y1="14.223cm" svg:x2="13.841cm" svg:y2="14.223cm">
          <text:p/>
        </draw:line>
        <draw:line draw:style-name="gr4" draw:text-style-name="P1" draw:layer="layout" svg:x1="12.141cm" svg:y1="14.223cm" svg:x2="12.491cm" svg:y2="14.223cm">
          <text:p/>
        </draw:line>
        <draw:line draw:style-name="gr4" draw:text-style-name="P1" draw:layer="layout" svg:x1="13.841cm" svg:y1="14.123cm" svg:x2="13.491cm" svg:y2="14.123cm">
          <text:p/>
        </draw:line>
        <draw:line draw:style-name="gr4" draw:text-style-name="P1" draw:layer="layout" svg:x1="12.741cm" svg:y1="12.123cm" svg:x2="12.741cm" svg:y2="12.323cm">
          <text:p/>
        </draw:line>
        <draw:line draw:style-name="gr4" draw:text-style-name="P1" draw:layer="layout" svg:x1="12.741cm" svg:y1="12.323cm" svg:x2="12.841cm" svg:y2="12.323cm">
          <text:p/>
        </draw:line>
        <draw:line draw:style-name="gr4" draw:text-style-name="P1" draw:layer="layout" svg:x1="12.841cm" svg:y1="12.323cm" svg:x2="12.841cm" svg:y2="12.123cm">
          <text:p/>
        </draw:line>
        <draw:line draw:style-name="gr4" draw:text-style-name="P1" draw:layer="layout" svg:x1="12.841cm" svg:y1="12.123cm" svg:x2="12.741cm" svg:y2="12.123cm">
          <text:p/>
        </draw:line>
        <draw:polygon draw:style-name="gr5" draw:text-style-name="P2" draw:layer="layout" svg:width="0.1cm" svg:height="0.2cm" svg:x="12.741cm" svg:y="12.123cm" svg:viewBox="0 0 101 201" draw:points="0,0 101,0 101,201 0,201">
          <text:p/>
        </draw:polygon>
        <draw:line draw:style-name="gr4" draw:text-style-name="P1" draw:layer="layout" svg:x1="13.241cm" svg:y1="11.123cm" svg:x2="13.591cm" svg:y2="11.123cm">
          <text:p/>
        </draw:line>
        <draw:line draw:style-name="gr4" draw:text-style-name="P1" draw:layer="layout" svg:x1="12.741cm" svg:y1="11.123cm" svg:x2="12.741cm" svg:y2="11.723cm">
          <text:p/>
        </draw:line>
        <draw:line draw:style-name="gr4" draw:text-style-name="P1" draw:layer="layout" svg:x1="12.741cm" svg:y1="11.723cm" svg:x2="12.841cm" svg:y2="11.723cm">
          <text:p/>
        </draw:line>
        <draw:line draw:style-name="gr4" draw:text-style-name="P1" draw:layer="layout" svg:x1="12.841cm" svg:y1="11.723cm" svg:x2="12.841cm" svg:y2="11.123cm">
          <text:p/>
        </draw:line>
        <draw:line draw:style-name="gr4" draw:text-style-name="P1" draw:layer="layout" svg:x1="12.841cm" svg:y1="11.123cm" svg:x2="12.741cm" svg:y2="11.123cm">
          <text:p/>
        </draw:line>
        <draw:polygon draw:style-name="gr5" draw:text-style-name="P2" draw:layer="layout" svg:width="0.1cm" svg:height="0.6cm" svg:x="12.741cm" svg:y="11.123cm" svg:viewBox="0 0 101 601" draw:points="0,0 101,0 101,601 0,601">
          <text:p/>
        </draw:polygon>
        <draw:path draw:style-name="gr4" draw:text-style-name="P1" draw:layer="layout" svg:width="0.157cm" svg:height="0.122cm" svg:x="12.535cm" svg:y="11.817cm" svg:viewBox="0 0 158 123" svg:d="M1 123c-6-40 11-81 44-104s76-26 113-7">
          <text:p/>
        </draw:path>
        <draw:line draw:style-name="gr4" draw:text-style-name="P1" draw:layer="layout" svg:x1="3.541cm" svg:y1="4.123cm" svg:x2="3.541cm" svg:y2="4.373cm">
          <text:p/>
        </draw:line>
        <draw:line draw:style-name="gr4" draw:text-style-name="P1" draw:layer="layout" svg:x1="3.541cm" svg:y1="4.373cm" svg:x2="3.641cm" svg:y2="4.373cm">
          <text:p/>
        </draw:line>
        <draw:line draw:style-name="gr4" draw:text-style-name="P1" draw:layer="layout" svg:x1="3.641cm" svg:y1="4.373cm" svg:x2="3.641cm" svg:y2="4.123cm">
          <text:p/>
        </draw:line>
        <draw:line draw:style-name="gr4" draw:text-style-name="P1" draw:layer="layout" svg:x1="3.641cm" svg:y1="4.123cm" svg:x2="3.541cm" svg:y2="4.123cm">
          <text:p/>
        </draw:line>
        <draw:polygon draw:style-name="gr5" draw:text-style-name="P2" draw:layer="layout" svg:width="0.1cm" svg:height="0.249cm" svg:x="3.541cm" svg:y="4.123cm" svg:viewBox="0 0 101 250" draw:points="0,0 101,0 101,250 0,250">
          <text:p/>
        </draw:polygon>
        <draw:line draw:style-name="gr4" draw:text-style-name="P1" draw:layer="layout" svg:x1="3.541cm" svg:y1="4.723cm" svg:x2="3.541cm" svg:y2="5.523cm">
          <text:p/>
        </draw:line>
        <draw:line draw:style-name="gr4" draw:text-style-name="P1" draw:layer="layout" svg:x1="3.541cm" svg:y1="5.523cm" svg:x2="3.641cm" svg:y2="5.523cm">
          <text:p/>
        </draw:line>
        <draw:line draw:style-name="gr4" draw:text-style-name="P1" draw:layer="layout" svg:x1="3.641cm" svg:y1="5.523cm" svg:x2="3.641cm" svg:y2="4.723cm">
          <text:p/>
        </draw:line>
        <draw:line draw:style-name="gr4" draw:text-style-name="P1" draw:layer="layout" svg:x1="3.641cm" svg:y1="4.723cm" svg:x2="3.541cm" svg:y2="4.723cm">
          <text:p/>
        </draw:line>
        <draw:polygon draw:style-name="gr5" draw:text-style-name="P2" draw:layer="layout" svg:width="0.1cm" svg:height="0.8cm" svg:x="3.541cm" svg:y="4.723cm" svg:viewBox="0 0 101 801" draw:points="0,0 101,0 101,801 0,801">
          <text:p/>
        </draw:polygon>
        <draw:line draw:style-name="gr4" draw:text-style-name="P1" draw:layer="layout" svg:x1="3.591cm" svg:y1="4.774cm" svg:x2="3.792cm" svg:y2="4.423cm">
          <text:p/>
        </draw:line>
        <draw:line draw:style-name="gr4" draw:text-style-name="P1" draw:layer="layout" svg:x1="3.591cm" svg:y1="4.173cm" svg:x2="4.691cm" svg:y2="4.173cm">
          <text:p/>
        </draw:line>
        <draw:path draw:style-name="gr4" draw:text-style-name="P1" draw:layer="layout" svg:width="0.144cm" svg:height="0.1cm" svg:x="3.694cm" svg:y="4.408cm" svg:viewBox="0 0 145 101" svg:d="M0 11c30-16 67-14 98 4 29 18 47 51 47 86">
          <text:p/>
        </draw:path>
        <draw:line draw:style-name="gr4" draw:text-style-name="P1" draw:layer="layout" svg:x1="4.641cm" svg:y1="4.173cm" svg:x2="4.641cm" svg:y2="4.273cm">
          <text:p/>
        </draw:line>
        <draw:line draw:style-name="gr4" draw:text-style-name="P1" draw:layer="layout" svg:x1="4.641cm" svg:y1="4.273cm" svg:x2="4.741cm" svg:y2="4.273cm">
          <text:p/>
        </draw:line>
        <draw:line draw:style-name="gr4" draw:text-style-name="P1" draw:layer="layout" svg:x1="4.741cm" svg:y1="4.273cm" svg:x2="4.741cm" svg:y2="4.173cm">
          <text:p/>
        </draw:line>
        <draw:line draw:style-name="gr4" draw:text-style-name="P1" draw:layer="layout" svg:x1="4.741cm" svg:y1="4.173cm" svg:x2="4.641cm" svg:y2="4.173cm">
          <text:p/>
        </draw:line>
        <draw:polygon draw:style-name="gr5" draw:text-style-name="P2" draw:layer="layout" svg:width="0.1cm" svg:height="0.1cm" svg:x="4.641cm" svg:y="4.173cm" svg:viewBox="0 0 101 101" draw:points="0,0 101,0 101,101 0,101">
          <text:p/>
        </draw:polygon>
        <draw:line draw:style-name="gr4" draw:text-style-name="P1" draw:layer="layout" svg:x1="3.941cm" svg:y1="3.973cm" svg:x2="4.641cm" svg:y2="3.973cm">
          <text:p/>
        </draw:line>
        <draw:line draw:style-name="gr4" draw:text-style-name="P1" draw:layer="layout" svg:x1="4.641cm" svg:y1="4.168cm" svg:x2="4.641cm" svg:y2="3.323cm">
          <text:p/>
        </draw:line>
        <draw:line draw:style-name="gr4" draw:text-style-name="P1" draw:layer="layout" svg:x1="3.941cm" svg:y1="3.573cm" svg:x2="4.641cm" svg:y2="3.573cm">
          <text:p/>
        </draw:line>
        <draw:line draw:style-name="gr4" draw:text-style-name="P1" draw:layer="layout" svg:x1="3.941cm" svg:y1="3.773cm" svg:x2="4.641cm" svg:y2="3.773cm">
          <text:p/>
        </draw:line>
        <draw:line draw:style-name="gr4" draw:text-style-name="P1" draw:layer="layout" svg:x1="3.941cm" svg:y1="3.373cm" svg:x2="4.641cm" svg:y2="3.373cm">
          <text:p/>
        </draw:line>
        <draw:line draw:style-name="gr4" draw:text-style-name="P1" draw:layer="layout" svg:x1="1.691cm" svg:y1="4.123cm" svg:x2="1.691cm" svg:y2="4.773cm">
          <text:p/>
        </draw:line>
        <draw:line draw:style-name="gr4" draw:text-style-name="P1" draw:layer="layout" svg:x1="1.691cm" svg:y1="4.773cm" svg:x2="1.791cm" svg:y2="4.773cm">
          <text:p/>
        </draw:line>
        <draw:line draw:style-name="gr4" draw:text-style-name="P1" draw:layer="layout" svg:x1="1.791cm" svg:y1="4.773cm" svg:x2="1.791cm" svg:y2="4.123cm">
          <text:p/>
        </draw:line>
        <draw:line draw:style-name="gr4" draw:text-style-name="P1" draw:layer="layout" svg:x1="1.791cm" svg:y1="4.123cm" svg:x2="1.691cm" svg:y2="4.123cm">
          <text:p/>
        </draw:line>
        <draw:polygon draw:style-name="gr5" draw:text-style-name="P2" draw:layer="layout" svg:width="0.1cm" svg:height="0.65cm" svg:x="1.691cm" svg:y="4.123cm" svg:viewBox="0 0 101 651" draw:points="0,0 101,0 101,651 0,651">
          <text:p/>
        </draw:polygon>
        <draw:line draw:style-name="gr4" draw:text-style-name="P1" draw:layer="layout" svg:x1="1.791cm" svg:y1="6.323cm" svg:x2="1.791cm" svg:y2="6.673cm">
          <text:p/>
        </draw:line>
        <draw:line draw:style-name="gr4" draw:text-style-name="P1" draw:layer="layout" svg:x1="1.691cm" svg:y1="5.123cm" svg:x2="1.691cm" svg:y2="6.323cm">
          <text:p/>
        </draw:line>
        <draw:line draw:style-name="gr4" draw:text-style-name="P1" draw:layer="layout" svg:x1="1.691cm" svg:y1="6.323cm" svg:x2="1.791cm" svg:y2="6.323cm">
          <text:p/>
        </draw:line>
        <draw:line draw:style-name="gr4" draw:text-style-name="P1" draw:layer="layout" svg:x1="1.791cm" svg:y1="6.323cm" svg:x2="1.791cm" svg:y2="5.123cm">
          <text:p/>
        </draw:line>
        <draw:line draw:style-name="gr4" draw:text-style-name="P1" draw:layer="layout" svg:x1="1.791cm" svg:y1="5.123cm" svg:x2="1.691cm" svg:y2="5.123cm">
          <text:p/>
        </draw:line>
        <draw:polygon draw:style-name="gr5" draw:text-style-name="P2" draw:layer="layout" svg:width="0.1cm" svg:height="1.2cm" svg:x="1.691cm" svg:y="5.123cm" svg:viewBox="0 0 101 1201" draw:points="0,0 101,0 101,1201 0,1201">
          <text:p/>
        </draw:polygon>
        <draw:line draw:style-name="gr4" draw:text-style-name="P1" draw:layer="layout" svg:x1="1.691cm" svg:y1="6.323cm" svg:x2="1.691cm" svg:y2="6.673cm">
          <text:p/>
        </draw:line>
        <draw:line draw:style-name="gr4" draw:text-style-name="P1" draw:layer="layout" svg:x1="1.691cm" svg:y1="4.123cm" svg:x2="1.691cm" svg:y2="4.223cm">
          <text:p/>
        </draw:line>
        <draw:line draw:style-name="gr4" draw:text-style-name="P1" draw:layer="layout" svg:x1="1.691cm" svg:y1="4.223cm" svg:x2="3.541cm" svg:y2="4.223cm">
          <text:p/>
        </draw:line>
        <draw:line draw:style-name="gr4" draw:text-style-name="P1" draw:layer="layout" svg:x1="3.541cm" svg:y1="4.223cm" svg:x2="3.541cm" svg:y2="4.123cm">
          <text:p/>
        </draw:line>
        <draw:line draw:style-name="gr4" draw:text-style-name="P1" draw:layer="layout" svg:x1="3.541cm" svg:y1="4.123cm" svg:x2="1.691cm" svg:y2="4.123cm">
          <text:p/>
        </draw:line>
        <draw:polygon draw:style-name="gr5" draw:text-style-name="P2" draw:layer="layout" svg:width="1.85cm" svg:height="0.1cm" svg:x="1.691cm" svg:y="4.123cm" svg:viewBox="0 0 1851 101" draw:points="0,0 1851,0 1851,101 0,101">
          <text:p/>
        </draw:polygon>
        <draw:line draw:style-name="gr4" draw:text-style-name="P1" draw:layer="layout" svg:x1="1.791cm" svg:y1="4.773cm" svg:x2="1.791cm" svg:y2="5.123cm">
          <text:p/>
        </draw:line>
        <draw:line draw:style-name="gr4" draw:text-style-name="P1" draw:layer="layout" svg:x1="1.691cm" svg:y1="4.773cm" svg:x2="1.691cm" svg:y2="5.123cm">
          <text:p/>
        </draw:line>
        <draw:line draw:style-name="gr4" draw:text-style-name="P1" draw:layer="layout" svg:x1="3.541cm" svg:y1="5.523cm" svg:x2="3.541cm" svg:y2="6.073cm">
          <text:p/>
        </draw:line>
        <draw:line draw:style-name="gr4" draw:text-style-name="P1" draw:layer="layout" svg:x1="4.641cm" svg:y1="6.573cm" svg:x2="4.641cm" svg:y2="6.673cm">
          <text:p/>
        </draw:line>
        <draw:line draw:style-name="gr4" draw:text-style-name="P1" draw:layer="layout" svg:x1="4.641cm" svg:y1="6.673cm" svg:x2="4.741cm" svg:y2="6.673cm">
          <text:p/>
        </draw:line>
        <draw:line draw:style-name="gr4" draw:text-style-name="P1" draw:layer="layout" svg:x1="4.741cm" svg:y1="6.673cm" svg:x2="4.741cm" svg:y2="6.573cm">
          <text:p/>
        </draw:line>
        <draw:line draw:style-name="gr4" draw:text-style-name="P1" draw:layer="layout" svg:x1="4.741cm" svg:y1="6.573cm" svg:x2="4.641cm" svg:y2="6.573cm">
          <text:p/>
        </draw:line>
        <draw:polygon draw:style-name="gr5" draw:text-style-name="P2" draw:layer="layout" svg:width="0.1cm" svg:height="0.1cm" svg:x="4.641cm" svg:y="6.573cm" svg:viewBox="0 0 101 101" draw:points="0,0 101,0 101,101 0,101">
          <text:p/>
        </draw:polygon>
        <draw:line draw:style-name="gr4" draw:text-style-name="P1" draw:layer="layout" svg:x1="4.641cm" svg:y1="5.423cm" svg:x2="4.641cm" svg:y2="5.523cm">
          <text:p/>
        </draw:line>
        <draw:line draw:style-name="gr4" draw:text-style-name="P1" draw:layer="layout" svg:x1="4.641cm" svg:y1="5.523cm" svg:x2="4.741cm" svg:y2="5.523cm">
          <text:p/>
        </draw:line>
        <draw:line draw:style-name="gr4" draw:text-style-name="P1" draw:layer="layout" svg:x1="4.741cm" svg:y1="5.523cm" svg:x2="4.741cm" svg:y2="5.423cm">
          <text:p/>
        </draw:line>
        <draw:line draw:style-name="gr4" draw:text-style-name="P1" draw:layer="layout" svg:x1="4.741cm" svg:y1="5.423cm" svg:x2="4.641cm" svg:y2="5.423cm">
          <text:p/>
        </draw:line>
        <draw:polygon draw:style-name="gr5" draw:text-style-name="P2" draw:layer="layout" svg:width="0.1cm" svg:height="0.1cm" svg:x="4.641cm" svg:y="5.423cm" svg:viewBox="0 0 101 101" draw:points="0,0 101,0 101,101 0,101">
          <text:p/>
        </draw:polygon>
        <draw:line draw:style-name="gr4" draw:text-style-name="P1" draw:layer="layout" svg:x1="3.641cm" svg:y1="6.073cm" svg:x2="3.641cm" svg:y2="5.523cm">
          <text:p/>
        </draw:line>
        <draw:line draw:style-name="gr4" draw:text-style-name="P1" draw:layer="layout" svg:x1="7.791cm" svg:y1="14.123cm" svg:x2="7.791cm" svg:y2="14.223cm">
          <text:p/>
        </draw:line>
        <draw:line draw:style-name="gr4" draw:text-style-name="P1" draw:layer="layout" svg:x1="7.791cm" svg:y1="14.223cm" svg:x2="8.741cm" svg:y2="14.223cm">
          <text:p/>
        </draw:line>
        <draw:line draw:style-name="gr4" draw:text-style-name="P1" draw:layer="layout" svg:x1="8.741cm" svg:y1="14.223cm" svg:x2="8.741cm" svg:y2="14.123cm">
          <text:p/>
        </draw:line>
        <draw:line draw:style-name="gr4" draw:text-style-name="P1" draw:layer="layout" svg:x1="8.741cm" svg:y1="14.123cm" svg:x2="7.791cm" svg:y2="14.123cm">
          <text:p/>
        </draw:line>
        <draw:polygon draw:style-name="gr5" draw:text-style-name="P2" draw:layer="layout" svg:width="0.95cm" svg:height="0.1cm" svg:x="7.791cm" svg:y="14.123cm" svg:viewBox="0 0 951 101" draw:points="0,0 951,0 951,101 0,101">
          <text:p/>
        </draw:polygon>
        <draw:line draw:style-name="gr4" draw:text-style-name="P1" draw:layer="layout" svg:x1="2.958cm" svg:y1="16.619cm" svg:x2="2.558cm" svg:y2="16.619cm">
          <text:p/>
        </draw:line>
        <draw:line draw:style-name="gr4" draw:text-style-name="P1" draw:layer="layout" svg:x1="6.691cm" svg:y1="14.123cm" svg:x2="6.691cm" svg:y2="14.223cm">
          <text:p/>
        </draw:line>
        <draw:line draw:style-name="gr4" draw:text-style-name="P1" draw:layer="layout" svg:x1="6.691cm" svg:y1="14.223cm" svg:x2="7.441cm" svg:y2="14.223cm">
          <text:p/>
        </draw:line>
        <draw:line draw:style-name="gr4" draw:text-style-name="P1" draw:layer="layout" svg:x1="7.441cm" svg:y1="14.223cm" svg:x2="7.441cm" svg:y2="14.123cm">
          <text:p/>
        </draw:line>
        <draw:line draw:style-name="gr4" draw:text-style-name="P1" draw:layer="layout" svg:x1="7.441cm" svg:y1="14.123cm" svg:x2="6.691cm" svg:y2="14.123cm">
          <text:p/>
        </draw:line>
        <draw:polygon draw:style-name="gr5" draw:text-style-name="P2" draw:layer="layout" svg:width="0.75cm" svg:height="0.1cm" svg:x="6.691cm" svg:y="14.123cm" svg:viewBox="0 0 751 101" draw:points="0,0 751,0 751,101 0,101">
          <text:p/>
        </draw:polygon>
        <draw:line draw:style-name="gr4" draw:text-style-name="P1" draw:layer="layout" svg:x1="7.441cm" svg:y1="14.123cm" svg:x2="7.791cm" svg:y2="14.123cm">
          <text:p/>
        </draw:line>
        <draw:line draw:style-name="gr4" draw:text-style-name="P1" draw:layer="layout" svg:x1="2.558cm" svg:y1="16.719cm" svg:x2="2.958cm" svg:y2="16.719cm">
          <text:p/>
        </draw:line>
        <draw:line draw:style-name="gr4" draw:text-style-name="P1" draw:layer="layout" svg:x1="7.441cm" svg:y1="14.223cm" svg:x2="7.791cm" svg:y2="14.223cm">
          <text:p/>
        </draw:line>
        <draw:line draw:style-name="gr4" draw:text-style-name="P1" draw:layer="layout" svg:x1="7.591cm" svg:y1="12.223cm" svg:x2="7.591cm" svg:y2="12.323cm">
          <text:p/>
        </draw:line>
        <draw:line draw:style-name="gr4" draw:text-style-name="P1" draw:layer="layout" svg:x1="7.591cm" svg:y1="12.323cm" svg:x2="8.041cm" svg:y2="12.323cm">
          <text:p/>
        </draw:line>
        <draw:line draw:style-name="gr4" draw:text-style-name="P1" draw:layer="layout" svg:x1="8.041cm" svg:y1="12.323cm" svg:x2="8.041cm" svg:y2="12.223cm">
          <text:p/>
        </draw:line>
        <draw:line draw:style-name="gr4" draw:text-style-name="P1" draw:layer="layout" svg:x1="8.041cm" svg:y1="12.223cm" svg:x2="7.591cm" svg:y2="12.223cm">
          <text:p/>
        </draw:line>
        <draw:polygon draw:style-name="gr5" draw:text-style-name="P2" draw:layer="layout" svg:width="0.45cm" svg:height="0.1cm" svg:x="7.591cm" svg:y="12.223cm" svg:viewBox="0 0 451 101" draw:points="0,0 451,0 451,101 0,101">
          <text:p/>
        </draw:polygon>
        <draw:line draw:style-name="gr4" draw:text-style-name="P1" draw:layer="layout" svg:x1="6.891cm" svg:y1="12.223cm" svg:x2="6.891cm" svg:y2="12.323cm">
          <text:p/>
        </draw:line>
        <draw:line draw:style-name="gr4" draw:text-style-name="P1" draw:layer="layout" svg:x1="6.891cm" svg:y1="12.323cm" svg:x2="7.191cm" svg:y2="12.323cm">
          <text:p/>
        </draw:line>
        <draw:line draw:style-name="gr4" draw:text-style-name="P1" draw:layer="layout" svg:x1="7.191cm" svg:y1="12.323cm" svg:x2="7.191cm" svg:y2="12.223cm">
          <text:p/>
        </draw:line>
        <draw:line draw:style-name="gr4" draw:text-style-name="P1" draw:layer="layout" svg:x1="7.191cm" svg:y1="12.223cm" svg:x2="6.891cm" svg:y2="12.223cm">
          <text:p/>
        </draw:line>
        <draw:polygon draw:style-name="gr5" draw:text-style-name="P2" draw:layer="layout" svg:width="0.3cm" svg:height="0.1cm" svg:x="6.891cm" svg:y="12.223cm" svg:viewBox="0 0 301 101" draw:points="0,0 301,0 301,101 0,101">
          <text:p/>
        </draw:polygon>
        <draw:line draw:style-name="gr4" draw:text-style-name="P1" draw:layer="layout" svg:x1="7.076cm" svg:y1="12.323cm" svg:x2="7.492cm" svg:y2="12.023cm">
          <text:p/>
        </draw:line>
        <draw:line draw:style-name="gr4" draw:text-style-name="P1" draw:layer="layout" svg:x1="6.941cm" svg:y1="11.123cm" svg:x2="6.941cm" svg:y2="11.223cm">
          <text:p/>
        </draw:line>
        <draw:line draw:style-name="gr4" draw:text-style-name="P1" draw:layer="layout" svg:x1="6.941cm" svg:y1="11.223cm" svg:x2="7.041cm" svg:y2="11.223cm">
          <text:p/>
        </draw:line>
        <draw:line draw:style-name="gr4" draw:text-style-name="P1" draw:layer="layout" svg:x1="7.041cm" svg:y1="11.223cm" svg:x2="7.041cm" svg:y2="11.123cm">
          <text:p/>
        </draw:line>
        <draw:line draw:style-name="gr4" draw:text-style-name="P1" draw:layer="layout" svg:x1="7.041cm" svg:y1="11.123cm" svg:x2="6.941cm" svg:y2="11.123cm">
          <text:p/>
        </draw:line>
        <draw:polygon draw:style-name="gr5" draw:text-style-name="P2" draw:layer="layout" svg:width="0.1cm" svg:height="0.1cm" svg:x="6.941cm" svg:y="11.123cm" svg:viewBox="0 0 101 101" draw:points="0,0 101,0 101,101 0,101">
          <text:p/>
        </draw:polygon>
        <draw:path draw:style-name="gr4" draw:text-style-name="P1" draw:layer="layout" svg:width="0.104cm" svg:height="0.14cm" svg:x="7.398cm" svg:y="11.981cm" svg:viewBox="0 0 105 141" svg:d="M0 3c37-11 76 5 94 39 19 32 12 73-15 99">
          <text:p/>
        </draw:path>
        <draw:line draw:style-name="gr4" draw:text-style-name="P1" draw:layer="layout" svg:x1="6.991cm" svg:y1="12.223cm" svg:x2="6.991cm" svg:y2="14.223cm">
          <text:p/>
        </draw:line>
        <draw:line draw:style-name="gr4" draw:text-style-name="P1" draw:layer="layout" svg:x1="6.991cm" svg:y1="14.223cm" svg:x2="7.091cm" svg:y2="14.223cm">
          <text:p/>
        </draw:line>
        <draw:line draw:style-name="gr4" draw:text-style-name="P1" draw:layer="layout" svg:x1="7.091cm" svg:y1="14.223cm" svg:x2="7.091cm" svg:y2="12.223cm">
          <text:p/>
        </draw:line>
        <draw:line draw:style-name="gr4" draw:text-style-name="P1" draw:layer="layout" svg:x1="7.091cm" svg:y1="12.223cm" svg:x2="6.991cm" svg:y2="12.223cm">
          <text:p/>
        </draw:line>
        <draw:polygon draw:style-name="gr5" draw:text-style-name="P2" draw:layer="layout" svg:width="0.1cm" svg:height="2cm" svg:x="6.991cm" svg:y="12.223cm" svg:viewBox="0 0 101 2001" draw:points="0,0 101,0 101,2001 0,2001">
          <text:p/>
        </draw:polygon>
        <draw:line draw:style-name="gr4" draw:text-style-name="P1" draw:layer="layout" svg:x1="6.041cm" svg:y1="12.223cm" svg:x2="5.691cm" svg:y2="12.223cm">
          <text:p/>
        </draw:line>
        <draw:line draw:style-name="gr4" draw:text-style-name="P1" draw:layer="layout" svg:x1="6.041cm" svg:y1="12.223cm" svg:x2="6.041cm" svg:y2="12.323cm">
          <text:p/>
        </draw:line>
        <draw:line draw:style-name="gr4" draw:text-style-name="P1" draw:layer="layout" svg:x1="6.041cm" svg:y1="12.323cm" svg:x2="6.491cm" svg:y2="12.323cm">
          <text:p/>
        </draw:line>
        <draw:line draw:style-name="gr4" draw:text-style-name="P1" draw:layer="layout" svg:x1="6.491cm" svg:y1="12.323cm" svg:x2="6.491cm" svg:y2="12.223cm">
          <text:p/>
        </draw:line>
        <draw:line draw:style-name="gr4" draw:text-style-name="P1" draw:layer="layout" svg:x1="6.491cm" svg:y1="12.223cm" svg:x2="6.041cm" svg:y2="12.223cm">
          <text:p/>
        </draw:line>
        <draw:polygon draw:style-name="gr5" draw:text-style-name="P2" draw:layer="layout" svg:width="0.45cm" svg:height="0.1cm" svg:x="6.041cm" svg:y="12.223cm" svg:viewBox="0 0 451 101" draw:points="0,0 451,0 451,101 0,101">
          <text:p/>
        </draw:polygon>
        <draw:line draw:style-name="gr4" draw:text-style-name="P1" draw:layer="layout" svg:x1="5.241cm" svg:y1="12.223cm" svg:x2="5.241cm" svg:y2="12.323cm">
          <text:p/>
        </draw:line>
        <draw:line draw:style-name="gr4" draw:text-style-name="P1" draw:layer="layout" svg:x1="5.241cm" svg:y1="12.323cm" svg:x2="5.691cm" svg:y2="12.323cm">
          <text:p/>
        </draw:line>
        <draw:line draw:style-name="gr4" draw:text-style-name="P1" draw:layer="layout" svg:x1="5.691cm" svg:y1="12.323cm" svg:x2="5.691cm" svg:y2="12.223cm">
          <text:p/>
        </draw:line>
        <draw:line draw:style-name="gr4" draw:text-style-name="P1" draw:layer="layout" svg:x1="5.691cm" svg:y1="12.223cm" svg:x2="5.241cm" svg:y2="12.223cm">
          <text:p/>
        </draw:line>
        <draw:polygon draw:style-name="gr5" draw:text-style-name="P2" draw:layer="layout" svg:width="0.45cm" svg:height="0.1cm" svg:x="5.241cm" svg:y="12.223cm" svg:viewBox="0 0 451 101" draw:points="0,0 451,0 451,101 0,101">
          <text:p/>
        </draw:polygon>
        <draw:line draw:style-name="gr4" draw:text-style-name="P1" draw:layer="layout" svg:x1="5.691cm" svg:y1="12.323cm" svg:x2="6.041cm" svg:y2="12.323cm">
          <text:p/>
        </draw:line>
        <draw:line draw:style-name="gr4" draw:text-style-name="P1" draw:layer="layout" svg:x1="6.691cm" svg:y1="14.123cm" svg:x2="6.291cm" svg:y2="14.123cm">
          <text:p/>
        </draw:line>
        <draw:line draw:style-name="gr4" draw:text-style-name="P1" draw:layer="layout" svg:x1="6.291cm" svg:y1="14.223cm" svg:x2="6.691cm" svg:y2="14.223cm">
          <text:p/>
        </draw:line>
        <draw:line draw:style-name="gr4" draw:text-style-name="P1" draw:layer="layout" svg:x1="5.541cm" svg:y1="14.123cm" svg:x2="5.141cm" svg:y2="14.123cm">
          <text:p/>
        </draw:line>
        <draw:line draw:style-name="gr4" draw:text-style-name="P1" draw:layer="layout" svg:x1="4.091cm" svg:y1="14.123cm" svg:x2="4.091cm" svg:y2="14.223cm">
          <text:p/>
        </draw:line>
        <draw:line draw:style-name="gr4" draw:text-style-name="P1" draw:layer="layout" svg:x1="4.091cm" svg:y1="14.223cm" svg:x2="5.141cm" svg:y2="14.223cm">
          <text:p/>
        </draw:line>
        <draw:line draw:style-name="gr4" draw:text-style-name="P1" draw:layer="layout" svg:x1="5.141cm" svg:y1="14.223cm" svg:x2="5.141cm" svg:y2="14.123cm">
          <text:p/>
        </draw:line>
        <draw:line draw:style-name="gr4" draw:text-style-name="P1" draw:layer="layout" svg:x1="5.141cm" svg:y1="14.123cm" svg:x2="4.091cm" svg:y2="14.123cm">
          <text:p/>
        </draw:line>
        <draw:polygon draw:style-name="gr5" draw:text-style-name="P2" draw:layer="layout" svg:width="1.05cm" svg:height="0.1cm" svg:x="4.091cm" svg:y="14.123cm" svg:viewBox="0 0 1051 101" draw:points="0,0 1051,0 1051,101 0,101">
          <text:p/>
        </draw:polygon>
        <draw:line draw:style-name="gr4" draw:text-style-name="P1" draw:layer="layout" svg:x1="4.091cm" svg:y1="14.123cm" svg:x2="3.691cm" svg:y2="14.123cm">
          <text:p/>
        </draw:line>
        <draw:line draw:style-name="gr4" draw:text-style-name="P1" draw:layer="layout" svg:x1="3.691cm" svg:y1="14.223cm" svg:x2="4.091cm" svg:y2="14.223cm">
          <text:p/>
        </draw:line>
        <draw:line draw:style-name="gr4" draw:text-style-name="P1" draw:layer="layout" svg:x1="3.541cm" svg:y1="9.073cm" svg:x2="3.541cm" svg:y2="9.423cm">
          <text:p/>
        </draw:line>
        <draw:line draw:style-name="gr4" draw:text-style-name="P1" draw:layer="layout" svg:x1="3.541cm" svg:y1="9.423cm" svg:x2="3.641cm" svg:y2="9.423cm">
          <text:p/>
        </draw:line>
        <draw:line draw:style-name="gr4" draw:text-style-name="P1" draw:layer="layout" svg:x1="3.641cm" svg:y1="9.423cm" svg:x2="3.641cm" svg:y2="9.073cm">
          <text:p/>
        </draw:line>
        <draw:line draw:style-name="gr4" draw:text-style-name="P1" draw:layer="layout" svg:x1="3.641cm" svg:y1="9.073cm" svg:x2="3.541cm" svg:y2="9.073cm">
          <text:p/>
        </draw:line>
        <draw:polygon draw:style-name="gr5" draw:text-style-name="P2" draw:layer="layout" svg:width="0.1cm" svg:height="0.35cm" svg:x="3.541cm" svg:y="9.073cm" svg:viewBox="0 0 101 351" draw:points="0,0 101,0 101,351 0,351">
          <text:p/>
        </draw:polygon>
        <draw:path draw:style-name="gr4" draw:text-style-name="P1" draw:layer="layout" svg:width="0.103cm" svg:height="0.14cm" svg:x="4.414cm" svg:y="11.933cm" svg:viewBox="0 0 104 141" svg:d="M0 3c37-10 75 5 93 38 19 34 12 74-15 100">
          <text:p/>
        </draw:path>
        <draw:line draw:style-name="gr4" draw:text-style-name="P1" draw:layer="layout" svg:x1="4.541cm" svg:y1="12.223cm" svg:x2="4.541cm" svg:y2="12.323cm">
          <text:p/>
        </draw:line>
        <draw:line draw:style-name="gr4" draw:text-style-name="P1" draw:layer="layout" svg:x1="4.541cm" svg:y1="12.323cm" svg:x2="4.891cm" svg:y2="12.323cm">
          <text:p/>
        </draw:line>
        <draw:line draw:style-name="gr4" draw:text-style-name="P1" draw:layer="layout" svg:x1="4.891cm" svg:y1="12.323cm" svg:x2="4.891cm" svg:y2="12.223cm">
          <text:p/>
        </draw:line>
        <draw:line draw:style-name="gr4" draw:text-style-name="P1" draw:layer="layout" svg:x1="4.891cm" svg:y1="12.223cm" svg:x2="4.541cm" svg:y2="12.223cm">
          <text:p/>
        </draw:line>
        <draw:polygon draw:style-name="gr5" draw:text-style-name="P2" draw:layer="layout" svg:width="0.35cm" svg:height="0.1cm" svg:x="4.541cm" svg:y="12.223cm" svg:viewBox="0 0 351 101" draw:points="0,0 351,0 351,101 0,101">
          <text:p/>
        </draw:polygon>
        <draw:line draw:style-name="gr4" draw:text-style-name="P1" draw:layer="layout" svg:x1="4.641cm" svg:y1="12.223cm" svg:x2="4.641cm" svg:y2="14.223cm">
          <text:p/>
        </draw:line>
        <draw:line draw:style-name="gr4" draw:text-style-name="P1" draw:layer="layout" svg:x1="4.641cm" svg:y1="14.223cm" svg:x2="4.741cm" svg:y2="14.223cm">
          <text:p/>
        </draw:line>
        <draw:line draw:style-name="gr4" draw:text-style-name="P1" draw:layer="layout" svg:x1="4.741cm" svg:y1="14.223cm" svg:x2="4.741cm" svg:y2="12.223cm">
          <text:p/>
        </draw:line>
        <draw:line draw:style-name="gr4" draw:text-style-name="P1" draw:layer="layout" svg:x1="4.741cm" svg:y1="12.223cm" svg:x2="4.641cm" svg:y2="12.223cm">
          <text:p/>
        </draw:line>
        <draw:polygon draw:style-name="gr5" draw:text-style-name="P2" draw:layer="layout" svg:width="0.1cm" svg:height="2cm" svg:x="4.641cm" svg:y="12.223cm" svg:viewBox="0 0 101 2001" draw:points="0,0 101,0 101,2001 0,2001">
          <text:p/>
        </draw:polygon>
        <draw:line draw:style-name="gr4" draw:text-style-name="P1" draw:layer="layout" svg:x1="4.775cm" svg:y1="12.323cm" svg:x2="5.192cm" svg:y2="12.023cm">
          <text:p/>
        </draw:line>
        <draw:line draw:style-name="gr4" draw:text-style-name="P1" draw:layer="layout" svg:x1="4.091cm" svg:y1="12.274cm" svg:x2="4.508cm" svg:y2="11.974cm">
          <text:p/>
        </draw:line>
        <draw:line draw:style-name="gr4" draw:text-style-name="P1" draw:layer="layout" svg:x1="3.594cm" svg:y1="7.938cm" svg:x2="3.794cm" svg:y2="7.588cm">
          <text:p/>
        </draw:line>
        <draw:line draw:style-name="gr4" draw:text-style-name="P1" draw:layer="layout" svg:x1="0.991cm" svg:y1="0.673cm" svg:x2="0.991cm" svg:y2="14.873cm">
          <text:p/>
        </draw:line>
        <draw:line draw:style-name="gr4" draw:text-style-name="P1" draw:layer="layout" svg:x1="0.991cm" svg:y1="14.873cm" svg:x2="1.091cm" svg:y2="14.873cm">
          <text:p/>
        </draw:line>
        <draw:line draw:style-name="gr4" draw:text-style-name="P1" draw:layer="layout" svg:x1="1.091cm" svg:y1="14.873cm" svg:x2="1.091cm" svg:y2="0.673cm">
          <text:p/>
        </draw:line>
        <draw:line draw:style-name="gr4" draw:text-style-name="P1" draw:layer="layout" svg:x1="1.091cm" svg:y1="0.673cm" svg:x2="0.991cm" svg:y2="0.673cm">
          <text:p/>
        </draw:line>
        <draw:polygon draw:style-name="gr5" draw:text-style-name="P2" draw:layer="layout" svg:width="0.1cm" svg:height="14.2cm" svg:x="0.991cm" svg:y="0.673cm" svg:viewBox="0 0 101 14201" draw:points="0,0 101,0 101,14201 0,14201">
          <text:p/>
        </draw:polygon>
        <draw:line draw:style-name="gr4" draw:text-style-name="P1" draw:layer="layout" svg:x1="1.691cm" svg:y1="6.673cm" svg:x2="1.691cm" svg:y2="7.623cm">
          <text:p/>
        </draw:line>
        <draw:line draw:style-name="gr4" draw:text-style-name="P1" draw:layer="layout" svg:x1="1.691cm" svg:y1="7.623cm" svg:x2="1.791cm" svg:y2="7.623cm">
          <text:p/>
        </draw:line>
        <draw:line draw:style-name="gr4" draw:text-style-name="P1" draw:layer="layout" svg:x1="1.791cm" svg:y1="7.623cm" svg:x2="1.791cm" svg:y2="6.673cm">
          <text:p/>
        </draw:line>
        <draw:line draw:style-name="gr4" draw:text-style-name="P1" draw:layer="layout" svg:x1="1.791cm" svg:y1="6.673cm" svg:x2="1.691cm" svg:y2="6.673cm">
          <text:p/>
        </draw:line>
        <draw:polygon draw:style-name="gr5" draw:text-style-name="P2" draw:layer="layout" svg:width="0.1cm" svg:height="0.95cm" svg:x="1.691cm" svg:y="6.673cm" svg:viewBox="0 0 101 951" draw:points="0,0 101,0 101,951 0,951">
          <text:p/>
        </draw:polygon>
        <draw:line draw:style-name="gr4" draw:text-style-name="P1" draw:layer="layout" svg:x1="3.541cm" svg:y1="7.173cm" svg:x2="3.541cm" svg:y2="7.523cm">
          <text:p/>
        </draw:line>
        <draw:line draw:style-name="gr4" draw:text-style-name="P1" draw:layer="layout" svg:x1="3.541cm" svg:y1="7.523cm" svg:x2="3.641cm" svg:y2="7.523cm">
          <text:p/>
        </draw:line>
        <draw:line draw:style-name="gr4" draw:text-style-name="P1" draw:layer="layout" svg:x1="3.641cm" svg:y1="7.523cm" svg:x2="3.641cm" svg:y2="7.173cm">
          <text:p/>
        </draw:line>
        <draw:line draw:style-name="gr4" draw:text-style-name="P1" draw:layer="layout" svg:x1="3.641cm" svg:y1="7.173cm" svg:x2="3.541cm" svg:y2="7.173cm">
          <text:p/>
        </draw:line>
        <draw:polygon draw:style-name="gr5" draw:text-style-name="P2" draw:layer="layout" svg:width="0.1cm" svg:height="0.35cm" svg:x="3.541cm" svg:y="7.173cm" svg:viewBox="0 0 101 351" draw:points="0,0 101,0 101,351 0,351">
          <text:p/>
        </draw:polygon>
        <draw:line draw:style-name="gr4" draw:text-style-name="P1" draw:layer="layout" svg:x1="1.691cm" svg:y1="14.123cm" svg:x2="1.691cm" svg:y2="14.223cm">
          <text:p/>
        </draw:line>
        <draw:line draw:style-name="gr4" draw:text-style-name="P1" draw:layer="layout" svg:x1="1.691cm" svg:y1="14.223cm" svg:x2="1.791cm" svg:y2="14.223cm">
          <text:p/>
        </draw:line>
        <draw:line draw:style-name="gr4" draw:text-style-name="P1" draw:layer="layout" svg:x1="1.791cm" svg:y1="14.223cm" svg:x2="1.791cm" svg:y2="14.123cm">
          <text:p/>
        </draw:line>
        <draw:line draw:style-name="gr4" draw:text-style-name="P1" draw:layer="layout" svg:x1="1.791cm" svg:y1="14.123cm" svg:x2="1.691cm" svg:y2="14.123cm">
          <text:p/>
        </draw:line>
        <draw:polygon draw:style-name="gr5" draw:text-style-name="P2" draw:layer="layout" svg:width="0.1cm" svg:height="0.1cm" svg:x="1.691cm" svg:y="14.123cm" svg:viewBox="0 0 101 101" draw:points="0,0 101,0 101,101 0,101">
          <text:p/>
        </draw:polygon>
        <draw:line draw:style-name="gr4" draw:text-style-name="P1" draw:layer="layout" svg:x1="3.141cm" svg:y1="14.173cm" svg:x2="1.741cm" svg:y2="14.173cm">
          <text:p/>
        </draw:line>
        <draw:line draw:style-name="gr4" draw:text-style-name="P1" draw:layer="layout" svg:x1="1.691cm" svg:y1="10.823cm" svg:x2="1.691cm" svg:y2="11.223cm">
          <text:p/>
        </draw:line>
        <draw:line draw:style-name="gr4" draw:text-style-name="P1" draw:layer="layout" svg:x1="1.691cm" svg:y1="11.223cm" svg:x2="1.791cm" svg:y2="11.223cm">
          <text:p/>
        </draw:line>
        <draw:line draw:style-name="gr4" draw:text-style-name="P1" draw:layer="layout" svg:x1="1.791cm" svg:y1="11.223cm" svg:x2="1.791cm" svg:y2="10.823cm">
          <text:p/>
        </draw:line>
        <draw:line draw:style-name="gr4" draw:text-style-name="P1" draw:layer="layout" svg:x1="1.791cm" svg:y1="10.823cm" svg:x2="1.691cm" svg:y2="10.823cm">
          <text:p/>
        </draw:line>
        <draw:polygon draw:style-name="gr5" draw:text-style-name="P2" draw:layer="layout" svg:width="0.1cm" svg:height="0.4cm" svg:x="1.691cm" svg:y="10.823cm" svg:viewBox="0 0 101 401" draw:points="0,0 101,0 101,401 0,401">
          <text:p/>
        </draw:polygon>
        <draw:line draw:style-name="gr4" draw:text-style-name="P1" draw:layer="layout" svg:x1="1.691cm" svg:y1="13.173cm" svg:x2="1.691cm" svg:y2="13.273cm">
          <text:p/>
        </draw:line>
        <draw:line draw:style-name="gr4" draw:text-style-name="P1" draw:layer="layout" svg:x1="1.691cm" svg:y1="13.273cm" svg:x2="1.791cm" svg:y2="13.273cm">
          <text:p/>
        </draw:line>
        <draw:line draw:style-name="gr4" draw:text-style-name="P1" draw:layer="layout" svg:x1="1.791cm" svg:y1="13.273cm" svg:x2="1.791cm" svg:y2="13.173cm">
          <text:p/>
        </draw:line>
        <draw:line draw:style-name="gr4" draw:text-style-name="P1" draw:layer="layout" svg:x1="1.791cm" svg:y1="13.173cm" svg:x2="1.691cm" svg:y2="13.173cm">
          <text:p/>
        </draw:line>
        <draw:polygon draw:style-name="gr5" draw:text-style-name="P2" draw:layer="layout" svg:width="0.1cm" svg:height="0.1cm" svg:x="1.691cm" svg:y="13.173cm" svg:viewBox="0 0 101 101" draw:points="0,0 101,0 101,101 0,101">
          <text:p/>
        </draw:polygon>
        <draw:line draw:style-name="gr4" draw:text-style-name="P1" draw:layer="layout" svg:x1="1.691cm" svg:y1="12.273cm" svg:x2="1.691cm" svg:y2="12.373cm">
          <text:p/>
        </draw:line>
        <draw:line draw:style-name="gr4" draw:text-style-name="P1" draw:layer="layout" svg:x1="1.691cm" svg:y1="12.373cm" svg:x2="1.791cm" svg:y2="12.373cm">
          <text:p/>
        </draw:line>
        <draw:line draw:style-name="gr4" draw:text-style-name="P1" draw:layer="layout" svg:x1="1.791cm" svg:y1="12.373cm" svg:x2="1.791cm" svg:y2="12.273cm">
          <text:p/>
        </draw:line>
        <draw:line draw:style-name="gr4" draw:text-style-name="P1" draw:layer="layout" svg:x1="1.791cm" svg:y1="12.273cm" svg:x2="1.691cm" svg:y2="12.273cm">
          <text:p/>
        </draw:line>
        <draw:polygon draw:style-name="gr5" draw:text-style-name="P2" draw:layer="layout" svg:width="0.1cm" svg:height="0.1cm" svg:x="1.691cm" svg:y="12.273cm" svg:viewBox="0 0 101 101" draw:points="0,0 101,0 101,101 0,101">
          <text:p/>
        </draw:polygon>
        <draw:line draw:style-name="gr4" draw:text-style-name="P1" draw:layer="layout" svg:x1="1.691cm" svg:y1="7.623cm" svg:x2="1.691cm" svg:y2="7.973cm">
          <text:p/>
        </draw:line>
        <draw:line draw:style-name="gr4" draw:text-style-name="P1" draw:layer="layout" svg:x1="4.841cm" svg:y1="8.873cm" svg:x2="4.841cm" svg:y2="10.023cm">
          <text:p/>
        </draw:line>
        <draw:line draw:style-name="gr4" draw:text-style-name="P1" draw:layer="layout" svg:x1="4.641cm" svg:y1="7.673cm" svg:x2="4.641cm" svg:y2="7.773cm">
          <text:p/>
        </draw:line>
        <draw:line draw:style-name="gr4" draw:text-style-name="P1" draw:layer="layout" svg:x1="4.641cm" svg:y1="7.773cm" svg:x2="4.741cm" svg:y2="7.773cm">
          <text:p/>
        </draw:line>
        <draw:line draw:style-name="gr4" draw:text-style-name="P1" draw:layer="layout" svg:x1="4.741cm" svg:y1="7.773cm" svg:x2="4.741cm" svg:y2="7.673cm">
          <text:p/>
        </draw:line>
        <draw:line draw:style-name="gr4" draw:text-style-name="P1" draw:layer="layout" svg:x1="4.741cm" svg:y1="7.673cm" svg:x2="4.641cm" svg:y2="7.673cm">
          <text:p/>
        </draw:line>
        <draw:polygon draw:style-name="gr5" draw:text-style-name="P2" draw:layer="layout" svg:width="0.1cm" svg:height="0.1cm" svg:x="4.641cm" svg:y="7.673cm" svg:viewBox="0 0 101 101" draw:points="0,0 101,0 101,101 0,101">
          <text:p/>
        </draw:polygon>
        <draw:line draw:style-name="gr4" draw:text-style-name="P1" draw:layer="layout" svg:x1="4.641cm" svg:y1="8.823cm" svg:x2="4.641cm" svg:y2="8.923cm">
          <text:p/>
        </draw:line>
        <draw:line draw:style-name="gr4" draw:text-style-name="P1" draw:layer="layout" svg:x1="4.641cm" svg:y1="8.923cm" svg:x2="4.741cm" svg:y2="8.923cm">
          <text:p/>
        </draw:line>
        <draw:line draw:style-name="gr4" draw:text-style-name="P1" draw:layer="layout" svg:x1="4.741cm" svg:y1="8.923cm" svg:x2="4.741cm" svg:y2="8.823cm">
          <text:p/>
        </draw:line>
        <draw:line draw:style-name="gr4" draw:text-style-name="P1" draw:layer="layout" svg:x1="4.741cm" svg:y1="8.823cm" svg:x2="4.641cm" svg:y2="8.823cm">
          <text:p/>
        </draw:line>
        <draw:polygon draw:style-name="gr5" draw:text-style-name="P2" draw:layer="layout" svg:width="0.1cm" svg:height="0.1cm" svg:x="4.641cm" svg:y="8.823cm" svg:viewBox="0 0 101 101" draw:points="0,0 101,0 101,101 0,101">
          <text:p/>
        </draw:polygon>
        <draw:line draw:style-name="gr4" draw:text-style-name="P1" draw:layer="layout" svg:x1="3.541cm" svg:y1="11.023cm" svg:x2="3.541cm" svg:y2="11.223cm">
          <text:p/>
        </draw:line>
        <draw:line draw:style-name="gr4" draw:text-style-name="P1" draw:layer="layout" svg:x1="3.541cm" svg:y1="11.223cm" svg:x2="3.641cm" svg:y2="11.223cm">
          <text:p/>
        </draw:line>
        <draw:line draw:style-name="gr4" draw:text-style-name="P1" draw:layer="layout" svg:x1="3.641cm" svg:y1="11.223cm" svg:x2="3.641cm" svg:y2="11.023cm">
          <text:p/>
        </draw:line>
        <draw:line draw:style-name="gr4" draw:text-style-name="P1" draw:layer="layout" svg:x1="3.641cm" svg:y1="11.023cm" svg:x2="3.541cm" svg:y2="11.023cm">
          <text:p/>
        </draw:line>
        <draw:polygon draw:style-name="gr5" draw:text-style-name="P2" draw:layer="layout" svg:width="0.1cm" svg:height="0.2cm" svg:x="3.541cm" svg:y="11.023cm" svg:viewBox="0 0 101 201" draw:points="0,0 101,0 101,201 0,201">
          <text:p/>
        </draw:polygon>
        <draw:path draw:style-name="gr4" draw:text-style-name="P1" draw:layer="layout" svg:width="0.145cm" svg:height="0.1cm" svg:x="3.696cm" svg:y="7.573cm" svg:viewBox="0 0 146 101" svg:d="M0 11c31-16 68-14 98 4s48 51 48 86">
          <text:p/>
        </draw:path>
        <draw:line draw:style-name="gr4" draw:text-style-name="P1" draw:layer="layout" svg:x1="0.991cm" svg:y1="0.673cm" svg:x2="0.991cm" svg:y2="0.773cm">
          <text:p/>
        </draw:line>
        <draw:line draw:style-name="gr4" draw:text-style-name="P1" draw:layer="layout" svg:x1="0.991cm" svg:y1="0.773cm" svg:x2="5.341cm" svg:y2="0.773cm">
          <text:p/>
        </draw:line>
        <draw:line draw:style-name="gr4" draw:text-style-name="P1" draw:layer="layout" svg:x1="5.341cm" svg:y1="0.773cm" svg:x2="5.341cm" svg:y2="0.673cm">
          <text:p/>
        </draw:line>
        <draw:line draw:style-name="gr4" draw:text-style-name="P1" draw:layer="layout" svg:x1="5.341cm" svg:y1="0.673cm" svg:x2="0.991cm" svg:y2="0.673cm">
          <text:p/>
        </draw:line>
        <draw:polygon draw:style-name="gr5" draw:text-style-name="P2" draw:layer="layout" svg:width="4.35cm" svg:height="0.1cm" svg:x="0.991cm" svg:y="0.673cm" svg:viewBox="0 0 4351 101" draw:points="0,0 4351,0 4351,101 0,101">
          <text:p/>
        </draw:polygon>
        <draw:line draw:style-name="gr4" draw:text-style-name="P1" draw:layer="layout" svg:x1="3.941cm" svg:y1="1.973cm" svg:x2="4.641cm" svg:y2="1.973cm">
          <text:p/>
        </draw:line>
        <draw:line draw:style-name="gr4" draw:text-style-name="P1" draw:layer="layout" svg:x1="11.271cm" svg:y1="0.673cm" svg:x2="11.271cm" svg:y2="0.773cm">
          <text:p/>
        </draw:line>
        <draw:line draw:style-name="gr4" draw:text-style-name="P1" draw:layer="layout" svg:x1="11.271cm" svg:y1="0.773cm" svg:x2="12.591cm" svg:y2="0.773cm">
          <text:p/>
        </draw:line>
        <draw:line draw:style-name="gr4" draw:text-style-name="P1" draw:layer="layout" svg:x1="12.591cm" svg:y1="0.773cm" svg:x2="12.591cm" svg:y2="0.673cm">
          <text:p/>
        </draw:line>
        <draw:line draw:style-name="gr4" draw:text-style-name="P1" draw:layer="layout" svg:x1="12.591cm" svg:y1="0.673cm" svg:x2="11.271cm" svg:y2="0.673cm">
          <text:p/>
        </draw:line>
        <draw:polygon draw:style-name="gr5" draw:text-style-name="P2" draw:layer="layout" svg:width="1.32cm" svg:height="0.1cm" svg:x="11.271cm" svg:y="0.673cm" svg:viewBox="0 0 1321 101" draw:points="0,0 1321,0 1321,101 0,101">
          <text:p/>
        </draw:polygon>
        <draw:line draw:style-name="gr4" draw:text-style-name="P1" draw:layer="layout" svg:x1="4.641cm" svg:y1="9.973cm" svg:x2="4.641cm" svg:y2="10.073cm">
          <text:p/>
        </draw:line>
        <draw:line draw:style-name="gr4" draw:text-style-name="P1" draw:layer="layout" svg:x1="4.641cm" svg:y1="10.073cm" svg:x2="4.741cm" svg:y2="10.073cm">
          <text:p/>
        </draw:line>
        <draw:line draw:style-name="gr4" draw:text-style-name="P1" draw:layer="layout" svg:x1="4.741cm" svg:y1="10.073cm" svg:x2="4.741cm" svg:y2="9.973cm">
          <text:p/>
        </draw:line>
        <draw:line draw:style-name="gr4" draw:text-style-name="P1" draw:layer="layout" svg:x1="4.741cm" svg:y1="9.973cm" svg:x2="4.641cm" svg:y2="9.973cm">
          <text:p/>
        </draw:line>
        <draw:polygon draw:style-name="gr5" draw:text-style-name="P2" draw:layer="layout" svg:width="0.1cm" svg:height="0.1cm" svg:x="4.641cm" svg:y="9.973cm" svg:viewBox="0 0 101 101" draw:points="0,0 101,0 101,101 0,101">
          <text:p/>
        </draw:polygon>
        <draw:path draw:style-name="gr4" draw:text-style-name="P1" draw:layer="layout" svg:width="0.145cm" svg:height="0.1cm" svg:x="3.696cm" svg:y="9.473cm" svg:viewBox="0 0 146 101" svg:d="M0 10c31-15 68-14 98 5 30 18 48 51 48 86">
          <text:p/>
        </draw:path>
        <draw:line draw:style-name="gr4" draw:text-style-name="P1" draw:layer="layout" svg:x1="5.141cm" svg:y1="8.873cm" svg:x2="5.141cm" svg:y2="10.023cm">
          <text:p/>
        </draw:line>
        <draw:line draw:style-name="gr4" draw:text-style-name="P1" draw:layer="layout" svg:x1="4.991cm" svg:y1="8.873cm" svg:x2="4.991cm" svg:y2="10.023cm">
          <text:p/>
        </draw:line>
        <draw:line draw:style-name="gr4" draw:text-style-name="P1" draw:layer="layout" svg:x1="5.141cm" svg:y1="10.023cm" svg:x2="4.741cm" svg:y2="10.023cm">
          <text:p/>
        </draw:line>
        <draw:line draw:style-name="gr4" draw:text-style-name="P1" draw:layer="layout" svg:x1="4.691cm" svg:y1="8.873cm" svg:x2="5.141cm" svg:y2="8.873cm">
          <text:p/>
        </draw:line>
        <draw:line draw:style-name="gr4" draw:text-style-name="P1" draw:layer="layout" svg:x1="4.691cm" svg:y1="4.223cm" svg:x2="4.691cm" svg:y2="11.173cm">
          <text:p/>
        </draw:line>
        <draw:line draw:style-name="gr4" draw:text-style-name="P1" draw:layer="layout" svg:x1="3.541cm" svg:y1="7.923cm" svg:x2="3.541cm" svg:y2="8.673cm">
          <text:p/>
        </draw:line>
        <draw:line draw:style-name="gr4" draw:text-style-name="P1" draw:layer="layout" svg:x1="3.541cm" svg:y1="8.673cm" svg:x2="3.641cm" svg:y2="8.673cm">
          <text:p/>
        </draw:line>
        <draw:line draw:style-name="gr4" draw:text-style-name="P1" draw:layer="layout" svg:x1="3.641cm" svg:y1="8.673cm" svg:x2="3.641cm" svg:y2="7.923cm">
          <text:p/>
        </draw:line>
        <draw:line draw:style-name="gr4" draw:text-style-name="P1" draw:layer="layout" svg:x1="3.641cm" svg:y1="7.923cm" svg:x2="3.541cm" svg:y2="7.923cm">
          <text:p/>
        </draw:line>
        <draw:polygon draw:style-name="gr5" draw:text-style-name="P2" draw:layer="layout" svg:width="0.1cm" svg:height="0.75cm" svg:x="3.541cm" svg:y="7.923cm" svg:viewBox="0 0 101 751" draw:points="0,0 101,0 101,751 0,751">
          <text:p/>
        </draw:polygon>
        <draw:line draw:style-name="gr4" draw:text-style-name="P1" draw:layer="layout" svg:x1="3.591cm" svg:y1="7.224cm" svg:x2="3.792cm" svg:y2="6.873cm">
          <text:p/>
        </draw:line>
        <draw:line draw:style-name="gr4" draw:text-style-name="P1" draw:layer="layout" svg:x1="3.541cm" svg:y1="6.073cm" svg:x2="3.541cm" svg:y2="6.823cm">
          <text:p/>
        </draw:line>
        <draw:line draw:style-name="gr4" draw:text-style-name="P1" draw:layer="layout" svg:x1="3.541cm" svg:y1="6.823cm" svg:x2="3.641cm" svg:y2="6.823cm">
          <text:p/>
        </draw:line>
        <draw:line draw:style-name="gr4" draw:text-style-name="P1" draw:layer="layout" svg:x1="3.641cm" svg:y1="6.823cm" svg:x2="3.641cm" svg:y2="6.073cm">
          <text:p/>
        </draw:line>
        <draw:line draw:style-name="gr4" draw:text-style-name="P1" draw:layer="layout" svg:x1="3.641cm" svg:y1="6.073cm" svg:x2="3.541cm" svg:y2="6.073cm">
          <text:p/>
        </draw:line>
        <draw:polygon draw:style-name="gr5" draw:text-style-name="P2" draw:layer="layout" svg:width="0.1cm" svg:height="0.75cm" svg:x="3.541cm" svg:y="6.073cm" svg:viewBox="0 0 101 751" draw:points="0,0 101,0 101,751 0,751">
          <text:p/>
        </draw:polygon>
        <draw:line draw:style-name="gr4" draw:text-style-name="P1" draw:layer="layout" svg:x1="3.594cm" svg:y1="11.039cm" svg:x2="3.794cm" svg:y2="10.688cm">
          <text:p/>
        </draw:line>
        <draw:line draw:style-name="gr4" draw:text-style-name="P1" draw:layer="layout" svg:x1="3.594cm" svg:y1="9.089cm" svg:x2="3.794cm" svg:y2="8.738cm">
          <text:p/>
        </draw:line>
        <draw:line draw:style-name="gr4" draw:text-style-name="P1" draw:layer="layout" svg:x1="1.791cm" svg:y1="7.623cm" svg:x2="1.791cm" svg:y2="8.023cm">
          <text:p/>
        </draw:line>
        <draw:path draw:style-name="gr4" draw:text-style-name="P1" draw:layer="layout" svg:width="0.145cm" svg:height="0.1cm" svg:x="3.696cm" svg:y="8.723cm" svg:viewBox="0 0 146 101" svg:d="M0 11c31-16 68-14 98 5 30 18 48 50 48 85">
          <text:p/>
        </draw:path>
        <draw:line draw:style-name="gr4" draw:text-style-name="P1" draw:layer="layout" svg:x1="1.791cm" svg:y1="7.323cm" svg:x2="1.791cm" svg:y2="7.423cm">
          <text:p/>
        </draw:line>
        <draw:line draw:style-name="gr4" draw:text-style-name="P1" draw:layer="layout" svg:x1="1.791cm" svg:y1="7.423cm" svg:x2="3.541cm" svg:y2="7.423cm">
          <text:p/>
        </draw:line>
        <draw:line draw:style-name="gr4" draw:text-style-name="P1" draw:layer="layout" svg:x1="3.541cm" svg:y1="7.423cm" svg:x2="3.541cm" svg:y2="7.323cm">
          <text:p/>
        </draw:line>
        <draw:line draw:style-name="gr4" draw:text-style-name="P1" draw:layer="layout" svg:x1="3.541cm" svg:y1="7.323cm" svg:x2="1.791cm" svg:y2="7.323cm">
          <text:p/>
        </draw:line>
        <draw:polygon draw:style-name="gr5" draw:text-style-name="P2" draw:layer="layout" svg:width="1.75cm" svg:height="0.1cm" svg:x="1.791cm" svg:y="7.323cm" svg:viewBox="0 0 1751 101" draw:points="0,0 1751,0 1751,101 0,101">
          <text:p/>
        </draw:polygon>
        <draw:line draw:style-name="gr4" draw:text-style-name="P1" draw:layer="layout" svg:x1="1.791cm" svg:y1="8.973cm" svg:x2="1.791cm" svg:y2="8.623cm">
          <text:p/>
        </draw:line>
        <draw:line draw:style-name="gr4" draw:text-style-name="P1" draw:layer="layout" svg:x1="1.691cm" svg:y1="7.973cm" svg:x2="1.691cm" svg:y2="8.623cm">
          <text:p/>
        </draw:line>
        <draw:line draw:style-name="gr4" draw:text-style-name="P1" draw:layer="layout" svg:x1="1.691cm" svg:y1="8.623cm" svg:x2="1.791cm" svg:y2="8.623cm">
          <text:p/>
        </draw:line>
        <draw:line draw:style-name="gr4" draw:text-style-name="P1" draw:layer="layout" svg:x1="1.791cm" svg:y1="8.623cm" svg:x2="1.791cm" svg:y2="7.973cm">
          <text:p/>
        </draw:line>
        <draw:line draw:style-name="gr4" draw:text-style-name="P1" draw:layer="layout" svg:x1="1.791cm" svg:y1="7.973cm" svg:x2="1.691cm" svg:y2="7.973cm">
          <text:p/>
        </draw:line>
        <draw:polygon draw:style-name="gr5" draw:text-style-name="P2" draw:layer="layout" svg:width="0.1cm" svg:height="0.65cm" svg:x="1.691cm" svg:y="7.973cm" svg:viewBox="0 0 101 651" draw:points="0,0 101,0 101,651 0,651">
          <text:p/>
        </draw:polygon>
        <draw:line draw:style-name="gr4" draw:text-style-name="P1" draw:layer="layout" svg:x1="1.691cm" svg:y1="8.623cm" svg:x2="1.691cm" svg:y2="8.973cm">
          <text:p/>
        </draw:line>
        <draw:path draw:style-name="gr4" draw:text-style-name="P1" draw:layer="layout" svg:width="0.145cm" svg:height="0.1cm" svg:x="3.696cm" svg:y="10.673cm" svg:viewBox="0 0 146 101" svg:d="M0 10c31-15 68-13 98 5 30 19 48 51 48 86">
          <text:p/>
        </draw:path>
        <draw:line draw:style-name="gr4" draw:text-style-name="P1" draw:layer="layout" svg:x1="3.594cm" svg:y1="9.839cm" svg:x2="3.794cm" svg:y2="9.488cm">
          <text:p/>
        </draw:line>
        <draw:line draw:style-name="gr4" draw:text-style-name="P1" draw:layer="layout" svg:x1="1.791cm" svg:y1="9.223cm" svg:x2="1.791cm" svg:y2="9.323cm">
          <text:p/>
        </draw:line>
        <draw:line draw:style-name="gr4" draw:text-style-name="P1" draw:layer="layout" svg:x1="1.791cm" svg:y1="9.323cm" svg:x2="3.591cm" svg:y2="9.323cm">
          <text:p/>
        </draw:line>
        <draw:line draw:style-name="gr4" draw:text-style-name="P1" draw:layer="layout" svg:x1="3.591cm" svg:y1="9.323cm" svg:x2="3.591cm" svg:y2="9.223cm">
          <text:p/>
        </draw:line>
        <draw:line draw:style-name="gr4" draw:text-style-name="P1" draw:layer="layout" svg:x1="3.591cm" svg:y1="9.223cm" svg:x2="1.791cm" svg:y2="9.223cm">
          <text:p/>
        </draw:line>
        <draw:polygon draw:style-name="gr5" draw:text-style-name="P2" draw:layer="layout" svg:width="1.8cm" svg:height="0.1cm" svg:x="1.791cm" svg:y="9.223cm" svg:viewBox="0 0 1801 101" draw:points="0,0 1801,0 1801,101 0,101">
          <text:p/>
        </draw:polygon>
        <draw:line draw:style-name="gr4" draw:text-style-name="P1" draw:layer="layout" svg:x1="3.541cm" svg:y1="9.823cm" svg:x2="3.541cm" svg:y2="10.623cm">
          <text:p/>
        </draw:line>
        <draw:line draw:style-name="gr4" draw:text-style-name="P1" draw:layer="layout" svg:x1="3.541cm" svg:y1="10.623cm" svg:x2="3.641cm" svg:y2="10.623cm">
          <text:p/>
        </draw:line>
        <draw:line draw:style-name="gr4" draw:text-style-name="P1" draw:layer="layout" svg:x1="3.641cm" svg:y1="10.623cm" svg:x2="3.641cm" svg:y2="9.823cm">
          <text:p/>
        </draw:line>
        <draw:line draw:style-name="gr4" draw:text-style-name="P1" draw:layer="layout" svg:x1="3.641cm" svg:y1="9.823cm" svg:x2="3.541cm" svg:y2="9.823cm">
          <text:p/>
        </draw:line>
        <draw:polygon draw:style-name="gr5" draw:text-style-name="P2" draw:layer="layout" svg:width="0.1cm" svg:height="0.8cm" svg:x="3.541cm" svg:y="9.823cm" svg:viewBox="0 0 101 801" draw:points="0,0 101,0 101,801 0,801">
          <text:p/>
        </draw:polygon>
        <draw:line draw:style-name="gr4" draw:text-style-name="P1" draw:layer="layout" svg:x1="1.691cm" svg:y1="9.923cm" svg:x2="1.691cm" svg:y2="10.523cm">
          <text:p/>
        </draw:line>
        <draw:line draw:style-name="gr4" draw:text-style-name="P1" draw:layer="layout" svg:x1="1.691cm" svg:y1="10.523cm" svg:x2="1.791cm" svg:y2="10.523cm">
          <text:p/>
        </draw:line>
        <draw:line draw:style-name="gr4" draw:text-style-name="P1" draw:layer="layout" svg:x1="1.791cm" svg:y1="10.523cm" svg:x2="1.791cm" svg:y2="9.923cm">
          <text:p/>
        </draw:line>
        <draw:line draw:style-name="gr4" draw:text-style-name="P1" draw:layer="layout" svg:x1="1.791cm" svg:y1="9.923cm" svg:x2="1.691cm" svg:y2="9.923cm">
          <text:p/>
        </draw:line>
        <draw:polygon draw:style-name="gr5" draw:text-style-name="P2" draw:layer="layout" svg:width="0.1cm" svg:height="0.6cm" svg:x="1.691cm" svg:y="9.923cm" svg:viewBox="0 0 101 601" draw:points="0,0 101,0 101,601 0,601">
          <text:p/>
        </draw:polygon>
        <draw:line draw:style-name="gr4" draw:text-style-name="P1" draw:layer="layout" svg:x1="1.791cm" svg:y1="9.923cm" svg:x2="1.791cm" svg:y2="9.623cm">
          <text:p/>
        </draw:line>
        <draw:line draw:style-name="gr4" draw:text-style-name="P1" draw:layer="layout" svg:x1="1.691cm" svg:y1="9.623cm" svg:x2="1.691cm" svg:y2="9.923cm">
          <text:p/>
        </draw:line>
        <draw:line draw:style-name="gr4" draw:text-style-name="P1" draw:layer="layout" svg:x1="1.791cm" svg:y1="10.523cm" svg:x2="1.791cm" svg:y2="10.823cm">
          <text:p/>
        </draw:line>
        <draw:line draw:style-name="gr4" draw:text-style-name="P1" draw:layer="layout" svg:x1="1.691cm" svg:y1="8.973cm" svg:x2="1.691cm" svg:y2="9.623cm">
          <text:p/>
        </draw:line>
        <draw:line draw:style-name="gr4" draw:text-style-name="P1" draw:layer="layout" svg:x1="1.691cm" svg:y1="9.623cm" svg:x2="1.791cm" svg:y2="9.623cm">
          <text:p/>
        </draw:line>
        <draw:line draw:style-name="gr4" draw:text-style-name="P1" draw:layer="layout" svg:x1="1.791cm" svg:y1="9.623cm" svg:x2="1.791cm" svg:y2="8.973cm">
          <text:p/>
        </draw:line>
        <draw:line draw:style-name="gr4" draw:text-style-name="P1" draw:layer="layout" svg:x1="1.791cm" svg:y1="8.973cm" svg:x2="1.691cm" svg:y2="8.973cm">
          <text:p/>
        </draw:line>
        <draw:polygon draw:style-name="gr5" draw:text-style-name="P2" draw:layer="layout" svg:width="0.1cm" svg:height="0.65cm" svg:x="1.691cm" svg:y="8.973cm" svg:viewBox="0 0 101 651" draw:points="0,0 101,0 101,651 0,651">
          <text:p/>
        </draw:polygon>
        <draw:line draw:style-name="gr4" draw:text-style-name="P1" draw:layer="layout" svg:x1="1.691cm" svg:y1="10.823cm" svg:x2="1.691cm" svg:y2="10.523cm">
          <text:p/>
        </draw:line>
        <draw:line draw:style-name="gr4" draw:text-style-name="P1" draw:layer="layout" svg:x1="5.141cm" svg:y1="7.723cm" svg:x2="5.141cm" svg:y2="4.223cm">
          <text:p/>
        </draw:line>
        <draw:line draw:style-name="gr4" draw:text-style-name="P1" draw:layer="layout" svg:x1="4.691cm" svg:y1="7.723cm" svg:x2="5.141cm" svg:y2="7.723cm">
          <text:p/>
        </draw:line>
        <draw:path draw:style-name="gr4" draw:text-style-name="P1" draw:layer="layout" svg:width="0.144cm" svg:height="0.1cm" svg:x="3.694cm" svg:y="6.858cm" svg:viewBox="0 0 145 101" svg:d="M0 11c30-16 67-14 98 4 29 18 47 50 47 86">
          <text:p/>
        </draw:path>
        <draw:line draw:style-name="gr4" draw:text-style-name="P1" draw:layer="layout" svg:x1="8.441cm" svg:y1="4.173cm" svg:x2="8.441cm" svg:y2="4.273cm">
          <text:p/>
        </draw:line>
        <draw:line draw:style-name="gr4" draw:text-style-name="P1" draw:layer="layout" svg:x1="8.441cm" svg:y1="4.273cm" svg:x2="8.541cm" svg:y2="4.273cm">
          <text:p/>
        </draw:line>
        <draw:line draw:style-name="gr4" draw:text-style-name="P1" draw:layer="layout" svg:x1="8.541cm" svg:y1="4.273cm" svg:x2="8.541cm" svg:y2="4.173cm">
          <text:p/>
        </draw:line>
        <draw:line draw:style-name="gr4" draw:text-style-name="P1" draw:layer="layout" svg:x1="8.541cm" svg:y1="4.173cm" svg:x2="8.441cm" svg:y2="4.173cm">
          <text:p/>
        </draw:line>
        <draw:polygon draw:style-name="gr5" draw:text-style-name="P2" draw:layer="layout" svg:width="0.1cm" svg:height="0.1cm" svg:x="8.441cm" svg:y="4.173cm" svg:viewBox="0 0 101 101" draw:points="0,0 101,0 101,101 0,101">
          <text:p/>
        </draw:polygon>
        <draw:path draw:style-name="gr4" draw:text-style-name="P1" draw:layer="layout" svg:width="0.103cm" svg:height="0.14cm" svg:x="6.698cm" svg:y="11.981cm" svg:viewBox="0 0 104 141" svg:d="M0 3c36-11 75 5 93 39 19 32 13 73-15 99">
          <text:p/>
        </draw:path>
        <draw:line draw:style-name="gr4" draw:text-style-name="P1" draw:layer="layout" svg:x1="6.376cm" svg:y1="12.323cm" svg:x2="6.792cm" svg:y2="12.023cm">
          <text:p/>
        </draw:line>
        <draw:line draw:style-name="gr4" draw:text-style-name="P1" draw:layer="layout" svg:x1="5.791cm" svg:y1="11.123cm" svg:x2="5.791cm" svg:y2="11.223cm">
          <text:p/>
        </draw:line>
        <draw:line draw:style-name="gr4" draw:text-style-name="P1" draw:layer="layout" svg:x1="5.791cm" svg:y1="11.223cm" svg:x2="5.891cm" svg:y2="11.223cm">
          <text:p/>
        </draw:line>
        <draw:line draw:style-name="gr4" draw:text-style-name="P1" draw:layer="layout" svg:x1="5.891cm" svg:y1="11.223cm" svg:x2="5.891cm" svg:y2="11.123cm">
          <text:p/>
        </draw:line>
        <draw:line draw:style-name="gr4" draw:text-style-name="P1" draw:layer="layout" svg:x1="5.891cm" svg:y1="11.123cm" svg:x2="5.791cm" svg:y2="11.123cm">
          <text:p/>
        </draw:line>
        <draw:polygon draw:style-name="gr5" draw:text-style-name="P2" draw:layer="layout" svg:width="0.1cm" svg:height="0.1cm" svg:x="5.791cm" svg:y="11.123cm" svg:viewBox="0 0 101 101" draw:points="0,0 101,0 101,101 0,101">
          <text:p/>
        </draw:polygon>
        <draw:line draw:style-name="gr4" draw:text-style-name="P1" draw:layer="layout" svg:x1="1.741cm" svg:y1="11.123cm" svg:x2="1.741cm" svg:y2="11.223cm">
          <text:p/>
        </draw:line>
        <draw:line draw:style-name="gr4" draw:text-style-name="P1" draw:layer="layout" svg:x1="1.741cm" svg:y1="11.223cm" svg:x2="3.591cm" svg:y2="11.223cm">
          <text:p/>
        </draw:line>
        <draw:line draw:style-name="gr4" draw:text-style-name="P1" draw:layer="layout" svg:x1="3.591cm" svg:y1="11.223cm" svg:x2="3.591cm" svg:y2="11.123cm">
          <text:p/>
        </draw:line>
        <draw:line draw:style-name="gr4" draw:text-style-name="P1" draw:layer="layout" svg:x1="3.591cm" svg:y1="11.123cm" svg:x2="1.741cm" svg:y2="11.123cm">
          <text:p/>
        </draw:line>
        <draw:polygon draw:style-name="gr5" draw:text-style-name="P2" draw:layer="layout" svg:width="1.85cm" svg:height="0.1cm" svg:x="1.741cm" svg:y="11.123cm" svg:viewBox="0 0 1851 101" draw:points="0,0 1851,0 1851,101 0,101">
          <text:p/>
        </draw:polygon>
        <draw:line draw:style-name="gr4" draw:text-style-name="P1" draw:layer="layout" svg:x1="4.641cm" svg:y1="11.123cm" svg:x2="4.641cm" svg:y2="11.223cm">
          <text:p/>
        </draw:line>
        <draw:line draw:style-name="gr4" draw:text-style-name="P1" draw:layer="layout" svg:x1="4.641cm" svg:y1="11.223cm" svg:x2="4.741cm" svg:y2="11.223cm">
          <text:p/>
        </draw:line>
        <draw:line draw:style-name="gr4" draw:text-style-name="P1" draw:layer="layout" svg:x1="4.741cm" svg:y1="11.223cm" svg:x2="4.741cm" svg:y2="11.123cm">
          <text:p/>
        </draw:line>
        <draw:line draw:style-name="gr4" draw:text-style-name="P1" draw:layer="layout" svg:x1="4.741cm" svg:y1="11.123cm" svg:x2="4.641cm" svg:y2="11.123cm">
          <text:p/>
        </draw:line>
        <draw:polygon draw:style-name="gr5" draw:text-style-name="P2" draw:layer="layout" svg:width="0.1cm" svg:height="0.1cm" svg:x="4.641cm" svg:y="11.123cm" svg:viewBox="0 0 101 101" draw:points="0,0 101,0 101,101 0,101">
          <text:p/>
        </draw:polygon>
        <draw:line draw:style-name="gr4" draw:text-style-name="P1" draw:layer="layout" svg:x1="2.014cm" svg:y1="16.147cm" svg:x2="2.014cm" svg:y2="16.297cm">
          <text:p/>
        </draw:line>
        <draw:line draw:style-name="gr4" draw:text-style-name="P1" draw:layer="layout" svg:x1="3.091cm" svg:y1="14.123cm" svg:x2="3.091cm" svg:y2="14.223cm">
          <text:p/>
        </draw:line>
        <draw:line draw:style-name="gr4" draw:text-style-name="P1" draw:layer="layout" svg:x1="3.091cm" svg:y1="14.223cm" svg:x2="3.691cm" svg:y2="14.223cm">
          <text:p/>
        </draw:line>
        <draw:line draw:style-name="gr4" draw:text-style-name="P1" draw:layer="layout" svg:x1="3.691cm" svg:y1="14.223cm" svg:x2="3.691cm" svg:y2="14.123cm">
          <text:p/>
        </draw:line>
        <draw:line draw:style-name="gr4" draw:text-style-name="P1" draw:layer="layout" svg:x1="3.691cm" svg:y1="14.123cm" svg:x2="3.091cm" svg:y2="14.123cm">
          <text:p/>
        </draw:line>
        <draw:polygon draw:style-name="gr5" draw:text-style-name="P2" draw:layer="layout" svg:width="0.6cm" svg:height="0.1cm" svg:x="3.091cm" svg:y="14.123cm" svg:viewBox="0 0 601 101" draw:points="0,0 601,0 601,101 0,101">
          <text:p/>
        </draw:polygon>
        <draw:line draw:style-name="gr4" draw:text-style-name="P1" draw:layer="layout" svg:x1="3.091cm" svg:y1="12.223cm" svg:x2="3.091cm" svg:y2="14.223cm">
          <text:p/>
        </draw:line>
        <draw:line draw:style-name="gr4" draw:text-style-name="P1" draw:layer="layout" svg:x1="3.091cm" svg:y1="14.223cm" svg:x2="3.191cm" svg:y2="14.223cm">
          <text:p/>
        </draw:line>
        <draw:line draw:style-name="gr4" draw:text-style-name="P1" draw:layer="layout" svg:x1="3.191cm" svg:y1="14.223cm" svg:x2="3.191cm" svg:y2="12.223cm">
          <text:p/>
        </draw:line>
        <draw:line draw:style-name="gr4" draw:text-style-name="P1" draw:layer="layout" svg:x1="3.191cm" svg:y1="12.223cm" svg:x2="3.091cm" svg:y2="12.223cm">
          <text:p/>
        </draw:line>
        <draw:polygon draw:style-name="gr5" draw:text-style-name="P2" draw:layer="layout" svg:width="0.1cm" svg:height="2cm" svg:x="3.091cm" svg:y="12.223cm" svg:viewBox="0 0 101 2001" draw:points="0,0 101,0 101,2001 0,2001">
          <text:p/>
        </draw:polygon>
        <draw:line draw:style-name="gr4" draw:text-style-name="P1" draw:layer="layout" svg:x1="1.514cm" svg:y1="16.298cm" svg:x2="2.415cm" svg:y2="16.197cm">
          <text:p/>
        </draw:line>
        <draw:line draw:style-name="gr4" draw:text-style-name="P1" draw:layer="layout" svg:x1="2.391cm" svg:y1="14.123cm" svg:x2="2.391cm" svg:y2="14.223cm">
          <text:p/>
        </draw:line>
        <draw:line draw:style-name="gr4" draw:text-style-name="P1" draw:layer="layout" svg:x1="2.391cm" svg:y1="14.223cm" svg:x2="2.491cm" svg:y2="14.223cm">
          <text:p/>
        </draw:line>
        <draw:line draw:style-name="gr4" draw:text-style-name="P1" draw:layer="layout" svg:x1="2.491cm" svg:y1="14.223cm" svg:x2="2.491cm" svg:y2="14.123cm">
          <text:p/>
        </draw:line>
        <draw:line draw:style-name="gr4" draw:text-style-name="P1" draw:layer="layout" svg:x1="2.491cm" svg:y1="14.123cm" svg:x2="2.391cm" svg:y2="14.123cm">
          <text:p/>
        </draw:line>
        <draw:polygon draw:style-name="gr5" draw:text-style-name="P2" draw:layer="layout" svg:width="0.1cm" svg:height="0.1cm" svg:x="2.391cm" svg:y="14.123cm" svg:viewBox="0 0 101 101" draw:points="0,0 101,0 101,101 0,101">
          <text:p/>
        </draw:polygon>
        <draw:line draw:style-name="gr4" draw:text-style-name="P1" draw:layer="layout" svg:x1="1.764cm" svg:y1="16.197cm" svg:x2="1.764cm" svg:y2="16.347cm">
          <text:p/>
        </draw:line>
        <draw:line draw:style-name="gr4" draw:text-style-name="P1" draw:layer="layout" svg:x1="2.614cm" svg:y1="16.097cm" svg:x2="2.614cm" svg:y2="16.297cm">
          <text:p/>
        </draw:line>
        <draw:line draw:style-name="gr4" draw:text-style-name="P1" draw:layer="layout" svg:x1="3.165cm" svg:y1="16.298cm" svg:x2="2.364cm" svg:y2="16.147cm">
          <text:p/>
        </draw:line>
        <draw:line draw:style-name="gr4" draw:text-style-name="P1" draw:layer="layout" svg:x1="2.814cm" svg:y1="15.873cm" svg:x2="3.015cm" svg:y2="15.522cm">
          <text:p/>
        </draw:line>
        <draw:line draw:style-name="gr4" draw:text-style-name="P1" draw:layer="layout" svg:x1="2.864cm" svg:y1="16.147cm" svg:x2="2.864cm" svg:y2="16.347cm">
          <text:p/>
        </draw:line>
        <draw:path draw:style-name="gr4" draw:text-style-name="P1" draw:layer="layout" svg:width="0.144cm" svg:height="0.1cm" svg:x="2.917cm" svg:y="15.507cm" svg:viewBox="0 0 145 101" svg:d="M0 11c30-16 67-14 98 4 29 18 47 50 47 86">
          <text:p/>
        </draw:path>
        <draw:line draw:style-name="gr4" draw:text-style-name="P1" draw:layer="layout" svg:x1="5.541cm" svg:y1="14.123cm" svg:x2="5.541cm" svg:y2="14.223cm">
          <text:p/>
        </draw:line>
        <draw:line draw:style-name="gr4" draw:text-style-name="P1" draw:layer="layout" svg:x1="5.541cm" svg:y1="14.223cm" svg:x2="6.291cm" svg:y2="14.223cm">
          <text:p/>
        </draw:line>
        <draw:line draw:style-name="gr4" draw:text-style-name="P1" draw:layer="layout" svg:x1="6.291cm" svg:y1="14.223cm" svg:x2="6.291cm" svg:y2="14.123cm">
          <text:p/>
        </draw:line>
        <draw:line draw:style-name="gr4" draw:text-style-name="P1" draw:layer="layout" svg:x1="6.291cm" svg:y1="14.123cm" svg:x2="5.541cm" svg:y2="14.123cm">
          <text:p/>
        </draw:line>
        <draw:polygon draw:style-name="gr5" draw:text-style-name="P2" draw:layer="layout" svg:width="0.75cm" svg:height="0.1cm" svg:x="5.541cm" svg:y="14.123cm" svg:viewBox="0 0 751 101" draw:points="0,0 751,0 751,101 0,101">
          <text:p/>
        </draw:polygon>
        <draw:line draw:style-name="gr4" draw:text-style-name="P1" draw:layer="layout" svg:x1="5.141cm" svg:y1="14.223cm" svg:x2="5.541cm" svg:y2="14.223cm">
          <text:p/>
        </draw:line>
        <draw:path draw:style-name="gr4" draw:text-style-name="P1" draw:layer="layout" svg:width="0.103cm" svg:height="0.14cm" svg:x="5.098cm" svg:y="11.982cm" svg:viewBox="0 0 104 141" svg:d="M0 3c36-11 75 5 94 39 18 32 12 73-16 99">
          <text:p/>
        </draw:path>
        <draw:line draw:style-name="gr4" draw:text-style-name="P1" draw:layer="layout" svg:x1="1.741cm" svg:y1="11.223cm" svg:x2="1.741cm" svg:y2="14.173cm">
          <text:p/>
        </draw:line>
        <draw:line draw:style-name="gr4" draw:text-style-name="P1" draw:layer="layout" svg:x1="3.091cm" svg:y1="12.223cm" svg:x2="3.091cm" svg:y2="12.323cm">
          <text:p/>
        </draw:line>
        <draw:line draw:style-name="gr4" draw:text-style-name="P1" draw:layer="layout" svg:x1="3.091cm" svg:y1="12.323cm" svg:x2="4.141cm" svg:y2="12.323cm">
          <text:p/>
        </draw:line>
        <draw:line draw:style-name="gr4" draw:text-style-name="P1" draw:layer="layout" svg:x1="4.141cm" svg:y1="12.323cm" svg:x2="4.141cm" svg:y2="12.223cm">
          <text:p/>
        </draw:line>
        <draw:line draw:style-name="gr4" draw:text-style-name="P1" draw:layer="layout" svg:x1="4.141cm" svg:y1="12.223cm" svg:x2="3.091cm" svg:y2="12.223cm">
          <text:p/>
        </draw:line>
        <draw:polygon draw:style-name="gr5" draw:text-style-name="P2" draw:layer="layout" svg:width="1.05cm" svg:height="0.1cm" svg:x="3.091cm" svg:y="12.223cm" svg:viewBox="0 0 1051 101" draw:points="0,0 1051,0 1051,101 0,101">
          <text:p/>
        </draw:polygon>
        <draw:line draw:style-name="gr4" draw:text-style-name="P1" draw:layer="layout" svg:x1="2.408cm" svg:y1="16.619cm" svg:x2="2.408cm" svg:y2="16.719cm">
          <text:p/>
        </draw:line>
        <draw:line draw:style-name="gr4" draw:text-style-name="P1" draw:layer="layout" svg:x1="2.408cm" svg:y1="16.719cm" svg:x2="2.558cm" svg:y2="16.719cm">
          <text:p/>
        </draw:line>
        <draw:line draw:style-name="gr4" draw:text-style-name="P1" draw:layer="layout" svg:x1="2.558cm" svg:y1="16.719cm" svg:x2="2.558cm" svg:y2="16.619cm">
          <text:p/>
        </draw:line>
        <draw:line draw:style-name="gr4" draw:text-style-name="P1" draw:layer="layout" svg:x1="2.558cm" svg:y1="16.619cm" svg:x2="2.408cm" svg:y2="16.619cm">
          <text:p/>
        </draw:line>
        <draw:polygon draw:style-name="gr5" draw:text-style-name="P2" draw:layer="layout" svg:width="0.15cm" svg:height="0.1cm" svg:x="2.408cm" svg:y="16.619cm" svg:viewBox="0 0 151 101" draw:points="0,0 151,0 151,101 0,101">
          <text:p/>
        </draw:polygon>
        <draw:line draw:style-name="gr4" draw:text-style-name="P1" draw:layer="layout" svg:x1="1.041cm" svg:y1="14.773cm" svg:x2="1.041cm" svg:y2="14.873cm">
          <text:p/>
        </draw:line>
        <draw:line draw:style-name="gr4" draw:text-style-name="P1" draw:layer="layout" svg:x1="1.041cm" svg:y1="14.873cm" svg:x2="14.791cm" svg:y2="14.873cm">
          <text:p/>
        </draw:line>
        <draw:line draw:style-name="gr4" draw:text-style-name="P1" draw:layer="layout" svg:x1="14.791cm" svg:y1="14.873cm" svg:x2="14.791cm" svg:y2="14.773cm">
          <text:p/>
        </draw:line>
        <draw:line draw:style-name="gr4" draw:text-style-name="P1" draw:layer="layout" svg:x1="14.791cm" svg:y1="14.773cm" svg:x2="1.041cm" svg:y2="14.773cm">
          <text:p/>
        </draw:line>
        <draw:polygon draw:style-name="gr5" draw:text-style-name="P2" draw:layer="layout" svg:width="13.75cm" svg:height="0.1cm" svg:x="1.041cm" svg:y="14.773cm" svg:viewBox="0 0 13751 101" draw:points="0,0 13751,0 13751,101 0,101">
          <text:p/>
        </draw:polygon>
        <draw:line draw:style-name="gr4" draw:text-style-name="P1" draw:layer="layout" svg:x1="12.791cm" svg:y1="11.173cm" svg:x2="4.691cm" svg:y2="11.173cm">
          <text:p/>
        </draw:line>
        <draw:line draw:style-name="gr4" draw:text-style-name="P1" draw:layer="layout" svg:x1="13.841cm" svg:y1="14.123cm" svg:x2="13.841cm" svg:y2="14.223cm">
          <text:p/>
        </draw:line>
        <draw:line draw:style-name="gr4" draw:text-style-name="P1" draw:layer="layout" svg:x1="13.841cm" svg:y1="14.223cm" svg:x2="14.191cm" svg:y2="14.223cm">
          <text:p/>
        </draw:line>
        <draw:line draw:style-name="gr4" draw:text-style-name="P1" draw:layer="layout" svg:x1="14.191cm" svg:y1="14.223cm" svg:x2="14.191cm" svg:y2="14.123cm">
          <text:p/>
        </draw:line>
        <draw:line draw:style-name="gr4" draw:text-style-name="P1" draw:layer="layout" svg:x1="14.191cm" svg:y1="14.123cm" svg:x2="13.841cm" svg:y2="14.123cm">
          <text:p/>
        </draw:line>
        <draw:polygon draw:style-name="gr5" draw:text-style-name="P2" draw:layer="layout" svg:width="0.35cm" svg:height="0.1cm" svg:x="13.841cm" svg:y="14.123cm" svg:viewBox="0 0 351 101" draw:points="0,0 351,0 351,101 0,101">
          <text:p/>
        </draw:polygon>
        <draw:frame draw:style-name="gr7" draw:text-style-name="P4" draw:layer="layout" svg:width="10.718cm" svg:height="1.502cm" svg:x="7.976cm" svg:y="16.548cm">
          <draw:text-box>
            <text:p text:style-name="P3">Classroom Chart</text:p>
          </draw:text-box>
        </draw:frame>
        <draw:frame draw:style-name="gr8" draw:text-style-name="P6" draw:layer="layout" svg:width="1.587cm" svg:height="0.952cm" svg:x="9.452cm" svg:y="2.306cm">
          <draw:text-box>
            <text:p text:style-name="P5"><text:span text:style-name="T1">12th</text:span></text:p>
          </draw:text-box>
        </draw:frame>
        <draw:frame draw:style-name="gr9" draw:text-style-name="P6" draw:layer="layout" svg:width="1.587cm" svg:height="0.952cm" svg:x="5.959cm" svg:y="2.306cm">
          <draw:text-box>
            <text:p><text:span text:style-name="T1">5th</text:span></text:p>
          </draw:text-box>
        </draw:frame>
        <draw:frame draw:style-name="gr10" draw:text-style-name="P6" draw:layer="layout" svg:width="3.175cm" svg:height="1.873cm" svg:x="12.627cm" svg:y="2.338cm">
          <draw:text-box>
            <text:p><text:span text:style-name="T1">Office</text:span></text:p>
          </draw:text-box>
        </draw:frame>
        <draw:frame draw:style-name="gr11" draw:text-style-name="P8" draw:layer="layout" svg:width="1.905cm" svg:height="0.906cm" svg:x="1.832cm" svg:y="6.48cm">
          <draw:text-box>
            <text:p text:style-name="P7"><text:span text:style-name="T2">1st-4th</text:span></text:p>
          </draw:text-box>
        </draw:frame>
        <draw:frame draw:style-name="gr11" draw:text-style-name="P8" draw:layer="layout" svg:width="1.905cm" svg:height="0.906cm" svg:x="2.467cm" svg:y="8.338cm">
          <draw:text-box>
            <text:p><text:span text:style-name="T2">10th</text:span></text:p>
          </draw:text-box>
        </draw:frame>
        <draw:frame draw:style-name="gr12" draw:text-style-name="P8" draw:layer="layout" svg:width="1.377cm" svg:height="0.762cm" svg:x="2.36cm" svg:y="9.926cm">
          <draw:text-box>
            <text:p><text:span text:style-name="T2">11th</text:span></text:p>
          </draw:text-box>
        </draw:frame>
        <draw:frame draw:style-name="gr12" draw:text-style-name="P8" draw:layer="layout" svg:width="1.377cm" svg:height="0.762cm" svg:x="5.217cm" svg:y="12.339cm">
          <draw:text-box>
            <text:p><text:span text:style-name="T2">8th</text:span></text:p>
          </draw:text-box>
        </draw:frame>
        <draw:frame draw:style-name="gr12" draw:text-style-name="P8" draw:layer="layout" svg:width="1.377cm" svg:height="0.762cm" svg:x="7.547cm" svg:y="12.339cm">
          <draw:text-box>
            <text:p><text:span text:style-name="T2">9th</text:span></text:p>
          </draw:text-box>
        </draw:frame>
        <draw:frame draw:style-name="gr12" draw:text-style-name="P8" draw:layer="layout" svg:width="1.377cm" svg:height="0.762cm" svg:x="9.98cm" svg:y="12.339cm">
          <draw:text-box>
            <text:p><text:span text:style-name="T2">7th</text:span></text:p>
          </draw:text-box>
        </draw:frame>
        <draw:frame draw:style-name="gr12" draw:text-style-name="P8" draw:layer="layout" svg:width="1.377cm" svg:height="0.762cm" svg:x="12.309cm" svg:y="12.339cm">
          <draw:text-box>
            <text:p><text:span text:style-name="T2">6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19.685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3T09:22:27.517546541</dc:date>
    <meta:editing-duration>PT36M2S</meta:editing-duration>
    <meta:editing-cycles>5</meta:editing-cycles>
    <meta:generator>LibreOffice/25.2.3.2$Linux_X86_64 LibreOffice_project/520$Build-2</meta:generator>
    <meta:document-statistic meta:object-count="1502"/>
  </office:meta>
</office:document-meta>
</file>