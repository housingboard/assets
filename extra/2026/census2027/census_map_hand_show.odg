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B68000013615805E82BD378D7C6.png" manifest:media-type="image/png"/>
  <manifest:file-entry manifest:full-path="Pictures/1000000100000633000004639FB41D6D4A77E559.png" manifest:media-type="image/png"/>
  <manifest:file-entry manifest:full-path="Pictures/10091AE60000A40500007411C71A921577579743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1.572cm, 1.565cm, 10.603cm, 9.145cm)" draw:image-opacity="30%" style:mirror="none" style:protect="position size"/>
    </style:style>
    <style:style style:name="gr2" style:family="graphic" style:parent-style-name="standard">
      <style:graphic-properties svg:stroke-color="#000000" draw:fill="hatch" draw:fill-color="#729fcf" draw:fill-hatch-name="hat2" loext:fill-use-slide-background="false" draw:textarea-horizontal-align="justify" draw:textarea-vertical-align="middle" draw:auto-grow-height="false" fo:min-height="0cm" fo:min-width="0.25cm" style:protect="position size"/>
      <style:paragraph-properties style:writing-mode="lr-tb"/>
    </style:style>
    <style:style style:name="gr3" style:family="graphic" style:parent-style-name="standard">
      <style:graphic-properties svg:stroke-color="#000000" draw:fill="hatch" draw:fill-color="#729fcf" draw:fill-hatch-name="hat2" loext:fill-use-slide-background="false" draw:textarea-horizontal-align="justify" draw:textarea-vertical-align="middle" draw:auto-grow-height="false" fo:min-height="0.25cm" fo:min-width="0.25cm" style:protect="position siz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75cm" style:protect="position size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5cm" style:protect="position size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1.25cm" style:protect="position size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25cm" style:protect="position size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25cm" style:protect="position size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.25cm" style:protect="position siz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5cm" style:protect="position size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0cm" style:protect="position size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45cm" style:protect="position siz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45cm" style:protect="position size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.45cm" style:protect="position size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45cm" style:protect="position size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25cm" style:protect="position size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cm" fo:min-width="0.5cm" style:protect="position size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cm" style:protect="position size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cm" fo:min-width="0cm" style:protect="position size"/>
      <style:paragraph-properties style:writing-mode="lr-tb"/>
    </style:style>
    <style:style style:name="gr20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25cm" fo:min-width="0cm" style:protect="position size"/>
      <style:paragraph-properties style:writing-mode="lr-tb"/>
    </style:style>
    <style:style style:name="gr21" style:family="graphic" style:parent-style-name="objectwithoutfill">
      <style:graphic-properties svg:stroke-color="#000000" draw:fill="none" draw:textarea-vertical-align="middle" style:protect="position size"/>
    </style:style>
    <style:style style:name="gr22" style:family="graphic" style:parent-style-name="standard">
      <style:graphic-properties draw:stroke="none" svg:stroke-color="#000000" draw:fill="none" draw:fill-color="#ffffff" fo:min-height="0.477cm" style:protect="position size"/>
      <style:paragraph-properties style:writing-mode="lr-tb"/>
    </style:style>
    <style:style style:name="gr2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cm" style:protect="position size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cm" style:protect="position size"/>
      <style:paragraph-properties style:writing-mode="lr-tb"/>
    </style:style>
    <style:style style:name="gr25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cm" fo:min-width="0cm" style:protect="position size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cm" fo:min-width="0cm" style:protect="position size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05cm" fo:min-width="0cm" style:protect="position size"/>
      <style:paragraph-properties style:writing-mode="lr-tb"/>
    </style:style>
    <style:style style:name="gr2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cm" style:protect="position siz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cm" style:protect="position siz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cm" style:protect="position size"/>
      <style:paragraph-properties style:writing-mode="lr-tb"/>
    </style:style>
    <style:style style:name="gr3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cm" style:protect="position size"/>
      <style:paragraph-properties style:writing-mode="lr-tb"/>
    </style:style>
    <style:style style:name="gr32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35cm" fo:min-width="0cm" style:protect="position size"/>
      <style:paragraph-properties style:writing-mode="lr-tb"/>
    </style:style>
    <style:style style:name="gr3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cm" style:protect="position size"/>
      <style:paragraph-properties style:writing-mode="lr-tb"/>
    </style:style>
    <style:style style:name="gr3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cm" style:protect="position size"/>
      <style:paragraph-properties style:writing-mode="lr-tb"/>
    </style:style>
    <style:style style:name="gr3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1cm" style:protect="position size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1cm" fo:min-width="0.1cm" style:protect="position size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1cm" style:protect="position size"/>
      <style:paragraph-properties style:writing-mode="lr-tb"/>
    </style:style>
    <style:style style:name="gr3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1cm" style:protect="position size"/>
      <style:paragraph-properties style:writing-mode="lr-tb"/>
    </style:style>
    <style:style style:name="gr3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1cm" style:protect="position size"/>
      <style:paragraph-properties style:writing-mode="lr-tb"/>
    </style:style>
    <style:style style:name="gr4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1cm" style:protect="position size"/>
      <style:paragraph-properties style:writing-mode="lr-tb"/>
    </style:style>
    <style:style style:name="gr4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5cm" style:protect="position size"/>
      <style:paragraph-properties style:writing-mode="lr-tb"/>
    </style:style>
    <style:style style:name="gr4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cm" style:protect="position size"/>
      <style:paragraph-properties style:writing-mode="lr-tb"/>
    </style:style>
    <style:style style:name="gr4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2cm" style:protect="position size"/>
      <style:paragraph-properties style:writing-mode="lr-tb"/>
    </style:style>
    <style:style style:name="gr4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cm" style:protect="position size"/>
      <style:paragraph-properties style:writing-mode="lr-tb"/>
    </style:style>
    <style:style style:name="gr4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15cm" style:protect="position size"/>
      <style:paragraph-properties style:writing-mode="lr-tb"/>
    </style:style>
    <style:style style:name="gr4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1cm" style:protect="position size"/>
      <style:paragraph-properties style:writing-mode="lr-tb"/>
    </style:style>
    <style:style style:name="gr4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05cm" style:protect="position size"/>
      <style:paragraph-properties style:writing-mode="lr-tb"/>
    </style:style>
    <style:style style:name="gr4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2cm" fo:min-width="0cm" style:protect="position size"/>
      <style:paragraph-properties style:writing-mode="lr-tb"/>
    </style:style>
    <style:style style:name="gr4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5cm" style:protect="position size"/>
      <style:paragraph-properties style:writing-mode="lr-tb"/>
    </style:style>
    <style:style style:name="gr5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35cm" style:protect="position size"/>
      <style:paragraph-properties style:writing-mode="lr-tb"/>
    </style:style>
    <style:style style:name="gr5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7cm" style:protect="position size"/>
      <style:paragraph-properties style:writing-mode="lr-tb"/>
    </style:style>
    <style:style style:name="gr5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cm" style:protect="position size"/>
      <style:paragraph-properties style:writing-mode="lr-tb"/>
    </style:style>
    <style:style style:name="gr5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35cm" style:protect="position size"/>
      <style:paragraph-properties style:writing-mode="lr-tb"/>
    </style:style>
    <style:style style:name="gr5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.3cm" style:protect="position size"/>
      <style:paragraph-properties style:writing-mode="lr-tb"/>
    </style:style>
    <style:style style:name="gr55" style:family="graphic" style:parent-style-name="standard">
      <style:graphic-properties draw:stroke="none" draw:stroke-dash="Dot_20__28_Rounded_29_" svg:stroke-color="#000000" svg:stroke-linecap="round" draw:fill="hatch" draw:fill-color="#ffffff" draw:fill-hatch-name="Blue_20_45_20_Degrees" loext:fill-use-slide-background="false" draw:opacity="100%" draw:textarea-horizontal-align="justify" draw:textarea-vertical-align="middle" draw:auto-grow-height="false" fo:min-height="1.1cm" fo:min-width="0.3cm" style:protect="position size"/>
      <style:paragraph-properties style:writing-mode="lr-tb"/>
    </style:style>
    <style:style style:name="gr5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cm" style:protect="position size"/>
      <style:paragraph-properties style:writing-mode="lr-tb"/>
    </style:style>
    <style:style style:name="gr5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55cm" fo:min-width="1.15cm" style:protect="position size"/>
      <style:paragraph-properties style:writing-mode="lr-tb"/>
    </style:style>
    <style:style style:name="gr5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.25cm" style:protect="position size"/>
      <style:paragraph-properties style:writing-mode="lr-tb"/>
    </style:style>
    <style:style style:name="gr5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5cm" style:protect="position size"/>
      <style:paragraph-properties style:writing-mode="lr-tb"/>
    </style:style>
    <style:style style:name="gr6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cm" style:protect="position size"/>
      <style:paragraph-properties style:writing-mode="lr-tb"/>
    </style:style>
    <style:style style:name="gr6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1.2cm" style:protect="position size"/>
      <style:paragraph-properties style:writing-mode="lr-tb"/>
    </style:style>
    <style:style style:name="gr6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1.2cm" style:protect="position size"/>
      <style:paragraph-properties style:writing-mode="lr-tb"/>
    </style:style>
    <style:style style:name="gr6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2cm" style:protect="position size"/>
      <style:paragraph-properties style:writing-mode="lr-tb"/>
    </style:style>
    <style:style style:name="gr64" style:family="graphic" style:parent-style-name="standard">
      <style:graphic-properties draw:stroke="none" svg:stroke-color="#000000" draw:fill="solid" draw:fill-color="#ffffff" loext:fill-use-slide-background="false" draw:opacity="50%" draw:textarea-horizontal-align="justify" draw:textarea-vertical-align="middle" draw:auto-grow-height="false" fo:min-height="1.9cm" fo:min-width="0.4cm" style:protect="position siz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239cm" style:protect="position size"/>
      <style:paragraph-properties style:writing-mode="lr-tb"/>
    </style:style>
    <style:style style:name="gr66" style:family="graphic" style:parent-style-name="standard">
      <style:graphic-properties draw:stroke="none" draw:stroke-dash="Dot_20__28_Rounded_29_" svg:stroke-color="#000000" svg:stroke-linecap="round" draw:fill="hatch" draw:fill-color="#ffffff" draw:fill-hatch-name="hat2" loext:fill-use-slide-background="false" draw:opacity="100%" draw:textarea-horizontal-align="justify" draw:textarea-vertical-align="middle" draw:auto-grow-height="false" fo:min-height="0.1cm" fo:min-width="0.15cm" style:protect="position size"/>
      <style:paragraph-properties style:writing-mode="lr-tb"/>
    </style:style>
    <style:style style:name="gr6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cm" style:protect="position size"/>
      <style:paragraph-properties style:writing-mode="lr-tb"/>
    </style:style>
    <style:style style:name="gr6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4cm" style:protect="position size"/>
      <style:paragraph-properties style:writing-mode="lr-tb"/>
    </style:style>
    <style:style style:name="gr6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5cm" style:protect="position size"/>
      <style:paragraph-properties style:writing-mode="lr-tb"/>
    </style:style>
    <style:style style:name="gr7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1cm" style:protect="position size"/>
      <style:paragraph-properties style:writing-mode="lr-tb"/>
    </style:style>
    <style:style style:name="gr7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1cm" style:protect="position size"/>
      <style:paragraph-properties style:writing-mode="lr-tb"/>
    </style:style>
    <style:style style:name="gr7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cm" style:protect="position size"/>
      <style:paragraph-properties style:writing-mode="lr-tb"/>
    </style:style>
    <style:style style:name="gr7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2cm" style:protect="position size"/>
      <style:paragraph-properties style:writing-mode="lr-tb"/>
    </style:style>
    <style:style style:name="gr74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95cm" fo:min-width="0.25cm" style:protect="position size"/>
      <style:paragraph-properties style:writing-mode="lr-tb"/>
    </style:style>
    <style:style style:name="gr7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cm" style:protect="position size"/>
      <style:paragraph-properties style:writing-mode="lr-tb"/>
    </style:style>
    <style:style style:name="gr7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35cm" style:protect="position size"/>
      <style:paragraph-properties style:writing-mode="lr-tb"/>
    </style:style>
    <style:style style:name="gr7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.9cm" style:protect="position size"/>
      <style:paragraph-properties style:writing-mode="lr-tb"/>
    </style:style>
    <style:style style:name="gr7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5cm" style:protect="position size"/>
      <style:paragraph-properties style:writing-mode="lr-tb"/>
    </style:style>
    <style:style style:name="gr7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5cm" fo:min-width="0.2cm" style:protect="position size"/>
      <style:paragraph-properties style:writing-mode="lr-tb"/>
    </style:style>
    <style:style style:name="gr8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45cm" fo:min-width="0cm" style:protect="position size"/>
      <style:paragraph-properties style:writing-mode="lr-tb"/>
    </style:style>
    <style:style style:name="gr8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cm" fo:min-width="0cm" style:protect="position size"/>
      <style:paragraph-properties style:writing-mode="lr-tb"/>
    </style:style>
    <style:style style:name="gr82" style:family="graphic" style:parent-style-name="objectwithoutfill">
      <style:graphic-properties draw:fill="none" draw:textarea-vertical-align="middle" style:protect="position size"/>
    </style:style>
    <style:style style:name="gr83" style:family="graphic" style:parent-style-name="standard">
      <style:graphic-properties draw:stroke="none" svg:stroke-color="#000000" draw:fill="none" draw:fill-color="#ffffff" fo:min-height="2.134cm" style:protect="position siz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fo:min-height="0.25cm" style:protect="position size"/>
      <style:paragraph-properties style:writing-mode="lr-tb"/>
    </style:style>
    <style:style style:name="gr85" style:family="graphic" style:parent-style-name="standard">
      <style:graphic-properties svg:stroke-color="#000000" draw:fill="none" draw:fill-color="#ffffff" loext:fill-use-slide-background="false" draw:opacity="50%" draw:textarea-horizontal-align="justify" draw:textarea-vertical-align="middle" draw:auto-grow-height="false" fo:min-height="1cm" fo:min-width="0.65cm" style:protect="position size"/>
      <style:paragraph-properties style:writing-mode="lr-tb"/>
    </style:style>
    <style:style style:name="gr8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6cm" style:protect="position size"/>
      <style:paragraph-properties style:writing-mode="lr-tb"/>
    </style:style>
    <style:style style:name="gr87" style:family="graphic" style:parent-style-name="standard">
      <style:graphic-properties svg:stroke-color="#000000" draw:stroke-linejoin="none" draw:fill="hatch" draw:fill-color="#ffffff" draw:fill-hatch-name="Blue_20_45_20_Degrees" loext:fill-use-slide-background="false" draw:opacity="100%" draw:textarea-horizontal-align="justify" draw:textarea-vertical-align="middle" draw:auto-grow-height="false" fo:min-height="0.55cm" fo:min-width="0.5cm" style:protect="position size"/>
      <style:paragraph-properties style:writing-mode="lr-tb"/>
    </style:style>
    <style:style style:name="gr88" style:family="graphic" style:parent-style-name="standard">
      <style:graphic-properties svg:stroke-width="0.028cm" svg:stroke-color="#000000" draw:marker-start-width="0.242cm" draw:marker-end-width="0.242cm" draw:fill="solid" draw:fill-color="#ffffff" draw:opacity="35%" draw:textarea-horizontal-align="justify" draw:textarea-vertical-align="middle" draw:auto-grow-height="false" fo:min-height="0.458cm" fo:min-width="0.208cm" fo:padding-top="0.139cm" fo:padding-bottom="0.139cm" fo:padding-left="0.264cm" fo:padding-right="0.264cm" style:protect="position size"/>
    </style:style>
    <style:style style:name="gr8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style:protect="position siz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561cm" style:protect="position size"/>
      <style:paragraph-properties style:writing-mode="lr-tb"/>
    </style:style>
    <style:style style:name="gr91" style:family="graphic" style:parent-style-name="standard">
      <style:graphic-properties draw:stroke="none"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2cm" fo:min-width="0cm" style:protect="position size"/>
      <style:paragraph-properties style:writing-mode="lr-tb"/>
    </style:style>
    <style:style style:name="gr92" style:family="graphic" style:parent-style-name="standard">
      <style:graphic-properties draw:stroke="none"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cm" fo:min-width="0cm" style:protect="position size"/>
      <style:paragraph-properties style:writing-mode="lr-tb"/>
    </style:style>
    <style:style style:name="gr93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0.25cm" fo:min-width="0cm" style:protect="position size"/>
      <style:paragraph-properties style:writing-mode="lr-tb"/>
    </style:style>
    <style:style style:name="gr9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5cm" style:protect="position size"/>
      <style:paragraph-properties style:writing-mode="lr-tb"/>
    </style:style>
    <style:style style:name="gr95" style:family="graphic" style:parent-style-name="objectwithoutfill">
      <style:graphic-properties draw:stroke="dash" draw:stroke-dash="Double_20_Dash_20_Dot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 style:protect="position size"/>
    </style:style>
    <style:style style:name="gr96" style:family="graphic" style:parent-style-name="standard">
      <style:graphic-properties draw:stroke="none" svg:stroke-color="#000000" draw:fill="none" draw:fill-color="#ffffff" fo:min-height="0.789cm" style:protect="position siz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fo:min-height="0.319cm" style:protect="position siz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0.5cm" style:protect="position size"/>
      <style:paragraph-properties style:writing-mode="lr-tb"/>
    </style:style>
    <style:style style:name="gr99" style:family="graphic" style:parent-style-name="objectwithoutfill">
      <style:graphic-properties draw:marker-end="Arrowheads_20_1" draw:marker-end-width="0.3cm" draw:fill="none" draw:textarea-vertical-align="middle" style:protect="position size"/>
    </style:style>
    <style:style style:name="gr100" style:family="graphic" style:parent-style-name="standard">
      <style:graphic-properties draw:stroke="none" draw:fill="solid" draw:fill-color="#000000"/>
    </style:style>
    <style:style style:name="gr101" style:family="graphic" style:parent-style-name="standard">
      <style:graphic-properties draw:stroke="none" draw:fill="solid" draw:fill-color="#ffffff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5cm" fo:padding-top="0cm" fo:padding-bottom="0cm" fo:padding-left="0cm" fo:padding-right="0cm"/>
      <style:paragraph-properties style:writing-mode="lr-tb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7.319cm, 0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7.292cm, 0cm, 6.744cm, 104.333cm)" draw:image-opacity="100%" style:mirror="none"/>
    </style:style>
    <style:style style:name="gr105" style:family="graphic" style:parent-style-name="standard">
      <style:graphic-properties svg:stroke-color="#000000" draw:fill="hatch" draw:fill-color="#729fcf" draw:fill-hatch-name="Blue_20_45_20_Degrees" loext:fill-use-slide-background="false" draw:textarea-horizontal-align="justify" draw:textarea-vertical-align="middle" draw:auto-grow-height="false" fo:min-height="0cm" fo:min-width="0.25cm"/>
      <style:paragraph-properties style:writing-mode="lr-tb"/>
    </style:style>
    <style:style style:name="gr106" style:family="graphic" style:parent-style-name="standard">
      <style:graphic-properties svg:stroke-color="#000000" draw:fill="hatch" draw:fill-color="#729fcf" draw:fill-hatch-name="Blue_20_45_20_Degrees" loext:fill-use-slide-background="false" draw:textarea-horizontal-align="justify" draw:textarea-vertical-align="middle" draw:auto-grow-height="false" fo:min-height="0.25cm" fo:min-width="0.25cm"/>
      <style:paragraph-properties style:writing-mode="lr-tb"/>
    </style:style>
    <style:style style:name="gr10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75cm"/>
      <style:paragraph-properties style:writing-mode="lr-tb"/>
    </style:style>
    <style:style style:name="gr10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5cm"/>
      <style:paragraph-properties style:writing-mode="lr-tb"/>
    </style:style>
    <style:style style:name="gr10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1.25cm"/>
      <style:paragraph-properties style:writing-mode="lr-tb"/>
    </style:style>
    <style:style style:name="gr11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25cm"/>
      <style:paragraph-properties style:writing-mode="lr-tb"/>
    </style:style>
    <style:style style:name="gr11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25cm"/>
      <style:paragraph-properties style:writing-mode="lr-tb"/>
    </style:style>
    <style:style style:name="gr11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.25cm"/>
      <style:paragraph-properties style:writing-mode="lr-tb"/>
    </style:style>
    <style:style style:name="gr11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5cm"/>
      <style:paragraph-properties style:writing-mode="lr-tb"/>
    </style:style>
    <style:style style:name="gr11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0cm"/>
      <style:paragraph-properties style:writing-mode="lr-tb"/>
    </style:style>
    <style:style style:name="gr11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45cm"/>
      <style:paragraph-properties style:writing-mode="lr-tb"/>
    </style:style>
    <style:style style:name="gr11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45cm"/>
      <style:paragraph-properties style:writing-mode="lr-tb"/>
    </style:style>
    <style:style style:name="gr11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.45cm"/>
      <style:paragraph-properties style:writing-mode="lr-tb"/>
    </style:style>
    <style:style style:name="gr11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45cm"/>
      <style:paragraph-properties style:writing-mode="lr-tb"/>
    </style:style>
    <style:style style:name="gr11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25cm"/>
      <style:paragraph-properties style:writing-mode="lr-tb"/>
    </style:style>
    <style:style style:name="gr12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cm" fo:min-width="0.5cm"/>
      <style:paragraph-properties style:writing-mode="lr-tb"/>
    </style:style>
    <style:style style:name="gr12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cm"/>
      <style:paragraph-properties style:writing-mode="lr-tb"/>
    </style:style>
    <style:style style:name="gr12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cm" fo:min-width="0cm"/>
      <style:paragraph-properties style:writing-mode="lr-tb"/>
    </style:style>
    <style:style style:name="gr123" style:family="graphic" style:parent-style-name="standard">
      <style:graphic-properties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.25cm" fo:min-width="0cm"/>
      <style:paragraph-properties style:writing-mode="lr-tb"/>
    </style:style>
    <style:style style:name="gr124" style:family="graphic" style:parent-style-name="objectwithoutfill">
      <style:graphic-properties svg:stroke-color="#000000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2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cm"/>
      <style:paragraph-properties style:writing-mode="lr-tb"/>
    </style:style>
    <style:style style:name="gr12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cm"/>
      <style:paragraph-properties style:writing-mode="lr-tb"/>
    </style:style>
    <style:style style:name="gr128" style:family="graphic" style:parent-style-name="standard">
      <style:graphic-properties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cm" fo:min-width="0cm"/>
      <style:paragraph-properties style:writing-mode="lr-tb"/>
    </style:style>
    <style:style style:name="gr12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cm" fo:min-width="0cm"/>
      <style:paragraph-properties style:writing-mode="lr-tb"/>
    </style:style>
    <style:style style:name="gr13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05cm" fo:min-width="0cm"/>
      <style:paragraph-properties style:writing-mode="lr-tb"/>
    </style:style>
    <style:style style:name="gr13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cm"/>
      <style:paragraph-properties style:writing-mode="lr-tb"/>
    </style:style>
    <style:style style:name="gr13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cm"/>
      <style:paragraph-properties style:writing-mode="lr-tb"/>
    </style:style>
    <style:style style:name="gr133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25cm" fo:min-width="0cm"/>
      <style:paragraph-properties style:writing-mode="lr-tb"/>
    </style:style>
    <style:style style:name="gr13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cm"/>
      <style:paragraph-properties style:writing-mode="lr-tb"/>
    </style:style>
    <style:style style:name="gr13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cm"/>
      <style:paragraph-properties style:writing-mode="lr-tb"/>
    </style:style>
    <style:style style:name="gr136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35cm" fo:min-width="0cm"/>
      <style:paragraph-properties style:writing-mode="lr-tb"/>
    </style:style>
    <style:style style:name="gr13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cm"/>
      <style:paragraph-properties style:writing-mode="lr-tb"/>
    </style:style>
    <style:style style:name="gr13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cm"/>
      <style:paragraph-properties style:writing-mode="lr-tb"/>
    </style:style>
    <style:style style:name="gr13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1cm"/>
      <style:paragraph-properties style:writing-mode="lr-tb"/>
    </style:style>
    <style:style style:name="gr14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1cm" fo:min-width="0.1cm"/>
      <style:paragraph-properties style:writing-mode="lr-tb"/>
    </style:style>
    <style:style style:name="gr14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1cm"/>
      <style:paragraph-properties style:writing-mode="lr-tb"/>
    </style:style>
    <style:style style:name="gr14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1cm"/>
      <style:paragraph-properties style:writing-mode="lr-tb"/>
    </style:style>
    <style:style style:name="gr14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1cm"/>
      <style:paragraph-properties style:writing-mode="lr-tb"/>
    </style:style>
    <style:style style:name="gr14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1cm"/>
      <style:paragraph-properties style:writing-mode="lr-tb"/>
    </style:style>
    <style:style style:name="gr14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5cm"/>
      <style:paragraph-properties style:writing-mode="lr-tb"/>
    </style:style>
    <style:style style:name="gr14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cm"/>
      <style:paragraph-properties style:writing-mode="lr-tb"/>
    </style:style>
    <style:style style:name="gr14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2cm"/>
      <style:paragraph-properties style:writing-mode="lr-tb"/>
    </style:style>
    <style:style style:name="gr14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cm"/>
      <style:paragraph-properties style:writing-mode="lr-tb"/>
    </style:style>
    <style:style style:name="gr14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15cm"/>
      <style:paragraph-properties style:writing-mode="lr-tb"/>
    </style:style>
    <style:style style:name="gr15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1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05cm"/>
      <style:paragraph-properties style:writing-mode="lr-tb"/>
    </style:style>
    <style:style style:name="gr15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2cm" fo:min-width="0cm"/>
      <style:paragraph-properties style:writing-mode="lr-tb"/>
    </style:style>
    <style:style style:name="gr15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5cm"/>
      <style:paragraph-properties style:writing-mode="lr-tb"/>
    </style:style>
    <style:style style:name="gr15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35cm"/>
      <style:paragraph-properties style:writing-mode="lr-tb"/>
    </style:style>
    <style:style style:name="gr15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7cm"/>
      <style:paragraph-properties style:writing-mode="lr-tb"/>
    </style:style>
    <style:style style:name="gr15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cm"/>
      <style:paragraph-properties style:writing-mode="lr-tb"/>
    </style:style>
    <style:style style:name="gr15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35cm"/>
      <style:paragraph-properties style:writing-mode="lr-tb"/>
    </style:style>
    <style:style style:name="gr15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.3cm"/>
      <style:paragraph-properties style:writing-mode="lr-tb"/>
    </style:style>
    <style:style style:name="gr159" style:family="graphic" style:parent-style-name="standard">
      <style:graphic-properties draw:stroke="none" draw:stroke-dash="Dot_20__28_Rounded_29_" svg:stroke-color="#000000" svg:stroke-linecap="round" draw:fill="hatch" draw:fill-color="#ffffff" draw:fill-hatch-name="Blue_20_45_20_Degrees" loext:fill-use-slide-background="false" draw:opacity="100%" draw:textarea-horizontal-align="justify" draw:textarea-vertical-align="middle" draw:auto-grow-height="false" fo:min-height="1.1cm" fo:min-width="0.3cm"/>
      <style:paragraph-properties style:writing-mode="lr-tb"/>
    </style:style>
    <style:style style:name="gr16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cm"/>
      <style:paragraph-properties style:writing-mode="lr-tb"/>
    </style:style>
    <style:style style:name="gr16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55cm" fo:min-width="1.15cm"/>
      <style:paragraph-properties style:writing-mode="lr-tb"/>
    </style:style>
    <style:style style:name="gr16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.25cm"/>
      <style:paragraph-properties style:writing-mode="lr-tb"/>
    </style:style>
    <style:style style:name="gr16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5cm"/>
      <style:paragraph-properties style:writing-mode="lr-tb"/>
    </style:style>
    <style:style style:name="gr16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cm"/>
      <style:paragraph-properties style:writing-mode="lr-tb"/>
    </style:style>
    <style:style style:name="gr16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1.2cm"/>
      <style:paragraph-properties style:writing-mode="lr-tb"/>
    </style:style>
    <style:style style:name="gr16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1.2cm"/>
      <style:paragraph-properties style:writing-mode="lr-tb"/>
    </style:style>
    <style:style style:name="gr16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2cm"/>
      <style:paragraph-properties style:writing-mode="lr-tb"/>
    </style:style>
    <style:style style:name="gr168" style:family="graphic" style:parent-style-name="standard">
      <style:graphic-properties draw:stroke="none" svg:stroke-color="#000000" draw:fill="solid" draw:fill-color="#ffffff" loext:fill-use-slide-background="false" draw:opacity="50%" draw:textarea-horizontal-align="justify" draw:textarea-vertical-align="middle" draw:auto-grow-height="false" fo:min-height="1.9cm" fo:min-width="0.4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70" style:family="graphic" style:parent-style-name="standard">
      <style:graphic-properties draw:stroke="none" draw:stroke-dash="Dot_20__28_Rounded_29_" svg:stroke-color="#000000" svg:stroke-linecap="round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.1cm" fo:min-width="0.15cm"/>
      <style:paragraph-properties style:writing-mode="lr-tb"/>
    </style:style>
    <style:style style:name="gr17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cm"/>
      <style:paragraph-properties style:writing-mode="lr-tb"/>
    </style:style>
    <style:style style:name="gr17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4cm"/>
      <style:paragraph-properties style:writing-mode="lr-tb"/>
    </style:style>
    <style:style style:name="gr17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5cm"/>
      <style:paragraph-properties style:writing-mode="lr-tb"/>
    </style:style>
    <style:style style:name="gr17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1cm"/>
      <style:paragraph-properties style:writing-mode="lr-tb"/>
    </style:style>
    <style:style style:name="gr17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1cm"/>
      <style:paragraph-properties style:writing-mode="lr-tb"/>
    </style:style>
    <style:style style:name="gr17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cm"/>
      <style:paragraph-properties style:writing-mode="lr-tb"/>
    </style:style>
    <style:style style:name="gr17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2cm"/>
      <style:paragraph-properties style:writing-mode="lr-tb"/>
    </style:style>
    <style:style style:name="gr178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95cm" fo:min-width="0.25cm"/>
      <style:paragraph-properties style:writing-mode="lr-tb"/>
    </style:style>
    <style:style style:name="gr17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cm"/>
      <style:paragraph-properties style:writing-mode="lr-tb"/>
    </style:style>
    <style:style style:name="gr18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35cm"/>
      <style:paragraph-properties style:writing-mode="lr-tb"/>
    </style:style>
    <style:style style:name="gr18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.9cm"/>
      <style:paragraph-properties style:writing-mode="lr-tb"/>
    </style:style>
    <style:style style:name="gr18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5cm"/>
      <style:paragraph-properties style:writing-mode="lr-tb"/>
    </style:style>
    <style:style style:name="gr18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5cm" fo:min-width="0.2cm"/>
      <style:paragraph-properties style:writing-mode="lr-tb"/>
    </style:style>
    <style:style style:name="gr18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45cm" fo:min-width="0cm"/>
      <style:paragraph-properties style:writing-mode="lr-tb"/>
    </style:style>
    <style:style style:name="gr18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cm" fo:min-width="0cm"/>
      <style:paragraph-properties style:writing-mode="lr-tb"/>
    </style:style>
    <style:style style:name="gr186" style:family="graphic" style:parent-style-name="objectwithoutfill">
      <style:graphic-properties draw:fill="none" draw:textarea-vertical-align="middle"/>
    </style:style>
    <style:style style:name="gr18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89" style:family="graphic" style:parent-style-name="standard">
      <style:graphic-properties svg:stroke-color="#000000" draw:fill="none" draw:fill-color="#ffffff" loext:fill-use-slide-background="false" draw:opacity="50%" draw:textarea-horizontal-align="justify" draw:textarea-vertical-align="middle" draw:auto-grow-height="false" fo:min-height="1cm" fo:min-width="0.65cm"/>
      <style:paragraph-properties style:writing-mode="lr-tb"/>
    </style:style>
    <style:style style:name="gr19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6cm"/>
      <style:paragraph-properties style:writing-mode="lr-tb"/>
    </style:style>
    <style:style style:name="gr191" style:family="graphic" style:parent-style-name="standard">
      <style:graphic-properties svg:stroke-color="#000000" draw:stroke-linejoin="none" draw:fill="hatch" draw:fill-color="#ffffff" draw:fill-hatch-name="Blue_20_45_20_Degrees" loext:fill-use-slide-background="false" draw:opacity="100%" draw:textarea-horizontal-align="justify" draw:textarea-vertical-align="middle" draw:auto-grow-height="false" fo:min-height="0.55cm" fo:min-width="0.5cm"/>
      <style:paragraph-properties style:writing-mode="lr-tb"/>
    </style:style>
    <style:style style:name="gr192" style:family="graphic" style:parent-style-name="standard">
      <style:graphic-properties svg:stroke-width="0.028cm" svg:stroke-color="#000000" draw:marker-start-width="0.242cm" draw:marker-end-width="0.242cm" draw:fill="solid" draw:fill-color="#ffffff" draw:opacity="35%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19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561cm"/>
      <style:paragraph-properties style:writing-mode="lr-tb"/>
    </style:style>
    <style:style style:name="gr195" style:family="graphic" style:parent-style-name="standard">
      <style:graphic-properties draw:stroke="none"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.2cm" fo:min-width="0cm"/>
      <style:paragraph-properties style:writing-mode="lr-tb"/>
    </style:style>
    <style:style style:name="gr196" style:family="graphic" style:parent-style-name="standard">
      <style:graphic-properties draw:stroke="none"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cm" fo:min-width="0cm"/>
      <style:paragraph-properties style:writing-mode="lr-tb"/>
    </style:style>
    <style:style style:name="gr197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0.25cm" fo:min-width="0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199" style:family="graphic" style:parent-style-name="standard">
      <style:graphic-properties draw:stroke="none" svg:stroke-color="#000000" draw:fill="solid" draw:fill-color="#ffffff" loext:fill-use-slide-background="false" draw:opacity="100%" draw:textarea-horizontal-align="justify" draw:textarea-vertical-align="middle" draw:auto-grow-height="false" fo:min-height="0cm" fo:min-width="0cm"/>
    </style:style>
    <style:style style:name="gr200" style:family="graphic" style:parent-style-name="standard">
      <style:graphic-properties svg:stroke-color="#000000" draw:fill="hatch" draw:fill-color="#729fcf" draw:fill-hatch-name="hatx" loext:fill-use-slide-background="false" draw:opacity="100%" draw:textarea-horizontal-align="justify" draw:textarea-vertical-align="middle" draw:auto-grow-height="false" fo:min-height="0cm" fo:min-width="0cm"/>
    </style:style>
    <style:style style:name="gr201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95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4.347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323cm" fo:padding-top="0cm" fo:padding-bottom="0cm" fo:padding-left="0cm" fo:padding-right="0cm"/>
      <style:paragraph-properties style:writing-mode="lr-tb"/>
    </style:style>
    <style:style style:name="gr205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1.572cm, 1.565cm, 10.603cm, 9.145cm)" draw:image-opacity="30%" style:mirror="none" style:protect="size"/>
    </style:style>
    <style:style style:name="gr206" style:family="graphic" style:parent-style-name="standard">
      <style:graphic-properties svg:stroke-color="#000000" draw:fill="hatch" draw:fill-color="#729fcf" draw:fill-hatch-name="hat2" loext:fill-use-slide-background="false" draw:textarea-horizontal-align="justify" draw:textarea-vertical-align="middle" draw:auto-grow-height="false" fo:min-height="0cm" fo:min-width="0.25cm" style:protect="size"/>
      <style:paragraph-properties style:writing-mode="lr-tb"/>
    </style:style>
    <style:style style:name="gr207" style:family="graphic" style:parent-style-name="standard">
      <style:graphic-properties svg:stroke-color="#000000" draw:fill="hatch" draw:fill-color="#729fcf" draw:fill-hatch-name="hat2" loext:fill-use-slide-background="false" draw:textarea-horizontal-align="justify" draw:textarea-vertical-align="middle" draw:auto-grow-height="false" fo:min-height="0.25cm" fo:min-width="0.25cm" style:protect="size"/>
      <style:paragraph-properties style:writing-mode="lr-tb"/>
    </style:style>
    <style:style style:name="gr20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75cm" style:protect="size"/>
      <style:paragraph-properties style:writing-mode="lr-tb"/>
    </style:style>
    <style:style style:name="gr20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5cm" style:protect="size"/>
      <style:paragraph-properties style:writing-mode="lr-tb"/>
    </style:style>
    <style:style style:name="gr21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1.25cm" style:protect="size"/>
      <style:paragraph-properties style:writing-mode="lr-tb"/>
    </style:style>
    <style:style style:name="gr21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25cm" style:protect="size"/>
      <style:paragraph-properties style:writing-mode="lr-tb"/>
    </style:style>
    <style:style style:name="gr21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25cm" style:protect="size"/>
      <style:paragraph-properties style:writing-mode="lr-tb"/>
    </style:style>
    <style:style style:name="gr21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.25cm" style:protect="size"/>
      <style:paragraph-properties style:writing-mode="lr-tb"/>
    </style:style>
    <style:style style:name="gr21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5cm" style:protect="size"/>
      <style:paragraph-properties style:writing-mode="lr-tb"/>
    </style:style>
    <style:style style:name="gr21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0cm" style:protect="size"/>
      <style:paragraph-properties style:writing-mode="lr-tb"/>
    </style:style>
    <style:style style:name="gr21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45cm" style:protect="size"/>
      <style:paragraph-properties style:writing-mode="lr-tb"/>
    </style:style>
    <style:style style:name="gr21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45cm" style:protect="size"/>
      <style:paragraph-properties style:writing-mode="lr-tb"/>
    </style:style>
    <style:style style:name="gr21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.45cm" style:protect="size"/>
      <style:paragraph-properties style:writing-mode="lr-tb"/>
    </style:style>
    <style:style style:name="gr21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45cm" style:protect="size"/>
      <style:paragraph-properties style:writing-mode="lr-tb"/>
    </style:style>
    <style:style style:name="gr22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25cm" style:protect="size"/>
      <style:paragraph-properties style:writing-mode="lr-tb"/>
    </style:style>
    <style:style style:name="gr22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cm" fo:min-width="0.5cm" style:protect="size"/>
      <style:paragraph-properties style:writing-mode="lr-tb"/>
    </style:style>
    <style:style style:name="gr22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cm" style:protect="size"/>
      <style:paragraph-properties style:writing-mode="lr-tb"/>
    </style:style>
    <style:style style:name="gr22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cm" fo:min-width="0cm" style:protect="size"/>
      <style:paragraph-properties style:writing-mode="lr-tb"/>
    </style:style>
    <style:style style:name="gr224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25cm" fo:min-width="0cm" style:protect="size"/>
      <style:paragraph-properties style:writing-mode="lr-tb"/>
    </style:style>
    <style:style style:name="gr225" style:family="graphic" style:parent-style-name="objectwithoutfill">
      <style:graphic-properties svg:stroke-color="#000000" draw:fill="none" draw:textarea-vertical-align="middle" style:protect="size"/>
    </style:style>
    <style:style style:name="gr226" style:family="graphic" style:parent-style-name="standard">
      <style:graphic-properties draw:stroke="none" svg:stroke-color="#000000" draw:fill="none" draw:fill-color="#ffffff" fo:min-height="0.477cm" style:protect="size"/>
      <style:paragraph-properties style:writing-mode="lr-tb"/>
    </style:style>
    <style:style style:name="gr22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cm" style:protect="size"/>
      <style:paragraph-properties style:writing-mode="lr-tb"/>
    </style:style>
    <style:style style:name="gr22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cm" style:protect="size"/>
      <style:paragraph-properties style:writing-mode="lr-tb"/>
    </style:style>
    <style:style style:name="gr229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cm" fo:min-width="0cm" style:protect="size"/>
      <style:paragraph-properties style:writing-mode="lr-tb"/>
    </style:style>
    <style:style style:name="gr23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cm" fo:min-width="0cm" style:protect="size"/>
      <style:paragraph-properties style:writing-mode="lr-tb"/>
    </style:style>
    <style:style style:name="gr23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05cm" fo:min-width="0cm" style:protect="size"/>
      <style:paragraph-properties style:writing-mode="lr-tb"/>
    </style:style>
    <style:style style:name="gr23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cm" style:protect="size"/>
      <style:paragraph-properties style:writing-mode="lr-tb"/>
    </style:style>
    <style:style style:name="gr23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cm" style:protect="size"/>
      <style:paragraph-properties style:writing-mode="lr-tb"/>
    </style:style>
    <style:style style:name="gr23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cm" style:protect="size"/>
      <style:paragraph-properties style:writing-mode="lr-tb"/>
    </style:style>
    <style:style style:name="gr23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cm" style:protect="size"/>
      <style:paragraph-properties style:writing-mode="lr-tb"/>
    </style:style>
    <style:style style:name="gr236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35cm" fo:min-width="0cm" style:protect="size"/>
      <style:paragraph-properties style:writing-mode="lr-tb"/>
    </style:style>
    <style:style style:name="gr23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cm" style:protect="size"/>
      <style:paragraph-properties style:writing-mode="lr-tb"/>
    </style:style>
    <style:style style:name="gr23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cm" style:protect="size"/>
      <style:paragraph-properties style:writing-mode="lr-tb"/>
    </style:style>
    <style:style style:name="gr23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1cm" style:protect="size"/>
      <style:paragraph-properties style:writing-mode="lr-tb"/>
    </style:style>
    <style:style style:name="gr24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1cm" fo:min-width="0.1cm" style:protect="size"/>
      <style:paragraph-properties style:writing-mode="lr-tb"/>
    </style:style>
    <style:style style:name="gr24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1cm" style:protect="size"/>
      <style:paragraph-properties style:writing-mode="lr-tb"/>
    </style:style>
    <style:style style:name="gr24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1cm" style:protect="size"/>
      <style:paragraph-properties style:writing-mode="lr-tb"/>
    </style:style>
    <style:style style:name="gr24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1cm" style:protect="size"/>
      <style:paragraph-properties style:writing-mode="lr-tb"/>
    </style:style>
    <style:style style:name="gr24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1cm" style:protect="size"/>
      <style:paragraph-properties style:writing-mode="lr-tb"/>
    </style:style>
    <style:style style:name="gr24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5cm" style:protect="size"/>
      <style:paragraph-properties style:writing-mode="lr-tb"/>
    </style:style>
    <style:style style:name="gr24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cm" style:protect="size"/>
      <style:paragraph-properties style:writing-mode="lr-tb"/>
    </style:style>
    <style:style style:name="gr24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2cm" style:protect="size"/>
      <style:paragraph-properties style:writing-mode="lr-tb"/>
    </style:style>
    <style:style style:name="gr24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cm" style:protect="size"/>
      <style:paragraph-properties style:writing-mode="lr-tb"/>
    </style:style>
    <style:style style:name="gr24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15cm" style:protect="size"/>
      <style:paragraph-properties style:writing-mode="lr-tb"/>
    </style:style>
    <style:style style:name="gr25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1cm" style:protect="size"/>
      <style:paragraph-properties style:writing-mode="lr-tb"/>
    </style:style>
    <style:style style:name="gr25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05cm" style:protect="size"/>
      <style:paragraph-properties style:writing-mode="lr-tb"/>
    </style:style>
    <style:style style:name="gr25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2cm" fo:min-width="0cm" style:protect="size"/>
      <style:paragraph-properties style:writing-mode="lr-tb"/>
    </style:style>
    <style:style style:name="gr25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5cm" style:protect="size"/>
      <style:paragraph-properties style:writing-mode="lr-tb"/>
    </style:style>
    <style:style style:name="gr25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35cm" style:protect="size"/>
      <style:paragraph-properties style:writing-mode="lr-tb"/>
    </style:style>
    <style:style style:name="gr25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7cm" style:protect="size"/>
      <style:paragraph-properties style:writing-mode="lr-tb"/>
    </style:style>
    <style:style style:name="gr25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cm" style:protect="size"/>
      <style:paragraph-properties style:writing-mode="lr-tb"/>
    </style:style>
    <style:style style:name="gr25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35cm" style:protect="size"/>
      <style:paragraph-properties style:writing-mode="lr-tb"/>
    </style:style>
    <style:style style:name="gr25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.3cm" style:protect="size"/>
      <style:paragraph-properties style:writing-mode="lr-tb"/>
    </style:style>
    <style:style style:name="gr259" style:family="graphic" style:parent-style-name="standard">
      <style:graphic-properties draw:stroke="none" draw:stroke-dash="Dot_20__28_Rounded_29_" svg:stroke-color="#000000" svg:stroke-linecap="round" draw:fill="hatch" draw:fill-color="#ffffff" draw:fill-hatch-name="Blue_20_45_20_Degrees" loext:fill-use-slide-background="false" draw:opacity="100%" draw:textarea-horizontal-align="justify" draw:textarea-vertical-align="middle" draw:auto-grow-height="false" fo:min-height="1.1cm" fo:min-width="0.3cm" style:protect="size"/>
      <style:paragraph-properties style:writing-mode="lr-tb"/>
    </style:style>
    <style:style style:name="gr26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cm" style:protect="size"/>
      <style:paragraph-properties style:writing-mode="lr-tb"/>
    </style:style>
    <style:style style:name="gr26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55cm" fo:min-width="1.15cm" style:protect="size"/>
      <style:paragraph-properties style:writing-mode="lr-tb"/>
    </style:style>
    <style:style style:name="gr26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.25cm" style:protect="size"/>
      <style:paragraph-properties style:writing-mode="lr-tb"/>
    </style:style>
    <style:style style:name="gr26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5cm" style:protect="size"/>
      <style:paragraph-properties style:writing-mode="lr-tb"/>
    </style:style>
    <style:style style:name="gr26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cm" style:protect="size"/>
      <style:paragraph-properties style:writing-mode="lr-tb"/>
    </style:style>
    <style:style style:name="gr26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1.2cm" style:protect="size"/>
      <style:paragraph-properties style:writing-mode="lr-tb"/>
    </style:style>
    <style:style style:name="gr26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1.2cm" style:protect="size"/>
      <style:paragraph-properties style:writing-mode="lr-tb"/>
    </style:style>
    <style:style style:name="gr26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2cm" style:protect="size"/>
      <style:paragraph-properties style:writing-mode="lr-tb"/>
    </style:style>
    <style:style style:name="gr268" style:family="graphic" style:parent-style-name="standard">
      <style:graphic-properties draw:stroke="none" svg:stroke-color="#000000" draw:fill="solid" draw:fill-color="#ffffff" loext:fill-use-slide-background="false" draw:opacity="50%" draw:textarea-horizontal-align="justify" draw:textarea-vertical-align="middle" draw:auto-grow-height="false" fo:min-height="1.9cm" fo:min-width="0.4cm" style:protect="size"/>
      <style:paragraph-properties style:writing-mode="lr-tb"/>
    </style:style>
    <style:style style:name="gr269" style:family="graphic" style:parent-style-name="standard">
      <style:graphic-properties draw:stroke="none" svg:stroke-color="#000000" draw:fill="none" draw:fill-color="#ffffff" fo:min-height="0.239cm" style:protect="size"/>
      <style:paragraph-properties style:writing-mode="lr-tb"/>
    </style:style>
    <style:style style:name="gr270" style:family="graphic" style:parent-style-name="standard">
      <style:graphic-properties draw:stroke="none" draw:stroke-dash="Dot_20__28_Rounded_29_" svg:stroke-color="#000000" svg:stroke-linecap="round" draw:fill="hatch" draw:fill-color="#ffffff" draw:fill-hatch-name="hat2" loext:fill-use-slide-background="false" draw:opacity="100%" draw:textarea-horizontal-align="justify" draw:textarea-vertical-align="middle" draw:auto-grow-height="false" fo:min-height="0.1cm" fo:min-width="0.15cm" style:protect="size"/>
      <style:paragraph-properties style:writing-mode="lr-tb"/>
    </style:style>
    <style:style style:name="gr27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cm" style:protect="size"/>
      <style:paragraph-properties style:writing-mode="lr-tb"/>
    </style:style>
    <style:style style:name="gr27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4cm" style:protect="size"/>
      <style:paragraph-properties style:writing-mode="lr-tb"/>
    </style:style>
    <style:style style:name="gr27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5cm" style:protect="size"/>
      <style:paragraph-properties style:writing-mode="lr-tb"/>
    </style:style>
    <style:style style:name="gr27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1cm" style:protect="size"/>
      <style:paragraph-properties style:writing-mode="lr-tb"/>
    </style:style>
    <style:style style:name="gr27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1cm" style:protect="size"/>
      <style:paragraph-properties style:writing-mode="lr-tb"/>
    </style:style>
    <style:style style:name="gr27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cm" style:protect="size"/>
      <style:paragraph-properties style:writing-mode="lr-tb"/>
    </style:style>
    <style:style style:name="gr27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2cm" style:protect="size"/>
      <style:paragraph-properties style:writing-mode="lr-tb"/>
    </style:style>
    <style:style style:name="gr278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95cm" fo:min-width="0.25cm" style:protect="size"/>
      <style:paragraph-properties style:writing-mode="lr-tb"/>
    </style:style>
    <style:style style:name="gr27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cm" style:protect="size"/>
      <style:paragraph-properties style:writing-mode="lr-tb"/>
    </style:style>
    <style:style style:name="gr28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35cm" style:protect="size"/>
      <style:paragraph-properties style:writing-mode="lr-tb"/>
    </style:style>
    <style:style style:name="gr28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.9cm" style:protect="size"/>
      <style:paragraph-properties style:writing-mode="lr-tb"/>
    </style:style>
    <style:style style:name="gr28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5cm" style:protect="size"/>
      <style:paragraph-properties style:writing-mode="lr-tb"/>
    </style:style>
    <style:style style:name="gr28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5cm" fo:min-width="0.2cm" style:protect="size"/>
      <style:paragraph-properties style:writing-mode="lr-tb"/>
    </style:style>
    <style:style style:name="gr28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45cm" fo:min-width="0cm" style:protect="size"/>
      <style:paragraph-properties style:writing-mode="lr-tb"/>
    </style:style>
    <style:style style:name="gr28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cm" fo:min-width="0cm" style:protect="size"/>
      <style:paragraph-properties style:writing-mode="lr-tb"/>
    </style:style>
    <style:style style:name="gr286" style:family="graphic" style:parent-style-name="objectwithoutfill">
      <style:graphic-properties draw:fill="none" draw:textarea-vertical-align="middle" style:protect="size"/>
    </style:style>
    <style:style style:name="gr287" style:family="graphic" style:parent-style-name="standard">
      <style:graphic-properties draw:stroke="none" svg:stroke-color="#000000" draw:fill="none" draw:fill-color="#ffffff" fo:min-height="0.25cm" style:protect="size"/>
      <style:paragraph-properties style:writing-mode="lr-tb"/>
    </style:style>
    <style:style style:name="gr288" style:family="graphic" style:parent-style-name="standard">
      <style:graphic-properties svg:stroke-color="#000000" draw:fill="none" draw:fill-color="#ffffff" loext:fill-use-slide-background="false" draw:opacity="50%" draw:textarea-horizontal-align="justify" draw:textarea-vertical-align="middle" draw:auto-grow-height="false" fo:min-height="1cm" fo:min-width="0.65cm" style:protect="size"/>
      <style:paragraph-properties style:writing-mode="lr-tb"/>
    </style:style>
    <style:style style:name="gr28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6cm" style:protect="size"/>
      <style:paragraph-properties style:writing-mode="lr-tb"/>
    </style:style>
    <style:style style:name="gr290" style:family="graphic" style:parent-style-name="standard">
      <style:graphic-properties svg:stroke-color="#000000" draw:stroke-linejoin="none" draw:fill="hatch" draw:fill-color="#ffffff" draw:fill-hatch-name="Blue_20_45_20_Degrees" loext:fill-use-slide-background="false" draw:opacity="100%" draw:textarea-horizontal-align="justify" draw:textarea-vertical-align="middle" draw:auto-grow-height="false" fo:min-height="0.55cm" fo:min-width="0.5cm" style:protect="size"/>
      <style:paragraph-properties style:writing-mode="lr-tb"/>
    </style:style>
    <style:style style:name="gr291" style:family="graphic" style:parent-style-name="standard">
      <style:graphic-properties svg:stroke-width="0.028cm" svg:stroke-color="#000000" draw:marker-start-width="0.242cm" draw:marker-end-width="0.242cm" draw:fill="solid" draw:fill-color="#ffffff" draw:opacity="35%" draw:textarea-horizontal-align="justify" draw:textarea-vertical-align="middle" draw:auto-grow-height="false" fo:min-height="0.43cm" fo:min-width="0.18cm" fo:padding-top="0.139cm" fo:padding-bottom="0.139cm" fo:padding-left="0.264cm" fo:padding-right="0.264cm" style:protect="size"/>
    </style:style>
    <style:style style:name="gr29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style:protect="size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561cm" style:protect="size"/>
      <style:paragraph-properties style:writing-mode="lr-tb"/>
    </style:style>
    <style:style style:name="gr294" style:family="graphic" style:parent-style-name="standard">
      <style:graphic-properties draw:stroke="none"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2cm" fo:min-width="0cm" style:protect="size"/>
      <style:paragraph-properties style:writing-mode="lr-tb"/>
    </style:style>
    <style:style style:name="gr295" style:family="graphic" style:parent-style-name="standard">
      <style:graphic-properties draw:stroke="none"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cm" fo:min-width="0cm" style:protect="size"/>
      <style:paragraph-properties style:writing-mode="lr-tb"/>
    </style:style>
    <style:style style:name="gr296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0.25cm" fo:min-width="0cm" style:protect="size"/>
      <style:paragraph-properties style:writing-mode="lr-tb"/>
    </style:style>
    <style:style style:name="gr29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5cm" style:protect="size"/>
      <style:paragraph-properties style:writing-mode="lr-tb"/>
    </style:style>
    <style:style style:name="gr298" style:family="graphic" style:parent-style-name="objectwithoutfill">
      <style:graphic-properties draw:stroke="dash" draw:stroke-dash="Double_20_Dash_20_Dot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 style:protect="size"/>
    </style:style>
    <style:style style:name="gr299" style:family="graphic" style:parent-style-name="standard">
      <style:graphic-properties draw:stroke="none" svg:stroke-color="#000000" draw:fill="none" draw:fill-color="#ffffff" fo:min-height="0.789cm" style:protect="size"/>
      <style:paragraph-properties style:writing-mode="lr-tb"/>
    </style:style>
    <style:style style:name="gr300" style:family="graphic" style:parent-style-name="standard">
      <style:graphic-properties draw:stroke="none" svg:stroke-color="#000000" draw:fill="none" draw:fill-color="#ffffff" fo:min-height="0.319cm" style:protect="size"/>
      <style:paragraph-properties style:writing-mode="lr-tb"/>
    </style:style>
    <style:style style:name="gr301" style:family="graphic" style:parent-style-name="standard">
      <style:graphic-properties draw:stroke="none" svg:stroke-color="#000000" draw:fill="none" draw:fill-color="#ffffff" fo:min-height="0.5cm" style:protect="size"/>
      <style:paragraph-properties style:writing-mode="lr-tb"/>
    </style:style>
    <style:style style:name="gr302" style:family="graphic" style:parent-style-name="objectwithoutfill">
      <style:graphic-properties draw:marker-end="Arrowheads_20_1" draw:marker-end-width="0.3cm" draw:fill="none" draw:textarea-vertical-align="middle" style:protect="size"/>
    </style:style>
    <style:style style:name="gr30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368cm, 28.122cm, 84.145cm, 151.437cm)" draw:image-opacity="100%" style:mirror="none"/>
    </style:style>
    <style:style style:name="P1" style:family="paragraph">
      <loext:graphic-properties draw:fill="none" draw:opacity="100%"/>
      <style:paragraph-properties fo:text-align="center" style:writing-mode="lr-tb">
        <style:tab-stops/>
      </style:paragraph-properties>
    </style:style>
    <style:style style:name="P2" style:family="paragraph">
      <style:paragraph-properties fo:text-align="center"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3" style:family="paragraph">
      <loext:graphic-properties draw:fill="hatch" draw:fill-color="#729fcf" draw:fill-hatch-name="hat2"/>
      <style:paragraph-properties fo:text-align="center"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4" style:family="paragraph">
      <style:paragraph-properties fo:text-align="center" style:writing-mode="lr-tb"/>
      <style:text-properties fo:font-size="8pt" fo:background-color="#ffffff" style:font-size-asian="8pt" style:font-size-complex="8pt"/>
    </style:style>
    <style:style style:name="P5" style:family="paragraph">
      <loext:graphic-properties draw:fill="hatch" draw:fill-color="#729fcf" draw:fill-hatch-name="hat2"/>
      <style:paragraph-properties fo:text-align="center" style:writing-mode="lr-tb"/>
      <style:text-properties fo:font-size="8pt" fo:background-color="#ffffff" style:font-size-asian="8pt" style:font-size-complex="8pt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ffffff" draw:opacity="50%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loext:graphic-properties draw:fill="solid" draw:fill-color="#ffffff" draw:opacity="50%"/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style:paragraph-properties fo:text-align="center" style:writing-mode="lr-tb"/>
      <style:text-properties fo:font-size="6pt" fo:background-color="#ffffff" style:font-size-asian="6pt" style:font-size-complex="6pt"/>
    </style:style>
    <style:style style:name="P11" style:family="paragraph">
      <loext:graphic-properties draw:fill="hatch" draw:fill-color="#ffffff" draw:fill-hatch-name="hat2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center" style:writing-mode="lr-tb"/>
      <style:text-properties fo:font-size="4pt" fo:background-color="#ffffff" style:font-size-asian="4pt" style:font-size-complex="4pt"/>
    </style:style>
    <style:style style:name="P15" style:family="paragraph">
      <loext:graphic-properties draw:fill="hatch" draw:fill-color="#ffffff" draw:fill-hatch-name="hat2" draw:opacity="100%"/>
      <style:paragraph-properties fo:text-align="center" style:writing-mode="lr-tb"/>
      <style:text-properties fo:font-size="4pt" fo:background-color="#ffffff" style:font-size-asian="4pt" style:font-size-complex="4pt"/>
    </style:style>
    <style:style style:name="P16" style:family="paragraph">
      <style:paragraph-properties fo:text-align="center" style:writing-mode="lr-tb"/>
      <style:text-properties fo:font-size="4pt" style:font-size-asian="4pt" style:font-size-complex="4pt"/>
    </style:style>
    <style:style style:name="P17" style:family="paragraph">
      <loext:graphic-properties draw:fill="solid" draw:fill-color="#ffffff" draw:opacity="50%"/>
      <style:paragraph-properties fo:text-align="center" style:writing-mode="lr-tb"/>
      <style:text-properties fo:font-size="4pt" style:font-size-asian="4pt" style:font-size-complex="4pt"/>
    </style:style>
    <style:style style:name="P18" style:family="paragraph">
      <style:paragraph-properties fo:text-align="center" style:writing-mode="lr-tb"/>
      <style:text-properties fo:font-size="6pt" style:font-size-asian="4pt" style:font-size-complex="4pt"/>
    </style:style>
    <style:style style:name="P19" style:family="paragraph">
      <loext:graphic-properties draw:fill="solid" draw:fill-color="#ffffff" draw:opacity="50%"/>
      <style:paragraph-properties fo:text-align="center" style:writing-mode="lr-tb"/>
      <style:text-properties fo:font-size="6pt" style:font-size-asian="4pt" style:font-size-complex="4pt"/>
    </style:style>
    <style:style style:name="P20" style:family="paragraph">
      <loext:graphic-properties draw:fill="hatch" draw:fill-color="#ffffff" draw:fill-hatch-name="Blue_20_45_20_Degrees" draw:opacity="100%"/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loext:graphic-properties draw:fill="hatch" draw:fill-color="#ffffff" draw:fill-hatch-name="hat2" draw:opacity="100%"/>
      <style:paragraph-properties fo:text-align="center" style:writing-mode="lr-tb"/>
      <style:text-properties fo:font-size="6pt" style:font-size-asian="6pt" style:font-size-complex="6pt"/>
    </style:style>
    <style:style style:name="P22" style:family="paragraph">
      <loext:graphic-properties draw:fill="hatch" draw:fill-color="#ffffff" draw:fill-hatch-name="Blue_20_45_20_Degrees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23" style:family="paragraph">
      <style:paragraph-properties fo:text-align="center" style:writing-mode="lr-tb"/>
      <style:text-properties fo:font-size="5pt" style:font-size-asian="5pt" style:font-size-complex="5pt"/>
    </style:style>
    <style:style style:name="P24" style:family="paragraph">
      <loext:graphic-properties draw:fill="solid" draw:fill-color="#ffffff" draw:opacity="50%"/>
      <style:paragraph-properties fo:text-align="center" style:writing-mode="lr-tb"/>
      <style:text-properties fo:font-size="5pt" style:font-size-asian="5pt" style:font-size-complex="5pt"/>
    </style:style>
    <style:style style:name="P25" style:family="paragraph">
      <style:text-properties fo:background-color="#ffffff"/>
    </style:style>
    <style:style style:name="P26" style:family="paragraph">
      <loext:graphic-properties draw:fill="none" draw:fill-color="#ffffff"/>
      <style:paragraph-properties style:writing-mode="lr-tb"/>
      <style:text-properties fo:background-color="#ffffff"/>
    </style:style>
    <style:style style:name="P27" style:family="paragraph">
      <loext:graphic-properties draw:fill="none" draw:fill-color="#ffffff" draw:opacity="50%"/>
      <style:paragraph-properties fo:text-align="center" style:writing-mode="lr-tb"/>
      <style:text-properties fo:font-size="5pt" style:font-size-asian="5pt" style:font-size-complex="5pt"/>
    </style:style>
    <style:style style:name="P28" style:family="paragraph">
      <style:paragraph-properties fo:text-align="center" style:writing-mode="lr-tb"/>
      <style:text-properties fo:font-size="5pt" style:font-size-asian="6pt" style:font-size-complex="6pt"/>
    </style:style>
    <style:style style:name="P29" style:family="paragraph">
      <loext:graphic-properties draw:fill="solid" draw:fill-color="#ffffff" draw:opacity="50%"/>
      <style:paragraph-properties fo:text-align="center" style:writing-mode="lr-tb"/>
      <style:text-properties fo:font-size="5pt" style:font-size-asian="6pt" style:font-size-complex="6pt"/>
    </style:style>
    <style:style style:name="P30" style:family="paragraph">
      <loext:graphic-properties draw:fill="solid" draw:fill-color="#ffffff" draw:opacity="35%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34" style:family="paragraph"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style:text-properties fo:font-size="6pt" style:font-size-asian="6pt" style:font-size-complex="6pt"/>
    </style:style>
    <style:style style:name="P37" style:family="paragraph">
      <loext:graphic-properties draw:fill="none" draw:fill-color="#ffffff"/>
      <style:text-properties fo:font-size="6pt" style:font-size-asian="6pt" style:font-size-complex="6pt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0" style:family="paragraph">
      <style:paragraph-properties fo:text-align="center"/>
      <style:text-properties fo:font-size="6pt" style:font-size-asian="6pt" style:font-size-complex="6pt"/>
    </style:style>
    <style:style style:name="P41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42" style:family="paragraph">
      <loext:graphic-properties draw:fill="solid" draw:fill-color="#000000"/>
    </style:style>
    <style:style style:name="P43" style:family="paragraph">
      <loext:graphic-properties draw:fill="solid" draw:fill-color="#ffffff"/>
    </style:style>
    <style:style style:name="P44" style:family="paragraph">
      <style:paragraph-properties fo:text-align="start" style:writing-mode="lr-tb"/>
    </style:style>
    <style:style style:name="P4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46" style:family="paragraph">
      <loext:graphic-properties draw:fill="hatch" draw:fill-color="#729fcf" draw:fill-hatch-name="Blue_20_45_20_Degrees"/>
      <style:paragraph-properties fo:text-align="center"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47" style:family="paragraph">
      <loext:graphic-properties draw:fill="hatch" draw:fill-color="#729fcf" draw:fill-hatch-name="Blue_20_45_20_Degrees"/>
      <style:paragraph-properties fo:text-align="center" style:writing-mode="lr-tb"/>
      <style:text-properties fo:font-size="8pt" fo:background-color="#ffffff" style:font-size-asian="8pt" style:font-size-complex="8pt"/>
    </style:style>
    <style:style style:name="P48" style:family="paragraph">
      <loext:graphic-properties draw:fill="hatch" draw:fill-color="#ffffff" draw:fill-hatch-name="Blue_20_45_20_Degrees_20_Crossed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49" style:family="paragraph">
      <loext:graphic-properties draw:fill="hatch" draw:fill-color="#ffffff" draw:fill-hatch-name="Blue_20_45_20_Degrees_20_Crossed" draw:opacity="100%"/>
      <style:paragraph-properties fo:text-align="center" style:writing-mode="lr-tb"/>
      <style:text-properties fo:font-size="6pt" style:font-size-asian="6pt" style:font-size-complex="6pt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52" style:family="paragraph">
      <loext:graphic-properties draw:fill="solid" draw:fill-color="#ffffff" draw:opacity="100%"/>
      <style:paragraph-properties fo:text-align="center"/>
    </style:style>
    <style:style style:name="P53" style:family="paragraph">
      <loext:graphic-properties draw:fill="hatch" draw:fill-color="#729fcf" draw:fill-hatch-name="hatx" draw:opacity="100%"/>
      <style:paragraph-properties fo:text-align="center"/>
    </style:style>
    <style:style style:name="T1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2" style:family="text">
      <style:text-properties fo:font-size="8pt" fo:background-color="#ffffff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background-color="#ffffff" style:font-size-asian="6pt" style:font-size-complex="6pt"/>
    </style:style>
    <style:style style:name="T6" style:family="text">
      <style:text-properties fo:font-size="4pt" fo:background-color="#ffffff" style:font-size-asian="4pt" style:font-size-complex="4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6pt" style:font-size-asian="4pt" style:font-size-complex="4pt"/>
    </style:style>
    <style:style style:name="T9" style:family="text">
      <style:text-properties fo:font-size="5pt" style:font-size-asian="5pt" style:font-size-complex="5pt"/>
    </style:style>
    <style:style style:name="T10" style:family="text">
      <style:text-properties fo:background-color="#ffffff"/>
    </style:style>
    <style:style style:name="T11" style:family="text">
      <style:text-properties fo:font-size="5pt" style:font-size-asian="6pt" style:font-size-complex="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loext:opacity="100%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976cm" svg:height="6.499cm" svg:x="1.5cm" svg:y="7cm">
          <draw:image xlink:href="Pictures/10091AE60000A40500007411C71A921577579743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2" draw:text-style-name="P3" draw:layer="layout" svg:width="0.75cm" svg:height="0.25cm" svg:x="3.5cm" svg:y="7.2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3.5cm" svg:y="7.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5cm" svg:height="0.5cm" svg:x="3.5cm" svg:y="8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3.5cm" svg:y="8.5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cm" svg:x="3.5cm" svg:y="9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3.5cm" svg:y="10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5cm" svg:height="0.75cm" svg:x="3.5cm" svg:y="10.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3.5cm" svg:y="11.25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5cm" svg:height="0.8cm" svg:x="4.25cm" svg:y="10.75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4.25cm" svg:y="10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5cm" svg:height="1cm" svg:x="5.25cm" svg:y="10.25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9.75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9.25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8.75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8.25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0.75cm" svg:x="5cm" svg:y="7.5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65cm" svg:x="4.25cm" svg:y="7.35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4.25cm" svg:y="8.5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95cm" svg:height="0.6cm" svg:x="6.3cm" svg:y="7.65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6.3cm" svg:y="8.25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3cm" svg:y="8.75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3cm" svg:y="9.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3cm" svg:y="9.45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6.3cm" svg:y="9.8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cm" svg:height="0.75cm" svg:x="6.3cm" svg:y="10.3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7.25cm" svg:y="10.3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8.25cm" svg:y="10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8.25cm" svg:y="7.75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25cm" svg:y="8.5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25cm" svg:y="8.993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25cm" svg:y="9.5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cm" svg:height="1.25cm" svg:x="7.25cm" svg:y="7.75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25cm" svg:height="0.5cm" svg:x="9.25cm" svg:y="7.75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25cm" svg:y="8.25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25cm" svg:y="8.5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5cm" svg:height="0.5cm" svg:x="9.25cm" svg:y="8.75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25cm" svg:y="9.25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9.25cm" svg:y="9.5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25cm" svg:height="0.5cm" svg:x="9.25cm" svg:y="10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9.25cm" svg:y1="9.75cm" svg:x2="9.75cm" svg:y2="9.75cm">
          <text:p/>
        </draw:line>
        <draw:line draw:style-name="gr21" draw:text-style-name="P12" draw:layer="layout" svg:x1="9.75cm" svg:y1="10.45cm" svg:x2="9.75cm" svg:y2="9.75cm">
          <text:p/>
        </draw:line>
        <draw:line draw:style-name="gr21" draw:text-style-name="P12" draw:layer="layout" svg:x1="9.5cm" svg:y1="10.457cm" svg:x2="9.75cm" svg:y2="10.457cm">
          <text:p/>
        </draw:line>
        <draw:line draw:style-name="gr21" draw:text-style-name="P12" draw:layer="layout" svg:x1="9.5cm" svg:y1="10cm" svg:x2="9.5cm" svg:y2="10.5cm">
          <text:p/>
        </draw:line>
        <draw:line draw:style-name="gr21" draw:text-style-name="P12" draw:layer="layout" svg:x1="9.25cm" svg:y1="10cm" svg:x2="9.5cm" svg:y2="10cm">
          <text:p/>
        </draw:line>
        <draw:line draw:style-name="gr21" draw:text-style-name="P12" draw:layer="layout" svg:x1="9.25cm" svg:y1="9.75cm" svg:x2="9.25cm" svg:y2="10cm">
          <text:p/>
        </draw:line>
        <draw:frame draw:style-name="gr22" draw:text-style-name="P13" draw:layer="layout" svg:width="0.25cm" svg:height="0.727cm" svg:x="9.4cm" svg:y="9.65cm">
          <draw:text-box>
            <text:p><text:span text:style-name="T4">39</text:span></text:p>
          </draw:text-box>
        </draw:frame>
        <draw:custom-shape draw:style-name="gr11" draw:text-style-name="P9" draw:layer="layout" svg:width="0.25cm" svg:height="0.65cm" svg:x="9.75cm" svg:y="9.75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25cm" svg:height="0.6cm" svg:x="10cm" svg:y="9.75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9.75cm" svg:y="7.75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9.75cm" svg:y="9.25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9.75cm" svg:y="8.5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5cm" svg:y="7.75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5cm" svg:y="8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5cm" svg:y="8.25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5cm" svg:y="8.75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cm" svg:y="10.25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0.5cm" svg:y="9.75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25cm" svg:height="0.5cm" svg:x="10.75cm" svg:y="9.75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cm" svg:y="10.5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0.25cm" svg:height="0.25cm" svg:x="11cm" svg:y="10.75cm">
          <text:p text:style-name="P14"><text:span text:style-name="T6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0.25cm" svg:height="0.25cm" svg:x="11.25cm" svg:y="10.75cm">
          <text:p text:style-name="P16"><text:span text:style-name="T7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5cm" svg:y="9.25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cm" svg:y="10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11cm" svg:y="9.25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5cm" svg:height="0.65cm" svg:x="11cm" svg:y="7.75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5cm" svg:height="0.85cm" svg:x="11cm" svg:y="8.4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.75cm" svg:y="8.15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8.4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8.9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11.75cm" svg:y="9.4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.75cm" svg:y="9.75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10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10.5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3cm" svg:y="7.75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1.75cm" svg:y="7.75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12cm" svg:y="9.4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7.75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8.25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25cm" svg:y="8.75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9.15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25cm" svg:y="9.65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25cm" svg:y="10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25cm" svg:y="10.4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25cm" svg:y="10.75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11.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2cm" svg:y="11.25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75cm" svg:y="11.25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5cm" svg:y="11.25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5cm" svg:height="0.25cm" svg:x="11cm" svg:y="11.25cm">
          <text:p text:style-name="P10"><text:span text:style-name="T5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5cm" svg:height="0.5cm" svg:x="11cm" svg:y="11.5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1cm" svg:y="12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4cm" svg:height="0.6cm" svg:x="11.5cm" svg:y="11.75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35cm" svg:height="0.6cm" svg:x="11.9cm" svg:y="11.75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12.25cm" svg:y="11.6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3cm" svg:y="8.05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8.35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3cm" svg:y="8.75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9.05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9.45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cm" svg:y="11.5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cm" svg:y="1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0.5cm" svg:height="0.5cm" svg:x="13cm" svg:y="12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9.85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3cm" svg:y="10.25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10.6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25cm" svg:height="1cm" svg:x="13.5cm" svg:y="11.5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25cm" svg:height="1cm" svg:x="13.75cm" svg:y="11.5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.5cm" svg:y="1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5cm" svg:y="9.45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5cm" svg:y="9.85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5cm" svg:y="9.05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0.5cm" svg:height="0.7cm" svg:x="13.5cm" svg:y="8.35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0.5cm" svg:height="0.6cm" svg:x="13.5cm" svg:y="7.75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0.5cm" svg:height="1.4cm" svg:x="14.25cm" svg:y="7.75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14.25cm" svg:y="9.15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14.25cm" svg:y="9.75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0.9cm" svg:x="14.25cm" svg:y="10.35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6cm" svg:height="0.6cm" svg:x="14.75cm" svg:y="11.9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0.6cm" svg:height="0.66cm" svg:x="14.75cm" svg:y="11.25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45cm" svg:x="14.75cm" svg:y="10.8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45cm" svg:x="14.75cm" svg:y="10.35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1.2cm" svg:x="14.75cm" svg:y="9.15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0.6cm" svg:height="0.5cm" svg:x="14.75cm" svg:y="7.75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45cm" svg:x="14.75cm" svg:y="8.25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45cm" svg:x="14.75cm" svg:y="8.7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0.6cm" svg:height="0.8cm" svg:x="15.75cm" svg:y="7.9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0.95cm" svg:height="0.7cm" svg:x="15.65cm" svg:y="11.8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layout" svg:width="1cm" svg:height="0.45cm" svg:x="15.65cm" svg:y="11.35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0.7cm" svg:height="0.4cm" svg:x="15.65cm" svg:y="10.5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0.7cm" svg:height="0.4cm" svg:x="15.65cm" svg:y="10.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5cm" svg:x="15.65cm" svg:y="9.6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65cm" svg:height="0.4cm" svg:x="15.7cm" svg:y="8.7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5cm" svg:x="15.65cm" svg:y="9.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0.6cm" svg:height="0.7cm" svg:x="16.6cm" svg:y="11.8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55cm" svg:height="0.45cm" svg:x="16.65cm" svg:y="11.35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3cm" svg:x="16.7cm" svg:y="10.9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2cm" svg:x="16.7cm" svg:y="11.13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5cm" svg:height="0.67cm" svg:x="16.7cm" svg:y="10.23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35cm" svg:height="0.67cm" svg:x="16.35cm" svg:y="10.23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85cm" svg:height="0.6cm" svg:x="16.35cm" svg:y="9.5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1.6cm" svg:x="16.35cm" svg:y="7.9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1.2cm" svg:height="1.6cm" svg:x="17.2cm" svg:y="7.9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0.45cm" svg:height="0.8cm" svg:x="17.4cm" svg:y="9.5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17.85cm" svg:y="9.5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17.85cm" svg:y="9.9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0.85cm" svg:height="0.8cm" svg:x="17.4cm" svg:y="10.3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8cm" svg:height="1.4cm" svg:x="17.4cm" svg:y="11.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0" draw:layer="layout" svg:width="0.8cm" svg:height="1.35cm" svg:x="18.55cm" svg:y="7.9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0.8cm" svg:height="0.6cm" svg:x="18.55cm" svg:y="9.25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1.65cm" svg:height="1.8cm" svg:x="18.5cm" svg:y="9.85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0.75cm" svg:height="0.9cm" svg:x="18.4cm" svg:y="11.65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0.9cm" svg:x="19.15cm" svg:y="11.65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0.9cm" svg:x="19.65cm" svg:y="11.65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layout" svg:width="0.85cm" svg:height="1.15cm" svg:x="20.15cm" svg:y="11.4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0.8cm" svg:height="1.15cm" svg:x="21cm" svg:y="11.4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1.7cm" svg:height="0.9cm" svg:x="20.15cm" svg:y="10.5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1.7cm" svg:height="0.65cm" svg:x="20.15cm" svg:y="9.85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0.7cm" svg:height="1.6cm" svg:x="21.3cm" svg:y="7.7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1.6cm" svg:x="20.25cm" svg:y="7.7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1.1cm" svg:y1="7.7cm" svg:x2="21.3cm" svg:y2="7.7cm">
          <text:p/>
        </draw:line>
        <draw:custom-shape draw:style-name="gr64" draw:text-style-name="P9" draw:layer="layout" svg:width="0.9cm" svg:height="2.15cm" svg:x="19.35cm" svg:y="7.7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1.95cm" svg:y1="9.859cm" svg:x2="21.95cm" svg:y2="9.3cm">
          <text:p/>
        </draw:line>
        <draw:line draw:style-name="gr21" draw:text-style-name="P12" draw:layer="layout" svg:x1="21.95cm" svg:y1="9.85cm" svg:x2="21.85cm" svg:y2="9.85cm">
          <text:p/>
        </draw:line>
        <draw:frame draw:style-name="gr65" draw:text-style-name="P13" draw:layer="layout" svg:width="1cm" svg:height="0.489cm" svg:x="20.75cm" svg:y="9.261cm">
          <draw:text-box>
            <text:p><text:span text:style-name="T4">154</text:span></text:p>
          </draw:text-box>
        </draw:frame>
        <draw:line draw:style-name="gr21" draw:text-style-name="P12" draw:layer="layout" svg:x1="19.35cm" svg:y1="7.9cm" svg:x2="18.55cm" svg:y2="7.9cm">
          <text:p/>
        </draw:line>
        <draw:line draw:style-name="gr21" draw:text-style-name="P12" draw:layer="layout" svg:x1="18.55cm" svg:y1="7.9cm" svg:x2="18.55cm" svg:y2="9.3cm">
          <text:p/>
        </draw:line>
        <draw:line draw:style-name="gr21" draw:text-style-name="P12" draw:layer="layout" svg:x1="19.35cm" svg:y1="7.9cm" svg:x2="19.35cm" svg:y2="7.7cm">
          <text:p/>
        </draw:line>
        <draw:line draw:style-name="gr21" draw:text-style-name="P12" draw:layer="layout" svg:x1="20.25cm" svg:y1="9.3cm" svg:x2="20.25cm" svg:y2="9.85cm">
          <text:p/>
        </draw:line>
        <draw:line draw:style-name="gr21" draw:text-style-name="P12" draw:layer="layout" svg:x1="19.35cm" svg:y1="7.7cm" svg:x2="20.25cm" svg:y2="7.7cm">
          <text:p/>
        </draw:line>
        <draw:custom-shape draw:style-name="gr66" draw:text-style-name="P21" draw:layer="layout" svg:width="0.65cm" svg:height="0.35cm" svg:x="21.15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22.25cm" svg:y="7.8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9" draw:layer="layout" svg:width="0.5cm" svg:height="0.55cm" svg:x="22.25cm" svg:y="8.3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0.9cm" svg:height="0.4cm" svg:x="22.25cm" svg:y="8.85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0.95cm" svg:height="0.8cm" svg:x="22.2cm" svg:y="9.25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1.5cm" svg:height="0.5cm" svg:x="22.15cm" svg:y="10.05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.5cm" svg:height="0.8cm" svg:x="22.05cm" svg:y="10.55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0.9cm" svg:height="0.7cm" svg:x="22cm" svg:y="11.35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22cm" svg:y="12.05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22.45cm" svg:y="12.05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0.7cm" svg:height="1.2cm" svg:x="22.9cm" svg:y="11.35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2" draw:layer="layout" svg:width="0.75cm" svg:height="1.2cm" svg:x="23.6cm" svg:y="11.35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9" draw:layer="layout" svg:width="0.9cm" svg:height="0.8cm" svg:x="23.55cm" svg:y="10.55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9" draw:layer="layout" svg:width="0.85cm" svg:height="0.5cm" svg:x="23.65cm" svg:y="10.05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1.4cm" svg:height="0.55cm" svg:x="23.15cm" svg:y="9.5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9" draw:layer="layout" svg:width="1cm" svg:height="0.5cm" svg:x="23.6cm" svg:y="9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0.7cm" svg:height="1.1cm" svg:x="24cm" svg:y="7.9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4" draw:layer="layout" svg:width="0.3cm" svg:height="0.55cm" svg:x="23.7cm" svg:y="7.85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9" draw:layer="layout" svg:width="0.45cm" svg:height="1.7cm" svg:x="23.15cm" svg:y="7.8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9" draw:layer="layout" svg:width="0.4cm" svg:height="1.05cm" svg:x="22.75cm" svg:y="7.8cm">
          <text:p text:style-name="P8"><text:span text:style-name="T4">175</text:span></text:p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3.6cm" svg:y1="7.8cm" svg:x2="23.6cm" svg:y2="7.8cm">
          <text:p/>
        </draw:line>
        <draw:line draw:style-name="gr21" draw:text-style-name="P12" draw:layer="layout" svg:x1="23.6cm" svg:y1="7.8cm" svg:x2="23.7cm" svg:y2="7.8cm">
          <text:p/>
        </draw:line>
        <draw:line draw:style-name="gr82" draw:text-style-name="P12" draw:layer="layout" svg:x1="23.7cm" svg:y1="7.8cm" svg:x2="23.7cm" svg:y2="7.8cm">
          <text:p/>
        </draw:line>
        <draw:line draw:style-name="gr21" draw:text-style-name="P12" draw:layer="layout" svg:x1="23.7cm" svg:y1="7.8cm" svg:x2="23.7cm" svg:y2="7.85cm">
          <text:p/>
        </draw:line>
        <draw:frame draw:style-name="gr83" draw:text-style-name="P26" draw:layer="layout" svg:width="0.5cm" svg:height="2.384cm" svg:x="22.5cm" svg:y="6.5cm">
          <draw:text-box>
            <text:p text:style-name="P25"><text:span text:style-name="T10">173</text:span></text:p>
          </draw:text-box>
        </draw:frame>
        <draw:frame draw:style-name="gr84" draw:text-style-name="P13" draw:layer="layout" svg:width="1.12cm" svg:height="0.5cm" svg:x="23.38cm" svg:y="8.5cm">
          <draw:text-box>
            <text:p><text:span text:style-name="T4">173</text:span></text:p>
          </draw:text-box>
        </draw:frame>
        <draw:custom-shape draw:style-name="gr31" draw:text-style-name="P24" draw:layer="layout" svg:width="0.35cm" svg:height="0.7cm" svg:x="24.85cm" svg:y="8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35cm" svg:height="0.7cm" svg:x="25.2cm" svg:y="8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7" draw:layer="layout" svg:width="1.15cm" svg:height="1.25cm" svg:x="24.8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.25cm" svg:height="0.727cm" svg:x="25cm" svg:y="8.75cm">
          <draw:text-box>
            <text:p><text:span text:style-name="T4">177(3)</text:span></text:p>
          </draw:text-box>
        </draw:frame>
        <draw:custom-shape draw:style-name="gr86" draw:text-style-name="P9" draw:layer="layout" svg:width="1.1cm" svg:height="1.15cm" svg:x="26cm" svg:y="8.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4.85cm" svg:y1="9.25cm" svg:x2="24.6cm" svg:y2="11.95cm">
          <text:p/>
        </draw:line>
        <draw:custom-shape draw:style-name="gr87" draw:text-style-name="P22" draw:layer="layout" svg:width="1cm" svg:height="0.8cm" svg:x="24.6cm" svg:y="11.95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9" draw:layer="layout" svg:width="0.3cm" svg:height="0.8cm" svg:x="25.6cm" svg:y="11.95cm">
          <text:p text:style-name="P28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9" draw:layer="layout" svg:width="0.3cm" svg:height="0.8cm" svg:x="25.9cm" svg:y="11.95cm">
          <text:p text:style-name="P28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9" draw:layer="layout" svg:width="0.3cm" svg:height="0.8cm" svg:x="26.2cm" svg:y="11.95cm">
          <text:p text:style-name="P28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75cm" svg:height="0.8cm" svg:x="26.5cm" svg:y="11.95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0" draw:layer="layout" svg:width="1cm" svg:height="1cm" svg:x="25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2" draw:layer="layout" svg:x1="26cm" svg:y1="10.75cm" svg:x2="26cm" svg:y2="11.5cm">
          <text:p/>
        </draw:line>
        <draw:line draw:style-name="gr89" draw:text-style-name="P12" draw:layer="layout" svg:x1="26.25cm" svg:y1="11cm" svg:x2="26.25cm" svg:y2="11.5cm">
          <text:p/>
        </draw:line>
        <draw:line draw:style-name="gr89" draw:text-style-name="P12" draw:layer="layout" svg:x1="26.5cm" svg:y1="10.75cm" svg:x2="26.5cm" svg:y2="11.5cm">
          <text:p/>
        </draw:line>
        <draw:frame draw:style-name="gr84" draw:text-style-name="P13" draw:layer="layout" svg:width="1cm" svg:height="0.5cm" svg:x="25.75cm" svg:y="10.25cm">
          <draw:text-box>
            <text:p><text:span text:style-name="T4">185</text:span></text:p>
          </draw:text-box>
        </draw:frame>
        <draw:frame draw:style-name="gr90" draw:text-style-name="P32" draw:layer="layout" svg:width="1.061cm" svg:height="0.727cm" svg:x="24.939cm" svg:y="10.773cm">
          <draw:text-box>
            <text:p text:style-name="P31"><text:span text:style-name="T4">Water</text:span><text:span text:style-name="T4"><text:line-break/></text:span><text:span text:style-name="T4">Tank</text:span></text:p>
          </draw:text-box>
        </draw:frame>
        <draw:line draw:style-name="gr21" draw:text-style-name="P12" draw:layer="layout" svg:x1="27.1cm" svg:y1="9.25cm" svg:x2="26.85cm" svg:y2="11.95cm">
          <text:p/>
        </draw:line>
        <draw:custom-shape draw:style-name="gr91" draw:text-style-name="P21" draw:layer="layout" svg:width="0.25cm" svg:height="0.45cm" svg:x="9.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1" draw:layer="layout" svg:width="0.25cm" svg:height="0.25cm" svg:x="9.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3" draw:layer="layout" svg:width="0.25cm" svg:height="0.5cm" svg:x="9.5cm" svg:y="7.75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2.95cm" svg:y1="8.414cm" svg:x2="22.85cm" svg:y2="8.528cm">
          <text:p/>
        </draw:line>
        <draw:line draw:style-name="gr21" draw:text-style-name="P12" draw:layer="layout" svg:x1="22.95cm" svg:y1="8.414cm" svg:x2="23.05cm" svg:y2="8.528cm">
          <text:p/>
        </draw:line>
        <draw:line draw:style-name="gr21" draw:text-style-name="P12" draw:layer="layout" svg:x1="22.89cm" svg:y1="8.483cm" svg:x2="23.01cm" svg:y2="8.483cm">
          <text:p/>
        </draw:line>
        <draw:line draw:style-name="gr21" draw:text-style-name="P12" draw:layer="layout" svg:x1="22.85cm" svg:y1="8.529cm" svg:x2="23.05cm" svg:y2="8.529cm">
          <text:p/>
        </draw:line>
        <draw:line draw:style-name="gr21" draw:text-style-name="P12" draw:layer="layout" svg:x1="22.85cm" svg:y1="8.529cm" svg:x2="22.85cm" svg:y2="8.7cm">
          <text:p/>
        </draw:line>
        <draw:line draw:style-name="gr21" draw:text-style-name="P12" draw:layer="layout" svg:x1="23.05cm" svg:y1="8.529cm" svg:x2="23.05cm" svg:y2="8.7cm">
          <text:p/>
        </draw:line>
        <draw:line draw:style-name="gr21" draw:text-style-name="P12" draw:layer="layout" svg:x1="22.85cm" svg:y1="8.7cm" svg:x2="23.05cm" svg:y2="8.7cm">
          <text:p/>
        </draw:line>
        <draw:line draw:style-name="gr21" draw:text-style-name="P12" draw:layer="layout" svg:x1="22.9cm" svg:y1="8.7cm" svg:x2="22.9cm" svg:y2="8.586cm">
          <text:p/>
        </draw:line>
        <draw:line draw:style-name="gr21" draw:text-style-name="P12" draw:layer="layout" svg:x1="22.9cm" svg:y1="8.586cm" svg:x2="23cm" svg:y2="8.586cm">
          <text:p/>
        </draw:line>
        <draw:line draw:style-name="gr21" draw:text-style-name="P12" draw:layer="layout" svg:x1="23cm" svg:y1="8.586cm" svg:x2="23cm" svg:y2="8.7cm">
          <text:p/>
        </draw:line>
        <draw:line draw:style-name="gr21" draw:text-style-name="P12" draw:layer="layout" svg:x1="22.95cm" svg:y1="8.414cm" svg:x2="22.95cm" svg:y2="8.3cm">
          <text:p/>
        </draw:line>
        <draw:line draw:style-name="gr21" draw:text-style-name="P12" draw:layer="layout" svg:x1="22.95cm" svg:y1="8.3cm" svg:x2="23.05cm" svg:y2="8.3cm">
          <text:p/>
        </draw:line>
        <draw:line draw:style-name="gr21" draw:text-style-name="P12" draw:layer="layout" svg:x1="23.05cm" svg:y1="8.3cm" svg:x2="22.95cm" svg:y2="8.357cm">
          <text:p/>
        </draw:line>
        <draw:custom-shape draw:style-name="gr94" draw:text-style-name="P9" draw:layer="layout" svg:width="1.05cm" svg:height="0.45cm" svg:x="15.65cm" svg:y="10.9cm"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12" draw:layer="layout" svg:x1="3.25cm" svg:y1="12.5cm" svg:x2="10.75cm" svg:y2="10.5cm">
          <text:p/>
        </draw:line>
        <draw:line draw:style-name="gr95" draw:text-style-name="P12" draw:layer="layout" svg:x1="3.25cm" svg:y1="12.5cm" svg:x2="3.25cm" svg:y2="7cm">
          <text:p/>
        </draw:line>
        <draw:line draw:style-name="gr95" draw:text-style-name="P12" draw:layer="layout" svg:x1="3.25cm" svg:y1="7cm" svg:x2="9cm" svg:y2="7.5cm">
          <text:p/>
        </draw:line>
        <draw:line draw:style-name="gr95" draw:text-style-name="P12" draw:layer="layout" svg:x1="9.25cm" svg:y1="7.5cm" svg:x2="20cm" svg:y2="7.5cm">
          <text:p/>
        </draw:line>
        <draw:line draw:style-name="gr95" draw:text-style-name="P12" draw:layer="layout" svg:x1="10.75cm" svg:y1="10.5cm" svg:x2="10.75cm" svg:y2="12.75cm">
          <text:p/>
        </draw:line>
        <draw:line draw:style-name="gr95" draw:text-style-name="P12" draw:layer="layout" svg:x1="10.75cm" svg:y1="12.75cm" svg:x2="28cm" svg:y2="13cm">
          <text:p/>
        </draw:line>
        <draw:line draw:style-name="gr95" draw:text-style-name="P12" draw:layer="layout" svg:x1="28cm" svg:y1="7.75cm" svg:x2="28cm" svg:y2="13cm">
          <text:p/>
        </draw:line>
        <draw:line draw:style-name="gr95" draw:text-style-name="P12" draw:layer="layout" svg:x1="20.25cm" svg:y1="7.5cm" svg:x2="24cm" svg:y2="7.5cm">
          <text:p/>
        </draw:line>
        <draw:line draw:style-name="gr95" draw:text-style-name="P12" draw:layer="layout" svg:x1="24cm" svg:y1="7.5cm" svg:x2="28cm" svg:y2="7.75cm">
          <text:p/>
        </draw:line>
        <draw:line draw:style-name="gr21" draw:text-style-name="P12" draw:layer="layout" svg:x1="28.7cm" svg:y1="6.5cm" svg:x2="28.7cm" svg:y2="14cm">
          <text:p/>
        </draw:line>
        <draw:line draw:style-name="gr21" draw:text-style-name="P12" draw:layer="layout" svg:x1="27.5cm" svg:y1="6.5cm" svg:x2="27.5cm" svg:y2="7.5cm">
          <text:p/>
        </draw:line>
        <draw:line draw:style-name="gr21" draw:text-style-name="P12" draw:layer="layout" svg:x1="24.75cm" svg:y1="7.25cm" svg:x2="27.5cm" svg:y2="7.5cm">
          <text:p/>
        </draw:line>
        <draw:line draw:style-name="gr21" draw:text-style-name="P12" draw:layer="layout" svg:x1="20.5cm" svg:y1="7.25cm" svg:x2="22cm" svg:y2="7.25cm">
          <text:p/>
        </draw:line>
        <draw:line draw:style-name="gr21" draw:text-style-name="P12" draw:layer="layout" svg:x1="13.75cm" svg:y1="7.25cm" svg:x2="16.75cm" svg:y2="7.25cm">
          <text:p/>
        </draw:line>
        <draw:line draw:style-name="gr21" draw:text-style-name="P12" draw:layer="layout" svg:x1="3.5cm" svg:y1="6.75cm" svg:x2="5.25cm" svg:y2="7cm">
          <text:p/>
        </draw:line>
        <draw:line draw:style-name="gr21" draw:text-style-name="P12" draw:layer="layout" svg:x1="2.75cm" svg:y1="10cm" svg:x2="2.75cm" svg:y2="6.5cm">
          <text:p/>
        </draw:line>
        <draw:line draw:style-name="gr21" draw:text-style-name="P12" draw:layer="layout" svg:x1="3.5cm" svg:y1="6.5cm" svg:x2="3.5cm" svg:y2="6.75cm">
          <text:p/>
        </draw:line>
        <draw:line draw:style-name="gr21" draw:text-style-name="P12" draw:layer="layout" svg:x1="3.25cm" svg:y1="12.75cm" svg:x2="3.25cm" svg:y2="14cm">
          <text:p/>
        </draw:line>
        <draw:line draw:style-name="gr21" draw:text-style-name="P12" draw:layer="layout" svg:x1="3.25cm" svg:y1="12.75cm" svg:x2="10.5cm" svg:y2="10.75cm">
          <text:p/>
        </draw:line>
        <draw:line draw:style-name="gr21" draw:text-style-name="P12" draw:layer="layout" svg:x1="10.5cm" svg:y1="10.75cm" svg:x2="10.5cm" svg:y2="11.5cm">
          <text:p/>
        </draw:line>
        <draw:line draw:style-name="gr21" draw:text-style-name="P12" draw:layer="layout" svg:x1="10.5cm" svg:y1="13cm" svg:x2="10cm" svg:y2="14cm">
          <text:p/>
        </draw:line>
        <draw:line draw:style-name="gr21" draw:text-style-name="P12" draw:layer="layout" svg:x1="10.5cm" svg:y1="14cm" svg:x2="11cm" svg:y2="13cm">
          <text:p/>
        </draw:line>
        <draw:line draw:style-name="gr21" draw:text-style-name="P12" draw:layer="layout" svg:x1="11cm" svg:y1="13cm" svg:x2="13.5cm" svg:y2="13cm">
          <text:p/>
        </draw:line>
        <draw:line draw:style-name="gr21" draw:text-style-name="P12" draw:layer="layout" svg:x1="24cm" svg:y1="13.25cm" svg:x2="27.25cm" svg:y2="13.25cm">
          <text:p/>
        </draw:line>
        <draw:line draw:style-name="gr21" draw:text-style-name="P12" draw:layer="layout" svg:x1="27.25cm" svg:y1="14cm" svg:x2="27.25cm" svg:y2="13.25cm">
          <text:p/>
        </draw:line>
        <draw:line draw:style-name="gr21" draw:text-style-name="P12" draw:layer="layout" svg:x1="5.25cm" svg:y1="7cm" svg:x2="5.25cm" svg:y2="6.5cm">
          <text:p/>
        </draw:line>
        <draw:line draw:style-name="gr21" draw:text-style-name="P12" draw:layer="layout" svg:x1="5.75cm" svg:y1="6.5cm" svg:x2="5.75cm" svg:y2="7cm">
          <text:p/>
        </draw:line>
        <draw:line draw:style-name="gr21" draw:text-style-name="P12" draw:layer="layout" svg:x1="5.75cm" svg:y1="7cm" svg:x2="7cm" svg:y2="7.25cm">
          <text:p/>
        </draw:line>
        <draw:line draw:style-name="gr21" draw:text-style-name="P12" draw:layer="layout" svg:x1="7cm" svg:y1="6.5cm" svg:x2="7cm" svg:y2="7.25cm">
          <text:p/>
        </draw:line>
        <draw:line draw:style-name="gr21" draw:text-style-name="P12" draw:layer="layout" svg:x1="7.5cm" svg:y1="7.25cm" svg:x2="7.5cm" svg:y2="6.5cm">
          <text:p/>
        </draw:line>
        <draw:line draw:style-name="gr21" draw:text-style-name="P12" draw:layer="layout" svg:x1="7.5cm" svg:y1="7.25cm" svg:x2="9.25cm" svg:y2="7.25cm">
          <text:p/>
        </draw:line>
        <draw:line draw:style-name="gr21" draw:text-style-name="P12" draw:layer="layout" svg:x1="9.25cm" svg:y1="7.25cm" svg:x2="9.25cm" svg:y2="6.5cm">
          <text:p/>
        </draw:line>
        <draw:line draw:style-name="gr21" draw:text-style-name="P12" draw:layer="layout" svg:x1="9.5cm" svg:y1="6.5cm" svg:x2="9.5cm" svg:y2="7.25cm">
          <text:p/>
        </draw:line>
        <draw:line draw:style-name="gr21" draw:text-style-name="P12" draw:layer="layout" svg:x1="9.5cm" svg:y1="7.25cm" svg:x2="10.75cm" svg:y2="7.25cm">
          <text:p/>
        </draw:line>
        <draw:line draw:style-name="gr21" draw:text-style-name="P12" draw:layer="layout" svg:x1="10.75cm" svg:y1="6.5cm" svg:x2="10.75cm" svg:y2="7.25cm">
          <text:p/>
        </draw:line>
        <draw:line draw:style-name="gr21" draw:text-style-name="P12" draw:layer="layout" svg:x1="11cm" svg:y1="7.25cm" svg:x2="11cm" svg:y2="6.5cm">
          <text:p/>
        </draw:line>
        <draw:line draw:style-name="gr21" draw:text-style-name="P12" draw:layer="layout" svg:x1="11cm" svg:y1="7.25cm" svg:x2="13.5cm" svg:y2="7.25cm">
          <text:p/>
        </draw:line>
        <draw:line draw:style-name="gr21" draw:text-style-name="P12" draw:layer="layout" svg:x1="13.5cm" svg:y1="7.25cm" svg:x2="13.5cm" svg:y2="6.5cm">
          <text:p/>
        </draw:line>
        <draw:line draw:style-name="gr21" draw:text-style-name="P12" draw:layer="layout" svg:x1="13.75cm" svg:y1="7.25cm" svg:x2="13.75cm" svg:y2="6.5cm">
          <text:p/>
        </draw:line>
        <draw:line draw:style-name="gr21" draw:text-style-name="P12" draw:layer="layout" svg:x1="16.75cm" svg:y1="6.5cm" svg:x2="16.75cm" svg:y2="7.25cm">
          <text:p/>
        </draw:line>
        <draw:line draw:style-name="gr21" draw:text-style-name="P12" draw:layer="layout" svg:x1="17cm" svg:y1="6.5cm" svg:x2="17cm" svg:y2="7.25cm">
          <text:p/>
        </draw:line>
        <draw:line draw:style-name="gr21" draw:text-style-name="P12" draw:layer="layout" svg:x1="17cm" svg:y1="7.25cm" svg:x2="20.25cm" svg:y2="7.25cm">
          <text:p/>
        </draw:line>
        <draw:line draw:style-name="gr21" draw:text-style-name="P12" draw:layer="layout" svg:x1="20.25cm" svg:y1="6.5cm" svg:x2="20.25cm" svg:y2="7.25cm">
          <text:p/>
        </draw:line>
        <draw:line draw:style-name="gr21" draw:text-style-name="P12" draw:layer="layout" svg:x1="20.5cm" svg:y1="6.5cm" svg:x2="20.5cm" svg:y2="7.25cm">
          <text:p/>
        </draw:line>
        <draw:line draw:style-name="gr21" draw:text-style-name="P12" draw:layer="layout" svg:x1="22cm" svg:y1="6.5cm" svg:x2="22cm" svg:y2="7.25cm">
          <text:p/>
        </draw:line>
        <draw:line draw:style-name="gr21" draw:text-style-name="P12" draw:layer="layout" svg:x1="22.25cm" svg:y1="7.25cm" svg:x2="22.25cm" svg:y2="6.5cm">
          <text:p/>
        </draw:line>
        <draw:line draw:style-name="gr21" draw:text-style-name="P12" draw:layer="layout" svg:x1="22.25cm" svg:y1="7.25cm" svg:x2="24.5cm" svg:y2="7.25cm">
          <text:p/>
        </draw:line>
        <draw:line draw:style-name="gr21" draw:text-style-name="P12" draw:layer="layout" svg:x1="24.75cm" svg:y1="6.5cm" svg:x2="24.75cm" svg:y2="7.25cm">
          <text:p/>
        </draw:line>
        <draw:line draw:style-name="gr21" draw:text-style-name="P12" draw:layer="layout" svg:x1="24.5cm" svg:y1="6.5cm" svg:x2="24.5cm" svg:y2="7.25cm">
          <text:p/>
        </draw:line>
        <draw:line draw:style-name="gr21" draw:text-style-name="P12" draw:layer="layout" svg:x1="3.75cm" svg:y1="13.25cm" svg:x2="10.5cm" svg:y2="11.5cm">
          <text:p/>
        </draw:line>
        <draw:line draw:style-name="gr21" draw:text-style-name="P12" draw:layer="layout" svg:x1="10.5cm" svg:y1="13cm" svg:x2="10.5cm" svg:y2="11.75cm">
          <text:p/>
        </draw:line>
        <draw:line draw:style-name="gr21" draw:text-style-name="P12" draw:layer="layout" svg:x1="3.75cm" svg:y1="13.25cm" svg:x2="3.75cm" svg:y2="14cm">
          <text:p/>
        </draw:line>
        <draw:line draw:style-name="gr21" draw:text-style-name="P12" draw:layer="layout" svg:x1="4cm" svg:y1="13.5cm" svg:x2="8.75cm" svg:y2="12.25cm">
          <text:p/>
        </draw:line>
        <draw:line draw:style-name="gr21" draw:text-style-name="P12" draw:layer="layout" svg:x1="4cm" svg:y1="13.5cm" svg:x2="4cm" svg:y2="14cm">
          <text:p/>
        </draw:line>
        <draw:line draw:style-name="gr21" draw:text-style-name="P12" draw:layer="layout" svg:x1="9.25cm" svg:y1="12.25cm" svg:x2="10.5cm" svg:y2="11.75cm">
          <text:p/>
        </draw:line>
        <draw:line draw:style-name="gr21" draw:text-style-name="P12" draw:layer="layout" svg:x1="7.75cm" svg:y1="14cm" svg:x2="8.75cm" svg:y2="12.25cm">
          <text:p/>
        </draw:line>
        <draw:line draw:style-name="gr21" draw:text-style-name="P12" draw:layer="layout" svg:x1="9.25cm" svg:y1="12.25cm" svg:x2="8.25cm" svg:y2="14cm">
          <text:p/>
        </draw:line>
        <draw:line draw:style-name="gr21" draw:text-style-name="P12" draw:layer="layout" svg:x1="4cm" svg:y1="14cm" svg:x2="7.75cm" svg:y2="14cm">
          <text:p/>
        </draw:line>
        <draw:frame draw:style-name="gr96" draw:text-style-name="P35" draw:layer="layout" svg:width="2.75cm" svg:height="1.039cm" draw:transform="rotate (0.349065850398866) translate (1.381cm 10.62cm)">
          <draw:text-box>
            <text:p text:style-name="P34"><text:span text:style-name="T12">Patel </text:span></text:p>
          </draw:text-box>
        </draw:frame>
        <draw:frame draw:style-name="gr97" draw:text-style-name="P37" draw:layer="layout" svg:width="2.392cm" svg:height="0.569cm" draw:transform="rotate (0.244346095279206) translate (6.5cm 12.448cm)">
          <draw:text-box>
            <text:p text:style-name="P36"><text:span text:style-name="T4">Bhutani Road</text:span></text:p>
          </draw:text-box>
        </draw:frame>
        <draw:frame draw:style-name="gr98" draw:text-style-name="P39" draw:layer="layout" svg:width="6cm" svg:height="1.433cm" draw:transform="rotate (1.5707963267949) translate (27.5cm 13.5cm)">
          <draw:text-box>
            <text:p text:style-name="P38"><text:span text:style-name="T12">Mahila ITI College Road</text:span></text:p>
            <text:p text:style-name="P38"><text:span text:style-name="T12">Vallabh Garden Road</text:span><text:span text:style-name="T12"><text:line-break/></text:span><text:span text:style-name="T12"/></text:p>
          </draw:text-box>
        </draw:frame>
        <draw:line draw:style-name="gr21" draw:text-style-name="P12" draw:layer="layout" svg:x1="2.75cm" svg:y1="10cm" svg:x2="1cm" svg:y2="10.75cm">
          <text:p/>
        </draw:line>
        <draw:line draw:style-name="gr21" draw:text-style-name="P12" draw:layer="layout" svg:x1="2.75cm" svg:y1="10.75cm" svg:x2="1cm" svg:y2="11.5cm">
          <text:p/>
        </draw:line>
        <draw:line draw:style-name="gr21" draw:text-style-name="P12" draw:layer="layout" svg:x1="3cm" svg:y1="12.25cm" svg:x2="3cm" svg:y2="14cm">
          <text:p/>
        </draw:line>
        <draw:line draw:style-name="gr21" draw:text-style-name="P12" draw:layer="layout" svg:x1="3cm" svg:y1="12.25cm" svg:x2="2.75cm" svg:y2="10.75cm">
          <text:p/>
        </draw:line>
        <draw:frame draw:style-name="gr96" draw:text-style-name="P35" draw:layer="layout" svg:width="2.75cm" svg:height="1.039cm" draw:transform="rotate (1.5707963267949) translate (2.711cm 9.75cm)">
          <draw:text-box>
            <text:p text:style-name="P34"><text:span text:style-name="T12">Main Road</text:span></text:p>
          </draw:text-box>
        </draw:frame>
        <draw:frame draw:style-name="gr96" draw:text-style-name="P35" draw:layer="layout" svg:width="1.949cm" svg:height="1.039cm" draw:transform="rotate (1.0471975511966) translate (2.2cm 10.588cm)">
          <draw:text-box>
            <text:p text:style-name="P34"><text:span text:style-name="T12">Nagar</text:span></text:p>
          </draw:text-box>
        </draw:frame>
        <draw:frame draw:style-name="gr96" draw:text-style-name="P41" draw:layer="layout" svg:width="1.25cm" svg:height="1.039cm" svg:x="22.3cm" svg:y="6.05cm">
          <draw:text-box>
            <text:p text:style-name="P40"><text:span text:style-name="T4">Arya Samaj Temple</text:span></text:p>
          </draw:text-box>
        </draw:frame>
        <draw:line draw:style-name="gr99" draw:text-style-name="P12" draw:layer="layout" svg:x1="22.95cm" svg:y1="6.9cm" svg:x2="22.95cm" svg:y2="7.9cm">
          <text:p/>
        </draw:line>
        <draw:frame draw:style-name="gr96" draw:text-style-name="P35" draw:layer="layout" svg:width="2.75cm" svg:height="1.039cm" svg:x="5.5cm" svg:y="13.212cm">
          <draw:text-box>
            <text:p text:style-name="P34"><text:span text:style-name="T12">Nehru Park</text:span></text:p>
          </draw:text-box>
        </draw:frame>
        <draw:line draw:style-name="gr21" draw:text-style-name="P12" draw:layer="layout" svg:x1="13.5cm" svg:y1="13cm" svg:x2="13.5cm" svg:y2="14cm">
          <text:p/>
        </draw:line>
        <draw:line draw:style-name="gr21" draw:text-style-name="P12" draw:layer="layout" svg:x1="13.75cm" svg:y1="14cm" svg:x2="13.75cm" svg:y2="13cm">
          <text:p/>
        </draw:line>
        <draw:line draw:style-name="gr21" draw:text-style-name="P12" draw:layer="layout" svg:x1="13.75cm" svg:y1="13cm" svg:x2="17.5cm" svg:y2="13.25cm">
          <text:p/>
        </draw:line>
        <draw:line draw:style-name="gr21" draw:text-style-name="P12" draw:layer="layout" svg:x1="17.5cm" svg:y1="14cm" svg:x2="17.5cm" svg:y2="13.25cm">
          <text:p/>
        </draw:line>
        <draw:line draw:style-name="gr21" draw:text-style-name="P12" draw:layer="layout" svg:x1="17.75cm" svg:y1="14cm" svg:x2="17.75cm" svg:y2="13.25cm">
          <text:p/>
        </draw:line>
        <draw:line draw:style-name="gr21" draw:text-style-name="P12" draw:layer="layout" svg:x1="17.75cm" svg:y1="13.25cm" svg:x2="21.75cm" svg:y2="13.25cm">
          <text:p/>
        </draw:line>
        <draw:line draw:style-name="gr21" draw:text-style-name="P12" draw:layer="layout" svg:x1="21.75cm" svg:y1="14cm" svg:x2="21.75cm" svg:y2="13.25cm">
          <text:p/>
        </draw:line>
        <draw:line draw:style-name="gr21" draw:text-style-name="P12" draw:layer="layout" svg:x1="24cm" svg:y1="14cm" svg:x2="24cm" svg:y2="13.25cm">
          <text:p/>
        </draw:line>
        <draw:line draw:style-name="gr21" draw:text-style-name="P12" draw:layer="layout" svg:x1="22cm" svg:y1="13.25cm" svg:x2="22cm" svg:y2="14cm">
          <text:p/>
        </draw:line>
        <draw:line draw:style-name="gr21" draw:text-style-name="P12" draw:layer="layout" svg:x1="22cm" svg:y1="13.25cm" svg:x2="23.75cm" svg:y2="13.25cm">
          <text:p/>
        </draw:line>
        <draw:line draw:style-name="gr21" draw:text-style-name="P12" draw:layer="layout" svg:x1="23.75cm" svg:y1="14cm" svg:x2="23.75cm" svg:y2="13.25cm">
          <text:p/>
        </draw:line>
      </draw:page>
      <draw:page draw:name="page2" draw:style-name="dp1" draw:master-page-name="Default">
        <draw:path draw:style-name="gr100" draw:text-style-name="P42" draw:layer="layout" svg:width="0.231cm" svg:height="0.845cm" svg:x="28.659cm" svg:y="0.654cm" svg:viewBox="0 0 232 846" svg:d="M154 846h-77v-705h77zM0 169l115-169 117 169z">
          <text:p/>
        </draw:path>
        <draw:polygon draw:style-name="gr101" draw:text-style-name="P43" draw:layer="layout" svg:width="1.928cm" svg:height="0.338cm" svg:x="27cm" svg:y="0.345cm" svg:viewBox="0 0 1929 339" draw:points="0,339 1929,339 1929,0 0,0">
          <text:p/>
        </draw:polygon>
        <draw:frame draw:style-name="gr102" draw:text-style-name="P45" draw:layer="layout" svg:width="1.385cm" svg:height="0.319cm" svg:x="28.1cm" svg:y="0.3cm">
          <draw:text-box>
            <text:p text:style-name="P44"><text:span text:style-name="T13">NORTH </text:span></text:p>
          </draw:text-box>
        </draw:frame>
        <draw:frame draw:style-name="gr103" draw:text-style-name="P12" draw:layer="layout" svg:width="13.787cm" svg:height="4.748cm" svg:x="1cm" svg:y="16.251cm">
          <draw:image xlink:href="Pictures/1000000100001B68000013615805E82BD378D7C6.png" xlink:type="simple" xlink:show="embed" xlink:actuate="onLoad" draw:mime-type="image/png">
            <text:p/>
          </draw:image>
        </draw:frame>
        <draw:frame draw:style-name="gr104" draw:text-style-name="P12" draw:layer="layout" svg:width="6.037cm" svg:height="4.249cm" svg:x="22.75cm" svg:y="16.5cm">
          <draw:image xlink:href="Pictures/1000000100001B68000013615805E82BD378D7C6.png" xlink:type="simple" xlink:show="embed" xlink:actuate="onLoad" draw:mime-type="image/png">
            <text:p/>
          </draw:image>
        </draw:frame>
        <draw:frame draw:style-name="gr1" draw:text-style-name="P1" draw:layer="layout" svg:width="26.976cm" svg:height="6.499cm" svg:x="-43.188cm" svg:y="7.001cm">
          <draw:image xlink:href="Pictures/10091AE60000A40500007411C71A921577579743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105" draw:text-style-name="P46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6" draw:text-style-name="P47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09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06" draw:text-style-name="P47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18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20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123" draw:text-style-name="P48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35.438cm" svg:y1="9.751cm" svg:x2="-34.938cm" svg:y2="9.751cm">
          <text:p/>
        </draw:line>
        <draw:line draw:style-name="gr124" draw:text-style-name="P12" draw:layer="layout" svg:x1="-34.938cm" svg:y1="10.451cm" svg:x2="-34.938cm" svg:y2="9.751cm">
          <text:p/>
        </draw:line>
        <draw:line draw:style-name="gr124" draw:text-style-name="P12" draw:layer="layout" svg:x1="-35.188cm" svg:y1="10.458cm" svg:x2="-34.938cm" svg:y2="10.458cm">
          <text:p/>
        </draw:line>
        <draw:line draw:style-name="gr124" draw:text-style-name="P12" draw:layer="layout" svg:x1="-35.188cm" svg:y1="10.001cm" svg:x2="-35.188cm" svg:y2="10.501cm">
          <text:p/>
        </draw:line>
        <draw:line draw:style-name="gr124" draw:text-style-name="P12" draw:layer="layout" svg:x1="-35.438cm" svg:y1="10.001cm" svg:x2="-35.188cm" svg:y2="10.001cm">
          <text:p/>
        </draw:line>
        <draw:line draw:style-name="gr124" draw:text-style-name="P12" draw:layer="layout" svg:x1="-35.438cm" svg:y1="9.751cm" svg:x2="-35.438cm" svg:y2="10.001cm">
          <text:p/>
        </draw:line>
        <draw:frame draw:style-name="gr125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4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8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9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9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2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9" draw:layer="layout" svg:width="0.5cm" svg:height="0.5cm" svg:x="-31.688cm" svg:y="12.001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2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3.588cm" svg:y1="7.701cm" svg:x2="-23.388cm" svg:y2="7.701cm">
          <text:p/>
        </draw:line>
        <draw:custom-shape draw:style-name="gr168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2.738cm" svg:y1="9.86cm" svg:x2="-22.738cm" svg:y2="9.301cm">
          <text:p/>
        </draw:line>
        <draw:line draw:style-name="gr124" draw:text-style-name="P12" draw:layer="layout" svg:x1="-22.738cm" svg:y1="9.851cm" svg:x2="-22.838cm" svg:y2="9.851cm">
          <text:p/>
        </draw:line>
        <draw:frame draw:style-name="gr169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124" draw:text-style-name="P12" draw:layer="layout" svg:x1="-25.338cm" svg:y1="7.901cm" svg:x2="-26.138cm" svg:y2="7.901cm">
          <text:p/>
        </draw:line>
        <draw:line draw:style-name="gr124" draw:text-style-name="P12" draw:layer="layout" svg:x1="-26.138cm" svg:y1="7.901cm" svg:x2="-26.138cm" svg:y2="9.301cm">
          <text:p/>
        </draw:line>
        <draw:line draw:style-name="gr124" draw:text-style-name="P12" draw:layer="layout" svg:x1="-25.338cm" svg:y1="7.901cm" svg:x2="-25.338cm" svg:y2="7.701cm">
          <text:p/>
        </draw:line>
        <draw:line draw:style-name="gr124" draw:text-style-name="P12" draw:layer="layout" svg:x1="-24.438cm" svg:y1="9.301cm" svg:x2="-24.438cm" svg:y2="9.851cm">
          <text:p/>
        </draw:line>
        <draw:line draw:style-name="gr124" draw:text-style-name="P12" draw:layer="layout" svg:x1="-25.338cm" svg:y1="7.701cm" svg:x2="-24.438cm" svg:y2="7.701cm">
          <text:p/>
        </draw:line>
        <draw:custom-shape draw:style-name="gr170" draw:text-style-name="P49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2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3cm" svg:height="0.55cm" svg:x="-20.988cm" svg:y="7.851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1.088cm" svg:y1="7.801cm" svg:x2="-21.088cm" svg:y2="7.801cm">
          <text:p/>
        </draw:line>
        <draw:line draw:style-name="gr124" draw:text-style-name="P12" draw:layer="layout" svg:x1="-21.088cm" svg:y1="7.801cm" svg:x2="-20.988cm" svg:y2="7.801cm">
          <text:p/>
        </draw:line>
        <draw:line draw:style-name="gr186" draw:text-style-name="P12" draw:layer="layout" svg:x1="-20.988cm" svg:y1="7.801cm" svg:x2="-20.988cm" svg:y2="7.801cm">
          <text:p/>
        </draw:line>
        <draw:line draw:style-name="gr124" draw:text-style-name="P12" draw:layer="layout" svg:x1="-20.988cm" svg:y1="7.801cm" svg:x2="-20.988cm" svg:y2="7.851cm">
          <text:p/>
        </draw:line>
        <draw:frame draw:style-name="gr187" draw:text-style-name="P50" draw:layer="layout" svg:width="0.5cm" svg:height="2.384cm" svg:x="-22.188cm" svg:y="6.501cm">
          <draw:text-box>
            <text:p>173</text:p>
          </draw:text-box>
        </draw:frame>
        <draw:frame draw:style-name="gr188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135" draw:text-style-name="P24" draw:layer="layout" svg:width="0.35cm" svg:height="0.7cm" svg:x="-19.838cm" svg:y="8.001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35cm" svg:height="0.7cm" svg:x="-19.488cm" svg:y="8.001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7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190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19.838cm" svg:y1="9.251cm" svg:x2="-20.088cm" svg:y2="11.951cm">
          <text:p/>
        </draw:line>
        <draw:custom-shape draw:style-name="gr191" draw:text-style-name="P22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9.088cm" svg:y="11.951cm">
          <text:p text:style-name="P28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8.788cm" svg:y="11.951cm">
          <text:p text:style-name="P28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8.488cm" svg:y="11.951cm">
          <text:p text:style-name="P28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0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3" draw:text-style-name="P12" draw:layer="layout" svg:x1="-18.688cm" svg:y1="10.751cm" svg:x2="-18.688cm" svg:y2="11.501cm">
          <text:p/>
        </draw:line>
        <draw:line draw:style-name="gr193" draw:text-style-name="P12" draw:layer="layout" svg:x1="-18.438cm" svg:y1="11.001cm" svg:x2="-18.438cm" svg:y2="11.501cm">
          <text:p/>
        </draw:line>
        <draw:line draw:style-name="gr193" draw:text-style-name="P12" draw:layer="layout" svg:x1="-18.188cm" svg:y1="10.751cm" svg:x2="-18.188cm" svg:y2="11.501cm">
          <text:p/>
        </draw:line>
        <draw:frame draw:style-name="gr188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194" draw:text-style-name="P13" draw:layer="layout" svg:width="1.061cm" svg:height="0.727cm" svg:x="-19.749cm" svg:y="10.774cm">
          <draw:text-box>
            <text:p text:style-name="P31"><text:span text:style-name="T4">Water</text:span><text:span text:style-name="T4"><text:line-break/></text:span><text:span text:style-name="T4">Tank</text:span></text:p>
          </draw:text-box>
        </draw:frame>
        <draw:line draw:style-name="gr124" draw:text-style-name="P12" draw:layer="layout" svg:x1="-17.588cm" svg:y1="9.251cm" svg:x2="-17.838cm" svg:y2="11.951cm">
          <text:p/>
        </draw:line>
        <draw:custom-shape draw:style-name="gr195" draw:text-style-name="P49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9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3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6.976cm" svg:height="6.499cm" svg:x="-43.188cm" svg:y="7.001cm">
          <draw:image xlink:href="Pictures/10091AE60000A40500007411C71A921577579743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105" draw:text-style-name="P46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6" draw:text-style-name="P47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09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06" draw:text-style-name="P47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18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20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123" draw:text-style-name="P48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35.438cm" svg:y1="9.751cm" svg:x2="-34.938cm" svg:y2="9.751cm">
          <text:p/>
        </draw:line>
        <draw:line draw:style-name="gr124" draw:text-style-name="P12" draw:layer="layout" svg:x1="-34.938cm" svg:y1="10.451cm" svg:x2="-34.938cm" svg:y2="9.751cm">
          <text:p/>
        </draw:line>
        <draw:line draw:style-name="gr124" draw:text-style-name="P12" draw:layer="layout" svg:x1="-35.188cm" svg:y1="10.458cm" svg:x2="-34.938cm" svg:y2="10.458cm">
          <text:p/>
        </draw:line>
        <draw:line draw:style-name="gr124" draw:text-style-name="P12" draw:layer="layout" svg:x1="-35.188cm" svg:y1="10.001cm" svg:x2="-35.188cm" svg:y2="10.501cm">
          <text:p/>
        </draw:line>
        <draw:line draw:style-name="gr124" draw:text-style-name="P12" draw:layer="layout" svg:x1="-35.438cm" svg:y1="10.001cm" svg:x2="-35.188cm" svg:y2="10.001cm">
          <text:p/>
        </draw:line>
        <draw:line draw:style-name="gr124" draw:text-style-name="P12" draw:layer="layout" svg:x1="-35.438cm" svg:y1="9.751cm" svg:x2="-35.438cm" svg:y2="10.001cm">
          <text:p/>
        </draw:line>
        <draw:frame draw:style-name="gr125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4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8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9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9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2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9" draw:layer="layout" svg:width="0.5cm" svg:height="0.5cm" svg:x="-31.688cm" svg:y="12.001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2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3.588cm" svg:y1="7.701cm" svg:x2="-23.388cm" svg:y2="7.701cm">
          <text:p/>
        </draw:line>
        <draw:custom-shape draw:style-name="gr168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2.738cm" svg:y1="9.86cm" svg:x2="-22.738cm" svg:y2="9.301cm">
          <text:p/>
        </draw:line>
        <draw:line draw:style-name="gr124" draw:text-style-name="P12" draw:layer="layout" svg:x1="-22.738cm" svg:y1="9.851cm" svg:x2="-22.838cm" svg:y2="9.851cm">
          <text:p/>
        </draw:line>
        <draw:frame draw:style-name="gr169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124" draw:text-style-name="P12" draw:layer="layout" svg:x1="-25.338cm" svg:y1="7.901cm" svg:x2="-26.138cm" svg:y2="7.901cm">
          <text:p/>
        </draw:line>
        <draw:line draw:style-name="gr124" draw:text-style-name="P12" draw:layer="layout" svg:x1="-26.138cm" svg:y1="7.901cm" svg:x2="-26.138cm" svg:y2="9.301cm">
          <text:p/>
        </draw:line>
        <draw:line draw:style-name="gr124" draw:text-style-name="P12" draw:layer="layout" svg:x1="-25.338cm" svg:y1="7.901cm" svg:x2="-25.338cm" svg:y2="7.701cm">
          <text:p/>
        </draw:line>
        <draw:line draw:style-name="gr124" draw:text-style-name="P12" draw:layer="layout" svg:x1="-24.438cm" svg:y1="9.301cm" svg:x2="-24.438cm" svg:y2="9.851cm">
          <text:p/>
        </draw:line>
        <draw:line draw:style-name="gr124" draw:text-style-name="P12" draw:layer="layout" svg:x1="-25.338cm" svg:y1="7.701cm" svg:x2="-24.438cm" svg:y2="7.701cm">
          <text:p/>
        </draw:line>
        <draw:custom-shape draw:style-name="gr170" draw:text-style-name="P49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2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3cm" svg:height="0.55cm" svg:x="-20.988cm" svg:y="7.851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1.088cm" svg:y1="7.801cm" svg:x2="-21.088cm" svg:y2="7.801cm">
          <text:p/>
        </draw:line>
        <draw:line draw:style-name="gr124" draw:text-style-name="P12" draw:layer="layout" svg:x1="-21.088cm" svg:y1="7.801cm" svg:x2="-20.988cm" svg:y2="7.801cm">
          <text:p/>
        </draw:line>
        <draw:line draw:style-name="gr186" draw:text-style-name="P12" draw:layer="layout" svg:x1="-20.988cm" svg:y1="7.801cm" svg:x2="-20.988cm" svg:y2="7.801cm">
          <text:p/>
        </draw:line>
        <draw:line draw:style-name="gr124" draw:text-style-name="P12" draw:layer="layout" svg:x1="-20.988cm" svg:y1="7.801cm" svg:x2="-20.988cm" svg:y2="7.851cm">
          <text:p/>
        </draw:line>
        <draw:frame draw:style-name="gr187" draw:text-style-name="P50" draw:layer="layout" svg:width="0.5cm" svg:height="2.384cm" svg:x="-22.188cm" svg:y="6.501cm">
          <draw:text-box>
            <text:p>173</text:p>
          </draw:text-box>
        </draw:frame>
        <draw:frame draw:style-name="gr188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135" draw:text-style-name="P24" draw:layer="layout" svg:width="0.35cm" svg:height="0.7cm" svg:x="-19.838cm" svg:y="8.001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35cm" svg:height="0.7cm" svg:x="-19.488cm" svg:y="8.001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7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190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19.838cm" svg:y1="9.251cm" svg:x2="-20.088cm" svg:y2="11.951cm">
          <text:p/>
        </draw:line>
        <draw:custom-shape draw:style-name="gr191" draw:text-style-name="P22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9.088cm" svg:y="11.951cm">
          <text:p text:style-name="P28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8.788cm" svg:y="11.951cm">
          <text:p text:style-name="P28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8.488cm" svg:y="11.951cm">
          <text:p text:style-name="P28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0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3" draw:text-style-name="P12" draw:layer="layout" svg:x1="-18.688cm" svg:y1="10.751cm" svg:x2="-18.688cm" svg:y2="11.501cm">
          <text:p/>
        </draw:line>
        <draw:line draw:style-name="gr193" draw:text-style-name="P12" draw:layer="layout" svg:x1="-18.438cm" svg:y1="11.001cm" svg:x2="-18.438cm" svg:y2="11.501cm">
          <text:p/>
        </draw:line>
        <draw:line draw:style-name="gr193" draw:text-style-name="P12" draw:layer="layout" svg:x1="-18.188cm" svg:y1="10.751cm" svg:x2="-18.188cm" svg:y2="11.501cm">
          <text:p/>
        </draw:line>
        <draw:frame draw:style-name="gr188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194" draw:text-style-name="P13" draw:layer="layout" svg:width="1.061cm" svg:height="0.727cm" svg:x="-19.749cm" svg:y="10.774cm">
          <draw:text-box>
            <text:p text:style-name="P31"><text:span text:style-name="T4">Water</text:span><text:span text:style-name="T4"><text:line-break/></text:span><text:span text:style-name="T4">Tank</text:span></text:p>
          </draw:text-box>
        </draw:frame>
        <draw:line draw:style-name="gr124" draw:text-style-name="P12" draw:layer="layout" svg:x1="-17.588cm" svg:y1="9.251cm" svg:x2="-17.838cm" svg:y2="11.951cm">
          <text:p/>
        </draw:line>
        <draw:custom-shape draw:style-name="gr195" draw:text-style-name="P49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9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3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6.976cm" svg:height="6.499cm" svg:x="-43.188cm" svg:y="7.001cm">
          <draw:image xlink:href="Pictures/10091AE60000A40500007411C71A921577579743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105" draw:text-style-name="P46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6" draw:text-style-name="P47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09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06" draw:text-style-name="P47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18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20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123" draw:text-style-name="P48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35.438cm" svg:y1="9.751cm" svg:x2="-34.938cm" svg:y2="9.751cm">
          <text:p/>
        </draw:line>
        <draw:line draw:style-name="gr124" draw:text-style-name="P12" draw:layer="layout" svg:x1="-34.938cm" svg:y1="10.451cm" svg:x2="-34.938cm" svg:y2="9.751cm">
          <text:p/>
        </draw:line>
        <draw:line draw:style-name="gr124" draw:text-style-name="P12" draw:layer="layout" svg:x1="-35.188cm" svg:y1="10.458cm" svg:x2="-34.938cm" svg:y2="10.458cm">
          <text:p/>
        </draw:line>
        <draw:line draw:style-name="gr124" draw:text-style-name="P12" draw:layer="layout" svg:x1="-35.188cm" svg:y1="10.001cm" svg:x2="-35.188cm" svg:y2="10.501cm">
          <text:p/>
        </draw:line>
        <draw:line draw:style-name="gr124" draw:text-style-name="P12" draw:layer="layout" svg:x1="-35.438cm" svg:y1="10.001cm" svg:x2="-35.188cm" svg:y2="10.001cm">
          <text:p/>
        </draw:line>
        <draw:line draw:style-name="gr124" draw:text-style-name="P12" draw:layer="layout" svg:x1="-35.438cm" svg:y1="9.751cm" svg:x2="-35.438cm" svg:y2="10.001cm">
          <text:p/>
        </draw:line>
        <draw:frame draw:style-name="gr125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4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8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9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9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2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9" draw:layer="layout" svg:width="0.5cm" svg:height="0.5cm" svg:x="-31.688cm" svg:y="12.001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2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3.588cm" svg:y1="7.701cm" svg:x2="-23.388cm" svg:y2="7.701cm">
          <text:p/>
        </draw:line>
        <draw:custom-shape draw:style-name="gr168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2.738cm" svg:y1="9.86cm" svg:x2="-22.738cm" svg:y2="9.301cm">
          <text:p/>
        </draw:line>
        <draw:line draw:style-name="gr124" draw:text-style-name="P12" draw:layer="layout" svg:x1="-22.738cm" svg:y1="9.851cm" svg:x2="-22.838cm" svg:y2="9.851cm">
          <text:p/>
        </draw:line>
        <draw:frame draw:style-name="gr169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124" draw:text-style-name="P12" draw:layer="layout" svg:x1="-25.338cm" svg:y1="7.901cm" svg:x2="-26.138cm" svg:y2="7.901cm">
          <text:p/>
        </draw:line>
        <draw:line draw:style-name="gr124" draw:text-style-name="P12" draw:layer="layout" svg:x1="-26.138cm" svg:y1="7.901cm" svg:x2="-26.138cm" svg:y2="9.301cm">
          <text:p/>
        </draw:line>
        <draw:line draw:style-name="gr124" draw:text-style-name="P12" draw:layer="layout" svg:x1="-25.338cm" svg:y1="7.901cm" svg:x2="-25.338cm" svg:y2="7.701cm">
          <text:p/>
        </draw:line>
        <draw:line draw:style-name="gr124" draw:text-style-name="P12" draw:layer="layout" svg:x1="-24.438cm" svg:y1="9.301cm" svg:x2="-24.438cm" svg:y2="9.851cm">
          <text:p/>
        </draw:line>
        <draw:line draw:style-name="gr124" draw:text-style-name="P12" draw:layer="layout" svg:x1="-25.338cm" svg:y1="7.701cm" svg:x2="-24.438cm" svg:y2="7.701cm">
          <text:p/>
        </draw:line>
        <draw:custom-shape draw:style-name="gr170" draw:text-style-name="P49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2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3cm" svg:height="0.55cm" svg:x="-20.988cm" svg:y="7.851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1.088cm" svg:y1="7.801cm" svg:x2="-21.088cm" svg:y2="7.801cm">
          <text:p/>
        </draw:line>
        <draw:line draw:style-name="gr124" draw:text-style-name="P12" draw:layer="layout" svg:x1="-21.088cm" svg:y1="7.801cm" svg:x2="-20.988cm" svg:y2="7.801cm">
          <text:p/>
        </draw:line>
        <draw:line draw:style-name="gr186" draw:text-style-name="P12" draw:layer="layout" svg:x1="-20.988cm" svg:y1="7.801cm" svg:x2="-20.988cm" svg:y2="7.801cm">
          <text:p/>
        </draw:line>
        <draw:line draw:style-name="gr124" draw:text-style-name="P12" draw:layer="layout" svg:x1="-20.988cm" svg:y1="7.801cm" svg:x2="-20.988cm" svg:y2="7.851cm">
          <text:p/>
        </draw:line>
        <draw:frame draw:style-name="gr187" draw:text-style-name="P50" draw:layer="layout" svg:width="0.5cm" svg:height="2.384cm" svg:x="-22.188cm" svg:y="6.501cm">
          <draw:text-box>
            <text:p>173</text:p>
          </draw:text-box>
        </draw:frame>
        <draw:frame draw:style-name="gr188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135" draw:text-style-name="P24" draw:layer="layout" svg:width="0.35cm" svg:height="0.7cm" svg:x="-19.838cm" svg:y="8.001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35cm" svg:height="0.7cm" svg:x="-19.488cm" svg:y="8.001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7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190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19.838cm" svg:y1="9.251cm" svg:x2="-20.088cm" svg:y2="11.951cm">
          <text:p/>
        </draw:line>
        <draw:custom-shape draw:style-name="gr191" draw:text-style-name="P22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9.088cm" svg:y="11.951cm">
          <text:p text:style-name="P28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8.788cm" svg:y="11.951cm">
          <text:p text:style-name="P28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8.488cm" svg:y="11.951cm">
          <text:p text:style-name="P28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0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3" draw:text-style-name="P12" draw:layer="layout" svg:x1="-18.688cm" svg:y1="10.751cm" svg:x2="-18.688cm" svg:y2="11.501cm">
          <text:p/>
        </draw:line>
        <draw:line draw:style-name="gr193" draw:text-style-name="P12" draw:layer="layout" svg:x1="-18.438cm" svg:y1="11.001cm" svg:x2="-18.438cm" svg:y2="11.501cm">
          <text:p/>
        </draw:line>
        <draw:line draw:style-name="gr193" draw:text-style-name="P12" draw:layer="layout" svg:x1="-18.188cm" svg:y1="10.751cm" svg:x2="-18.188cm" svg:y2="11.501cm">
          <text:p/>
        </draw:line>
        <draw:frame draw:style-name="gr188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194" draw:text-style-name="P13" draw:layer="layout" svg:width="1.061cm" svg:height="0.727cm" svg:x="-19.749cm" svg:y="10.774cm">
          <draw:text-box>
            <text:p text:style-name="P31"><text:span text:style-name="T4">Water</text:span><text:span text:style-name="T4"><text:line-break/></text:span><text:span text:style-name="T4">Tank</text:span></text:p>
          </draw:text-box>
        </draw:frame>
        <draw:line draw:style-name="gr124" draw:text-style-name="P12" draw:layer="layout" svg:x1="-17.588cm" svg:y1="9.251cm" svg:x2="-17.838cm" svg:y2="11.951cm">
          <text:p/>
        </draw:line>
        <draw:custom-shape draw:style-name="gr195" draw:text-style-name="P49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9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3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6.976cm" svg:height="6.499cm" svg:x="-43.188cm" svg:y="7.001cm">
          <draw:image xlink:href="Pictures/10091AE60000A40500007411C71A921577579743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105" draw:text-style-name="P46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6" draw:text-style-name="P47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09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06" draw:text-style-name="P47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18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20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123" draw:text-style-name="P48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35.438cm" svg:y1="9.751cm" svg:x2="-34.938cm" svg:y2="9.751cm">
          <text:p/>
        </draw:line>
        <draw:line draw:style-name="gr124" draw:text-style-name="P12" draw:layer="layout" svg:x1="-34.938cm" svg:y1="10.451cm" svg:x2="-34.938cm" svg:y2="9.751cm">
          <text:p/>
        </draw:line>
        <draw:line draw:style-name="gr124" draw:text-style-name="P12" draw:layer="layout" svg:x1="-35.188cm" svg:y1="10.458cm" svg:x2="-34.938cm" svg:y2="10.458cm">
          <text:p/>
        </draw:line>
        <draw:line draw:style-name="gr124" draw:text-style-name="P12" draw:layer="layout" svg:x1="-35.188cm" svg:y1="10.001cm" svg:x2="-35.188cm" svg:y2="10.501cm">
          <text:p/>
        </draw:line>
        <draw:line draw:style-name="gr124" draw:text-style-name="P12" draw:layer="layout" svg:x1="-35.438cm" svg:y1="10.001cm" svg:x2="-35.188cm" svg:y2="10.001cm">
          <text:p/>
        </draw:line>
        <draw:line draw:style-name="gr124" draw:text-style-name="P12" draw:layer="layout" svg:x1="-35.438cm" svg:y1="9.751cm" svg:x2="-35.438cm" svg:y2="10.001cm">
          <text:p/>
        </draw:line>
        <draw:frame draw:style-name="gr125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4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8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9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9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2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9" draw:layer="layout" svg:width="0.5cm" svg:height="0.5cm" svg:x="-31.688cm" svg:y="12.001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2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3.588cm" svg:y1="7.701cm" svg:x2="-23.388cm" svg:y2="7.701cm">
          <text:p/>
        </draw:line>
        <draw:custom-shape draw:style-name="gr168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2.738cm" svg:y1="9.86cm" svg:x2="-22.738cm" svg:y2="9.301cm">
          <text:p/>
        </draw:line>
        <draw:line draw:style-name="gr124" draw:text-style-name="P12" draw:layer="layout" svg:x1="-22.738cm" svg:y1="9.851cm" svg:x2="-22.838cm" svg:y2="9.851cm">
          <text:p/>
        </draw:line>
        <draw:frame draw:style-name="gr169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124" draw:text-style-name="P12" draw:layer="layout" svg:x1="-25.338cm" svg:y1="7.901cm" svg:x2="-26.138cm" svg:y2="7.901cm">
          <text:p/>
        </draw:line>
        <draw:line draw:style-name="gr124" draw:text-style-name="P12" draw:layer="layout" svg:x1="-26.138cm" svg:y1="7.901cm" svg:x2="-26.138cm" svg:y2="9.301cm">
          <text:p/>
        </draw:line>
        <draw:line draw:style-name="gr124" draw:text-style-name="P12" draw:layer="layout" svg:x1="-25.338cm" svg:y1="7.901cm" svg:x2="-25.338cm" svg:y2="7.701cm">
          <text:p/>
        </draw:line>
        <draw:line draw:style-name="gr124" draw:text-style-name="P12" draw:layer="layout" svg:x1="-24.438cm" svg:y1="9.301cm" svg:x2="-24.438cm" svg:y2="9.851cm">
          <text:p/>
        </draw:line>
        <draw:line draw:style-name="gr124" draw:text-style-name="P12" draw:layer="layout" svg:x1="-25.338cm" svg:y1="7.701cm" svg:x2="-24.438cm" svg:y2="7.701cm">
          <text:p/>
        </draw:line>
        <draw:custom-shape draw:style-name="gr170" draw:text-style-name="P49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2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3cm" svg:height="0.55cm" svg:x="-20.988cm" svg:y="7.851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1.088cm" svg:y1="7.801cm" svg:x2="-21.088cm" svg:y2="7.801cm">
          <text:p/>
        </draw:line>
        <draw:line draw:style-name="gr124" draw:text-style-name="P12" draw:layer="layout" svg:x1="-21.088cm" svg:y1="7.801cm" svg:x2="-20.988cm" svg:y2="7.801cm">
          <text:p/>
        </draw:line>
        <draw:line draw:style-name="gr186" draw:text-style-name="P12" draw:layer="layout" svg:x1="-20.988cm" svg:y1="7.801cm" svg:x2="-20.988cm" svg:y2="7.801cm">
          <text:p/>
        </draw:line>
        <draw:line draw:style-name="gr124" draw:text-style-name="P12" draw:layer="layout" svg:x1="-20.988cm" svg:y1="7.801cm" svg:x2="-20.988cm" svg:y2="7.851cm">
          <text:p/>
        </draw:line>
        <draw:frame draw:style-name="gr187" draw:text-style-name="P50" draw:layer="layout" svg:width="0.5cm" svg:height="2.384cm" svg:x="-22.188cm" svg:y="6.501cm">
          <draw:text-box>
            <text:p>173</text:p>
          </draw:text-box>
        </draw:frame>
        <draw:frame draw:style-name="gr188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135" draw:text-style-name="P24" draw:layer="layout" svg:width="0.35cm" svg:height="0.7cm" svg:x="-19.838cm" svg:y="8.001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35cm" svg:height="0.7cm" svg:x="-19.488cm" svg:y="8.001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7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190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19.838cm" svg:y1="9.251cm" svg:x2="-20.088cm" svg:y2="11.951cm">
          <text:p/>
        </draw:line>
        <draw:custom-shape draw:style-name="gr191" draw:text-style-name="P22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9.088cm" svg:y="11.951cm">
          <text:p text:style-name="P28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8.788cm" svg:y="11.951cm">
          <text:p text:style-name="P28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9" draw:layer="layout" svg:width="0.3cm" svg:height="0.8cm" svg:x="-18.488cm" svg:y="11.951cm">
          <text:p text:style-name="P28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0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3" draw:text-style-name="P12" draw:layer="layout" svg:x1="-18.688cm" svg:y1="10.751cm" svg:x2="-18.688cm" svg:y2="11.501cm">
          <text:p/>
        </draw:line>
        <draw:line draw:style-name="gr193" draw:text-style-name="P12" draw:layer="layout" svg:x1="-18.438cm" svg:y1="11.001cm" svg:x2="-18.438cm" svg:y2="11.501cm">
          <text:p/>
        </draw:line>
        <draw:line draw:style-name="gr193" draw:text-style-name="P12" draw:layer="layout" svg:x1="-18.188cm" svg:y1="10.751cm" svg:x2="-18.188cm" svg:y2="11.501cm">
          <text:p/>
        </draw:line>
        <draw:frame draw:style-name="gr188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194" draw:text-style-name="P13" draw:layer="layout" svg:width="1.061cm" svg:height="0.727cm" svg:x="-19.749cm" svg:y="10.774cm">
          <draw:text-box>
            <text:p text:style-name="P31"><text:span text:style-name="T4">Water</text:span><text:span text:style-name="T4"><text:line-break/></text:span><text:span text:style-name="T4">Tank</text:span></text:p>
          </draw:text-box>
        </draw:frame>
        <draw:line draw:style-name="gr124" draw:text-style-name="P12" draw:layer="layout" svg:x1="-17.588cm" svg:y1="9.251cm" svg:x2="-17.838cm" svg:y2="11.951cm">
          <text:p/>
        </draw:line>
        <draw:custom-shape draw:style-name="gr195" draw:text-style-name="P49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9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3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51" draw:layer="layout" svg:width="4.25cm" svg:height="0.801cm" svg:x="24.25cm" svg:y="18.2cm">
          <draw:text-box>
            <text:p><text:span text:style-name="T14">Rishabh Sarswa <text:s text:c="2"/>(9680724566)</text:span></text:p>
          </draw:text-box>
        </draw:frame>
        <draw:custom-shape draw:style-name="gr199" draw:text-style-name="P52" draw:layer="layout" svg:width="0.25cm" svg:height="0.25cm" svg:x="8.7cm" svg:y="19.15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53" draw:layer="layout" svg:width="0.25cm" svg:height="0.25cm" svg:x="8.75cm" svg:y="19.25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52" draw:layer="layout" svg:width="0.25cm" svg:height="0.25cm" svg:x="8.7cm" svg:y="19.9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31" draw:layer="layout" svg:width="0.2cm" svg:height="0.2cm" svg:x="8.75cm" svg:y="1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01" draw:text-style-name="P43" draw:layer="layout" svg:width="7.688cm" svg:height="0.605cm" svg:x="13.75cm" svg:y="17.894cm" svg:viewBox="0 0 7689 606" draw:points="0,606 7689,606 7689,0 0,0">
          <text:p/>
        </draw:polygon>
        <draw:frame draw:style-name="gr202" draw:text-style-name="P45" draw:layer="layout" svg:width="3.795cm" svg:height="0.319cm" svg:x="15.955cm" svg:y="17.644cm">
          <draw:text-box>
            <text:p text:style-name="P44"><text:span text:style-name="T13">LAYOUT MAP </text:span></text:p>
          </draw:text-box>
        </draw:frame>
        <draw:frame draw:style-name="gr203" draw:text-style-name="P45" draw:layer="layout" svg:width="14.347cm" svg:height="0.637cm" svg:x="14.125cm" svg:y="18.06cm">
          <draw:text-box>
            <text:p text:style-name="P44"><text:span text:style-name="T15">This is an important Census document. </text:span><text:span text:style-name="T15"><text:line-break/></text:span><text:span text:style-name="T15">Please draw this map neatly and correctly.</text:span></text:p>
          </draw:text-box>
        </draw:frame>
        <draw:frame draw:style-name="gr204" draw:text-style-name="P45" draw:layer="layout" svg:width="7.323cm" svg:height="0.319cm" svg:x="14.177cm" svg:y="19cm">
          <draw:text-box>
            <text:p text:style-name="P44"><text:span text:style-name="T15">Houselisting &amp; Housing Census/Population Enumeration</text:span></text:p>
          </draw:text-box>
        </draw:frame>
        <draw:frame draw:style-name="gr205" draw:text-style-name="P1" draw:layer="layout" svg:width="26.976cm" svg:height="6.499cm" svg:x="1cm" svg:y="1.249cm">
          <draw:image xlink:href="Pictures/10091AE60000A40500007411C71A921577579743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206" draw:text-style-name="P3" draw:layer="layout" svg:width="0.75cm" svg:height="0.25cm" svg:x="3cm" svg:y="1.49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7" draw:text-style-name="P5" draw:layer="layout" svg:width="0.75cm" svg:height="0.5cm" svg:x="3cm" svg:y="1.749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08" draw:text-style-name="P7" draw:layer="layout" svg:width="1.25cm" svg:height="0.5cm" svg:x="3cm" svg:y="2.249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09" draw:text-style-name="P7" draw:layer="layout" svg:width="0.75cm" svg:height="0.5cm" svg:x="3cm" svg:y="2.749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10" draw:text-style-name="P7" draw:layer="layout" svg:width="1.75cm" svg:height="1cm" svg:x="3cm" svg:y="3.249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09" draw:text-style-name="P7" draw:layer="layout" svg:width="0.75cm" svg:height="0.5cm" svg:x="3cm" svg:y="4.249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211" draw:text-style-name="P7" draw:layer="layout" svg:width="0.75cm" svg:height="0.75cm" svg:x="3cm" svg:y="4.749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07" draw:text-style-name="P5" draw:layer="layout" svg:width="0.75cm" svg:height="0.5cm" svg:x="3cm" svg:y="5.499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12" draw:text-style-name="P7" draw:layer="layout" svg:width="0.75cm" svg:height="0.8cm" svg:x="3.75cm" svg:y="4.999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11" draw:text-style-name="P9" draw:layer="layout" svg:width="0.75cm" svg:height="0.75cm" svg:x="3.75cm" svg:y="4.249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13" draw:text-style-name="P9" draw:layer="layout" svg:width="0.75cm" svg:height="1cm" svg:x="4.75cm" svg:y="4.499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3.999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3.499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2.999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2.499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214" draw:text-style-name="P9" draw:layer="layout" svg:width="1cm" svg:height="0.75cm" svg:x="4.5cm" svg:y="1.749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215" draw:text-style-name="P9" draw:layer="layout" svg:width="0.5cm" svg:height="0.65cm" svg:x="3.75cm" svg:y="1.599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3.75cm" svg:y="2.749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9" draw:layer="layout" svg:width="0.95cm" svg:height="0.6cm" svg:x="5.8cm" svg:y="1.899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217" draw:text-style-name="P9" draw:layer="layout" svg:width="0.95cm" svg:height="0.5cm" svg:x="5.8cm" svg:y="2.499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2.999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3.349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3.699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217" draw:text-style-name="P9" draw:layer="layout" svg:width="0.95cm" svg:height="0.5cm" svg:x="5.8cm" svg:y="4.049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219" draw:text-style-name="P9" draw:layer="layout" svg:width="0.95cm" svg:height="0.75cm" svg:x="5.8cm" svg:y="4.549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220" draw:text-style-name="P9" draw:layer="layout" svg:width="0.75cm" svg:height="0.6cm" svg:x="6.75cm" svg:y="4.549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220" draw:text-style-name="P9" draw:layer="layout" svg:width="0.75cm" svg:height="0.6cm" svg:x="7.75cm" svg:y="4.249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211" draw:text-style-name="P9" draw:layer="layout" svg:width="0.75cm" svg:height="0.75cm" svg:x="7.75cm" svg:y="1.999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2.749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3.242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3.749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221" draw:text-style-name="P9" draw:layer="layout" svg:width="1cm" svg:height="1.25cm" svg:x="6.75cm" svg:y="1.999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222" draw:text-style-name="P9" draw:layer="layout" svg:width="0.25cm" svg:height="0.5cm" svg:x="8.75cm" svg:y="1.999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2.499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2.749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222" draw:text-style-name="P9" draw:layer="layout" svg:width="0.5cm" svg:height="0.5cm" svg:x="8.75cm" svg:y="2.999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3.499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8.75cm" svg:y="3.749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24" draw:text-style-name="P11" draw:layer="layout" svg:width="0.25cm" svg:height="0.5cm" svg:x="8.75cm" svg:y="4.249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8.75cm" svg:y1="3.999cm" svg:x2="9.25cm" svg:y2="3.999cm">
          <text:p/>
        </draw:line>
        <draw:line draw:style-name="gr225" draw:text-style-name="P12" draw:layer="layout" svg:x1="9.25cm" svg:y1="4.699cm" svg:x2="9.25cm" svg:y2="3.999cm">
          <text:p/>
        </draw:line>
        <draw:line draw:style-name="gr225" draw:text-style-name="P12" draw:layer="layout" svg:x1="9cm" svg:y1="4.706cm" svg:x2="9.25cm" svg:y2="4.706cm">
          <text:p/>
        </draw:line>
        <draw:line draw:style-name="gr225" draw:text-style-name="P12" draw:layer="layout" svg:x1="9cm" svg:y1="4.249cm" svg:x2="9cm" svg:y2="4.749cm">
          <text:p/>
        </draw:line>
        <draw:line draw:style-name="gr225" draw:text-style-name="P12" draw:layer="layout" svg:x1="8.75cm" svg:y1="4.249cm" svg:x2="9cm" svg:y2="4.249cm">
          <text:p/>
        </draw:line>
        <draw:line draw:style-name="gr225" draw:text-style-name="P12" draw:layer="layout" svg:x1="8.75cm" svg:y1="3.999cm" svg:x2="8.75cm" svg:y2="4.249cm">
          <text:p/>
        </draw:line>
        <draw:frame draw:style-name="gr226" draw:text-style-name="P13" draw:layer="layout" svg:width="0.25cm" svg:height="0.727cm" svg:x="8.9cm" svg:y="3.899cm">
          <draw:text-box>
            <text:p><text:span text:style-name="T4">39</text:span></text:p>
          </draw:text-box>
        </draw:frame>
        <draw:custom-shape draw:style-name="gr215" draw:text-style-name="P9" draw:layer="layout" svg:width="0.25cm" svg:height="0.65cm" svg:x="9.25cm" svg:y="3.999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25cm" svg:height="0.6cm" svg:x="9.5cm" svg:y="3.999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9.25cm" svg:y="1.999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9.25cm" svg:y="3.499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9.25cm" svg:y="2.749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cm" svg:y="1.999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cm" svg:y="2.249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2.499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2.999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4.499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0cm" svg:y="3.999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" draw:layer="layout" svg:width="0.25cm" svg:height="0.5cm" svg:x="10.25cm" svg:y="3.999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4.749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5" draw:layer="layout" svg:width="0.25cm" svg:height="0.25cm" svg:x="10.5cm" svg:y="4.999cm">
          <text:p text:style-name="P14"><text:span text:style-name="T6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7" draw:layer="layout" svg:width="0.25cm" svg:height="0.25cm" svg:x="10.75cm" svg:y="4.999cm">
          <text:p text:style-name="P16"><text:span text:style-name="T7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3.499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4.249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10.5cm" svg:y="3.499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9" draw:layer="layout" svg:width="0.5cm" svg:height="0.65cm" svg:x="10.5cm" svg:y="1.999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9" draw:layer="layout" svg:width="0.5cm" svg:height="0.85cm" svg:x="10.5cm" svg:y="2.649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1.25cm" svg:y="2.399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2.649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3.149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25cm" svg:height="0.3cm" svg:x="11.25cm" svg:y="3.649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1.25cm" svg:y="3.999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4.249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4.749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1.999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25cm" svg:y="1.999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25cm" svg:height="0.3cm" svg:x="11.5cm" svg:y="3.649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1.999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2.499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75cm" svg:y="2.999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3.399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3.899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75cm" svg:y="4.249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4.649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4.999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5.349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.5cm" svg:y="5.499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.25cm" svg:y="5.499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cm" svg:y="5.499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" draw:layer="layout" svg:width="0.5cm" svg:height="0.25cm" svg:x="10.5cm" svg:y="5.499cm">
          <text:p text:style-name="P10"><text:span text:style-name="T5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" draw:layer="layout" svg:width="0.5cm" svg:height="0.5cm" svg:x="10.5cm" svg:y="5.749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0.5cm" svg:y="6.249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4cm" svg:height="0.6cm" svg:x="11cm" svg:y="5.999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7" draw:layer="layout" svg:width="0.35cm" svg:height="0.6cm" svg:x="11.4cm" svg:y="5.999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11.75cm" svg:y="5.849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2.299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2.599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2.999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3.299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3.699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2.5cm" svg:y="5.749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2.5cm" svg:y="5.249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9" draw:layer="layout" svg:width="0.5cm" svg:height="0.5cm" svg:x="12.5cm" svg:y="6.249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4.099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2.5cm" svg:y="4.499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4.849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7" draw:layer="layout" svg:width="0.25cm" svg:height="1cm" svg:x="13cm" svg:y="5.749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7" draw:layer="layout" svg:width="0.25cm" svg:height="1cm" svg:x="13.25cm" svg:y="5.749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3cm" svg:y="5.249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3.699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4.099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3.299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9" draw:layer="layout" svg:width="0.5cm" svg:height="0.7cm" svg:x="13cm" svg:y="2.599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" draw:layer="layout" svg:width="0.5cm" svg:height="0.6cm" svg:x="13cm" svg:y="1.999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9" draw:layer="layout" svg:width="0.5cm" svg:height="1.4cm" svg:x="13.75cm" svg:y="1.999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5cm" svg:height="0.6cm" svg:x="13.75cm" svg:y="3.399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5cm" svg:height="0.6cm" svg:x="13.75cm" svg:y="3.999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3.75cm" svg:y="4.599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9" draw:layer="layout" svg:width="0.6cm" svg:height="0.6cm" svg:x="14.25cm" svg:y="6.149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9" draw:layer="layout" svg:width="0.6cm" svg:height="0.66cm" svg:x="14.25cm" svg:y="5.499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5.049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4.599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9" draw:layer="layout" svg:width="0.6cm" svg:height="1.2cm" svg:x="14.25cm" svg:y="3.399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9" draw:layer="layout" svg:width="0.6cm" svg:height="0.5cm" svg:x="14.25cm" svg:y="1.999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2.499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2.949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9" draw:layer="layout" svg:width="0.6cm" svg:height="0.8cm" svg:x="15.25cm" svg:y="2.149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9" draw:layer="layout" svg:width="0.95cm" svg:height="0.7cm" svg:x="15.15cm" svg:y="6.049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9" draw:layer="layout" svg:width="1cm" svg:height="0.45cm" svg:x="15.15cm" svg:y="5.599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9" draw:layer="layout" svg:width="0.7cm" svg:height="0.4cm" svg:x="15.15cm" svg:y="4.749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9" draw:layer="layout" svg:width="0.7cm" svg:height="0.4cm" svg:x="15.15cm" svg:y="4.349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9" draw:layer="layout" svg:width="0.7cm" svg:height="0.5cm" svg:x="15.15cm" svg:y="3.849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9" draw:layer="layout" svg:width="0.65cm" svg:height="0.4cm" svg:x="15.2cm" svg:y="2.949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9" draw:layer="layout" svg:width="0.7cm" svg:height="0.5cm" svg:x="15.15cm" svg:y="3.349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" draw:layer="layout" svg:width="0.6cm" svg:height="0.7cm" svg:x="16.1cm" svg:y="6.049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9" draw:layer="layout" svg:width="0.55cm" svg:height="0.45cm" svg:x="16.15cm" svg:y="5.599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3cm" svg:x="16.2cm" svg:y="5.149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2cm" svg:x="16.2cm" svg:y="5.379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" draw:layer="layout" svg:width="0.5cm" svg:height="0.67cm" svg:x="16.2cm" svg:y="4.479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" draw:layer="layout" svg:width="0.35cm" svg:height="0.67cm" svg:x="15.85cm" svg:y="4.479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" draw:layer="layout" svg:width="0.85cm" svg:height="0.6cm" svg:x="15.85cm" svg:y="3.749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9" draw:layer="layout" svg:width="0.85cm" svg:height="1.6cm" svg:x="15.85cm" svg:y="2.149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9" draw:layer="layout" svg:width="1.2cm" svg:height="1.6cm" svg:x="16.7cm" svg:y="2.149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9" draw:layer="layout" svg:width="0.45cm" svg:height="0.8cm" svg:x="16.9cm" svg:y="3.749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45cm" svg:height="0.4cm" svg:x="17.35cm" svg:y="3.749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45cm" svg:height="0.4cm" svg:x="17.35cm" svg:y="4.149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9" draw:layer="layout" svg:width="0.85cm" svg:height="0.8cm" svg:x="16.9cm" svg:y="4.549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9" draw:layer="layout" svg:width="0.8cm" svg:height="1.4cm" svg:x="16.9cm" svg:y="5.349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20" draw:layer="layout" svg:width="0.8cm" svg:height="1.35cm" svg:x="18.05cm" svg:y="2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9" draw:layer="layout" svg:width="0.8cm" svg:height="0.6cm" svg:x="18.05cm" svg:y="3.499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9" draw:layer="layout" svg:width="1.65cm" svg:height="1.8cm" svg:x="18cm" svg:y="4.099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9" draw:layer="layout" svg:width="0.75cm" svg:height="0.9cm" svg:x="17.9cm" svg:y="5.899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8.65cm" svg:y="5.899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9.15cm" svg:y="5.899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9" draw:layer="layout" svg:width="0.85cm" svg:height="1.15cm" svg:x="19.65cm" svg:y="5.649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9" draw:layer="layout" svg:width="0.8cm" svg:height="1.15cm" svg:x="20.5cm" svg:y="5.649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9" draw:layer="layout" svg:width="1.7cm" svg:height="0.9cm" svg:x="19.65cm" svg:y="4.749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9" draw:layer="layout" svg:width="1.7cm" svg:height="0.65cm" svg:x="19.65cm" svg:y="4.099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9" draw:layer="layout" svg:width="0.7cm" svg:height="1.6cm" svg:x="20.8cm" svg:y="1.949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9" draw:layer="layout" svg:width="0.85cm" svg:height="1.6cm" svg:x="19.75cm" svg:y="1.949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0.6cm" svg:y1="1.949cm" svg:x2="20.8cm" svg:y2="1.949cm">
          <text:p/>
        </draw:line>
        <draw:custom-shape draw:style-name="gr268" draw:text-style-name="P9" draw:layer="layout" svg:width="0.9cm" svg:height="2.15cm" svg:x="18.85cm" svg:y="1.949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1.45cm" svg:y1="4.108cm" svg:x2="21.45cm" svg:y2="3.549cm">
          <text:p/>
        </draw:line>
        <draw:line draw:style-name="gr225" draw:text-style-name="P12" draw:layer="layout" svg:x1="21.45cm" svg:y1="4.099cm" svg:x2="21.35cm" svg:y2="4.099cm">
          <text:p/>
        </draw:line>
        <draw:frame draw:style-name="gr269" draw:text-style-name="P13" draw:layer="layout" svg:width="1cm" svg:height="0.489cm" svg:x="20.25cm" svg:y="3.51cm">
          <draw:text-box>
            <text:p><text:span text:style-name="T4">154</text:span></text:p>
          </draw:text-box>
        </draw:frame>
        <draw:line draw:style-name="gr225" draw:text-style-name="P12" draw:layer="layout" svg:x1="18.85cm" svg:y1="2.149cm" svg:x2="18.05cm" svg:y2="2.149cm">
          <text:p/>
        </draw:line>
        <draw:line draw:style-name="gr225" draw:text-style-name="P12" draw:layer="layout" svg:x1="18.05cm" svg:y1="2.149cm" svg:x2="18.05cm" svg:y2="3.549cm">
          <text:p/>
        </draw:line>
        <draw:line draw:style-name="gr225" draw:text-style-name="P12" draw:layer="layout" svg:x1="18.85cm" svg:y1="2.149cm" svg:x2="18.85cm" svg:y2="1.949cm">
          <text:p/>
        </draw:line>
        <draw:line draw:style-name="gr225" draw:text-style-name="P12" draw:layer="layout" svg:x1="19.75cm" svg:y1="3.549cm" svg:x2="19.75cm" svg:y2="4.099cm">
          <text:p/>
        </draw:line>
        <draw:line draw:style-name="gr225" draw:text-style-name="P12" draw:layer="layout" svg:x1="18.85cm" svg:y1="1.949cm" svg:x2="19.75cm" svg:y2="1.949cm">
          <text:p/>
        </draw:line>
        <draw:custom-shape draw:style-name="gr270" draw:text-style-name="P21" draw:layer="layout" svg:width="0.65cm" svg:height="0.35cm" svg:x="20.65cm" svg:y="6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21.75cm" svg:y="2.049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9" draw:layer="layout" svg:width="0.5cm" svg:height="0.55cm" svg:x="21.75cm" svg:y="2.549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9" draw:layer="layout" svg:width="0.9cm" svg:height="0.4cm" svg:x="21.75cm" svg:y="3.099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9" draw:layer="layout" svg:width="0.95cm" svg:height="0.8cm" svg:x="21.7cm" svg:y="3.499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" draw:layer="layout" svg:width="1.5cm" svg:height="0.5cm" svg:x="21.65cm" svg:y="4.299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" draw:layer="layout" svg:width="1.5cm" svg:height="0.8cm" svg:x="21.55cm" svg:y="4.799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9" draw:layer="layout" svg:width="0.9cm" svg:height="0.7cm" svg:x="21.5cm" svg:y="5.599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45cm" svg:height="0.5cm" svg:x="21.5cm" svg:y="6.299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45cm" svg:height="0.5cm" svg:x="21.95cm" svg:y="6.299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9" draw:layer="layout" svg:width="0.7cm" svg:height="1.2cm" svg:x="22.4cm" svg:y="5.599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22" draw:layer="layout" svg:width="0.75cm" svg:height="1.2cm" svg:x="23.1cm" svg:y="5.599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9" draw:layer="layout" svg:width="0.9cm" svg:height="0.8cm" svg:x="23.05cm" svg:y="4.799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9" draw:layer="layout" svg:width="0.85cm" svg:height="0.5cm" svg:x="23.15cm" svg:y="4.299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9" draw:layer="layout" svg:width="1.4cm" svg:height="0.55cm" svg:x="22.65cm" svg:y="3.749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9" draw:layer="layout" svg:width="1cm" svg:height="0.5cm" svg:x="23.1cm" svg:y="3.249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9" draw:layer="layout" svg:width="0.7cm" svg:height="1.1cm" svg:x="23.5cm" svg:y="2.149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24" draw:layer="layout" svg:width="0.3cm" svg:height="0.55cm" svg:x="23.2cm" svg:y="2.099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9" draw:layer="layout" svg:width="0.45cm" svg:height="1.7cm" svg:x="22.65cm" svg:y="2.049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9" draw:layer="layout" svg:width="0.4cm" svg:height="1.05cm" svg:x="22.25cm" svg:y="2.049cm">
          <text:p text:style-name="P8"><text:span text:style-name="T4">175</text:span></text:p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3.1cm" svg:y1="2.049cm" svg:x2="23.1cm" svg:y2="2.049cm">
          <text:p/>
        </draw:line>
        <draw:line draw:style-name="gr225" draw:text-style-name="P12" draw:layer="layout" svg:x1="23.1cm" svg:y1="2.049cm" svg:x2="23.2cm" svg:y2="2.049cm">
          <text:p/>
        </draw:line>
        <draw:line draw:style-name="gr286" draw:text-style-name="P12" draw:layer="layout" svg:x1="23.2cm" svg:y1="2.049cm" svg:x2="23.2cm" svg:y2="2.049cm">
          <text:p/>
        </draw:line>
        <draw:line draw:style-name="gr225" draw:text-style-name="P12" draw:layer="layout" svg:x1="23.2cm" svg:y1="2.049cm" svg:x2="23.2cm" svg:y2="2.099cm">
          <text:p/>
        </draw:line>
        <draw:frame draw:style-name="gr287" draw:text-style-name="P13" draw:layer="layout" svg:width="1.12cm" svg:height="0.5cm" svg:x="22.88cm" svg:y="2.749cm">
          <draw:text-box>
            <text:p><text:span text:style-name="T4">173</text:span></text:p>
          </draw:text-box>
        </draw:frame>
        <draw:custom-shape draw:style-name="gr235" draw:text-style-name="P24" draw:layer="layout" svg:width="0.35cm" svg:height="0.7cm" svg:x="24.35cm" svg:y="2.249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24" draw:layer="layout" svg:width="0.35cm" svg:height="0.7cm" svg:x="24.7cm" svg:y="2.249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27" draw:layer="layout" svg:width="1.15cm" svg:height="1.25cm" svg:x="24.35cm" svg:y="2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6" draw:text-style-name="P13" draw:layer="layout" svg:width="1.25cm" svg:height="0.727cm" svg:x="24.5cm" svg:y="2.999cm">
          <draw:text-box>
            <text:p><text:span text:style-name="T4">177(3)</text:span></text:p>
          </draw:text-box>
        </draw:frame>
        <draw:custom-shape draw:style-name="gr289" draw:text-style-name="P9" draw:layer="layout" svg:width="1.1cm" svg:height="1.15cm" svg:x="25.5cm" svg:y="2.349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4.35cm" svg:y1="3.499cm" svg:x2="24.1cm" svg:y2="6.199cm">
          <text:p/>
        </draw:line>
        <draw:custom-shape draw:style-name="gr290" draw:text-style-name="P22" draw:layer="layout" svg:width="1cm" svg:height="0.8cm" svg:x="24.1cm" svg:y="6.199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9" draw:layer="layout" svg:width="0.3cm" svg:height="0.8cm" svg:x="25.1cm" svg:y="6.199cm">
          <text:p text:style-name="P28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9" draw:layer="layout" svg:width="0.3cm" svg:height="0.8cm" svg:x="25.4cm" svg:y="6.199cm">
          <text:p text:style-name="P28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9" draw:layer="layout" svg:width="0.3cm" svg:height="0.8cm" svg:x="25.7cm" svg:y="6.199cm">
          <text:p text:style-name="P28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9" draw:layer="layout" svg:width="0.75cm" svg:height="0.8cm" svg:x="26cm" svg:y="6.199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30" draw:layer="layout" svg:width="1cm" svg:height="1cm" svg:x="25.25cm" svg:y="4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12" draw:layer="layout" svg:x1="25.5cm" svg:y1="4.999cm" svg:x2="25.5cm" svg:y2="5.749cm">
          <text:p/>
        </draw:line>
        <draw:line draw:style-name="gr292" draw:text-style-name="P12" draw:layer="layout" svg:x1="25.75cm" svg:y1="5.249cm" svg:x2="25.75cm" svg:y2="5.749cm">
          <text:p/>
        </draw:line>
        <draw:line draw:style-name="gr292" draw:text-style-name="P12" draw:layer="layout" svg:x1="26cm" svg:y1="4.999cm" svg:x2="26cm" svg:y2="5.749cm">
          <text:p/>
        </draw:line>
        <draw:frame draw:style-name="gr287" draw:text-style-name="P13" draw:layer="layout" svg:width="1cm" svg:height="0.5cm" svg:x="25.25cm" svg:y="4.499cm">
          <draw:text-box>
            <text:p><text:span text:style-name="T4">185</text:span></text:p>
          </draw:text-box>
        </draw:frame>
        <draw:frame draw:style-name="gr293" draw:text-style-name="P32" draw:layer="layout" svg:width="1.061cm" svg:height="0.727cm" svg:x="24.439cm" svg:y="5.022cm">
          <draw:text-box>
            <text:p text:style-name="P31"><text:span text:style-name="T4">Water</text:span><text:span text:style-name="T4"><text:line-break/></text:span><text:span text:style-name="T4">Tank</text:span></text:p>
          </draw:text-box>
        </draw:frame>
        <draw:line draw:style-name="gr225" draw:text-style-name="P12" draw:layer="layout" svg:x1="26.6cm" svg:y1="3.499cm" svg:x2="26.35cm" svg:y2="6.199cm">
          <text:p/>
        </draw:line>
        <draw:custom-shape draw:style-name="gr294" draw:text-style-name="P21" draw:layer="layout" svg:width="0.25cm" svg:height="0.45cm" svg:x="9cm" svg:y="4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1" draw:layer="layout" svg:width="0.25cm" svg:height="0.25cm" svg:x="9cm" svg:y="1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33" draw:layer="layout" svg:width="0.25cm" svg:height="0.5cm" svg:x="9cm" svg:y="1.999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2.45cm" svg:y1="2.663cm" svg:x2="22.35cm" svg:y2="2.777cm">
          <text:p/>
        </draw:line>
        <draw:line draw:style-name="gr225" draw:text-style-name="P12" draw:layer="layout" svg:x1="22.45cm" svg:y1="2.663cm" svg:x2="22.55cm" svg:y2="2.777cm">
          <text:p/>
        </draw:line>
        <draw:line draw:style-name="gr225" draw:text-style-name="P12" draw:layer="layout" svg:x1="22.39cm" svg:y1="2.732cm" svg:x2="22.51cm" svg:y2="2.732cm">
          <text:p/>
        </draw:line>
        <draw:line draw:style-name="gr225" draw:text-style-name="P12" draw:layer="layout" svg:x1="22.35cm" svg:y1="2.778cm" svg:x2="22.55cm" svg:y2="2.778cm">
          <text:p/>
        </draw:line>
        <draw:line draw:style-name="gr225" draw:text-style-name="P12" draw:layer="layout" svg:x1="22.35cm" svg:y1="2.778cm" svg:x2="22.35cm" svg:y2="2.949cm">
          <text:p/>
        </draw:line>
        <draw:line draw:style-name="gr225" draw:text-style-name="P12" draw:layer="layout" svg:x1="22.55cm" svg:y1="2.778cm" svg:x2="22.55cm" svg:y2="2.949cm">
          <text:p/>
        </draw:line>
        <draw:line draw:style-name="gr225" draw:text-style-name="P12" draw:layer="layout" svg:x1="22.35cm" svg:y1="2.949cm" svg:x2="22.55cm" svg:y2="2.949cm">
          <text:p/>
        </draw:line>
        <draw:line draw:style-name="gr225" draw:text-style-name="P12" draw:layer="layout" svg:x1="22.4cm" svg:y1="2.949cm" svg:x2="22.4cm" svg:y2="2.835cm">
          <text:p/>
        </draw:line>
        <draw:line draw:style-name="gr225" draw:text-style-name="P12" draw:layer="layout" svg:x1="22.4cm" svg:y1="2.835cm" svg:x2="22.5cm" svg:y2="2.835cm">
          <text:p/>
        </draw:line>
        <draw:line draw:style-name="gr225" draw:text-style-name="P12" draw:layer="layout" svg:x1="22.5cm" svg:y1="2.835cm" svg:x2="22.5cm" svg:y2="2.949cm">
          <text:p/>
        </draw:line>
        <draw:line draw:style-name="gr225" draw:text-style-name="P12" draw:layer="layout" svg:x1="22.45cm" svg:y1="2.663cm" svg:x2="22.45cm" svg:y2="2.549cm">
          <text:p/>
        </draw:line>
        <draw:line draw:style-name="gr225" draw:text-style-name="P12" draw:layer="layout" svg:x1="22.45cm" svg:y1="2.549cm" svg:x2="22.55cm" svg:y2="2.549cm">
          <text:p/>
        </draw:line>
        <draw:line draw:style-name="gr225" draw:text-style-name="P12" draw:layer="layout" svg:x1="22.55cm" svg:y1="2.549cm" svg:x2="22.45cm" svg:y2="2.606cm">
          <text:p/>
        </draw:line>
        <draw:custom-shape draw:style-name="gr297" draw:text-style-name="P9" draw:layer="layout" svg:width="1.05cm" svg:height="0.45cm" svg:x="15.15cm" svg:y="5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8" draw:text-style-name="P12" draw:layer="layout" svg:x1="2.75cm" svg:y1="6.749cm" svg:x2="10.25cm" svg:y2="4.749cm">
          <text:p/>
        </draw:line>
        <draw:line draw:style-name="gr298" draw:text-style-name="P12" draw:layer="layout" svg:x1="2.75cm" svg:y1="6.749cm" svg:x2="2.75cm" svg:y2="1.249cm">
          <text:p/>
        </draw:line>
        <draw:line draw:style-name="gr298" draw:text-style-name="P12" draw:layer="layout" svg:x1="2.75cm" svg:y1="1.249cm" svg:x2="8.5cm" svg:y2="1.749cm">
          <text:p/>
        </draw:line>
        <draw:line draw:style-name="gr298" draw:text-style-name="P12" draw:layer="layout" svg:x1="8.75cm" svg:y1="1.749cm" svg:x2="19.5cm" svg:y2="1.749cm">
          <text:p/>
        </draw:line>
        <draw:line draw:style-name="gr298" draw:text-style-name="P12" draw:layer="layout" svg:x1="10.25cm" svg:y1="4.749cm" svg:x2="10.25cm" svg:y2="6.999cm">
          <text:p/>
        </draw:line>
        <draw:line draw:style-name="gr298" draw:text-style-name="P12" draw:layer="layout" svg:x1="10.25cm" svg:y1="6.999cm" svg:x2="27.5cm" svg:y2="7.249cm">
          <text:p/>
        </draw:line>
        <draw:line draw:style-name="gr298" draw:text-style-name="P12" draw:layer="layout" svg:x1="27.5cm" svg:y1="1.999cm" svg:x2="27.5cm" svg:y2="7.249cm">
          <text:p/>
        </draw:line>
        <draw:line draw:style-name="gr298" draw:text-style-name="P12" draw:layer="layout" svg:x1="19.75cm" svg:y1="1.749cm" svg:x2="23.5cm" svg:y2="1.749cm">
          <text:p/>
        </draw:line>
        <draw:line draw:style-name="gr298" draw:text-style-name="P12" draw:layer="layout" svg:x1="23.5cm" svg:y1="1.749cm" svg:x2="27.5cm" svg:y2="1.999cm">
          <text:p/>
        </draw:line>
        <draw:line draw:style-name="gr225" draw:text-style-name="P12" draw:layer="layout" svg:x1="28.2cm" svg:y1="0.749cm" svg:x2="28.2cm" svg:y2="8.249cm">
          <text:p/>
        </draw:line>
        <draw:line draw:style-name="gr225" draw:text-style-name="P12" draw:layer="layout" svg:x1="27cm" svg:y1="0.749cm" svg:x2="27cm" svg:y2="1.749cm">
          <text:p/>
        </draw:line>
        <draw:line draw:style-name="gr225" draw:text-style-name="P12" draw:layer="layout" svg:x1="24.25cm" svg:y1="1.499cm" svg:x2="27cm" svg:y2="1.749cm">
          <text:p/>
        </draw:line>
        <draw:line draw:style-name="gr225" draw:text-style-name="P12" draw:layer="layout" svg:x1="20cm" svg:y1="1.499cm" svg:x2="21.5cm" svg:y2="1.499cm">
          <text:p/>
        </draw:line>
        <draw:line draw:style-name="gr225" draw:text-style-name="P12" draw:layer="layout" svg:x1="13.25cm" svg:y1="1.499cm" svg:x2="16.25cm" svg:y2="1.499cm">
          <text:p/>
        </draw:line>
        <draw:line draw:style-name="gr225" draw:text-style-name="P12" draw:layer="layout" svg:x1="3cm" svg:y1="0.999cm" svg:x2="4.75cm" svg:y2="1.249cm">
          <text:p/>
        </draw:line>
        <draw:line draw:style-name="gr225" draw:text-style-name="P12" draw:layer="layout" svg:x1="2.25cm" svg:y1="4.249cm" svg:x2="2.25cm" svg:y2="0.749cm">
          <text:p/>
        </draw:line>
        <draw:line draw:style-name="gr225" draw:text-style-name="P12" draw:layer="layout" svg:x1="3cm" svg:y1="0.749cm" svg:x2="3cm" svg:y2="0.999cm">
          <text:p/>
        </draw:line>
        <draw:line draw:style-name="gr225" draw:text-style-name="P12" draw:layer="layout" svg:x1="2.75cm" svg:y1="6.999cm" svg:x2="2.75cm" svg:y2="8.249cm">
          <text:p/>
        </draw:line>
        <draw:line draw:style-name="gr225" draw:text-style-name="P12" draw:layer="layout" svg:x1="2.75cm" svg:y1="6.999cm" svg:x2="10cm" svg:y2="4.999cm">
          <text:p/>
        </draw:line>
        <draw:line draw:style-name="gr225" draw:text-style-name="P12" draw:layer="layout" svg:x1="10cm" svg:y1="4.999cm" svg:x2="10cm" svg:y2="5.749cm">
          <text:p/>
        </draw:line>
        <draw:line draw:style-name="gr225" draw:text-style-name="P12" draw:layer="layout" svg:x1="10cm" svg:y1="7.249cm" svg:x2="9.5cm" svg:y2="8.249cm">
          <text:p/>
        </draw:line>
        <draw:line draw:style-name="gr225" draw:text-style-name="P12" draw:layer="layout" svg:x1="10cm" svg:y1="8.249cm" svg:x2="10.5cm" svg:y2="7.249cm">
          <text:p/>
        </draw:line>
        <draw:line draw:style-name="gr225" draw:text-style-name="P12" draw:layer="layout" svg:x1="10.5cm" svg:y1="7.249cm" svg:x2="13cm" svg:y2="7.249cm">
          <text:p/>
        </draw:line>
        <draw:line draw:style-name="gr225" draw:text-style-name="P12" draw:layer="layout" svg:x1="23.5cm" svg:y1="7.499cm" svg:x2="26.75cm" svg:y2="7.499cm">
          <text:p/>
        </draw:line>
        <draw:line draw:style-name="gr225" draw:text-style-name="P12" draw:layer="layout" svg:x1="26.75cm" svg:y1="8.249cm" svg:x2="26.75cm" svg:y2="7.499cm">
          <text:p/>
        </draw:line>
        <draw:line draw:style-name="gr225" draw:text-style-name="P12" draw:layer="layout" svg:x1="4.75cm" svg:y1="1.249cm" svg:x2="4.75cm" svg:y2="0.749cm">
          <text:p/>
        </draw:line>
        <draw:line draw:style-name="gr225" draw:text-style-name="P12" draw:layer="layout" svg:x1="5.25cm" svg:y1="0.749cm" svg:x2="5.25cm" svg:y2="1.249cm">
          <text:p/>
        </draw:line>
        <draw:line draw:style-name="gr225" draw:text-style-name="P12" draw:layer="layout" svg:x1="5.25cm" svg:y1="1.249cm" svg:x2="6.5cm" svg:y2="1.499cm">
          <text:p/>
        </draw:line>
        <draw:line draw:style-name="gr225" draw:text-style-name="P12" draw:layer="layout" svg:x1="6.5cm" svg:y1="0.749cm" svg:x2="6.5cm" svg:y2="1.499cm">
          <text:p/>
        </draw:line>
        <draw:line draw:style-name="gr225" draw:text-style-name="P12" draw:layer="layout" svg:x1="7cm" svg:y1="1.499cm" svg:x2="7cm" svg:y2="0.749cm">
          <text:p/>
        </draw:line>
        <draw:line draw:style-name="gr225" draw:text-style-name="P12" draw:layer="layout" svg:x1="7cm" svg:y1="1.499cm" svg:x2="8.75cm" svg:y2="1.499cm">
          <text:p/>
        </draw:line>
        <draw:line draw:style-name="gr225" draw:text-style-name="P12" draw:layer="layout" svg:x1="8.75cm" svg:y1="1.499cm" svg:x2="8.75cm" svg:y2="0.749cm">
          <text:p/>
        </draw:line>
        <draw:line draw:style-name="gr225" draw:text-style-name="P12" draw:layer="layout" svg:x1="9cm" svg:y1="0.749cm" svg:x2="9cm" svg:y2="1.499cm">
          <text:p/>
        </draw:line>
        <draw:line draw:style-name="gr225" draw:text-style-name="P12" draw:layer="layout" svg:x1="9cm" svg:y1="1.499cm" svg:x2="10.25cm" svg:y2="1.499cm">
          <text:p/>
        </draw:line>
        <draw:line draw:style-name="gr225" draw:text-style-name="P12" draw:layer="layout" svg:x1="10.25cm" svg:y1="0.749cm" svg:x2="10.25cm" svg:y2="1.499cm">
          <text:p/>
        </draw:line>
        <draw:line draw:style-name="gr225" draw:text-style-name="P12" draw:layer="layout" svg:x1="10.5cm" svg:y1="1.499cm" svg:x2="10.5cm" svg:y2="0.749cm">
          <text:p/>
        </draw:line>
        <draw:line draw:style-name="gr225" draw:text-style-name="P12" draw:layer="layout" svg:x1="10.5cm" svg:y1="1.499cm" svg:x2="13cm" svg:y2="1.499cm">
          <text:p/>
        </draw:line>
        <draw:line draw:style-name="gr225" draw:text-style-name="P12" draw:layer="layout" svg:x1="13cm" svg:y1="1.499cm" svg:x2="13cm" svg:y2="0.749cm">
          <text:p/>
        </draw:line>
        <draw:line draw:style-name="gr225" draw:text-style-name="P12" draw:layer="layout" svg:x1="13.25cm" svg:y1="1.499cm" svg:x2="13.25cm" svg:y2="0.749cm">
          <text:p/>
        </draw:line>
        <draw:line draw:style-name="gr225" draw:text-style-name="P12" draw:layer="layout" svg:x1="16.25cm" svg:y1="0.749cm" svg:x2="16.25cm" svg:y2="1.499cm">
          <text:p/>
        </draw:line>
        <draw:line draw:style-name="gr225" draw:text-style-name="P12" draw:layer="layout" svg:x1="16.5cm" svg:y1="0.749cm" svg:x2="16.5cm" svg:y2="1.499cm">
          <text:p/>
        </draw:line>
        <draw:line draw:style-name="gr225" draw:text-style-name="P12" draw:layer="layout" svg:x1="16.5cm" svg:y1="1.499cm" svg:x2="19.75cm" svg:y2="1.499cm">
          <text:p/>
        </draw:line>
        <draw:line draw:style-name="gr225" draw:text-style-name="P12" draw:layer="layout" svg:x1="19.75cm" svg:y1="0.749cm" svg:x2="19.75cm" svg:y2="1.499cm">
          <text:p/>
        </draw:line>
        <draw:line draw:style-name="gr225" draw:text-style-name="P12" draw:layer="layout" svg:x1="20cm" svg:y1="0.749cm" svg:x2="20cm" svg:y2="1.499cm">
          <text:p/>
        </draw:line>
        <draw:line draw:style-name="gr225" draw:text-style-name="P12" draw:layer="layout" svg:x1="21.5cm" svg:y1="0.749cm" svg:x2="21.5cm" svg:y2="1.499cm">
          <text:p/>
        </draw:line>
        <draw:line draw:style-name="gr225" draw:text-style-name="P12" draw:layer="layout" svg:x1="21.75cm" svg:y1="1.499cm" svg:x2="21.75cm" svg:y2="0.749cm">
          <text:p/>
        </draw:line>
        <draw:line draw:style-name="gr225" draw:text-style-name="P12" draw:layer="layout" svg:x1="21.75cm" svg:y1="1.499cm" svg:x2="24cm" svg:y2="1.499cm">
          <text:p/>
        </draw:line>
        <draw:line draw:style-name="gr225" draw:text-style-name="P12" draw:layer="layout" svg:x1="24.25cm" svg:y1="0.749cm" svg:x2="24.25cm" svg:y2="1.499cm">
          <text:p/>
        </draw:line>
        <draw:line draw:style-name="gr225" draw:text-style-name="P12" draw:layer="layout" svg:x1="24cm" svg:y1="0.749cm" svg:x2="24cm" svg:y2="1.499cm">
          <text:p/>
        </draw:line>
        <draw:line draw:style-name="gr225" draw:text-style-name="P12" draw:layer="layout" svg:x1="3.25cm" svg:y1="7.499cm" svg:x2="10cm" svg:y2="5.749cm">
          <text:p/>
        </draw:line>
        <draw:line draw:style-name="gr225" draw:text-style-name="P12" draw:layer="layout" svg:x1="10cm" svg:y1="7.249cm" svg:x2="10cm" svg:y2="5.999cm">
          <text:p/>
        </draw:line>
        <draw:line draw:style-name="gr225" draw:text-style-name="P12" draw:layer="layout" svg:x1="3.25cm" svg:y1="7.499cm" svg:x2="3.25cm" svg:y2="8.249cm">
          <text:p/>
        </draw:line>
        <draw:line draw:style-name="gr225" draw:text-style-name="P12" draw:layer="layout" svg:x1="3.5cm" svg:y1="7.749cm" svg:x2="8.25cm" svg:y2="6.499cm">
          <text:p/>
        </draw:line>
        <draw:line draw:style-name="gr225" draw:text-style-name="P12" draw:layer="layout" svg:x1="3.5cm" svg:y1="7.749cm" svg:x2="3.5cm" svg:y2="8.249cm">
          <text:p/>
        </draw:line>
        <draw:line draw:style-name="gr225" draw:text-style-name="P12" draw:layer="layout" svg:x1="8.75cm" svg:y1="6.499cm" svg:x2="10cm" svg:y2="5.999cm">
          <text:p/>
        </draw:line>
        <draw:line draw:style-name="gr225" draw:text-style-name="P12" draw:layer="layout" svg:x1="7.25cm" svg:y1="8.249cm" svg:x2="8.25cm" svg:y2="6.499cm">
          <text:p/>
        </draw:line>
        <draw:line draw:style-name="gr225" draw:text-style-name="P12" draw:layer="layout" svg:x1="8.75cm" svg:y1="6.499cm" svg:x2="7.75cm" svg:y2="8.249cm">
          <text:p/>
        </draw:line>
        <draw:line draw:style-name="gr225" draw:text-style-name="P12" draw:layer="layout" svg:x1="3.5cm" svg:y1="8.249cm" svg:x2="7.25cm" svg:y2="8.249cm">
          <text:p/>
        </draw:line>
        <draw:frame draw:style-name="gr299" draw:text-style-name="P35" draw:layer="layout" svg:width="2.75cm" svg:height="1.039cm" draw:transform="rotate (0.349065850398866) translate (0.881cm 4.869cm)">
          <draw:text-box>
            <text:p text:style-name="P34"><text:span text:style-name="T12">Patel </text:span></text:p>
          </draw:text-box>
        </draw:frame>
        <draw:frame draw:style-name="gr300" draw:text-style-name="P37" draw:layer="layout" svg:width="2.392cm" svg:height="0.569cm" draw:transform="rotate (0.244346095279206) translate (6cm 6.697cm)">
          <draw:text-box>
            <text:p text:style-name="P36"><text:span text:style-name="T4">Bhutani Road</text:span></text:p>
          </draw:text-box>
        </draw:frame>
        <draw:frame draw:style-name="gr301" draw:text-style-name="P39" draw:layer="layout" svg:width="6cm" svg:height="1.433cm" draw:transform="rotate (1.5707963267949) translate (27cm 7.749cm)">
          <draw:text-box>
            <text:p text:style-name="P38"><text:span text:style-name="T12">Mahila ITI College Road</text:span></text:p>
            <text:p text:style-name="P38"><text:span text:style-name="T12">Vallabh Garden Road</text:span><text:span text:style-name="T12"><text:line-break/></text:span><text:span text:style-name="T12"/></text:p>
          </draw:text-box>
        </draw:frame>
        <draw:line draw:style-name="gr225" draw:text-style-name="P12" draw:layer="layout" svg:x1="2.25cm" svg:y1="4.249cm" svg:x2="0.5cm" svg:y2="4.999cm">
          <text:p/>
        </draw:line>
        <draw:line draw:style-name="gr225" draw:text-style-name="P12" draw:layer="layout" svg:x1="2.25cm" svg:y1="4.999cm" svg:x2="0.5cm" svg:y2="5.749cm">
          <text:p/>
        </draw:line>
        <draw:line draw:style-name="gr225" draw:text-style-name="P12" draw:layer="layout" svg:x1="2.5cm" svg:y1="6.499cm" svg:x2="2.5cm" svg:y2="8.249cm">
          <text:p/>
        </draw:line>
        <draw:line draw:style-name="gr225" draw:text-style-name="P12" draw:layer="layout" svg:x1="2.5cm" svg:y1="6.499cm" svg:x2="2.25cm" svg:y2="4.999cm">
          <text:p/>
        </draw:line>
        <draw:frame draw:style-name="gr299" draw:text-style-name="P35" draw:layer="layout" svg:width="2.75cm" svg:height="1.039cm" draw:transform="rotate (1.5707963267949) translate (2.211cm 3.999cm)">
          <draw:text-box>
            <text:p text:style-name="P34"><text:span text:style-name="T12">Main Road</text:span></text:p>
          </draw:text-box>
        </draw:frame>
        <draw:frame draw:style-name="gr299" draw:text-style-name="P35" draw:layer="layout" svg:width="1.949cm" svg:height="1.039cm" draw:transform="rotate (1.0471975511966) translate (1.7cm 4.837cm)">
          <draw:text-box>
            <text:p text:style-name="P34"><text:span text:style-name="T12">Nagar</text:span></text:p>
          </draw:text-box>
        </draw:frame>
        <draw:frame draw:style-name="gr299" draw:text-style-name="P41" draw:layer="layout" svg:width="1.25cm" svg:height="1.039cm" svg:x="21.8cm" svg:y="0.299cm">
          <draw:text-box>
            <text:p text:style-name="P40"><text:span text:style-name="T4">Arya Samaj Temple</text:span></text:p>
          </draw:text-box>
        </draw:frame>
        <draw:line draw:style-name="gr302" draw:text-style-name="P12" draw:layer="layout" svg:x1="22.45cm" svg:y1="1.149cm" svg:x2="22.45cm" svg:y2="2.149cm">
          <text:p/>
        </draw:line>
        <draw:frame draw:style-name="gr299" draw:text-style-name="P35" draw:layer="layout" svg:width="2.75cm" svg:height="1.039cm" svg:x="5cm" svg:y="7.461cm">
          <draw:text-box>
            <text:p text:style-name="P34"><text:span text:style-name="T12">Nehru Park</text:span></text:p>
          </draw:text-box>
        </draw:frame>
        <draw:line draw:style-name="gr225" draw:text-style-name="P12" draw:layer="layout" svg:x1="13cm" svg:y1="7.249cm" svg:x2="13cm" svg:y2="8.249cm">
          <text:p/>
        </draw:line>
        <draw:line draw:style-name="gr225" draw:text-style-name="P12" draw:layer="layout" svg:x1="13.25cm" svg:y1="8.249cm" svg:x2="13.25cm" svg:y2="7.249cm">
          <text:p/>
        </draw:line>
        <draw:line draw:style-name="gr225" draw:text-style-name="P12" draw:layer="layout" svg:x1="13.25cm" svg:y1="7.249cm" svg:x2="17cm" svg:y2="7.499cm">
          <text:p/>
        </draw:line>
        <draw:line draw:style-name="gr225" draw:text-style-name="P12" draw:layer="layout" svg:x1="17cm" svg:y1="8.249cm" svg:x2="17cm" svg:y2="7.499cm">
          <text:p/>
        </draw:line>
        <draw:line draw:style-name="gr225" draw:text-style-name="P12" draw:layer="layout" svg:x1="17.25cm" svg:y1="8.249cm" svg:x2="17.25cm" svg:y2="7.499cm">
          <text:p/>
        </draw:line>
        <draw:line draw:style-name="gr225" draw:text-style-name="P12" draw:layer="layout" svg:x1="17.25cm" svg:y1="7.499cm" svg:x2="21.25cm" svg:y2="7.499cm">
          <text:p/>
        </draw:line>
        <draw:line draw:style-name="gr225" draw:text-style-name="P12" draw:layer="layout" svg:x1="21.25cm" svg:y1="8.249cm" svg:x2="21.25cm" svg:y2="7.499cm">
          <text:p/>
        </draw:line>
        <draw:line draw:style-name="gr225" draw:text-style-name="P12" draw:layer="layout" svg:x1="23.5cm" svg:y1="8.249cm" svg:x2="23.5cm" svg:y2="7.499cm">
          <text:p/>
        </draw:line>
        <draw:line draw:style-name="gr225" draw:text-style-name="P12" draw:layer="layout" svg:x1="21.5cm" svg:y1="7.499cm" svg:x2="21.5cm" svg:y2="8.249cm">
          <text:p/>
        </draw:line>
        <draw:line draw:style-name="gr225" draw:text-style-name="P12" draw:layer="layout" svg:x1="21.5cm" svg:y1="7.499cm" svg:x2="23.25cm" svg:y2="7.499cm">
          <text:p/>
        </draw:line>
        <draw:line draw:style-name="gr225" draw:text-style-name="P12" draw:layer="layout" svg:x1="23.25cm" svg:y1="8.249cm" svg:x2="23.25cm" svg:y2="7.499cm">
          <text:p/>
        </draw:line>
        <draw:frame draw:style-name="gr205" draw:text-style-name="P1" draw:layer="layout" svg:width="26.976cm" svg:height="6.499cm" svg:x="1cm" svg:y="9.45cm">
          <draw:image xlink:href="Pictures/10091AE60000A40500007411C71A921577579743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206" draw:text-style-name="P3" draw:layer="layout" svg:width="0.75cm" svg:height="0.25cm" svg:x="3cm" svg:y="9.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7" draw:text-style-name="P5" draw:layer="layout" svg:width="0.75cm" svg:height="0.5cm" svg:x="3cm" svg:y="9.9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08" draw:text-style-name="P7" draw:layer="layout" svg:width="1.25cm" svg:height="0.5cm" svg:x="3cm" svg:y="10.4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09" draw:text-style-name="P7" draw:layer="layout" svg:width="0.75cm" svg:height="0.5cm" svg:x="3cm" svg:y="10.95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10" draw:text-style-name="P7" draw:layer="layout" svg:width="1.75cm" svg:height="1cm" svg:x="3cm" svg:y="11.4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09" draw:text-style-name="P7" draw:layer="layout" svg:width="0.75cm" svg:height="0.5cm" svg:x="3cm" svg:y="12.45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211" draw:text-style-name="P7" draw:layer="layout" svg:width="0.75cm" svg:height="0.75cm" svg:x="3cm" svg:y="12.9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07" draw:text-style-name="P5" draw:layer="layout" svg:width="0.75cm" svg:height="0.5cm" svg:x="3cm" svg:y="13.7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12" draw:text-style-name="P7" draw:layer="layout" svg:width="0.75cm" svg:height="0.8cm" svg:x="3.75cm" svg:y="13.2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11" draw:text-style-name="P9" draw:layer="layout" svg:width="0.75cm" svg:height="0.75cm" svg:x="3.75cm" svg:y="12.45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13" draw:text-style-name="P9" draw:layer="layout" svg:width="0.75cm" svg:height="1cm" svg:x="4.75cm" svg:y="12.7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12.2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11.7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11.2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10.7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214" draw:text-style-name="P9" draw:layer="layout" svg:width="1cm" svg:height="0.75cm" svg:x="4.5cm" svg:y="9.95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215" draw:text-style-name="P9" draw:layer="layout" svg:width="0.5cm" svg:height="0.65cm" svg:x="3.75cm" svg:y="9.8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3.75cm" svg:y="10.95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9" draw:layer="layout" svg:width="0.95cm" svg:height="0.6cm" svg:x="5.8cm" svg:y="10.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217" draw:text-style-name="P9" draw:layer="layout" svg:width="0.95cm" svg:height="0.5cm" svg:x="5.8cm" svg:y="10.7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11.2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11.55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11.9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217" draw:text-style-name="P9" draw:layer="layout" svg:width="0.95cm" svg:height="0.5cm" svg:x="5.8cm" svg:y="12.25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219" draw:text-style-name="P9" draw:layer="layout" svg:width="0.95cm" svg:height="0.75cm" svg:x="5.8cm" svg:y="12.75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220" draw:text-style-name="P9" draw:layer="layout" svg:width="0.75cm" svg:height="0.6cm" svg:x="6.75cm" svg:y="12.75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220" draw:text-style-name="P9" draw:layer="layout" svg:width="0.75cm" svg:height="0.6cm" svg:x="7.75cm" svg:y="12.45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211" draw:text-style-name="P9" draw:layer="layout" svg:width="0.75cm" svg:height="0.75cm" svg:x="7.75cm" svg:y="10.2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10.95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11.443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11.95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221" draw:text-style-name="P9" draw:layer="layout" svg:width="1cm" svg:height="1.25cm" svg:x="6.75cm" svg:y="10.2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222" draw:text-style-name="P9" draw:layer="layout" svg:width="0.25cm" svg:height="0.5cm" svg:x="8.75cm" svg:y="10.2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10.7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10.95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222" draw:text-style-name="P9" draw:layer="layout" svg:width="0.5cm" svg:height="0.5cm" svg:x="8.75cm" svg:y="11.2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11.7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8.75cm" svg:y="11.95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24" draw:text-style-name="P11" draw:layer="layout" svg:width="0.25cm" svg:height="0.5cm" svg:x="8.75cm" svg:y="12.45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8.75cm" svg:y1="12.2cm" svg:x2="9.25cm" svg:y2="12.2cm">
          <text:p/>
        </draw:line>
        <draw:line draw:style-name="gr225" draw:text-style-name="P12" draw:layer="layout" svg:x1="9.25cm" svg:y1="12.9cm" svg:x2="9.25cm" svg:y2="12.2cm">
          <text:p/>
        </draw:line>
        <draw:line draw:style-name="gr225" draw:text-style-name="P12" draw:layer="layout" svg:x1="9cm" svg:y1="12.907cm" svg:x2="9.25cm" svg:y2="12.907cm">
          <text:p/>
        </draw:line>
        <draw:line draw:style-name="gr225" draw:text-style-name="P12" draw:layer="layout" svg:x1="9cm" svg:y1="12.45cm" svg:x2="9cm" svg:y2="12.95cm">
          <text:p/>
        </draw:line>
        <draw:line draw:style-name="gr225" draw:text-style-name="P12" draw:layer="layout" svg:x1="8.75cm" svg:y1="12.45cm" svg:x2="9cm" svg:y2="12.45cm">
          <text:p/>
        </draw:line>
        <draw:line draw:style-name="gr225" draw:text-style-name="P12" draw:layer="layout" svg:x1="8.75cm" svg:y1="12.2cm" svg:x2="8.75cm" svg:y2="12.45cm">
          <text:p/>
        </draw:line>
        <draw:frame draw:style-name="gr226" draw:text-style-name="P13" draw:layer="layout" svg:width="0.25cm" svg:height="0.727cm" svg:x="8.9cm" svg:y="12.1cm">
          <draw:text-box>
            <text:p><text:span text:style-name="T4">39</text:span></text:p>
          </draw:text-box>
        </draw:frame>
        <draw:custom-shape draw:style-name="gr215" draw:text-style-name="P9" draw:layer="layout" svg:width="0.25cm" svg:height="0.65cm" svg:x="9.25cm" svg:y="12.2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25cm" svg:height="0.6cm" svg:x="9.5cm" svg:y="12.2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9.25cm" svg:y="10.2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9.25cm" svg:y="11.7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9.25cm" svg:y="10.95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cm" svg:y="10.2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cm" svg:y="10.45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10.7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11.2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12.7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0cm" svg:y="12.2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" draw:layer="layout" svg:width="0.25cm" svg:height="0.5cm" svg:x="10.25cm" svg:y="12.2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12.95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5" draw:layer="layout" svg:width="0.25cm" svg:height="0.25cm" svg:x="10.5cm" svg:y="13.2cm">
          <text:p text:style-name="P14"><text:span text:style-name="T6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7" draw:layer="layout" svg:width="0.25cm" svg:height="0.25cm" svg:x="10.75cm" svg:y="13.2cm">
          <text:p text:style-name="P16"><text:span text:style-name="T7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11.7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12.45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10.5cm" svg:y="11.7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9" draw:layer="layout" svg:width="0.5cm" svg:height="0.65cm" svg:x="10.5cm" svg:y="10.2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9" draw:layer="layout" svg:width="0.5cm" svg:height="0.85cm" svg:x="10.5cm" svg:y="10.85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1.25cm" svg:y="10.6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10.85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11.35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25cm" svg:height="0.3cm" svg:x="11.25cm" svg:y="11.85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1.25cm" svg:y="12.2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12.45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12.95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10.2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25cm" svg:y="10.2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25cm" svg:height="0.3cm" svg:x="11.5cm" svg:y="11.85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10.2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10.7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75cm" svg:y="11.2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11.6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12.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75cm" svg:y="12.45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12.85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13.2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13.55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.5cm" svg:y="13.7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.25cm" svg:y="13.7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cm" svg:y="13.7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" draw:layer="layout" svg:width="0.5cm" svg:height="0.25cm" svg:x="10.5cm" svg:y="13.7cm">
          <text:p text:style-name="P10"><text:span text:style-name="T5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" draw:layer="layout" svg:width="0.5cm" svg:height="0.5cm" svg:x="10.5cm" svg:y="13.95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0.5cm" svg:y="14.45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4cm" svg:height="0.6cm" svg:x="11cm" svg:y="14.2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7" draw:layer="layout" svg:width="0.35cm" svg:height="0.6cm" svg:x="11.4cm" svg:y="14.2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11.75cm" svg:y="14.05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10.5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10.8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11.2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11.5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11.9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2.5cm" svg:y="13.95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2.5cm" svg:y="13.45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9" draw:layer="layout" svg:width="0.5cm" svg:height="0.5cm" svg:x="12.5cm" svg:y="14.45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12.3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2.5cm" svg:y="12.7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13.05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7" draw:layer="layout" svg:width="0.25cm" svg:height="1cm" svg:x="13cm" svg:y="13.95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7" draw:layer="layout" svg:width="0.25cm" svg:height="1cm" svg:x="13.25cm" svg:y="13.95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3cm" svg:y="13.45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11.9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12.3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11.5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9" draw:layer="layout" svg:width="0.5cm" svg:height="0.7cm" svg:x="13cm" svg:y="10.8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" draw:layer="layout" svg:width="0.5cm" svg:height="0.6cm" svg:x="13cm" svg:y="10.2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9" draw:layer="layout" svg:width="0.5cm" svg:height="1.4cm" svg:x="13.75cm" svg:y="10.2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5cm" svg:height="0.6cm" svg:x="13.75cm" svg:y="11.6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5cm" svg:height="0.6cm" svg:x="13.75cm" svg:y="12.2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3.75cm" svg:y="12.8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9" draw:layer="layout" svg:width="0.6cm" svg:height="0.6cm" svg:x="14.25cm" svg:y="14.35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9" draw:layer="layout" svg:width="0.6cm" svg:height="0.66cm" svg:x="14.25cm" svg:y="13.7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13.25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12.8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9" draw:layer="layout" svg:width="0.6cm" svg:height="1.2cm" svg:x="14.25cm" svg:y="11.6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9" draw:layer="layout" svg:width="0.6cm" svg:height="0.5cm" svg:x="14.25cm" svg:y="10.2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10.7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11.15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9" draw:layer="layout" svg:width="0.6cm" svg:height="0.8cm" svg:x="15.25cm" svg:y="10.35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9" draw:layer="layout" svg:width="0.95cm" svg:height="0.7cm" svg:x="15.15cm" svg:y="14.25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9" draw:layer="layout" svg:width="1cm" svg:height="0.45cm" svg:x="15.15cm" svg:y="13.8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9" draw:layer="layout" svg:width="0.7cm" svg:height="0.4cm" svg:x="15.15cm" svg:y="12.95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9" draw:layer="layout" svg:width="0.7cm" svg:height="0.4cm" svg:x="15.15cm" svg:y="12.55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9" draw:layer="layout" svg:width="0.7cm" svg:height="0.5cm" svg:x="15.15cm" svg:y="12.05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9" draw:layer="layout" svg:width="0.65cm" svg:height="0.4cm" svg:x="15.2cm" svg:y="11.15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9" draw:layer="layout" svg:width="0.7cm" svg:height="0.5cm" svg:x="15.15cm" svg:y="11.55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" draw:layer="layout" svg:width="0.6cm" svg:height="0.7cm" svg:x="16.1cm" svg:y="14.25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9" draw:layer="layout" svg:width="0.55cm" svg:height="0.45cm" svg:x="16.15cm" svg:y="13.8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3cm" svg:x="16.2cm" svg:y="13.35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2cm" svg:x="16.2cm" svg:y="13.58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" draw:layer="layout" svg:width="0.5cm" svg:height="0.67cm" svg:x="16.2cm" svg:y="12.68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" draw:layer="layout" svg:width="0.35cm" svg:height="0.67cm" svg:x="15.85cm" svg:y="12.68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" draw:layer="layout" svg:width="0.85cm" svg:height="0.6cm" svg:x="15.85cm" svg:y="11.95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9" draw:layer="layout" svg:width="0.85cm" svg:height="1.6cm" svg:x="15.85cm" svg:y="10.35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9" draw:layer="layout" svg:width="1.2cm" svg:height="1.6cm" svg:x="16.7cm" svg:y="10.35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9" draw:layer="layout" svg:width="0.45cm" svg:height="0.8cm" svg:x="16.9cm" svg:y="11.95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45cm" svg:height="0.4cm" svg:x="17.35cm" svg:y="11.95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45cm" svg:height="0.4cm" svg:x="17.35cm" svg:y="12.35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9" draw:layer="layout" svg:width="0.85cm" svg:height="0.8cm" svg:x="16.9cm" svg:y="12.75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9" draw:layer="layout" svg:width="0.8cm" svg:height="1.4cm" svg:x="16.9cm" svg:y="13.55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20" draw:layer="layout" svg:width="0.8cm" svg:height="1.35cm" svg:x="18.05cm" svg:y="1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9" draw:layer="layout" svg:width="0.8cm" svg:height="0.6cm" svg:x="18.05cm" svg:y="11.7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9" draw:layer="layout" svg:width="1.65cm" svg:height="1.8cm" svg:x="18cm" svg:y="12.3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9" draw:layer="layout" svg:width="0.75cm" svg:height="0.9cm" svg:x="17.9cm" svg:y="14.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8.65cm" svg:y="14.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9.15cm" svg:y="14.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9" draw:layer="layout" svg:width="0.85cm" svg:height="1.15cm" svg:x="19.65cm" svg:y="13.85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9" draw:layer="layout" svg:width="0.8cm" svg:height="1.15cm" svg:x="20.5cm" svg:y="13.85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9" draw:layer="layout" svg:width="1.7cm" svg:height="0.9cm" svg:x="19.65cm" svg:y="12.95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9" draw:layer="layout" svg:width="1.7cm" svg:height="0.65cm" svg:x="19.65cm" svg:y="12.3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9" draw:layer="layout" svg:width="0.7cm" svg:height="1.6cm" svg:x="20.8cm" svg:y="10.15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9" draw:layer="layout" svg:width="0.85cm" svg:height="1.6cm" svg:x="19.75cm" svg:y="10.15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0.6cm" svg:y1="10.15cm" svg:x2="20.8cm" svg:y2="10.15cm">
          <text:p/>
        </draw:line>
        <draw:custom-shape draw:style-name="gr268" draw:text-style-name="P9" draw:layer="layout" svg:width="0.9cm" svg:height="2.15cm" svg:x="18.85cm" svg:y="10.15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1.45cm" svg:y1="12.309cm" svg:x2="21.45cm" svg:y2="11.75cm">
          <text:p/>
        </draw:line>
        <draw:line draw:style-name="gr225" draw:text-style-name="P12" draw:layer="layout" svg:x1="21.45cm" svg:y1="12.3cm" svg:x2="21.35cm" svg:y2="12.3cm">
          <text:p/>
        </draw:line>
        <draw:frame draw:style-name="gr269" draw:text-style-name="P13" draw:layer="layout" svg:width="1cm" svg:height="0.489cm" svg:x="20.25cm" svg:y="11.711cm">
          <draw:text-box>
            <text:p><text:span text:style-name="T4">154</text:span></text:p>
          </draw:text-box>
        </draw:frame>
        <draw:line draw:style-name="gr225" draw:text-style-name="P12" draw:layer="layout" svg:x1="18.85cm" svg:y1="10.35cm" svg:x2="18.05cm" svg:y2="10.35cm">
          <text:p/>
        </draw:line>
        <draw:line draw:style-name="gr225" draw:text-style-name="P12" draw:layer="layout" svg:x1="18.05cm" svg:y1="10.35cm" svg:x2="18.05cm" svg:y2="11.75cm">
          <text:p/>
        </draw:line>
        <draw:line draw:style-name="gr225" draw:text-style-name="P12" draw:layer="layout" svg:x1="18.85cm" svg:y1="10.35cm" svg:x2="18.85cm" svg:y2="10.15cm">
          <text:p/>
        </draw:line>
        <draw:line draw:style-name="gr225" draw:text-style-name="P12" draw:layer="layout" svg:x1="19.75cm" svg:y1="11.75cm" svg:x2="19.75cm" svg:y2="12.3cm">
          <text:p/>
        </draw:line>
        <draw:line draw:style-name="gr225" draw:text-style-name="P12" draw:layer="layout" svg:x1="18.85cm" svg:y1="10.15cm" svg:x2="19.75cm" svg:y2="10.15cm">
          <text:p/>
        </draw:line>
        <draw:custom-shape draw:style-name="gr270" draw:text-style-name="P21" draw:layer="layout" svg:width="0.65cm" svg:height="0.35cm" svg:x="20.65cm" svg:y="1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21.75cm" svg:y="10.25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9" draw:layer="layout" svg:width="0.5cm" svg:height="0.55cm" svg:x="21.75cm" svg:y="10.75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9" draw:layer="layout" svg:width="0.9cm" svg:height="0.4cm" svg:x="21.75cm" svg:y="11.3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9" draw:layer="layout" svg:width="0.95cm" svg:height="0.8cm" svg:x="21.7cm" svg:y="11.7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" draw:layer="layout" svg:width="1.5cm" svg:height="0.5cm" svg:x="21.65cm" svg:y="12.5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" draw:layer="layout" svg:width="1.5cm" svg:height="0.8cm" svg:x="21.55cm" svg:y="13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9" draw:layer="layout" svg:width="0.9cm" svg:height="0.7cm" svg:x="21.5cm" svg:y="13.8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45cm" svg:height="0.5cm" svg:x="21.5cm" svg:y="14.5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45cm" svg:height="0.5cm" svg:x="21.95cm" svg:y="14.5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9" draw:layer="layout" svg:width="0.7cm" svg:height="1.2cm" svg:x="22.4cm" svg:y="13.8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22" draw:layer="layout" svg:width="0.75cm" svg:height="1.2cm" svg:x="23.1cm" svg:y="13.8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9" draw:layer="layout" svg:width="0.9cm" svg:height="0.8cm" svg:x="23.05cm" svg:y="13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9" draw:layer="layout" svg:width="0.85cm" svg:height="0.5cm" svg:x="23.15cm" svg:y="12.5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9" draw:layer="layout" svg:width="1.4cm" svg:height="0.55cm" svg:x="22.65cm" svg:y="11.95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9" draw:layer="layout" svg:width="1cm" svg:height="0.5cm" svg:x="23.1cm" svg:y="11.45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9" draw:layer="layout" svg:width="0.7cm" svg:height="1.1cm" svg:x="23.5cm" svg:y="10.35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24" draw:layer="layout" svg:width="0.3cm" svg:height="0.55cm" svg:x="23.2cm" svg:y="10.3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9" draw:layer="layout" svg:width="0.45cm" svg:height="1.7cm" svg:x="22.65cm" svg:y="10.25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9" draw:layer="layout" svg:width="0.4cm" svg:height="1.05cm" svg:x="22.25cm" svg:y="10.25cm">
          <text:p text:style-name="P8"><text:span text:style-name="T4">175</text:span></text:p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3.1cm" svg:y1="10.25cm" svg:x2="23.1cm" svg:y2="10.25cm">
          <text:p/>
        </draw:line>
        <draw:line draw:style-name="gr225" draw:text-style-name="P12" draw:layer="layout" svg:x1="23.1cm" svg:y1="10.25cm" svg:x2="23.2cm" svg:y2="10.25cm">
          <text:p/>
        </draw:line>
        <draw:line draw:style-name="gr286" draw:text-style-name="P12" draw:layer="layout" svg:x1="23.2cm" svg:y1="10.25cm" svg:x2="23.2cm" svg:y2="10.25cm">
          <text:p/>
        </draw:line>
        <draw:line draw:style-name="gr225" draw:text-style-name="P12" draw:layer="layout" svg:x1="23.2cm" svg:y1="10.25cm" svg:x2="23.2cm" svg:y2="10.3cm">
          <text:p/>
        </draw:line>
        <draw:frame draw:style-name="gr287" draw:text-style-name="P13" draw:layer="layout" svg:width="1.12cm" svg:height="0.5cm" svg:x="22.88cm" svg:y="10.95cm">
          <draw:text-box>
            <text:p><text:span text:style-name="T4">173</text:span></text:p>
          </draw:text-box>
        </draw:frame>
        <draw:custom-shape draw:style-name="gr235" draw:text-style-name="P24" draw:layer="layout" svg:width="0.35cm" svg:height="0.7cm" svg:x="24.35cm" svg:y="10.45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24" draw:layer="layout" svg:width="0.35cm" svg:height="0.7cm" svg:x="24.7cm" svg:y="10.45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27" draw:layer="layout" svg:width="1.15cm" svg:height="1.25cm" svg:x="24.35cm" svg:y="10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6" draw:text-style-name="P13" draw:layer="layout" svg:width="1.25cm" svg:height="0.727cm" svg:x="24.5cm" svg:y="11.2cm">
          <draw:text-box>
            <text:p><text:span text:style-name="T4">177(3)</text:span></text:p>
          </draw:text-box>
        </draw:frame>
        <draw:custom-shape draw:style-name="gr289" draw:text-style-name="P9" draw:layer="layout" svg:width="1.1cm" svg:height="1.15cm" svg:x="25.5cm" svg:y="10.55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4.35cm" svg:y1="11.7cm" svg:x2="24.1cm" svg:y2="14.4cm">
          <text:p/>
        </draw:line>
        <draw:custom-shape draw:style-name="gr290" draw:text-style-name="P22" draw:layer="layout" svg:width="1cm" svg:height="0.8cm" svg:x="24.1cm" svg:y="14.4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9" draw:layer="layout" svg:width="0.3cm" svg:height="0.8cm" svg:x="25.1cm" svg:y="14.4cm">
          <text:p text:style-name="P28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9" draw:layer="layout" svg:width="0.3cm" svg:height="0.8cm" svg:x="25.4cm" svg:y="14.4cm">
          <text:p text:style-name="P28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9" draw:layer="layout" svg:width="0.3cm" svg:height="0.8cm" svg:x="25.7cm" svg:y="14.4cm">
          <text:p text:style-name="P28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9" draw:layer="layout" svg:width="0.75cm" svg:height="0.8cm" svg:x="26cm" svg:y="14.4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30" draw:layer="layout" svg:width="1cm" svg:height="1cm" svg:x="25.2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12" draw:layer="layout" svg:x1="25.5cm" svg:y1="13.2cm" svg:x2="25.5cm" svg:y2="13.95cm">
          <text:p/>
        </draw:line>
        <draw:line draw:style-name="gr292" draw:text-style-name="P12" draw:layer="layout" svg:x1="25.75cm" svg:y1="13.45cm" svg:x2="25.75cm" svg:y2="13.95cm">
          <text:p/>
        </draw:line>
        <draw:line draw:style-name="gr292" draw:text-style-name="P12" draw:layer="layout" svg:x1="26cm" svg:y1="13.2cm" svg:x2="26cm" svg:y2="13.95cm">
          <text:p/>
        </draw:line>
        <draw:frame draw:style-name="gr287" draw:text-style-name="P13" draw:layer="layout" svg:width="1cm" svg:height="0.5cm" svg:x="25.25cm" svg:y="12.7cm">
          <draw:text-box>
            <text:p><text:span text:style-name="T4">185</text:span></text:p>
          </draw:text-box>
        </draw:frame>
        <draw:frame draw:style-name="gr293" draw:text-style-name="P32" draw:layer="layout" svg:width="1.061cm" svg:height="0.727cm" svg:x="24.439cm" svg:y="13.223cm">
          <draw:text-box>
            <text:p text:style-name="P31"><text:span text:style-name="T4">Water</text:span><text:span text:style-name="T4"><text:line-break/></text:span><text:span text:style-name="T4">Tank</text:span></text:p>
          </draw:text-box>
        </draw:frame>
        <draw:line draw:style-name="gr225" draw:text-style-name="P12" draw:layer="layout" svg:x1="26.6cm" svg:y1="11.7cm" svg:x2="26.35cm" svg:y2="14.4cm">
          <text:p/>
        </draw:line>
        <draw:custom-shape draw:style-name="gr294" draw:text-style-name="P21" draw:layer="layout" svg:width="0.25cm" svg:height="0.45cm" svg:x="9cm" svg:y="1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1" draw:layer="layout" svg:width="0.25cm" svg:height="0.25cm" svg:x="9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33" draw:layer="layout" svg:width="0.25cm" svg:height="0.5cm" svg:x="9cm" svg:y="10.2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2.45cm" svg:y1="10.864cm" svg:x2="22.35cm" svg:y2="10.978cm">
          <text:p/>
        </draw:line>
        <draw:line draw:style-name="gr225" draw:text-style-name="P12" draw:layer="layout" svg:x1="22.45cm" svg:y1="10.864cm" svg:x2="22.55cm" svg:y2="10.978cm">
          <text:p/>
        </draw:line>
        <draw:line draw:style-name="gr225" draw:text-style-name="P12" draw:layer="layout" svg:x1="22.39cm" svg:y1="10.933cm" svg:x2="22.51cm" svg:y2="10.933cm">
          <text:p/>
        </draw:line>
        <draw:line draw:style-name="gr225" draw:text-style-name="P12" draw:layer="layout" svg:x1="22.35cm" svg:y1="10.979cm" svg:x2="22.55cm" svg:y2="10.979cm">
          <text:p/>
        </draw:line>
        <draw:line draw:style-name="gr225" draw:text-style-name="P12" draw:layer="layout" svg:x1="22.35cm" svg:y1="10.979cm" svg:x2="22.35cm" svg:y2="11.15cm">
          <text:p/>
        </draw:line>
        <draw:line draw:style-name="gr225" draw:text-style-name="P12" draw:layer="layout" svg:x1="22.55cm" svg:y1="10.979cm" svg:x2="22.55cm" svg:y2="11.15cm">
          <text:p/>
        </draw:line>
        <draw:line draw:style-name="gr225" draw:text-style-name="P12" draw:layer="layout" svg:x1="22.35cm" svg:y1="11.15cm" svg:x2="22.55cm" svg:y2="11.15cm">
          <text:p/>
        </draw:line>
        <draw:line draw:style-name="gr225" draw:text-style-name="P12" draw:layer="layout" svg:x1="22.4cm" svg:y1="11.15cm" svg:x2="22.4cm" svg:y2="11.036cm">
          <text:p/>
        </draw:line>
        <draw:line draw:style-name="gr225" draw:text-style-name="P12" draw:layer="layout" svg:x1="22.4cm" svg:y1="11.036cm" svg:x2="22.5cm" svg:y2="11.036cm">
          <text:p/>
        </draw:line>
        <draw:line draw:style-name="gr225" draw:text-style-name="P12" draw:layer="layout" svg:x1="22.5cm" svg:y1="11.036cm" svg:x2="22.5cm" svg:y2="11.15cm">
          <text:p/>
        </draw:line>
        <draw:line draw:style-name="gr225" draw:text-style-name="P12" draw:layer="layout" svg:x1="22.45cm" svg:y1="10.864cm" svg:x2="22.45cm" svg:y2="10.75cm">
          <text:p/>
        </draw:line>
        <draw:line draw:style-name="gr225" draw:text-style-name="P12" draw:layer="layout" svg:x1="22.45cm" svg:y1="10.75cm" svg:x2="22.55cm" svg:y2="10.75cm">
          <text:p/>
        </draw:line>
        <draw:line draw:style-name="gr225" draw:text-style-name="P12" draw:layer="layout" svg:x1="22.55cm" svg:y1="10.75cm" svg:x2="22.45cm" svg:y2="10.807cm">
          <text:p/>
        </draw:line>
        <draw:custom-shape draw:style-name="gr297" draw:text-style-name="P9" draw:layer="layout" svg:width="1.05cm" svg:height="0.45cm" svg:x="15.15cm" svg:y="13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8" draw:text-style-name="P12" draw:layer="layout" svg:x1="2.75cm" svg:y1="14.95cm" svg:x2="10.25cm" svg:y2="12.95cm">
          <text:p/>
        </draw:line>
        <draw:line draw:style-name="gr298" draw:text-style-name="P12" draw:layer="layout" svg:x1="2.75cm" svg:y1="14.95cm" svg:x2="2.75cm" svg:y2="9.45cm">
          <text:p/>
        </draw:line>
        <draw:line draw:style-name="gr298" draw:text-style-name="P12" draw:layer="layout" svg:x1="2.75cm" svg:y1="9.45cm" svg:x2="8.5cm" svg:y2="9.95cm">
          <text:p/>
        </draw:line>
        <draw:line draw:style-name="gr298" draw:text-style-name="P12" draw:layer="layout" svg:x1="8.75cm" svg:y1="9.95cm" svg:x2="19.5cm" svg:y2="9.95cm">
          <text:p/>
        </draw:line>
        <draw:line draw:style-name="gr298" draw:text-style-name="P12" draw:layer="layout" svg:x1="10.25cm" svg:y1="12.95cm" svg:x2="10.25cm" svg:y2="15.2cm">
          <text:p/>
        </draw:line>
        <draw:line draw:style-name="gr298" draw:text-style-name="P12" draw:layer="layout" svg:x1="10.25cm" svg:y1="15.2cm" svg:x2="27.5cm" svg:y2="15.45cm">
          <text:p/>
        </draw:line>
        <draw:line draw:style-name="gr298" draw:text-style-name="P12" draw:layer="layout" svg:x1="27.5cm" svg:y1="10.2cm" svg:x2="27.5cm" svg:y2="15.45cm">
          <text:p/>
        </draw:line>
        <draw:line draw:style-name="gr298" draw:text-style-name="P12" draw:layer="layout" svg:x1="19.75cm" svg:y1="9.95cm" svg:x2="23.5cm" svg:y2="9.95cm">
          <text:p/>
        </draw:line>
        <draw:line draw:style-name="gr298" draw:text-style-name="P12" draw:layer="layout" svg:x1="23.5cm" svg:y1="9.95cm" svg:x2="27.5cm" svg:y2="10.2cm">
          <text:p/>
        </draw:line>
        <draw:line draw:style-name="gr225" draw:text-style-name="P12" draw:layer="layout" svg:x1="28.2cm" svg:y1="8.95cm" svg:x2="28.2cm" svg:y2="16.45cm">
          <text:p/>
        </draw:line>
        <draw:line draw:style-name="gr225" draw:text-style-name="P12" draw:layer="layout" svg:x1="27cm" svg:y1="8.95cm" svg:x2="27cm" svg:y2="9.95cm">
          <text:p/>
        </draw:line>
        <draw:line draw:style-name="gr225" draw:text-style-name="P12" draw:layer="layout" svg:x1="24.25cm" svg:y1="9.7cm" svg:x2="27cm" svg:y2="9.95cm">
          <text:p/>
        </draw:line>
        <draw:line draw:style-name="gr225" draw:text-style-name="P12" draw:layer="layout" svg:x1="20cm" svg:y1="9.7cm" svg:x2="21.5cm" svg:y2="9.7cm">
          <text:p/>
        </draw:line>
        <draw:line draw:style-name="gr225" draw:text-style-name="P12" draw:layer="layout" svg:x1="13.25cm" svg:y1="9.7cm" svg:x2="16.25cm" svg:y2="9.7cm">
          <text:p/>
        </draw:line>
        <draw:line draw:style-name="gr225" draw:text-style-name="P12" draw:layer="layout" svg:x1="3cm" svg:y1="9.2cm" svg:x2="4.75cm" svg:y2="9.45cm">
          <text:p/>
        </draw:line>
        <draw:line draw:style-name="gr225" draw:text-style-name="P12" draw:layer="layout" svg:x1="2.25cm" svg:y1="12.45cm" svg:x2="2.25cm" svg:y2="8.95cm">
          <text:p/>
        </draw:line>
        <draw:line draw:style-name="gr225" draw:text-style-name="P12" draw:layer="layout" svg:x1="3cm" svg:y1="8.95cm" svg:x2="3cm" svg:y2="9.2cm">
          <text:p/>
        </draw:line>
        <draw:line draw:style-name="gr225" draw:text-style-name="P12" draw:layer="layout" svg:x1="2.75cm" svg:y1="15.2cm" svg:x2="2.75cm" svg:y2="16.45cm">
          <text:p/>
        </draw:line>
        <draw:line draw:style-name="gr225" draw:text-style-name="P12" draw:layer="layout" svg:x1="2.75cm" svg:y1="15.2cm" svg:x2="10cm" svg:y2="13.2cm">
          <text:p/>
        </draw:line>
        <draw:line draw:style-name="gr225" draw:text-style-name="P12" draw:layer="layout" svg:x1="10cm" svg:y1="13.2cm" svg:x2="10cm" svg:y2="13.95cm">
          <text:p/>
        </draw:line>
        <draw:line draw:style-name="gr225" draw:text-style-name="P12" draw:layer="layout" svg:x1="10cm" svg:y1="15.45cm" svg:x2="9.5cm" svg:y2="16.45cm">
          <text:p/>
        </draw:line>
        <draw:line draw:style-name="gr225" draw:text-style-name="P12" draw:layer="layout" svg:x1="10cm" svg:y1="16.45cm" svg:x2="10.5cm" svg:y2="15.45cm">
          <text:p/>
        </draw:line>
        <draw:line draw:style-name="gr225" draw:text-style-name="P12" draw:layer="layout" svg:x1="10.5cm" svg:y1="15.45cm" svg:x2="13cm" svg:y2="15.45cm">
          <text:p/>
        </draw:line>
        <draw:line draw:style-name="gr225" draw:text-style-name="P12" draw:layer="layout" svg:x1="23.5cm" svg:y1="15.7cm" svg:x2="26.75cm" svg:y2="15.7cm">
          <text:p/>
        </draw:line>
        <draw:line draw:style-name="gr225" draw:text-style-name="P12" draw:layer="layout" svg:x1="26.75cm" svg:y1="16.45cm" svg:x2="26.75cm" svg:y2="15.7cm">
          <text:p/>
        </draw:line>
        <draw:line draw:style-name="gr225" draw:text-style-name="P12" draw:layer="layout" svg:x1="4.75cm" svg:y1="9.45cm" svg:x2="4.75cm" svg:y2="8.95cm">
          <text:p/>
        </draw:line>
        <draw:line draw:style-name="gr225" draw:text-style-name="P12" draw:layer="layout" svg:x1="5.25cm" svg:y1="8.95cm" svg:x2="5.25cm" svg:y2="9.45cm">
          <text:p/>
        </draw:line>
        <draw:line draw:style-name="gr225" draw:text-style-name="P12" draw:layer="layout" svg:x1="5.25cm" svg:y1="9.45cm" svg:x2="6.5cm" svg:y2="9.7cm">
          <text:p/>
        </draw:line>
        <draw:line draw:style-name="gr225" draw:text-style-name="P12" draw:layer="layout" svg:x1="6.5cm" svg:y1="8.95cm" svg:x2="6.5cm" svg:y2="9.7cm">
          <text:p/>
        </draw:line>
        <draw:line draw:style-name="gr225" draw:text-style-name="P12" draw:layer="layout" svg:x1="7cm" svg:y1="9.7cm" svg:x2="7cm" svg:y2="8.95cm">
          <text:p/>
        </draw:line>
        <draw:line draw:style-name="gr225" draw:text-style-name="P12" draw:layer="layout" svg:x1="7cm" svg:y1="9.7cm" svg:x2="8.75cm" svg:y2="9.7cm">
          <text:p/>
        </draw:line>
        <draw:line draw:style-name="gr225" draw:text-style-name="P12" draw:layer="layout" svg:x1="8.75cm" svg:y1="9.7cm" svg:x2="8.75cm" svg:y2="8.95cm">
          <text:p/>
        </draw:line>
        <draw:line draw:style-name="gr225" draw:text-style-name="P12" draw:layer="layout" svg:x1="9cm" svg:y1="8.95cm" svg:x2="9cm" svg:y2="9.7cm">
          <text:p/>
        </draw:line>
        <draw:line draw:style-name="gr225" draw:text-style-name="P12" draw:layer="layout" svg:x1="9cm" svg:y1="9.7cm" svg:x2="10.25cm" svg:y2="9.7cm">
          <text:p/>
        </draw:line>
        <draw:line draw:style-name="gr225" draw:text-style-name="P12" draw:layer="layout" svg:x1="10.25cm" svg:y1="8.95cm" svg:x2="10.25cm" svg:y2="9.7cm">
          <text:p/>
        </draw:line>
        <draw:line draw:style-name="gr225" draw:text-style-name="P12" draw:layer="layout" svg:x1="10.5cm" svg:y1="9.7cm" svg:x2="10.5cm" svg:y2="8.95cm">
          <text:p/>
        </draw:line>
        <draw:line draw:style-name="gr225" draw:text-style-name="P12" draw:layer="layout" svg:x1="10.5cm" svg:y1="9.7cm" svg:x2="13cm" svg:y2="9.7cm">
          <text:p/>
        </draw:line>
        <draw:line draw:style-name="gr225" draw:text-style-name="P12" draw:layer="layout" svg:x1="13cm" svg:y1="9.7cm" svg:x2="13cm" svg:y2="8.95cm">
          <text:p/>
        </draw:line>
        <draw:line draw:style-name="gr225" draw:text-style-name="P12" draw:layer="layout" svg:x1="13.25cm" svg:y1="9.7cm" svg:x2="13.25cm" svg:y2="8.95cm">
          <text:p/>
        </draw:line>
        <draw:line draw:style-name="gr225" draw:text-style-name="P12" draw:layer="layout" svg:x1="16.25cm" svg:y1="8.95cm" svg:x2="16.25cm" svg:y2="9.7cm">
          <text:p/>
        </draw:line>
        <draw:line draw:style-name="gr225" draw:text-style-name="P12" draw:layer="layout" svg:x1="16.5cm" svg:y1="8.95cm" svg:x2="16.5cm" svg:y2="9.7cm">
          <text:p/>
        </draw:line>
        <draw:line draw:style-name="gr225" draw:text-style-name="P12" draw:layer="layout" svg:x1="16.5cm" svg:y1="9.7cm" svg:x2="19.75cm" svg:y2="9.7cm">
          <text:p/>
        </draw:line>
        <draw:line draw:style-name="gr225" draw:text-style-name="P12" draw:layer="layout" svg:x1="19.75cm" svg:y1="8.95cm" svg:x2="19.75cm" svg:y2="9.7cm">
          <text:p/>
        </draw:line>
        <draw:line draw:style-name="gr225" draw:text-style-name="P12" draw:layer="layout" svg:x1="20cm" svg:y1="8.95cm" svg:x2="20cm" svg:y2="9.7cm">
          <text:p/>
        </draw:line>
        <draw:line draw:style-name="gr225" draw:text-style-name="P12" draw:layer="layout" svg:x1="21.5cm" svg:y1="8.95cm" svg:x2="21.5cm" svg:y2="9.7cm">
          <text:p/>
        </draw:line>
        <draw:line draw:style-name="gr225" draw:text-style-name="P12" draw:layer="layout" svg:x1="21.75cm" svg:y1="9.7cm" svg:x2="21.75cm" svg:y2="8.95cm">
          <text:p/>
        </draw:line>
        <draw:line draw:style-name="gr225" draw:text-style-name="P12" draw:layer="layout" svg:x1="21.75cm" svg:y1="9.7cm" svg:x2="24cm" svg:y2="9.7cm">
          <text:p/>
        </draw:line>
        <draw:line draw:style-name="gr225" draw:text-style-name="P12" draw:layer="layout" svg:x1="24.25cm" svg:y1="8.95cm" svg:x2="24.25cm" svg:y2="9.7cm">
          <text:p/>
        </draw:line>
        <draw:line draw:style-name="gr225" draw:text-style-name="P12" draw:layer="layout" svg:x1="24cm" svg:y1="8.95cm" svg:x2="24cm" svg:y2="9.7cm">
          <text:p/>
        </draw:line>
        <draw:line draw:style-name="gr225" draw:text-style-name="P12" draw:layer="layout" svg:x1="3.25cm" svg:y1="15.7cm" svg:x2="10cm" svg:y2="13.95cm">
          <text:p/>
        </draw:line>
        <draw:line draw:style-name="gr225" draw:text-style-name="P12" draw:layer="layout" svg:x1="10cm" svg:y1="15.45cm" svg:x2="10cm" svg:y2="14.2cm">
          <text:p/>
        </draw:line>
        <draw:line draw:style-name="gr225" draw:text-style-name="P12" draw:layer="layout" svg:x1="3.25cm" svg:y1="15.7cm" svg:x2="3.25cm" svg:y2="16.45cm">
          <text:p/>
        </draw:line>
        <draw:line draw:style-name="gr225" draw:text-style-name="P12" draw:layer="layout" svg:x1="3.5cm" svg:y1="15.95cm" svg:x2="8.25cm" svg:y2="14.7cm">
          <text:p/>
        </draw:line>
        <draw:line draw:style-name="gr225" draw:text-style-name="P12" draw:layer="layout" svg:x1="3.5cm" svg:y1="15.95cm" svg:x2="3.5cm" svg:y2="16.45cm">
          <text:p/>
        </draw:line>
        <draw:line draw:style-name="gr225" draw:text-style-name="P12" draw:layer="layout" svg:x1="8.75cm" svg:y1="14.7cm" svg:x2="10cm" svg:y2="14.2cm">
          <text:p/>
        </draw:line>
        <draw:line draw:style-name="gr225" draw:text-style-name="P12" draw:layer="layout" svg:x1="7.25cm" svg:y1="16.45cm" svg:x2="8.25cm" svg:y2="14.7cm">
          <text:p/>
        </draw:line>
        <draw:line draw:style-name="gr225" draw:text-style-name="P12" draw:layer="layout" svg:x1="8.75cm" svg:y1="14.7cm" svg:x2="7.75cm" svg:y2="16.45cm">
          <text:p/>
        </draw:line>
        <draw:line draw:style-name="gr225" draw:text-style-name="P12" draw:layer="layout" svg:x1="3.5cm" svg:y1="16.45cm" svg:x2="7.25cm" svg:y2="16.45cm">
          <text:p/>
        </draw:line>
        <draw:frame draw:style-name="gr299" draw:text-style-name="P35" draw:layer="layout" svg:width="2.75cm" svg:height="1.039cm" draw:transform="rotate (0.349065850398866) translate (0.881cm 13.07cm)">
          <draw:text-box>
            <text:p text:style-name="P34"><text:span text:style-name="T12">Patel </text:span></text:p>
          </draw:text-box>
        </draw:frame>
        <draw:frame draw:style-name="gr300" draw:text-style-name="P37" draw:layer="layout" svg:width="2.392cm" svg:height="0.569cm" draw:transform="rotate (0.244346095279206) translate (6cm 14.898cm)">
          <draw:text-box>
            <text:p text:style-name="P36"><text:span text:style-name="T4">Bhutani Road</text:span></text:p>
          </draw:text-box>
        </draw:frame>
        <draw:frame draw:style-name="gr301" draw:text-style-name="P39" draw:layer="layout" svg:width="6cm" svg:height="1.433cm" draw:transform="rotate (1.5707963267949) translate (27cm 15.95cm)">
          <draw:text-box>
            <text:p text:style-name="P38"><text:span text:style-name="T12">Mahila ITI College Road</text:span></text:p>
            <text:p text:style-name="P38"><text:span text:style-name="T12">Vallabh Garden Road</text:span><text:span text:style-name="T12"><text:line-break/></text:span><text:span text:style-name="T12"/></text:p>
          </draw:text-box>
        </draw:frame>
        <draw:line draw:style-name="gr225" draw:text-style-name="P12" draw:layer="layout" svg:x1="2.25cm" svg:y1="12.45cm" svg:x2="0.5cm" svg:y2="13.2cm">
          <text:p/>
        </draw:line>
        <draw:line draw:style-name="gr225" draw:text-style-name="P12" draw:layer="layout" svg:x1="2.25cm" svg:y1="13.2cm" svg:x2="0.5cm" svg:y2="13.95cm">
          <text:p/>
        </draw:line>
        <draw:line draw:style-name="gr225" draw:text-style-name="P12" draw:layer="layout" svg:x1="2.5cm" svg:y1="14.7cm" svg:x2="2.5cm" svg:y2="16.45cm">
          <text:p/>
        </draw:line>
        <draw:line draw:style-name="gr225" draw:text-style-name="P12" draw:layer="layout" svg:x1="2.5cm" svg:y1="14.7cm" svg:x2="2.25cm" svg:y2="13.2cm">
          <text:p/>
        </draw:line>
        <draw:frame draw:style-name="gr299" draw:text-style-name="P35" draw:layer="layout" svg:width="2.75cm" svg:height="1.039cm" draw:transform="rotate (1.5707963267949) translate (2.211cm 12.2cm)">
          <draw:text-box>
            <text:p text:style-name="P34"><text:span text:style-name="T12">Main Road</text:span></text:p>
          </draw:text-box>
        </draw:frame>
        <draw:frame draw:style-name="gr299" draw:text-style-name="P35" draw:layer="layout" svg:width="1.949cm" svg:height="1.039cm" draw:transform="rotate (1.0471975511966) translate (1.7cm 13.038cm)">
          <draw:text-box>
            <text:p text:style-name="P34"><text:span text:style-name="T12">Nagar</text:span></text:p>
          </draw:text-box>
        </draw:frame>
        <draw:frame draw:style-name="gr299" draw:text-style-name="P41" draw:layer="layout" svg:width="1.25cm" svg:height="1.039cm" svg:x="21.8cm" svg:y="8.5cm">
          <draw:text-box>
            <text:p text:style-name="P40"><text:span text:style-name="T4">Arya Samaj Temple</text:span></text:p>
          </draw:text-box>
        </draw:frame>
        <draw:line draw:style-name="gr302" draw:text-style-name="P12" draw:layer="layout" svg:x1="22.45cm" svg:y1="9.35cm" svg:x2="22.45cm" svg:y2="10.35cm">
          <text:p/>
        </draw:line>
        <draw:frame draw:style-name="gr299" draw:text-style-name="P35" draw:layer="layout" svg:width="2.75cm" svg:height="1.039cm" svg:x="5cm" svg:y="15.662cm">
          <draw:text-box>
            <text:p text:style-name="P34"><text:span text:style-name="T12">Nehru Park</text:span></text:p>
          </draw:text-box>
        </draw:frame>
        <draw:line draw:style-name="gr225" draw:text-style-name="P12" draw:layer="layout" svg:x1="13cm" svg:y1="15.45cm" svg:x2="13cm" svg:y2="16.45cm">
          <text:p/>
        </draw:line>
        <draw:line draw:style-name="gr225" draw:text-style-name="P12" draw:layer="layout" svg:x1="13.25cm" svg:y1="16.45cm" svg:x2="13.25cm" svg:y2="15.45cm">
          <text:p/>
        </draw:line>
        <draw:line draw:style-name="gr225" draw:text-style-name="P12" draw:layer="layout" svg:x1="13.25cm" svg:y1="15.45cm" svg:x2="17cm" svg:y2="15.7cm">
          <text:p/>
        </draw:line>
        <draw:line draw:style-name="gr225" draw:text-style-name="P12" draw:layer="layout" svg:x1="17cm" svg:y1="16.45cm" svg:x2="17cm" svg:y2="15.7cm">
          <text:p/>
        </draw:line>
        <draw:line draw:style-name="gr225" draw:text-style-name="P12" draw:layer="layout" svg:x1="17.25cm" svg:y1="16.45cm" svg:x2="17.25cm" svg:y2="15.7cm">
          <text:p/>
        </draw:line>
        <draw:line draw:style-name="gr225" draw:text-style-name="P12" draw:layer="layout" svg:x1="17.25cm" svg:y1="15.7cm" svg:x2="21.25cm" svg:y2="15.7cm">
          <text:p/>
        </draw:line>
        <draw:line draw:style-name="gr225" draw:text-style-name="P12" draw:layer="layout" svg:x1="21.25cm" svg:y1="16.45cm" svg:x2="21.25cm" svg:y2="15.7cm">
          <text:p/>
        </draw:line>
        <draw:line draw:style-name="gr225" draw:text-style-name="P12" draw:layer="layout" svg:x1="23.5cm" svg:y1="16.45cm" svg:x2="23.5cm" svg:y2="15.7cm">
          <text:p/>
        </draw:line>
        <draw:line draw:style-name="gr225" draw:text-style-name="P12" draw:layer="layout" svg:x1="21.5cm" svg:y1="15.7cm" svg:x2="21.5cm" svg:y2="16.45cm">
          <text:p/>
        </draw:line>
        <draw:line draw:style-name="gr225" draw:text-style-name="P12" draw:layer="layout" svg:x1="21.5cm" svg:y1="15.7cm" svg:x2="23.25cm" svg:y2="15.7cm">
          <text:p/>
        </draw:line>
        <draw:line draw:style-name="gr225" draw:text-style-name="P12" draw:layer="layout" svg:x1="23.25cm" svg:y1="16.45cm" svg:x2="23.25cm" svg:y2="15.7cm">
          <text:p/>
        </draw:line>
        <draw:line draw:style-name="gr303" draw:text-style-name="P12" draw:layer="layout" svg:x1="-0.75cm" svg:y1="8.5cm" svg:x2="31cm" svg:y2="8.5cm">
          <text:p/>
        </draw:line>
      </draw:page>
      <draw:page draw:name="page3" draw:style-name="dp1" draw:master-page-name="Default">
        <draw:frame draw:style-name="gr304" draw:text-style-name="P12" draw:layer="layout" svg:width="0.449cm" svg:height="0.499cm" svg:x="12cm" svg:y="19.501cm">
          <draw:image xlink:href="Pictures/1000000100001B68000013615805E82BD378D7C6.png" xlink:type="simple" xlink:show="embed" xlink:actuate="onLoad" draw:mime-type="image/png">
            <text:p/>
          </draw:image>
        </draw:frame>
        <draw:line draw:style-name="gr124" draw:text-style-name="P12" draw:layer="layout" svg:x1="1.3cm" svg:y1="1.343cm" svg:x2="1cm" svg:y2="1.686cm">
          <text:p/>
        </draw:line>
        <draw:line draw:style-name="gr124" draw:text-style-name="P12" draw:layer="layout" svg:x1="1.3cm" svg:y1="1.343cm" svg:x2="1.6cm" svg:y2="1.686cm">
          <text:p/>
        </draw:line>
        <draw:line draw:style-name="gr124" draw:text-style-name="P12" draw:layer="layout" svg:x1="1.12cm" svg:y1="1.549cm" svg:x2="1.48cm" svg:y2="1.549cm">
          <text:p/>
        </draw:line>
        <draw:line draw:style-name="gr124" draw:text-style-name="P12" draw:layer="layout" svg:x1="1cm" svg:y1="1.686cm" svg:x2="1.6cm" svg:y2="1.686cm">
          <text:p/>
        </draw:line>
        <draw:line draw:style-name="gr124" draw:text-style-name="P12" draw:layer="layout" svg:x1="1cm" svg:y1="1.686cm" svg:x2="1cm" svg:y2="2.2cm">
          <text:p/>
        </draw:line>
        <draw:line draw:style-name="gr124" draw:text-style-name="P12" draw:layer="layout" svg:x1="1.6cm" svg:y1="1.686cm" svg:x2="1.6cm" svg:y2="2.2cm">
          <text:p/>
        </draw:line>
        <draw:line draw:style-name="gr124" draw:text-style-name="P12" draw:layer="layout" svg:x1="1cm" svg:y1="2.2cm" svg:x2="1.6cm" svg:y2="2.2cm">
          <text:p/>
        </draw:line>
        <draw:line draw:style-name="gr124" draw:text-style-name="P12" draw:layer="layout" svg:x1="1.15cm" svg:y1="2.2cm" svg:x2="1.15cm" svg:y2="1.857cm">
          <text:p/>
        </draw:line>
        <draw:line draw:style-name="gr124" draw:text-style-name="P12" draw:layer="layout" svg:x1="1.15cm" svg:y1="1.857cm" svg:x2="1.45cm" svg:y2="1.857cm">
          <text:p/>
        </draw:line>
        <draw:line draw:style-name="gr124" draw:text-style-name="P12" draw:layer="layout" svg:x1="1.45cm" svg:y1="1.857cm" svg:x2="1.45cm" svg:y2="2.2cm">
          <text:p/>
        </draw:line>
        <draw:line draw:style-name="gr124" draw:text-style-name="P12" draw:layer="layout" svg:x1="1.3cm" svg:y1="1.343cm" svg:x2="1.3cm" svg:y2="1cm">
          <text:p/>
        </draw:line>
        <draw:line draw:style-name="gr124" draw:text-style-name="P12" draw:layer="layout" svg:x1="1.3cm" svg:y1="1cm" svg:x2="1.6cm" svg:y2="1cm">
          <text:p/>
        </draw:line>
        <draw:line draw:style-name="gr124" draw:text-style-name="P12" draw:layer="layout" svg:x1="1.6cm" svg:y1="1cm" svg:x2="1.3cm" svg:y2="1.17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hatch draw:name="Blue_20_45_20_Degrees_20_Crossed" draw:display-name="Blue 45 Degrees Crossed" draw:style="double" draw:color="#2a6099" draw:distance="0.203cm" draw:rotation="450"/>
    <draw:hatch draw:name="hat2" draw:style="single" draw:color="#2a6099" draw:distance="0.05cm" draw:rotation="450"/>
    <draw:hatch draw:name="hatx" draw:style="single" draw:color="#2a6099" draw:distance="0.02cm" draw:rotation="450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hatch" draw:fill-color="#729fcf" draw:fill-hatch-name="hat2" draw:fill-hatch-solid="false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20:42:00.028685528</meta:creation-date>
    <dc:date>2026-05-21T16:39:04.252311664</dc:date>
    <meta:editing-duration>PT15H14M6S</meta:editing-duration>
    <meta:editing-cycles>199</meta:editing-cycles>
    <meta:generator>LibreOffice/7.4.7.2$Linux_X86_64 LibreOffice_project/40$Build-2</meta:generator>
    <meta:document-statistic meta:object-count="1831"/>
  </office:meta>
</office:document-meta>
</file>