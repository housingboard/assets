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B68000013615805E82BD378D7C6.png" manifest:media-type="image/png"/>
  <manifest:file-entry manifest:full-path="Pictures/1000000100000001000000010A5CEE47C9EFD756.png" manifest:media-type="image/png"/>
  <manifest:file-entry manifest:full-path="Pictures/1000000100000633000004639FB41D6D4A77E559.png" manifest:media-type="image/png"/>
  <manifest:file-entry manifest:full-path="Pictures/10091AE60000A405000074113A7F337473AE9A3D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 style:protect="position size"/>
    </style:style>
    <style:style style:name="gr2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cm" fo:min-width="0.25cm"/>
      <style:paragraph-properties style:writing-mode="lr-tb"/>
    </style:style>
    <style:style style:name="gr3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.25cm" fo:min-width="0.2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/>
      <style:paragraph-properties style:writing-mode="lr-tb"/>
    </style:style>
    <style:style style:name="gr25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/>
      <style:paragraph-properties style:writing-mode="lr-tb"/>
    </style:style>
    <style:style style:name="gr30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/>
      <style:paragraph-properties style:writing-mode="lr-tb"/>
    </style:style>
    <style:style style:name="gr33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35cm" fo:min-width="0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/>
      <style:paragraph-properties style:writing-mode="lr-tb"/>
    </style:style>
    <style:style style:name="gr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/>
      <style:paragraph-properties style:writing-mode="lr-tb"/>
    </style:style>
    <style:style style:name="gr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/>
      <style:paragraph-properties style:writing-mode="lr-tb"/>
    </style:style>
    <style:style style:name="gr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/>
      <style:paragraph-properties style:writing-mode="lr-tb"/>
    </style:style>
    <style:style style:name="gr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/>
      <style:paragraph-properties style:writing-mode="lr-tb"/>
    </style:style>
    <style:style style:name="gr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/>
      <style:paragraph-properties style:writing-mode="lr-tb"/>
    </style:style>
    <style:style style:name="gr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/>
      <style:paragraph-properties style:writing-mode="lr-tb"/>
    </style:style>
    <style:style style:name="gr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/>
      <style:paragraph-properties style:writing-mode="lr-tb"/>
    </style:style>
    <style:style style:name="gr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/>
      <style:paragraph-properties style:writing-mode="lr-tb"/>
    </style:style>
    <style:style style:name="gr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/>
      <style:paragraph-properties style:writing-mode="lr-tb"/>
    </style:style>
    <style:style style:name="gr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/>
      <style:paragraph-properties style:writing-mode="lr-tb"/>
    </style:style>
    <style:style style:name="gr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/>
      <style:paragraph-properties style:writing-mode="lr-tb"/>
    </style:style>
    <style:style style:name="gr5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/>
      <style:paragraph-properties style:writing-mode="lr-tb"/>
    </style:style>
    <style:style style:name="gr56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/>
      <style:paragraph-properties style:writing-mode="lr-tb"/>
    </style:style>
    <style:style style:name="gr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/>
      <style:paragraph-properties style:writing-mode="lr-tb"/>
    </style:style>
    <style:style style:name="gr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/>
      <style:paragraph-properties style:writing-mode="lr-tb"/>
    </style:style>
    <style:style style:name="gr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/>
      <style:paragraph-properties style:writing-mode="lr-tb"/>
    </style:style>
    <style:style style:name="gr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/>
      <style:paragraph-properties style:writing-mode="lr-tb"/>
    </style:style>
    <style:style style:name="gr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/>
      <style:paragraph-properties style:writing-mode="lr-tb"/>
    </style:style>
    <style:style style:name="gr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/>
      <style:paragraph-properties style:writing-mode="lr-tb"/>
    </style:style>
    <style:style style:name="gr6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7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1cm" fo:min-width="0.15cm"/>
      <style:paragraph-properties style:writing-mode="lr-tb"/>
    </style:style>
    <style:style style:name="gr6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/>
      <style:paragraph-properties style:writing-mode="lr-tb"/>
    </style:style>
    <style:style style:name="gr6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/>
      <style:paragraph-properties style:writing-mode="lr-tb"/>
    </style:style>
    <style:style style:name="gr7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/>
      <style:paragraph-properties style:writing-mode="lr-tb"/>
    </style:style>
    <style:style style:name="gr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/>
      <style:paragraph-properties style:writing-mode="lr-tb"/>
    </style:style>
    <style:style style:name="gr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/>
      <style:paragraph-properties style:writing-mode="lr-tb"/>
    </style:style>
    <style:style style:name="gr7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/>
      <style:paragraph-properties style:writing-mode="lr-tb"/>
    </style:style>
    <style:style style:name="gr75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/>
      <style:paragraph-properties style:writing-mode="lr-tb"/>
    </style:style>
    <style:style style:name="gr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/>
      <style:paragraph-properties style:writing-mode="lr-tb"/>
    </style:style>
    <style:style style:name="gr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/>
      <style:paragraph-properties style:writing-mode="lr-tb"/>
    </style:style>
    <style:style style:name="gr7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/>
      <style:paragraph-properties style:writing-mode="lr-tb"/>
    </style:style>
    <style:style style:name="gr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/>
      <style:paragraph-properties style:writing-mode="lr-tb"/>
    </style:style>
    <style:style style:name="gr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/>
      <style:paragraph-properties style:writing-mode="lr-tb"/>
    </style:style>
    <style:style style:name="gr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/>
      <style:paragraph-properties style:writing-mode="lr-tb"/>
    </style:style>
    <style:style style:name="gr8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/>
      <style:paragraph-properties style:writing-mode="lr-tb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6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/>
      <style:paragraph-properties style:writing-mode="lr-tb"/>
    </style:style>
    <style:style style:name="gr8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/>
      <style:paragraph-properties style:writing-mode="lr-tb"/>
    </style:style>
    <style:style style:name="gr88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/>
      <style:paragraph-properties style:writing-mode="lr-tb"/>
    </style:style>
    <style:style style:name="gr89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58cm" fo:min-width="0.208cm" fo:padding-top="0.139cm" fo:padding-bottom="0.139cm" fo:padding-left="0.264cm" fo:padding-right="0.264cm"/>
    </style:style>
    <style:style style:name="gr9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/>
      <style:paragraph-properties style:writing-mode="lr-tb"/>
    </style:style>
    <style:style style:name="gr92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94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95" style:family="graphic" style:parent-style-name="standard">
      <style:graphic-properties draw:stroke="none" draw:fill="solid" draw:fill-color="#ffffff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solid" svg:stroke-width="0.017cm" svg:stroke-color="#000000" draw:stroke-linejoin="miter" svg:stroke-linecap="round" draw:fill="none" fo:padding-top="0.008cm" fo:padding-bottom="0.008cm" fo:padding-left="0.008cm" fo:padding-right="0.008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34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solid" draw:fill-color="#000000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966cm" fo:padding-top="0cm" fo:padding-bottom="0cm" fo:padding-left="0cm" fo:padding-right="0cm"/>
      <style:paragraph-properties style:writing-mode="lr-tb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7.319cm, 0cm)" draw:image-opacity="100%" style:mirror="non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7.292cm, 0cm, 6.744cm, 104.333cm)" draw:image-opacity="100%" style:mirror="none"/>
    </style:style>
    <style:style style:name="gr105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06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/>
    </style:style>
    <style:style style:name="gr107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P1" style:family="paragraph">
      <loext:graphic-properties draw:fill="none" draw:opacity="100%"/>
      <style:paragraph-properties fo:text-align="center" style:writing-mode="lr-tb">
        <style:tab-stops/>
      </style:paragraph-properties>
    </style:style>
    <style:style style:name="P2" style:family="paragraph"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3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4" style:family="paragraph">
      <style:paragraph-properties fo:text-align="center" style:writing-mode="lr-tb"/>
      <style:text-properties fo:font-size="8pt" fo:background-color="#ffffff" style:font-size-asian="8pt" style:font-size-complex="8pt"/>
    </style:style>
    <style:style style:name="P5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8pt" fo:background-color="#ffffff" style:font-size-asian="8pt" style:font-size-complex="8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 draw:opacity="50%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text-align="center" style:writing-mode="lr-tb"/>
      <style:text-properties fo:font-size="6pt" fo:background-color="#ffffff" style:font-size-asian="6pt" style:font-size-complex="6pt"/>
    </style:style>
    <style:style style:name="P11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16" style:family="paragraph">
      <style:paragraph-properties fo:text-align="center" style:writing-mode="lr-tb"/>
      <style:text-properties fo:font-size="4pt" style:font-size-asian="4pt" style:font-size-complex="4pt"/>
    </style:style>
    <style:style style:name="P17" style:family="paragraph">
      <loext:graphic-properties draw:fill="solid" draw:fill-color="#ffffff" draw:opacity="50%"/>
      <style:paragraph-properties fo:text-align="center" style:writing-mode="lr-tb"/>
      <style:text-properties fo:font-size="4pt" style:font-size-asian="4pt" style:font-size-complex="4pt"/>
    </style:style>
    <style:style style:name="P18" style:family="paragraph">
      <style:paragraph-properties fo:text-align="center" style:writing-mode="lr-tb"/>
      <style:text-properties fo:font-size="6pt" style:font-size-asian="4pt" style:font-size-complex="4pt"/>
    </style:style>
    <style:style style:name="P1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4pt" style:font-size-complex="4pt"/>
    </style:style>
    <style:style style:name="P20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style:paragraph-properties fo:text-align="center" style:writing-mode="lr-tb"/>
      <style:text-properties fo:font-size="5pt" style:font-size-asian="5pt" style:font-size-complex="5pt"/>
    </style:style>
    <style:style style:name="P22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5" style:family="paragraph">
      <style:paragraph-properties fo:text-align="center" style:writing-mode="lr-tb"/>
      <style:text-properties fo:font-size="5pt" style:font-size-asian="6pt" style:font-size-complex="6pt"/>
    </style:style>
    <style:style style:name="P26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6pt" style:font-size-complex="6pt"/>
    </style:style>
    <style:style style:name="P27" style:family="paragraph">
      <loext:graphic-properties draw:fill="solid" draw:fill-color="#ffffff" draw:opacity="35%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30" style:family="paragraph">
      <loext:graphic-properties draw:fill="solid" draw:fill-color="#ffffff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000000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36" style:family="paragraph">
      <style:text-properties fo:font-size="7pt" style:font-size-asian="7pt" style:font-size-complex="7pt"/>
    </style:style>
    <style:style style:name="P37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2" style:family="text">
      <style:text-properties fo:font-size="8pt" fo:background-color="#ffffff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background-color="#ffffff" style:font-size-asian="6pt" style:font-size-complex="6pt"/>
    </style:style>
    <style:style style:name="T6" style:family="text">
      <style:text-properties fo:font-size="6pt" style:font-size-asian="4pt" style:font-size-complex="4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fo:font-size="5pt" style:font-size-asian="6pt" style:font-size-complex="6pt"/>
    </style:style>
    <style:style style:name="T10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1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76cm" svg:height="6.499cm" svg:x="1.5cm" svg:y="7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3.5cm" svg:y="7.2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7.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3.5cm" svg:y="8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8.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3.5cm" svg:y="9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10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3.5cm" svg:y="10.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11.2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4.25cm" svg:y="10.75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4.25cm" svg:y="10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5.25cm" svg:y="10.25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75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25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75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25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5cm" svg:y="7.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4.25cm" svg:y="7.35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4.25cm" svg:y="8.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6.3cm" svg:y="7.65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8.25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8.75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45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9.8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6.3cm" svg:y="10.3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7.25cm" svg:y="10.3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8.25cm" svg:y="10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8.25cm" svg:y="7.75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99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9.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7.25cm" svg:y="7.75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9.25cm" svg:y="7.75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25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9.25cm" svg:y="8.75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9.25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9.25cm" svg:y="9.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9.25cm" svg:y="10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9.25cm" svg:y1="9.75cm" svg:x2="9.75cm" svg:y2="9.75cm">
          <text:p/>
        </draw:line>
        <draw:line draw:style-name="gr21" draw:text-style-name="P12" draw:layer="layout" svg:x1="9.75cm" svg:y1="10.45cm" svg:x2="9.75cm" svg:y2="9.75cm">
          <text:p/>
        </draw:line>
        <draw:line draw:style-name="gr21" draw:text-style-name="P12" draw:layer="layout" svg:x1="9.5cm" svg:y1="10.457cm" svg:x2="9.75cm" svg:y2="10.457cm">
          <text:p/>
        </draw:line>
        <draw:line draw:style-name="gr21" draw:text-style-name="P12" draw:layer="layout" svg:x1="9.5cm" svg:y1="10cm" svg:x2="9.5cm" svg:y2="10.5cm">
          <text:p/>
        </draw:line>
        <draw:line draw:style-name="gr21" draw:text-style-name="P12" draw:layer="layout" svg:x1="9.25cm" svg:y1="10cm" svg:x2="9.5cm" svg:y2="10cm">
          <text:p/>
        </draw:line>
        <draw:line draw:style-name="gr21" draw:text-style-name="P12" draw:layer="layout" svg:x1="9.25cm" svg:y1="9.75cm" svg:x2="9.25cm" svg:y2="10cm">
          <text:p/>
        </draw:line>
        <draw:frame draw:style-name="gr22" draw:text-style-name="P13" draw:layer="layout" svg:width="0.25cm" svg:height="0.727cm" svg:x="9.4cm" svg:y="9.65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9.75cm" svg:y="9.75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10cm" svg:y="9.75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7.75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9.75cm" svg:y="9.25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8.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7.75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8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25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75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25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0.5cm" svg:y="9.75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10.75cm" svg:y="9.75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11cm" svg:y="10.75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11.25cm" svg:y="10.75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9.25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1cm" svg:y="9.25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11cm" svg:y="7.75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11cm" svg:y="8.4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8.15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4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9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75cm" svg:y="9.4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9.75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.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7.75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1.75cm" svg:y="7.75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2cm" svg:y="9.4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7.75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8.25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8.75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9.15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9.65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10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4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75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11.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2cm" svg:y="11.25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75cm" svg:y="11.25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5cm" svg:y="11.25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11cm" svg:y="11.25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11cm" svg:y="11.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1cm" svg:y="12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11.5cm" svg:y="11.75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11.9cm" svg:y="11.75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2.25cm" svg:y="11.6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05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8.35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75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05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45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.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13cm" svg:y="12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85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3cm" svg:y="10.25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10.6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5cm" svg:y="11.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75cm" svg:y="11.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.5cm" svg:y="1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45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85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05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13.5cm" svg:y="8.35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13.5cm" svg:y="7.75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14.25cm" svg:y="7.75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15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75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4.25cm" svg:y="10.35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14.75cm" svg:y="11.9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14.75cm" svg:y="11.25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75cm" svg:y="10.8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75cm" svg:y="10.35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14.75cm" svg:y="9.15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14.75cm" svg:y="7.75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75cm" svg:y="8.25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75cm" svg:y="8.7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15.75cm" svg:y="7.9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15.65cm" svg:y="11.8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15.65cm" svg:y="11.35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65cm" svg:y="10.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65cm" svg:y="10.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65cm" svg:y="9.6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15.7cm" svg:y="8.7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65cm" svg:y="9.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16.6cm" svg:y="11.8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16.65cm" svg:y="11.35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16.7cm" svg:y="10.9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16.7cm" svg:y="11.13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16.7cm" svg:y="10.23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16.35cm" svg:y="10.23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16.35cm" svg:y="9.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16.35cm" svg:y="7.9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17.2cm" svg:y="7.9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17.4cm" svg:y="9.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9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17.4cm" svg:y="10.3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17.4cm" svg:y="11.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18.55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18.55cm" svg:y="9.25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18.5cm" svg:y="9.85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18.4cm" svg:y="11.65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9.15cm" svg:y="11.65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9.65cm" svg:y="11.65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20.15cm" svg:y="11.4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21cm" svg:y="11.4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20.15cm" svg:y="10.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20.15cm" svg:y="9.85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21.3cm" svg:y="7.7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20.25cm" svg:y="7.7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1cm" svg:y1="7.7cm" svg:x2="21.3cm" svg:y2="7.7cm">
          <text:p/>
        </draw:line>
        <draw:custom-shape draw:style-name="gr65" draw:text-style-name="P9" draw:layer="layout" svg:width="0.9cm" svg:height="2.15cm" svg:x="19.35cm" svg:y="7.7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95cm" svg:y1="9.859cm" svg:x2="21.95cm" svg:y2="9.3cm">
          <text:p/>
        </draw:line>
        <draw:line draw:style-name="gr21" draw:text-style-name="P12" draw:layer="layout" svg:x1="21.95cm" svg:y1="9.85cm" svg:x2="21.85cm" svg:y2="9.85cm">
          <text:p/>
        </draw:line>
        <draw:frame draw:style-name="gr66" draw:text-style-name="P13" draw:layer="layout" svg:width="1cm" svg:height="0.489cm" svg:x="20.75cm" svg:y="9.261cm">
          <draw:text-box>
            <text:p><text:span text:style-name="T4">154</text:span></text:p>
          </draw:text-box>
        </draw:frame>
        <draw:line draw:style-name="gr21" draw:text-style-name="P12" draw:layer="layout" svg:x1="19.35cm" svg:y1="7.9cm" svg:x2="18.55cm" svg:y2="7.9cm">
          <text:p/>
        </draw:line>
        <draw:line draw:style-name="gr21" draw:text-style-name="P12" draw:layer="layout" svg:x1="18.55cm" svg:y1="7.9cm" svg:x2="18.55cm" svg:y2="9.3cm">
          <text:p/>
        </draw:line>
        <draw:line draw:style-name="gr21" draw:text-style-name="P12" draw:layer="layout" svg:x1="19.35cm" svg:y1="7.9cm" svg:x2="19.35cm" svg:y2="7.7cm">
          <text:p/>
        </draw:line>
        <draw:line draw:style-name="gr21" draw:text-style-name="P12" draw:layer="layout" svg:x1="20.25cm" svg:y1="9.3cm" svg:x2="20.25cm" svg:y2="9.85cm">
          <text:p/>
        </draw:line>
        <draw:line draw:style-name="gr21" draw:text-style-name="P12" draw:layer="layout" svg:x1="19.35cm" svg:y1="7.7cm" svg:x2="20.25cm" svg:y2="7.7cm">
          <text:p/>
        </draw:line>
        <draw:custom-shape draw:style-name="gr67" draw:text-style-name="P14" draw:layer="layout" svg:width="0.65cm" svg:height="0.35cm" svg:x="21.15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22.25cm" svg:y="7.8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22.25cm" svg:y="8.3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22.25cm" svg:y="8.85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22.2cm" svg:y="9.25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22.15cm" svg:y="10.05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22.05cm" svg:y="10.55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22cm" svg:y="11.35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cm" svg:y="12.05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.45cm" svg:y="12.05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22.9cm" svg:y="11.35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23.6cm" svg:y="11.35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23.55cm" svg:y="10.55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23.65cm" svg:y="10.05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23.15cm" svg:y="9.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23.6cm" svg:y="9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24cm" svg:y="7.9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23.7cm" svg:y="7.85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23.15cm" svg:y="7.8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22.75cm" svg:y="7.8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3.6cm" svg:y1="7.8cm" svg:x2="23.6cm" svg:y2="7.8cm">
          <text:p/>
        </draw:line>
        <draw:line draw:style-name="gr21" draw:text-style-name="P12" draw:layer="layout" svg:x1="23.6cm" svg:y1="7.8cm" svg:x2="23.7cm" svg:y2="7.8cm">
          <text:p/>
        </draw:line>
        <draw:line draw:style-name="gr83" draw:text-style-name="P12" draw:layer="layout" svg:x1="23.7cm" svg:y1="7.8cm" svg:x2="23.7cm" svg:y2="7.8cm">
          <text:p/>
        </draw:line>
        <draw:line draw:style-name="gr21" draw:text-style-name="P12" draw:layer="layout" svg:x1="23.7cm" svg:y1="7.8cm" svg:x2="23.7cm" svg:y2="7.85cm">
          <text:p/>
        </draw:line>
        <draw:frame draw:style-name="gr84" draw:text-style-name="P23" draw:layer="layout" svg:width="0.5cm" svg:height="2.384cm" svg:x="22.5cm" svg:y="6.5cm">
          <draw:text-box>
            <text:p>173</text:p>
          </draw:text-box>
        </draw:frame>
        <draw:frame draw:style-name="gr85" draw:text-style-name="P13" draw:layer="layout" svg:width="1.12cm" svg:height="0.5cm" svg:x="23.38cm" svg:y="8.5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24.85cm" svg:y="8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25.2cm" svg:y="8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24.8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25cm" svg:y="8.75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26cm" svg:y="8.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4.85cm" svg:y1="9.25cm" svg:x2="24.6cm" svg:y2="11.95cm">
          <text:p/>
        </draw:line>
        <draw:custom-shape draw:style-name="gr88" draw:text-style-name="P15" draw:layer="layout" svg:width="1cm" svg:height="0.8cm" svg:x="24.6cm" svg:y="11.95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6cm" svg:y="11.95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9cm" svg:y="11.95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6.2cm" svg:y="11.95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26.5cm" svg:y="11.95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7" draw:layer="layout" svg:width="1cm" svg:height="1cm" svg:x="25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26cm" svg:y1="10.75cm" svg:x2="26cm" svg:y2="11.5cm">
          <text:p/>
        </draw:line>
        <draw:line draw:style-name="gr90" draw:text-style-name="P12" draw:layer="layout" svg:x1="26.25cm" svg:y1="11cm" svg:x2="26.25cm" svg:y2="11.5cm">
          <text:p/>
        </draw:line>
        <draw:line draw:style-name="gr90" draw:text-style-name="P12" draw:layer="layout" svg:x1="26.5cm" svg:y1="10.75cm" svg:x2="26.5cm" svg:y2="11.5cm">
          <text:p/>
        </draw:line>
        <draw:frame draw:style-name="gr85" draw:text-style-name="P13" draw:layer="layout" svg:width="1cm" svg:height="0.5cm" svg:x="25.75cm" svg:y="10.25cm">
          <draw:text-box>
            <text:p><text:span text:style-name="T4">185</text:span></text:p>
          </draw:text-box>
        </draw:frame>
        <draw:frame draw:style-name="gr91" draw:text-style-name="P13" draw:layer="layout" svg:width="1.061cm" svg:height="0.727cm" svg:x="24.939cm" svg:y="10.773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27.1cm" svg:y1="9.25cm" svg:x2="26.85cm" svg:y2="11.95cm">
          <text:p/>
        </draw:line>
        <draw:custom-shape draw:style-name="gr92" draw:text-style-name="P14" draw:layer="layout" svg:width="0.25cm" svg:height="0.45cm" svg:x="9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9.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9.5cm" svg:y="7.75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polygon draw:style-name="gr95" draw:text-style-name="P30" draw:layer="layout" svg:width="7.688cm" svg:height="0.605cm" svg:x="1.25cm" svg:y="1.25cm" svg:viewBox="0 0 7689 606" draw:points="0,606 7689,606 7689,0 0,0">
          <text:p/>
        </draw:polygon>
        <draw:frame draw:style-name="gr96" draw:text-style-name="P32" draw:layer="layout" svg:width="3.795cm" svg:height="0.319cm" svg:x="3.455cm" svg:y="1cm">
          <draw:text-box>
            <text:p text:style-name="P31"><text:span text:style-name="T10">LAYOUT MAP </text:span></text:p>
          </draw:text-box>
        </draw:frame>
        <draw:polygon draw:style-name="gr97" draw:text-style-name="P33" draw:layer="layout" svg:width="27.698cm" svg:height="14.276cm" svg:x="1.001cm" svg:y="1.722cm" svg:viewBox="0 0 27699 14277" draw:points="0,14277 27699,14277 27699,0 0,0">
          <text:p/>
        </draw:polygon>
        <draw:frame draw:style-name="gr98" draw:text-style-name="P32" draw:layer="layout" svg:width="14.347cm" svg:height="0.319cm" svg:x="1.625cm" svg:y="1.416cm">
          <draw:text-box>
            <text:p text:style-name="P31"><text:span text:style-name="T11">This is an important Census document. Please draw this map neatly and correctly.</text:span></text:p>
          </draw:text-box>
        </draw:frame>
        <draw:path draw:style-name="gr99" draw:text-style-name="P34" draw:layer="layout" svg:width="0.231cm" svg:height="0.845cm" svg:x="28.159cm" svg:y="2.154cm" svg:viewBox="0 0 232 846" svg:d="M154 846h-77v-705h77zM0 169l115-169 117 169z">
          <text:p/>
        </draw:path>
        <draw:polygon draw:style-name="gr95" draw:text-style-name="P30" draw:layer="layout" svg:width="1.928cm" svg:height="0.338cm" svg:x="26.5cm" svg:y="1.845cm" svg:viewBox="0 0 1929 339" draw:points="0,339 1929,339 1929,0 0,0">
          <text:p/>
        </draw:polygon>
        <draw:frame draw:style-name="gr100" draw:text-style-name="P32" draw:layer="layout" svg:width="2.142cm" svg:height="0.319cm" svg:x="25.615cm" svg:y="1.955cm">
          <draw:text-box>
            <text:p text:style-name="P31"><text:span text:style-name="T10">NORTH </text:span></text:p>
          </draw:text-box>
        </draw:frame>
        <draw:frame draw:style-name="gr101" draw:text-style-name="P33" draw:layer="layout" svg:width="0.017cm" svg:height="0.012cm" svg:x="7.192cm" svg:y="11.109cm">
          <draw:image xlink:href="Pictures/1000000100000001000000010A5CEE47C9EFD756.png" xlink:type="simple" xlink:show="embed" xlink:actuate="onLoad" draw:mime-type="image/png">
            <text:p/>
          </draw:image>
        </draw:frame>
        <draw:frame draw:style-name="gr102" draw:text-style-name="P32" draw:layer="layout" svg:width="13.966cm" svg:height="0.319cm" svg:x="14.927cm" svg:y="1.36cm">
          <draw:text-box>
            <text:p text:style-name="P31"><text:span text:style-name="T11">Houselisting &amp; Housing Census/Population Enumeration</text:span></text:p>
          </draw:text-box>
        </draw:frame>
        <draw:frame draw:style-name="gr103" draw:text-style-name="P28" draw:layer="layout" svg:width="13.787cm" svg:height="4.748cm" svg:x="1cm" svg:y="16.251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04" draw:text-style-name="P28" draw:layer="layout" svg:width="6.037cm" svg:height="4.249cm" svg:x="22.75cm" svg:y="16.5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" draw:text-style-name="P1" draw:layer="layout" svg:width="26.976cm" svg:height="6.499cm" svg:x="-43.188cm" svg:y="7.001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35.438cm" svg:y1="9.751cm" svg:x2="-34.938cm" svg:y2="9.751cm">
          <text:p/>
        </draw:line>
        <draw:line draw:style-name="gr21" draw:text-style-name="P12" draw:layer="layout" svg:x1="-34.938cm" svg:y1="10.451cm" svg:x2="-34.938cm" svg:y2="9.751cm">
          <text:p/>
        </draw:line>
        <draw:line draw:style-name="gr21" draw:text-style-name="P12" draw:layer="layout" svg:x1="-35.188cm" svg:y1="10.458cm" svg:x2="-34.938cm" svg:y2="10.458cm">
          <text:p/>
        </draw:line>
        <draw:line draw:style-name="gr21" draw:text-style-name="P12" draw:layer="layout" svg:x1="-35.188cm" svg:y1="10.001cm" svg:x2="-35.188cm" svg:y2="10.501cm">
          <text:p/>
        </draw:line>
        <draw:line draw:style-name="gr21" draw:text-style-name="P12" draw:layer="layout" svg:x1="-35.438cm" svg:y1="10.001cm" svg:x2="-35.188cm" svg:y2="10.001cm">
          <text:p/>
        </draw:line>
        <draw:line draw:style-name="gr21" draw:text-style-name="P12" draw:layer="layout" svg:x1="-35.438cm" svg:y1="9.751cm" svg:x2="-35.438cm" svg:y2="10.001cm">
          <text:p/>
        </draw:line>
        <draw:frame draw:style-name="gr22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-31.688cm" svg:y="12.001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3.588cm" svg:y1="7.701cm" svg:x2="-23.388cm" svg:y2="7.701cm">
          <text:p/>
        </draw:line>
        <draw:custom-shape draw:style-name="gr65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2.738cm" svg:y1="9.86cm" svg:x2="-22.738cm" svg:y2="9.301cm">
          <text:p/>
        </draw:line>
        <draw:line draw:style-name="gr21" draw:text-style-name="P12" draw:layer="layout" svg:x1="-22.738cm" svg:y1="9.851cm" svg:x2="-22.838cm" svg:y2="9.851cm">
          <text:p/>
        </draw:line>
        <draw:frame draw:style-name="gr66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21" draw:text-style-name="P12" draw:layer="layout" svg:x1="-25.338cm" svg:y1="7.901cm" svg:x2="-26.138cm" svg:y2="7.901cm">
          <text:p/>
        </draw:line>
        <draw:line draw:style-name="gr21" draw:text-style-name="P12" draw:layer="layout" svg:x1="-26.138cm" svg:y1="7.901cm" svg:x2="-26.138cm" svg:y2="9.301cm">
          <text:p/>
        </draw:line>
        <draw:line draw:style-name="gr21" draw:text-style-name="P12" draw:layer="layout" svg:x1="-25.338cm" svg:y1="7.901cm" svg:x2="-25.338cm" svg:y2="7.701cm">
          <text:p/>
        </draw:line>
        <draw:line draw:style-name="gr21" draw:text-style-name="P12" draw:layer="layout" svg:x1="-24.438cm" svg:y1="9.301cm" svg:x2="-24.438cm" svg:y2="9.851cm">
          <text:p/>
        </draw:line>
        <draw:line draw:style-name="gr21" draw:text-style-name="P12" draw:layer="layout" svg:x1="-25.338cm" svg:y1="7.701cm" svg:x2="-24.438cm" svg:y2="7.701cm">
          <text:p/>
        </draw:line>
        <draw:custom-shape draw:style-name="gr67" draw:text-style-name="P14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-20.988cm" svg:y="7.85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1.088cm" svg:y1="7.801cm" svg:x2="-21.088cm" svg:y2="7.801cm">
          <text:p/>
        </draw:line>
        <draw:line draw:style-name="gr21" draw:text-style-name="P12" draw:layer="layout" svg:x1="-21.088cm" svg:y1="7.801cm" svg:x2="-20.988cm" svg:y2="7.801cm">
          <text:p/>
        </draw:line>
        <draw:line draw:style-name="gr83" draw:text-style-name="P12" draw:layer="layout" svg:x1="-20.988cm" svg:y1="7.801cm" svg:x2="-20.988cm" svg:y2="7.801cm">
          <text:p/>
        </draw:line>
        <draw:line draw:style-name="gr21" draw:text-style-name="P12" draw:layer="layout" svg:x1="-20.988cm" svg:y1="7.801cm" svg:x2="-20.988cm" svg:y2="7.851cm">
          <text:p/>
        </draw:line>
        <draw:frame draw:style-name="gr84" draw:text-style-name="P23" draw:layer="layout" svg:width="0.5cm" svg:height="2.384cm" svg:x="-22.188cm" svg:y="6.501cm">
          <draw:text-box>
            <text:p>173</text:p>
          </draw:text-box>
        </draw:frame>
        <draw:frame draw:style-name="gr85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-19.838cm" svg:y="8.001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-19.488cm" svg:y="8.001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19.838cm" svg:y1="9.251cm" svg:x2="-20.088cm" svg:y2="11.951cm">
          <text:p/>
        </draw:line>
        <draw:custom-shape draw:style-name="gr88" draw:text-style-name="P15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9.088cm" svg:y="11.951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788cm" svg:y="11.951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488cm" svg:y="11.951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-18.688cm" svg:y1="10.751cm" svg:x2="-18.688cm" svg:y2="11.501cm">
          <text:p/>
        </draw:line>
        <draw:line draw:style-name="gr90" draw:text-style-name="P12" draw:layer="layout" svg:x1="-18.438cm" svg:y1="11.001cm" svg:x2="-18.438cm" svg:y2="11.501cm">
          <text:p/>
        </draw:line>
        <draw:line draw:style-name="gr90" draw:text-style-name="P12" draw:layer="layout" svg:x1="-18.188cm" svg:y1="10.751cm" svg:x2="-18.188cm" svg:y2="11.501cm">
          <text:p/>
        </draw:line>
        <draw:frame draw:style-name="gr85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91" draw:text-style-name="P13" draw:layer="layout" svg:width="1.061cm" svg:height="0.727cm" svg:x="-19.749cm" svg:y="10.774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-17.588cm" svg:y1="9.251cm" svg:x2="-17.838cm" svg:y2="11.951cm">
          <text:p/>
        </draw:line>
        <draw:custom-shape draw:style-name="gr92" draw:text-style-name="P14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35.438cm" svg:y1="9.751cm" svg:x2="-34.938cm" svg:y2="9.751cm">
          <text:p/>
        </draw:line>
        <draw:line draw:style-name="gr21" draw:text-style-name="P12" draw:layer="layout" svg:x1="-34.938cm" svg:y1="10.451cm" svg:x2="-34.938cm" svg:y2="9.751cm">
          <text:p/>
        </draw:line>
        <draw:line draw:style-name="gr21" draw:text-style-name="P12" draw:layer="layout" svg:x1="-35.188cm" svg:y1="10.458cm" svg:x2="-34.938cm" svg:y2="10.458cm">
          <text:p/>
        </draw:line>
        <draw:line draw:style-name="gr21" draw:text-style-name="P12" draw:layer="layout" svg:x1="-35.188cm" svg:y1="10.001cm" svg:x2="-35.188cm" svg:y2="10.501cm">
          <text:p/>
        </draw:line>
        <draw:line draw:style-name="gr21" draw:text-style-name="P12" draw:layer="layout" svg:x1="-35.438cm" svg:y1="10.001cm" svg:x2="-35.188cm" svg:y2="10.001cm">
          <text:p/>
        </draw:line>
        <draw:line draw:style-name="gr21" draw:text-style-name="P12" draw:layer="layout" svg:x1="-35.438cm" svg:y1="9.751cm" svg:x2="-35.438cm" svg:y2="10.001cm">
          <text:p/>
        </draw:line>
        <draw:frame draw:style-name="gr22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-31.688cm" svg:y="12.001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3.588cm" svg:y1="7.701cm" svg:x2="-23.388cm" svg:y2="7.701cm">
          <text:p/>
        </draw:line>
        <draw:custom-shape draw:style-name="gr65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2.738cm" svg:y1="9.86cm" svg:x2="-22.738cm" svg:y2="9.301cm">
          <text:p/>
        </draw:line>
        <draw:line draw:style-name="gr21" draw:text-style-name="P12" draw:layer="layout" svg:x1="-22.738cm" svg:y1="9.851cm" svg:x2="-22.838cm" svg:y2="9.851cm">
          <text:p/>
        </draw:line>
        <draw:frame draw:style-name="gr66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21" draw:text-style-name="P12" draw:layer="layout" svg:x1="-25.338cm" svg:y1="7.901cm" svg:x2="-26.138cm" svg:y2="7.901cm">
          <text:p/>
        </draw:line>
        <draw:line draw:style-name="gr21" draw:text-style-name="P12" draw:layer="layout" svg:x1="-26.138cm" svg:y1="7.901cm" svg:x2="-26.138cm" svg:y2="9.301cm">
          <text:p/>
        </draw:line>
        <draw:line draw:style-name="gr21" draw:text-style-name="P12" draw:layer="layout" svg:x1="-25.338cm" svg:y1="7.901cm" svg:x2="-25.338cm" svg:y2="7.701cm">
          <text:p/>
        </draw:line>
        <draw:line draw:style-name="gr21" draw:text-style-name="P12" draw:layer="layout" svg:x1="-24.438cm" svg:y1="9.301cm" svg:x2="-24.438cm" svg:y2="9.851cm">
          <text:p/>
        </draw:line>
        <draw:line draw:style-name="gr21" draw:text-style-name="P12" draw:layer="layout" svg:x1="-25.338cm" svg:y1="7.701cm" svg:x2="-24.438cm" svg:y2="7.701cm">
          <text:p/>
        </draw:line>
        <draw:custom-shape draw:style-name="gr67" draw:text-style-name="P14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-20.988cm" svg:y="7.85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1.088cm" svg:y1="7.801cm" svg:x2="-21.088cm" svg:y2="7.801cm">
          <text:p/>
        </draw:line>
        <draw:line draw:style-name="gr21" draw:text-style-name="P12" draw:layer="layout" svg:x1="-21.088cm" svg:y1="7.801cm" svg:x2="-20.988cm" svg:y2="7.801cm">
          <text:p/>
        </draw:line>
        <draw:line draw:style-name="gr83" draw:text-style-name="P12" draw:layer="layout" svg:x1="-20.988cm" svg:y1="7.801cm" svg:x2="-20.988cm" svg:y2="7.801cm">
          <text:p/>
        </draw:line>
        <draw:line draw:style-name="gr21" draw:text-style-name="P12" draw:layer="layout" svg:x1="-20.988cm" svg:y1="7.801cm" svg:x2="-20.988cm" svg:y2="7.851cm">
          <text:p/>
        </draw:line>
        <draw:frame draw:style-name="gr84" draw:text-style-name="P23" draw:layer="layout" svg:width="0.5cm" svg:height="2.384cm" svg:x="-22.188cm" svg:y="6.501cm">
          <draw:text-box>
            <text:p>173</text:p>
          </draw:text-box>
        </draw:frame>
        <draw:frame draw:style-name="gr85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-19.838cm" svg:y="8.001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-19.488cm" svg:y="8.001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19.838cm" svg:y1="9.251cm" svg:x2="-20.088cm" svg:y2="11.951cm">
          <text:p/>
        </draw:line>
        <draw:custom-shape draw:style-name="gr88" draw:text-style-name="P15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9.088cm" svg:y="11.951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788cm" svg:y="11.951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488cm" svg:y="11.951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-18.688cm" svg:y1="10.751cm" svg:x2="-18.688cm" svg:y2="11.501cm">
          <text:p/>
        </draw:line>
        <draw:line draw:style-name="gr90" draw:text-style-name="P12" draw:layer="layout" svg:x1="-18.438cm" svg:y1="11.001cm" svg:x2="-18.438cm" svg:y2="11.501cm">
          <text:p/>
        </draw:line>
        <draw:line draw:style-name="gr90" draw:text-style-name="P12" draw:layer="layout" svg:x1="-18.188cm" svg:y1="10.751cm" svg:x2="-18.188cm" svg:y2="11.501cm">
          <text:p/>
        </draw:line>
        <draw:frame draw:style-name="gr85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91" draw:text-style-name="P13" draw:layer="layout" svg:width="1.061cm" svg:height="0.727cm" svg:x="-19.749cm" svg:y="10.774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-17.588cm" svg:y1="9.251cm" svg:x2="-17.838cm" svg:y2="11.951cm">
          <text:p/>
        </draw:line>
        <draw:custom-shape draw:style-name="gr92" draw:text-style-name="P14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35.438cm" svg:y1="9.751cm" svg:x2="-34.938cm" svg:y2="9.751cm">
          <text:p/>
        </draw:line>
        <draw:line draw:style-name="gr21" draw:text-style-name="P12" draw:layer="layout" svg:x1="-34.938cm" svg:y1="10.451cm" svg:x2="-34.938cm" svg:y2="9.751cm">
          <text:p/>
        </draw:line>
        <draw:line draw:style-name="gr21" draw:text-style-name="P12" draw:layer="layout" svg:x1="-35.188cm" svg:y1="10.458cm" svg:x2="-34.938cm" svg:y2="10.458cm">
          <text:p/>
        </draw:line>
        <draw:line draw:style-name="gr21" draw:text-style-name="P12" draw:layer="layout" svg:x1="-35.188cm" svg:y1="10.001cm" svg:x2="-35.188cm" svg:y2="10.501cm">
          <text:p/>
        </draw:line>
        <draw:line draw:style-name="gr21" draw:text-style-name="P12" draw:layer="layout" svg:x1="-35.438cm" svg:y1="10.001cm" svg:x2="-35.188cm" svg:y2="10.001cm">
          <text:p/>
        </draw:line>
        <draw:line draw:style-name="gr21" draw:text-style-name="P12" draw:layer="layout" svg:x1="-35.438cm" svg:y1="9.751cm" svg:x2="-35.438cm" svg:y2="10.001cm">
          <text:p/>
        </draw:line>
        <draw:frame draw:style-name="gr22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-31.688cm" svg:y="12.001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3.588cm" svg:y1="7.701cm" svg:x2="-23.388cm" svg:y2="7.701cm">
          <text:p/>
        </draw:line>
        <draw:custom-shape draw:style-name="gr65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2.738cm" svg:y1="9.86cm" svg:x2="-22.738cm" svg:y2="9.301cm">
          <text:p/>
        </draw:line>
        <draw:line draw:style-name="gr21" draw:text-style-name="P12" draw:layer="layout" svg:x1="-22.738cm" svg:y1="9.851cm" svg:x2="-22.838cm" svg:y2="9.851cm">
          <text:p/>
        </draw:line>
        <draw:frame draw:style-name="gr66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21" draw:text-style-name="P12" draw:layer="layout" svg:x1="-25.338cm" svg:y1="7.901cm" svg:x2="-26.138cm" svg:y2="7.901cm">
          <text:p/>
        </draw:line>
        <draw:line draw:style-name="gr21" draw:text-style-name="P12" draw:layer="layout" svg:x1="-26.138cm" svg:y1="7.901cm" svg:x2="-26.138cm" svg:y2="9.301cm">
          <text:p/>
        </draw:line>
        <draw:line draw:style-name="gr21" draw:text-style-name="P12" draw:layer="layout" svg:x1="-25.338cm" svg:y1="7.901cm" svg:x2="-25.338cm" svg:y2="7.701cm">
          <text:p/>
        </draw:line>
        <draw:line draw:style-name="gr21" draw:text-style-name="P12" draw:layer="layout" svg:x1="-24.438cm" svg:y1="9.301cm" svg:x2="-24.438cm" svg:y2="9.851cm">
          <text:p/>
        </draw:line>
        <draw:line draw:style-name="gr21" draw:text-style-name="P12" draw:layer="layout" svg:x1="-25.338cm" svg:y1="7.701cm" svg:x2="-24.438cm" svg:y2="7.701cm">
          <text:p/>
        </draw:line>
        <draw:custom-shape draw:style-name="gr67" draw:text-style-name="P14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-20.988cm" svg:y="7.85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1.088cm" svg:y1="7.801cm" svg:x2="-21.088cm" svg:y2="7.801cm">
          <text:p/>
        </draw:line>
        <draw:line draw:style-name="gr21" draw:text-style-name="P12" draw:layer="layout" svg:x1="-21.088cm" svg:y1="7.801cm" svg:x2="-20.988cm" svg:y2="7.801cm">
          <text:p/>
        </draw:line>
        <draw:line draw:style-name="gr83" draw:text-style-name="P12" draw:layer="layout" svg:x1="-20.988cm" svg:y1="7.801cm" svg:x2="-20.988cm" svg:y2="7.801cm">
          <text:p/>
        </draw:line>
        <draw:line draw:style-name="gr21" draw:text-style-name="P12" draw:layer="layout" svg:x1="-20.988cm" svg:y1="7.801cm" svg:x2="-20.988cm" svg:y2="7.851cm">
          <text:p/>
        </draw:line>
        <draw:frame draw:style-name="gr84" draw:text-style-name="P23" draw:layer="layout" svg:width="0.5cm" svg:height="2.384cm" svg:x="-22.188cm" svg:y="6.501cm">
          <draw:text-box>
            <text:p>173</text:p>
          </draw:text-box>
        </draw:frame>
        <draw:frame draw:style-name="gr85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-19.838cm" svg:y="8.001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-19.488cm" svg:y="8.001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19.838cm" svg:y1="9.251cm" svg:x2="-20.088cm" svg:y2="11.951cm">
          <text:p/>
        </draw:line>
        <draw:custom-shape draw:style-name="gr88" draw:text-style-name="P15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9.088cm" svg:y="11.951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788cm" svg:y="11.951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488cm" svg:y="11.951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-18.688cm" svg:y1="10.751cm" svg:x2="-18.688cm" svg:y2="11.501cm">
          <text:p/>
        </draw:line>
        <draw:line draw:style-name="gr90" draw:text-style-name="P12" draw:layer="layout" svg:x1="-18.438cm" svg:y1="11.001cm" svg:x2="-18.438cm" svg:y2="11.501cm">
          <text:p/>
        </draw:line>
        <draw:line draw:style-name="gr90" draw:text-style-name="P12" draw:layer="layout" svg:x1="-18.188cm" svg:y1="10.751cm" svg:x2="-18.188cm" svg:y2="11.501cm">
          <text:p/>
        </draw:line>
        <draw:frame draw:style-name="gr85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91" draw:text-style-name="P13" draw:layer="layout" svg:width="1.061cm" svg:height="0.727cm" svg:x="-19.749cm" svg:y="10.774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-17.588cm" svg:y1="9.251cm" svg:x2="-17.838cm" svg:y2="11.951cm">
          <text:p/>
        </draw:line>
        <draw:custom-shape draw:style-name="gr92" draw:text-style-name="P14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35.438cm" svg:y1="9.751cm" svg:x2="-34.938cm" svg:y2="9.751cm">
          <text:p/>
        </draw:line>
        <draw:line draw:style-name="gr21" draw:text-style-name="P12" draw:layer="layout" svg:x1="-34.938cm" svg:y1="10.451cm" svg:x2="-34.938cm" svg:y2="9.751cm">
          <text:p/>
        </draw:line>
        <draw:line draw:style-name="gr21" draw:text-style-name="P12" draw:layer="layout" svg:x1="-35.188cm" svg:y1="10.458cm" svg:x2="-34.938cm" svg:y2="10.458cm">
          <text:p/>
        </draw:line>
        <draw:line draw:style-name="gr21" draw:text-style-name="P12" draw:layer="layout" svg:x1="-35.188cm" svg:y1="10.001cm" svg:x2="-35.188cm" svg:y2="10.501cm">
          <text:p/>
        </draw:line>
        <draw:line draw:style-name="gr21" draw:text-style-name="P12" draw:layer="layout" svg:x1="-35.438cm" svg:y1="10.001cm" svg:x2="-35.188cm" svg:y2="10.001cm">
          <text:p/>
        </draw:line>
        <draw:line draw:style-name="gr21" draw:text-style-name="P12" draw:layer="layout" svg:x1="-35.438cm" svg:y1="9.751cm" svg:x2="-35.438cm" svg:y2="10.001cm">
          <text:p/>
        </draw:line>
        <draw:frame draw:style-name="gr22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-31.688cm" svg:y="12.001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3.588cm" svg:y1="7.701cm" svg:x2="-23.388cm" svg:y2="7.701cm">
          <text:p/>
        </draw:line>
        <draw:custom-shape draw:style-name="gr65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2.738cm" svg:y1="9.86cm" svg:x2="-22.738cm" svg:y2="9.301cm">
          <text:p/>
        </draw:line>
        <draw:line draw:style-name="gr21" draw:text-style-name="P12" draw:layer="layout" svg:x1="-22.738cm" svg:y1="9.851cm" svg:x2="-22.838cm" svg:y2="9.851cm">
          <text:p/>
        </draw:line>
        <draw:frame draw:style-name="gr66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21" draw:text-style-name="P12" draw:layer="layout" svg:x1="-25.338cm" svg:y1="7.901cm" svg:x2="-26.138cm" svg:y2="7.901cm">
          <text:p/>
        </draw:line>
        <draw:line draw:style-name="gr21" draw:text-style-name="P12" draw:layer="layout" svg:x1="-26.138cm" svg:y1="7.901cm" svg:x2="-26.138cm" svg:y2="9.301cm">
          <text:p/>
        </draw:line>
        <draw:line draw:style-name="gr21" draw:text-style-name="P12" draw:layer="layout" svg:x1="-25.338cm" svg:y1="7.901cm" svg:x2="-25.338cm" svg:y2="7.701cm">
          <text:p/>
        </draw:line>
        <draw:line draw:style-name="gr21" draw:text-style-name="P12" draw:layer="layout" svg:x1="-24.438cm" svg:y1="9.301cm" svg:x2="-24.438cm" svg:y2="9.851cm">
          <text:p/>
        </draw:line>
        <draw:line draw:style-name="gr21" draw:text-style-name="P12" draw:layer="layout" svg:x1="-25.338cm" svg:y1="7.701cm" svg:x2="-24.438cm" svg:y2="7.701cm">
          <text:p/>
        </draw:line>
        <draw:custom-shape draw:style-name="gr67" draw:text-style-name="P14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-20.988cm" svg:y="7.85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21.088cm" svg:y1="7.801cm" svg:x2="-21.088cm" svg:y2="7.801cm">
          <text:p/>
        </draw:line>
        <draw:line draw:style-name="gr21" draw:text-style-name="P12" draw:layer="layout" svg:x1="-21.088cm" svg:y1="7.801cm" svg:x2="-20.988cm" svg:y2="7.801cm">
          <text:p/>
        </draw:line>
        <draw:line draw:style-name="gr83" draw:text-style-name="P12" draw:layer="layout" svg:x1="-20.988cm" svg:y1="7.801cm" svg:x2="-20.988cm" svg:y2="7.801cm">
          <text:p/>
        </draw:line>
        <draw:line draw:style-name="gr21" draw:text-style-name="P12" draw:layer="layout" svg:x1="-20.988cm" svg:y1="7.801cm" svg:x2="-20.988cm" svg:y2="7.851cm">
          <text:p/>
        </draw:line>
        <draw:frame draw:style-name="gr84" draw:text-style-name="P23" draw:layer="layout" svg:width="0.5cm" svg:height="2.384cm" svg:x="-22.188cm" svg:y="6.501cm">
          <draw:text-box>
            <text:p>173</text:p>
          </draw:text-box>
        </draw:frame>
        <draw:frame draw:style-name="gr85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-19.838cm" svg:y="8.001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-19.488cm" svg:y="8.001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-19.838cm" svg:y1="9.251cm" svg:x2="-20.088cm" svg:y2="11.951cm">
          <text:p/>
        </draw:line>
        <draw:custom-shape draw:style-name="gr88" draw:text-style-name="P15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9.088cm" svg:y="11.951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788cm" svg:y="11.951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-18.488cm" svg:y="11.951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-18.688cm" svg:y1="10.751cm" svg:x2="-18.688cm" svg:y2="11.501cm">
          <text:p/>
        </draw:line>
        <draw:line draw:style-name="gr90" draw:text-style-name="P12" draw:layer="layout" svg:x1="-18.438cm" svg:y1="11.001cm" svg:x2="-18.438cm" svg:y2="11.501cm">
          <text:p/>
        </draw:line>
        <draw:line draw:style-name="gr90" draw:text-style-name="P12" draw:layer="layout" svg:x1="-18.188cm" svg:y1="10.751cm" svg:x2="-18.188cm" svg:y2="11.501cm">
          <text:p/>
        </draw:line>
        <draw:frame draw:style-name="gr85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91" draw:text-style-name="P13" draw:layer="layout" svg:width="1.061cm" svg:height="0.727cm" svg:x="-19.749cm" svg:y="10.774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-17.588cm" svg:y1="9.251cm" svg:x2="-17.838cm" svg:y2="11.951cm">
          <text:p/>
        </draw:line>
        <draw:custom-shape draw:style-name="gr92" draw:text-style-name="P14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1" draw:layer="layout" svg:width="26.976cm" svg:height="6.499cm" svg:x="1.274cm" svg:y="1.751cm">
          <draw:image xlink:href="Pictures/10091AE60000A405000074113A7F337473AE9A3D.pdf" xlink:type="simple" xlink:show="embed" xlink:actuate="onLoad" draw:mime-type="application/pdf">
            <text:p/>
          </draw:image>
          <draw:image xlink:href="Pictures/1000000100000633000004639FB41D6D4A77E559.png" xlink:type="simple" xlink:show="embed" xlink:actuate="onLoad" draw:mime-type="image/png"/>
        </draw:frame>
        <draw:custom-shape draw:style-name="gr2" draw:text-style-name="P3" draw:layer="layout" svg:width="0.75cm" svg:height="0.25cm" svg:x="3.274cm" svg:y="2.00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274cm" svg:y="2.25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3.274cm" svg:y="2.75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274cm" svg:y="3.25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3.274cm" svg:y="3.75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274cm" svg:y="4.75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3.274cm" svg:y="5.25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274cm" svg:y="6.00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4.024cm" svg:y="5.50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4.024cm" svg:y="4.75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5.024cm" svg:y="5.00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4.50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4.00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3.50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3.00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4.774cm" svg:y="2.25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4.024cm" svg:y="2.10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4.024cm" svg:y="3.25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6.074cm" svg:y="2.40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074cm" svg:y="3.00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3.50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3.85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4.20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074cm" svg:y="4.55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6.074cm" svg:y="5.05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7.024cm" svg:y="5.05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8.024cm" svg:y="4.75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8.024cm" svg:y="2.50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3.25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3.74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4.25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7.024cm" svg:y="2.50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9.024cm" svg:y="2.50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3.00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3.25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9.024cm" svg:y="3.50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4.00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9.024cm" svg:y="4.25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9.024cm" svg:y="4.75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9.024cm" svg:y1="4.501cm" svg:x2="9.524cm" svg:y2="4.501cm">
          <text:p/>
        </draw:line>
        <draw:line draw:style-name="gr21" draw:text-style-name="P12" draw:layer="layout" svg:x1="9.524cm" svg:y1="5.201cm" svg:x2="9.524cm" svg:y2="4.501cm">
          <text:p/>
        </draw:line>
        <draw:line draw:style-name="gr21" draw:text-style-name="P12" draw:layer="layout" svg:x1="9.274cm" svg:y1="5.208cm" svg:x2="9.524cm" svg:y2="5.208cm">
          <text:p/>
        </draw:line>
        <draw:line draw:style-name="gr21" draw:text-style-name="P12" draw:layer="layout" svg:x1="9.274cm" svg:y1="4.751cm" svg:x2="9.274cm" svg:y2="5.251cm">
          <text:p/>
        </draw:line>
        <draw:line draw:style-name="gr21" draw:text-style-name="P12" draw:layer="layout" svg:x1="9.024cm" svg:y1="4.751cm" svg:x2="9.274cm" svg:y2="4.751cm">
          <text:p/>
        </draw:line>
        <draw:line draw:style-name="gr21" draw:text-style-name="P12" draw:layer="layout" svg:x1="9.024cm" svg:y1="4.501cm" svg:x2="9.024cm" svg:y2="4.751cm">
          <text:p/>
        </draw:line>
        <draw:frame draw:style-name="gr22" draw:text-style-name="P13" draw:layer="layout" svg:width="0.25cm" svg:height="0.727cm" svg:x="9.174cm" svg:y="4.401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9.524cm" svg:y="4.50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9.774cm" svg:y="4.50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524cm" svg:y="2.50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9.524cm" svg:y="4.00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524cm" svg:y="3.25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274cm" svg:y="2.50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274cm" svg:y="2.75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3.00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3.50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5.00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0.274cm" svg:y="4.50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10.524cm" svg:y="4.50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5.25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10.774cm" svg:y="5.50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11.024cm" svg:y="5.50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4.00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4.75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0.774cm" svg:y="4.00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10.774cm" svg:y="2.50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10.774cm" svg:y="3.15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524cm" svg:y="2.90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3.15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3.65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524cm" svg:y="4.15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524cm" svg:y="4.50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4.75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5.25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2.50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1.524cm" svg:y="2.50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774cm" svg:y="4.15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2.50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3.00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024cm" svg:y="3.50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3.90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4.40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024cm" svg:y="4.75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5.15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5.50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5.85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774cm" svg:y="6.00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524cm" svg:y="6.00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274cm" svg:y="6.00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10.774cm" svg:y="6.00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10.774cm" svg:y="6.25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0.774cm" svg:y="6.75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11.274cm" svg:y="6.50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11.674cm" svg:y="6.50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2.024cm" svg:y="6.35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2.80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3.10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3.50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3.80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4.20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774cm" svg:y="6.25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774cm" svg:y="5.75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12.774cm" svg:y="6.751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4.60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774cm" svg:y="5.00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5.35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274cm" svg:y="6.25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524cm" svg:y="6.25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.274cm" svg:y="5.75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4.20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4.60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3.80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13.274cm" svg:y="3.10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13.274cm" svg:y="2.50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14.024cm" svg:y="2.50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024cm" svg:y="3.90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024cm" svg:y="4.50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4.024cm" svg:y="5.10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14.524cm" svg:y="6.65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14.524cm" svg:y="6.00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5.55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5.10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14.524cm" svg:y="3.90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14.524cm" svg:y="2.50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3.00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3.45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15.524cm" svg:y="2.65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15.424cm" svg:y="6.55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15.424cm" svg:y="6.10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424cm" svg:y="5.25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424cm" svg:y="4.85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424cm" svg:y="4.35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15.474cm" svg:y="3.45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424cm" svg:y="3.85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16.374cm" svg:y="6.55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16.424cm" svg:y="6.10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16.474cm" svg:y="5.65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16.474cm" svg:y="5.88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16.474cm" svg:y="4.98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16.124cm" svg:y="4.98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16.124cm" svg:y="4.25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16.124cm" svg:y="2.65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16.974cm" svg:y="2.65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17.174cm" svg:y="4.25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624cm" svg:y="4.25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624cm" svg:y="4.65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17.174cm" svg:y="5.05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17.174cm" svg:y="5.85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18.324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18.324cm" svg:y="4.00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18.274cm" svg:y="4.60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18.174cm" svg:y="6.40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8.924cm" svg:y="6.40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9.424cm" svg:y="6.40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19.924cm" svg:y="6.15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20.774cm" svg:y="6.15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19.924cm" svg:y="5.25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19.924cm" svg:y="4.60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21.074cm" svg:y="2.45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20.024cm" svg:y="2.45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0.874cm" svg:y1="2.451cm" svg:x2="21.074cm" svg:y2="2.451cm">
          <text:p/>
        </draw:line>
        <draw:custom-shape draw:style-name="gr65" draw:text-style-name="P9" draw:layer="layout" svg:width="0.9cm" svg:height="2.15cm" svg:x="19.124cm" svg:y="2.45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724cm" svg:y1="4.61cm" svg:x2="21.724cm" svg:y2="4.051cm">
          <text:p/>
        </draw:line>
        <draw:line draw:style-name="gr21" draw:text-style-name="P12" draw:layer="layout" svg:x1="21.724cm" svg:y1="4.601cm" svg:x2="21.624cm" svg:y2="4.601cm">
          <text:p/>
        </draw:line>
        <draw:frame draw:style-name="gr66" draw:text-style-name="P13" draw:layer="layout" svg:width="1cm" svg:height="0.489cm" svg:x="20.524cm" svg:y="4.012cm">
          <draw:text-box>
            <text:p><text:span text:style-name="T4">154</text:span></text:p>
          </draw:text-box>
        </draw:frame>
        <draw:line draw:style-name="gr21" draw:text-style-name="P12" draw:layer="layout" svg:x1="19.124cm" svg:y1="2.651cm" svg:x2="18.324cm" svg:y2="2.651cm">
          <text:p/>
        </draw:line>
        <draw:line draw:style-name="gr21" draw:text-style-name="P12" draw:layer="layout" svg:x1="18.324cm" svg:y1="2.651cm" svg:x2="18.324cm" svg:y2="4.051cm">
          <text:p/>
        </draw:line>
        <draw:line draw:style-name="gr21" draw:text-style-name="P12" draw:layer="layout" svg:x1="19.124cm" svg:y1="2.651cm" svg:x2="19.124cm" svg:y2="2.451cm">
          <text:p/>
        </draw:line>
        <draw:line draw:style-name="gr21" draw:text-style-name="P12" draw:layer="layout" svg:x1="20.024cm" svg:y1="4.051cm" svg:x2="20.024cm" svg:y2="4.601cm">
          <text:p/>
        </draw:line>
        <draw:line draw:style-name="gr21" draw:text-style-name="P12" draw:layer="layout" svg:x1="19.124cm" svg:y1="2.451cm" svg:x2="20.024cm" svg:y2="2.451cm">
          <text:p/>
        </draw:line>
        <draw:custom-shape draw:style-name="gr67" draw:text-style-name="P14" draw:layer="layout" svg:width="0.65cm" svg:height="0.35cm" svg:x="20.924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22.024cm" svg:y="2.55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22.024cm" svg:y="3.05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22.024cm" svg:y="3.60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21.974cm" svg:y="4.00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21.924cm" svg:y="4.80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21.824cm" svg:y="5.30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21.774cm" svg:y="6.10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1.774cm" svg:y="6.80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.224cm" svg:y="6.80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22.674cm" svg:y="6.10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23.374cm" svg:y="6.10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23.324cm" svg:y="5.30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23.424cm" svg:y="4.80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22.924cm" svg:y="4.25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23.374cm" svg:y="3.75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23.774cm" svg:y="2.65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23.474cm" svg:y="2.60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22.924cm" svg:y="2.55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22.524cm" svg:y="2.55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3.374cm" svg:y1="2.551cm" svg:x2="23.374cm" svg:y2="2.551cm">
          <text:p/>
        </draw:line>
        <draw:line draw:style-name="gr21" draw:text-style-name="P12" draw:layer="layout" svg:x1="23.374cm" svg:y1="2.551cm" svg:x2="23.474cm" svg:y2="2.551cm">
          <text:p/>
        </draw:line>
        <draw:line draw:style-name="gr83" draw:text-style-name="P12" draw:layer="layout" svg:x1="23.474cm" svg:y1="2.551cm" svg:x2="23.474cm" svg:y2="2.551cm">
          <text:p/>
        </draw:line>
        <draw:line draw:style-name="gr21" draw:text-style-name="P12" draw:layer="layout" svg:x1="23.474cm" svg:y1="2.551cm" svg:x2="23.474cm" svg:y2="2.601cm">
          <text:p/>
        </draw:line>
        <draw:frame draw:style-name="gr85" draw:text-style-name="P13" draw:layer="layout" svg:width="1.12cm" svg:height="0.5cm" svg:x="23.154cm" svg:y="3.251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24.624cm" svg:y="2.751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24.974cm" svg:y="2.751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24.624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24.774cm" svg:y="3.50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25.774cm" svg:y="2.85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4.624cm" svg:y1="4.001cm" svg:x2="24.374cm" svg:y2="6.701cm">
          <text:p/>
        </draw:line>
        <draw:custom-shape draw:style-name="gr88" draw:text-style-name="P15" draw:layer="layout" svg:width="1cm" svg:height="0.8cm" svg:x="24.374cm" svg:y="6.70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374cm" svg:y="6.701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674cm" svg:y="6.701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974cm" svg:y="6.701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26.274cm" svg:y="6.70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25.524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25.774cm" svg:y1="5.501cm" svg:x2="25.774cm" svg:y2="6.251cm">
          <text:p/>
        </draw:line>
        <draw:line draw:style-name="gr90" draw:text-style-name="P12" draw:layer="layout" svg:x1="26.024cm" svg:y1="5.751cm" svg:x2="26.024cm" svg:y2="6.251cm">
          <text:p/>
        </draw:line>
        <draw:line draw:style-name="gr90" draw:text-style-name="P12" draw:layer="layout" svg:x1="26.274cm" svg:y1="5.501cm" svg:x2="26.274cm" svg:y2="6.251cm">
          <text:p/>
        </draw:line>
        <draw:frame draw:style-name="gr85" draw:text-style-name="P13" draw:layer="layout" svg:width="1cm" svg:height="0.5cm" svg:x="25.524cm" svg:y="5.001cm">
          <draw:text-box>
            <text:p><text:span text:style-name="T4">185</text:span></text:p>
          </draw:text-box>
        </draw:frame>
        <draw:frame draw:style-name="gr91" draw:text-style-name="P35" draw:layer="layout" svg:width="1.061cm" svg:height="0.727cm" svg:x="24.713cm" svg:y="5.524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26.874cm" svg:y1="4.001cm" svg:x2="26.624cm" svg:y2="6.701cm">
          <text:p/>
        </draw:line>
        <draw:custom-shape draw:style-name="gr92" draw:text-style-name="P14" draw:layer="layout" svg:width="0.25cm" svg:height="0.45cm" svg:x="9.274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9.274cm" svg:y="2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9.274cm" svg:y="2.50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75cm" svg:height="0.25cm" svg:x="3.274cm" svg:y="9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274cm" svg:y="9.7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3.274cm" svg:y="10.2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274cm" svg:y="10.7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3.274cm" svg:y="11.2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274cm" svg:y="12.25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3.274cm" svg:y="12.7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274cm" svg:y="13.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4.024cm" svg:y="13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4.024cm" svg:y="12.25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5.024cm" svg:y="12.5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12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11.5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1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024cm" svg:y="10.5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4.774cm" svg:y="9.7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4.024cm" svg:y="9.6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4.024cm" svg:y="10.7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6.074cm" svg:y="9.9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074cm" svg:y="10.5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1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11.35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074cm" svg:y="11.7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074cm" svg:y="12.05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6.074cm" svg:y="12.55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7.024cm" svg:y="12.55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8.024cm" svg:y="12.25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8.024cm" svg:y="10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10.7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11.24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024cm" svg:y="11.7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7.024cm" svg:y="10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9.024cm" svg:y="10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10.5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10.7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9.024cm" svg:y="1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024cm" svg:y="11.5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9.024cm" svg:y="11.7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9.024cm" svg:y="12.25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9.024cm" svg:y1="12cm" svg:x2="9.524cm" svg:y2="12cm">
          <text:p/>
        </draw:line>
        <draw:line draw:style-name="gr21" draw:text-style-name="P12" draw:layer="layout" svg:x1="9.524cm" svg:y1="12.7cm" svg:x2="9.524cm" svg:y2="12cm">
          <text:p/>
        </draw:line>
        <draw:line draw:style-name="gr21" draw:text-style-name="P12" draw:layer="layout" svg:x1="9.274cm" svg:y1="12.707cm" svg:x2="9.524cm" svg:y2="12.707cm">
          <text:p/>
        </draw:line>
        <draw:line draw:style-name="gr21" draw:text-style-name="P12" draw:layer="layout" svg:x1="9.274cm" svg:y1="12.25cm" svg:x2="9.274cm" svg:y2="12.75cm">
          <text:p/>
        </draw:line>
        <draw:line draw:style-name="gr21" draw:text-style-name="P12" draw:layer="layout" svg:x1="9.024cm" svg:y1="12.25cm" svg:x2="9.274cm" svg:y2="12.25cm">
          <text:p/>
        </draw:line>
        <draw:line draw:style-name="gr21" draw:text-style-name="P12" draw:layer="layout" svg:x1="9.024cm" svg:y1="12cm" svg:x2="9.024cm" svg:y2="12.25cm">
          <text:p/>
        </draw:line>
        <draw:frame draw:style-name="gr22" draw:text-style-name="P13" draw:layer="layout" svg:width="0.25cm" svg:height="0.727cm" svg:x="9.174cm" svg:y="11.9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9.524cm" svg:y="12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9.774cm" svg:y="12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524cm" svg:y="10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9.524cm" svg:y="11.5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524cm" svg:y="10.7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274cm" svg:y="10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274cm" svg:y="10.25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10.5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1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12.5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0.274cm" svg:y="12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10.524cm" svg:y="12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12.7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5cm" svg:height="0.25cm" svg:x="10.774cm" svg:y="13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25cm" svg:height="0.25cm" svg:x="11.024cm" svg:y="13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274cm" svg:y="11.5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774cm" svg:y="12.25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0.774cm" svg:y="11.5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10.774cm" svg:y="10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10.774cm" svg:y="10.65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524cm" svg:y="10.4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10.65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11.15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524cm" svg:y="11.65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524cm" svg:y="12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12.25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524cm" svg:y="12.7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10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1.524cm" svg:y="10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774cm" svg:y="11.65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10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10.5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024cm" svg:y="1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11.4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11.9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024cm" svg:y="12.25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12.65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024cm" svg:y="13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024cm" svg:y="13.35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774cm" svg:y="13.5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524cm" svg:y="13.5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274cm" svg:y="13.5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0.25cm" svg:x="10.774cm" svg:y="13.5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5cm" svg:height="0.5cm" svg:x="10.774cm" svg:y="13.7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0.774cm" svg:y="14.25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11.274cm" svg:y="14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11.674cm" svg:y="14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2.024cm" svg:y="13.85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10.3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10.6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2.774cm" svg:y="1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11.3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11.7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774cm" svg:y="13.7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774cm" svg:y="13.25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12.774cm" svg:y="14.25cm">
          <text:p text:style-name="P18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12.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774cm" svg:y="12.5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774cm" svg:y="12.85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274cm" svg:y="13.7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25cm" svg:height="1cm" svg:x="13.524cm" svg:y="13.7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.274cm" svg:y="13.25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11.7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12.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274cm" svg:y="11.3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7cm" svg:x="13.274cm" svg:y="10.6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5cm" svg:height="0.6cm" svg:x="13.274cm" svg:y="10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1.4cm" svg:x="14.024cm" svg:y="10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024cm" svg:y="11.4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024cm" svg:y="12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4.024cm" svg:y="12.6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cm" svg:x="14.524cm" svg:y="14.15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66cm" svg:x="14.524cm" svg:y="13.5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13.05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12.6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1.2cm" svg:x="14.524cm" svg:y="11.4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5cm" svg:x="14.524cm" svg:y="10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10.5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0.45cm" svg:x="14.524cm" svg:y="10.95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6cm" svg:height="0.8cm" svg:x="15.524cm" svg:y="10.15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0.95cm" svg:height="0.7cm" svg:x="15.424cm" svg:y="14.05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1cm" svg:height="0.45cm" svg:x="15.424cm" svg:y="13.6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424cm" svg:y="12.7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4cm" svg:x="15.424cm" svg:y="12.35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424cm" svg:y="11.85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5cm" svg:height="0.4cm" svg:x="15.474cm" svg:y="10.95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7cm" svg:height="0.5cm" svg:x="15.424cm" svg:y="11.35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6cm" svg:height="0.7cm" svg:x="16.374cm" svg:y="14.05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5cm" svg:height="0.45cm" svg:x="16.424cm" svg:y="13.6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16.474cm" svg:y="13.15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16.474cm" svg:y="13.38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5cm" svg:height="0.67cm" svg:x="16.474cm" svg:y="12.48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35cm" svg:height="0.67cm" svg:x="16.124cm" svg:y="12.48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0.6cm" svg:x="16.124cm" svg:y="11.7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16.124cm" svg:y="10.15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.2cm" svg:height="1.6cm" svg:x="16.974cm" svg:y="10.15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45cm" svg:height="0.8cm" svg:x="17.174cm" svg:y="11.7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624cm" svg:y="11.7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624cm" svg:y="12.15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5cm" svg:height="0.8cm" svg:x="17.174cm" svg:y="12.55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9" draw:layer="layout" svg:width="0.8cm" svg:height="1.4cm" svg:x="17.174cm" svg:y="13.35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0.8cm" svg:height="1.35cm" svg:x="18.324cm" svg:y="10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8cm" svg:height="0.6cm" svg:x="18.324cm" svg:y="11.5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1.65cm" svg:height="1.8cm" svg:x="18.274cm" svg:y="12.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75cm" svg:height="0.9cm" svg:x="18.174cm" svg:y="13.9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8.924cm" svg:y="13.9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5cm" svg:height="0.9cm" svg:x="19.424cm" svg:y="13.9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5cm" svg:height="1.15cm" svg:x="19.924cm" svg:y="13.65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0.8cm" svg:height="1.15cm" svg:x="20.774cm" svg:y="13.65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9cm" svg:x="19.924cm" svg:y="12.7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7cm" svg:height="0.65cm" svg:x="19.924cm" svg:y="12.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draw:layer="layout" svg:width="0.7cm" svg:height="1.6cm" svg:x="21.074cm" svg:y="9.95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5cm" svg:height="1.6cm" svg:x="20.024cm" svg:y="9.95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0.874cm" svg:y1="9.95cm" svg:x2="21.074cm" svg:y2="9.95cm">
          <text:p/>
        </draw:line>
        <draw:custom-shape draw:style-name="gr65" draw:text-style-name="P9" draw:layer="layout" svg:width="0.9cm" svg:height="2.15cm" svg:x="19.124cm" svg:y="9.95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724cm" svg:y1="12.109cm" svg:x2="21.724cm" svg:y2="11.55cm">
          <text:p/>
        </draw:line>
        <draw:line draw:style-name="gr21" draw:text-style-name="P12" draw:layer="layout" svg:x1="21.724cm" svg:y1="12.1cm" svg:x2="21.624cm" svg:y2="12.1cm">
          <text:p/>
        </draw:line>
        <draw:frame draw:style-name="gr66" draw:text-style-name="P13" draw:layer="layout" svg:width="1cm" svg:height="0.489cm" svg:x="20.524cm" svg:y="11.511cm">
          <draw:text-box>
            <text:p><text:span text:style-name="T4">154</text:span></text:p>
          </draw:text-box>
        </draw:frame>
        <draw:line draw:style-name="gr21" draw:text-style-name="P12" draw:layer="layout" svg:x1="19.124cm" svg:y1="10.15cm" svg:x2="18.324cm" svg:y2="10.15cm">
          <text:p/>
        </draw:line>
        <draw:line draw:style-name="gr21" draw:text-style-name="P12" draw:layer="layout" svg:x1="18.324cm" svg:y1="10.15cm" svg:x2="18.324cm" svg:y2="11.55cm">
          <text:p/>
        </draw:line>
        <draw:line draw:style-name="gr21" draw:text-style-name="P12" draw:layer="layout" svg:x1="19.124cm" svg:y1="10.15cm" svg:x2="19.124cm" svg:y2="9.95cm">
          <text:p/>
        </draw:line>
        <draw:line draw:style-name="gr21" draw:text-style-name="P12" draw:layer="layout" svg:x1="20.024cm" svg:y1="11.55cm" svg:x2="20.024cm" svg:y2="12.1cm">
          <text:p/>
        </draw:line>
        <draw:line draw:style-name="gr21" draw:text-style-name="P12" draw:layer="layout" svg:x1="19.124cm" svg:y1="9.95cm" svg:x2="20.024cm" svg:y2="9.95cm">
          <text:p/>
        </draw:line>
        <draw:custom-shape draw:style-name="gr67" draw:text-style-name="P14" draw:layer="layout" svg:width="0.65cm" svg:height="0.35cm" svg:x="20.924cm" svg:y="1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22.024cm" svg:y="10.05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5cm" svg:height="0.55cm" svg:x="22.024cm" svg:y="10.55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cm" svg:height="0.4cm" svg:x="22.024cm" svg:y="11.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0.95cm" svg:height="0.8cm" svg:x="21.974cm" svg:y="11.5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5cm" svg:x="21.924cm" svg:y="12.3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1.5cm" svg:height="0.8cm" svg:x="21.824cm" svg:y="12.8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9cm" svg:height="0.7cm" svg:x="21.774cm" svg:y="13.6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1.774cm" svg:y="14.3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.224cm" svg:y="14.3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layout" svg:width="0.7cm" svg:height="1.2cm" svg:x="22.674cm" svg:y="13.6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75cm" svg:height="1.2cm" svg:x="23.374cm" svg:y="13.6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9cm" svg:height="0.8cm" svg:x="23.324cm" svg:y="12.8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0.85cm" svg:height="0.5cm" svg:x="23.424cm" svg:y="12.3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.4cm" svg:height="0.55cm" svg:x="22.924cm" svg:y="11.7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cm" svg:height="0.5cm" svg:x="23.374cm" svg:y="11.25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7cm" svg:height="1.1cm" svg:x="23.774cm" svg:y="10.15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3cm" svg:height="0.55cm" svg:x="23.474cm" svg:y="10.1cm">
          <text:p text:style-name="P21"><text:span text:style-name="T8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5cm" svg:height="1.7cm" svg:x="22.924cm" svg:y="10.05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layout" svg:width="0.4cm" svg:height="1.05cm" svg:x="22.524cm" svg:y="10.05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3.374cm" svg:y1="10.05cm" svg:x2="23.374cm" svg:y2="10.05cm">
          <text:p/>
        </draw:line>
        <draw:line draw:style-name="gr21" draw:text-style-name="P12" draw:layer="layout" svg:x1="23.374cm" svg:y1="10.05cm" svg:x2="23.474cm" svg:y2="10.05cm">
          <text:p/>
        </draw:line>
        <draw:line draw:style-name="gr83" draw:text-style-name="P12" draw:layer="layout" svg:x1="23.474cm" svg:y1="10.05cm" svg:x2="23.474cm" svg:y2="10.05cm">
          <text:p/>
        </draw:line>
        <draw:line draw:style-name="gr21" draw:text-style-name="P12" draw:layer="layout" svg:x1="23.474cm" svg:y1="10.05cm" svg:x2="23.474cm" svg:y2="10.1cm">
          <text:p/>
        </draw:line>
        <draw:frame draw:style-name="gr85" draw:text-style-name="P13" draw:layer="layout" svg:width="1.12cm" svg:height="0.5cm" svg:x="23.154cm" svg:y="10.75cm">
          <draw:text-box>
            <text:p><text:span text:style-name="T4">173</text:span></text:p>
          </draw:text-box>
        </draw:frame>
        <draw:custom-shape draw:style-name="gr32" draw:text-style-name="P22" draw:layer="layout" svg:width="0.35cm" svg:height="0.7cm" svg:x="24.624cm" svg:y="10.25cm">
          <text:p text:style-name="P21"><text:span text:style-name="T8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35cm" svg:height="0.7cm" svg:x="24.974cm" svg:y="10.25cm">
          <text:p text:style-name="P21"><text:span text:style-name="T8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cm" svg:height="1.25cm" svg:x="24.624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24.774cm" svg:y="11cm">
          <draw:text-box>
            <text:p><text:span text:style-name="T4">177(3)</text:span></text:p>
          </draw:text-box>
        </draw:frame>
        <draw:custom-shape draw:style-name="gr87" draw:text-style-name="P9" draw:layer="layout" svg:width="1.1cm" svg:height="1.15cm" svg:x="25.774cm" svg:y="10.35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4.624cm" svg:y1="11.5cm" svg:x2="24.374cm" svg:y2="14.2cm">
          <text:p/>
        </draw:line>
        <draw:custom-shape draw:style-name="gr88" draw:text-style-name="P15" draw:layer="layout" svg:width="1cm" svg:height="0.8cm" svg:x="24.374cm" svg:y="14.2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374cm" svg:y="14.2cm">
          <text:p text:style-name="P25"><text:span text:style-name="T9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674cm" svg:y="14.2cm">
          <text:p text:style-name="P25"><text:span text:style-name="T9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3cm" svg:height="0.8cm" svg:x="25.974cm" svg:y="14.2cm">
          <text:p text:style-name="P25"><text:span text:style-name="T9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26.274cm" svg:y="14.2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cm" svg:height="1cm" svg:x="25.52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2" draw:layer="layout" svg:x1="25.774cm" svg:y1="13cm" svg:x2="25.774cm" svg:y2="13.75cm">
          <text:p/>
        </draw:line>
        <draw:line draw:style-name="gr90" draw:text-style-name="P12" draw:layer="layout" svg:x1="26.024cm" svg:y1="13.25cm" svg:x2="26.024cm" svg:y2="13.75cm">
          <text:p/>
        </draw:line>
        <draw:line draw:style-name="gr90" draw:text-style-name="P12" draw:layer="layout" svg:x1="26.274cm" svg:y1="13cm" svg:x2="26.274cm" svg:y2="13.75cm">
          <text:p/>
        </draw:line>
        <draw:frame draw:style-name="gr85" draw:text-style-name="P13" draw:layer="layout" svg:width="1cm" svg:height="0.5cm" svg:x="25.524cm" svg:y="12.5cm">
          <draw:text-box>
            <text:p><text:span text:style-name="T4">185</text:span></text:p>
          </draw:text-box>
        </draw:frame>
        <draw:frame draw:style-name="gr91" draw:text-style-name="P35" draw:layer="layout" svg:width="1.061cm" svg:height="0.727cm" svg:x="24.713cm" svg:y="13.023cm">
          <draw:text-box>
            <text:p text:style-name="P28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26.874cm" svg:y1="11.5cm" svg:x2="26.624cm" svg:y2="14.2cm">
          <text:p/>
        </draw:line>
        <draw:custom-shape draw:style-name="gr92" draw:text-style-name="P14" draw:layer="layout" svg:width="0.25cm" svg:height="0.45cm" svg:x="9.27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draw:layer="layout" svg:width="0.25cm" svg:height="0.25cm" svg:x="9.27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25cm" svg:height="0.5cm" svg:x="9.274cm" svg:y="10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37" draw:layer="layout" svg:width="4.25cm" svg:height="0.801cm" svg:x="24.25cm" svg:y="18.2cm">
          <draw:text-box>
            <text:p text:style-name="P36"><text:span text:style-name="T12">Rishabh Sarswa <text:s text:c="2"/>(9680724566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stroke-dash36" draw:style="rect" draw:dots1="1" draw:dots1-length="0.141cm" draw:dots2="1" draw:dots2-length="0.035cm" draw:distance="0.105cm"/>
    <draw:stroke-dash draw:name="stroke-dash43" draw:style="rect" draw:dots1="1" draw:dots1-length="0.185cm" draw:distance="0.105cm"/>
    <draw:stroke-dash draw:name="stroke-dash46" draw:style="rect" draw:dots1="1" draw:dots1-length="0.141cm" draw:distance="0.105cm"/>
    <draw:stroke-dash draw:name="stroke-dash53" draw:style="rect" draw:dots1="1" draw:dots1-length="0.026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20:42:00.028685528</meta:creation-date>
    <dc:date>2026-05-21T14:35:04.332316373</dc:date>
    <meta:editing-duration>PT13H24M33S</meta:editing-duration>
    <meta:editing-cycles>160</meta:editing-cycles>
    <meta:generator>LibreOffice/7.4.7.2$Linux_X86_64 LibreOffice_project/40$Build-2</meta:generator>
    <meta:document-statistic meta:object-count="1528"/>
  </office:meta>
</office:document-meta>
</file>