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ublic Sans" svg:font-family="'Public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0.47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co1" style:family="table-column">
      <style:table-column-properties style:column-width="1.692cm" style:use-optimal-column-width="false"/>
    </style:style>
    <style:style style:name="co2" style:family="table-column">
      <style:table-column-properties style:column-width="1.587cm" style:use-optimal-column-width="false"/>
    </style:style>
    <style:style style:name="co3" style:family="table-column">
      <style:table-column-properties style:column-width="2.34cm" style:use-optimal-column-width="false"/>
    </style:style>
    <style:style style:name="co4" style:family="table-column">
      <style:table-column-properties style:column-width="2.339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2.172cm" style:use-optimal-column-width="false"/>
    </style:style>
    <style:style style:name="co7" style:family="table-column">
      <style:table-column-properties style:column-width="2.785cm" style:use-optimal-column-width="false"/>
    </style:style>
    <style:style style:name="co8" style:family="table-column">
      <style:table-column-properties style:column-width="2.395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ro1" style:family="table-row">
      <style:table-row-properties style:row-height="2.802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fo:font-size="20pt" style:font-size-asian="20pt" style:font-name-complex="Public Sans" style:font-size-complex="20pt"/>
    </style:style>
    <style:style style:name="T2" style:family="text">
      <style:text-properties fo:color="#000000" loext:opacity="100%" style:font-name="Public Sans" fo:font-size="20pt" style:font-size-asian="20pt" style:font-name-complex="Public Sans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size="20pt" fo:font-weight="bold" style:font-size-asian="20pt" style:font-name-complex="Public Sans" style:font-size-complex="20pt" style:font-weight-complex="bold"/>
    </style:style>
    <style:style style:name="T5" style:family="text">
      <style:text-properties fo:color="#000000" loext:opacity="100%" style:font-name="Public Sans" fo:font-size="20pt" style:font-name-asian="Public Sans" style:font-size-asian="20pt" style:font-name-complex="Public Sans" style:font-size-complex="20pt"/>
    </style:style>
    <style:style style:name="T6" style:family="text">
      <style:text-properties fo:color="#202124" loext:opacity="100%" style:font-name="Public Sans" fo:font-size="20pt" style:font-name-asian="Public Sans" style:font-size-asian="20pt" style:font-name-complex="Public Sans" style:font-size-complex="20pt"/>
    </style:style>
    <style:style style:name="T7" style:family="text">
      <style:text-properties style:font-name="Public Sans" fo:font-size="20pt" style:font-name-asian="Public Sans" style:font-size-asian="20pt" style:font-name-complex="Public Sans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24.477cm" svg:x="1cm" svg:y="1cm">
          <draw:text-box>
            <text:p><text:span text:style-name="T1">सेवा में </text:span><text:span text:style-name="T2">,</text:span></text:p>
            <text:p><text:span text:style-name="T3">श्रीमान प्रधानाचार्य जी</text:span></text:p>
            <text:p><text:span text:style-name="T3">MGGS Housing Board Bikaner</text:span></text:p>
            <text:p><text:span text:style-name="T3"/></text:p>
            <text:p text:style-name="P1"><text:span text:style-name="T4">विषय</text:span><text:span text:style-name="T1"> </text:span><text:span text:style-name="T2">: </text:span><text:span text:style-name="T2">स्थानांतरण प्रमाणपत्र</text:span><text:span text:style-name="T1"> </text:span><text:span text:style-name="T2">( </text:span><text:span text:style-name="T1">टीसी </text:span><text:span text:style-name="T2">) </text:span><text:span text:style-name="T1">हेतु आवेदन।</text:span></text:p>
            <text:p><text:span text:style-name="T4">महोदय जी</text:span><text:span text:style-name="T1"> </text:span><text:span text:style-name="T2">,</text:span></text:p>
            <text:p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><text:span text:style-name="T3"/></text:p>
            <text:p><text:span text:style-name="T3"/></text:p>
            <text:p text:style-name="P1"><text:span text:style-name="T1">अत </text:span><text:span text:style-name="T2">: <text:s/></text:span><text:span text:style-name="T1">मेरा आपसे अनुरोध है कि कृपया मुझे स्थानांतरण प्रमाणपत्र देने का कष्ट करें मैं आपका बहुत आभारी रहूंगा।</text:span></text:p>
            <text:p><text:span text:style-name="T3">धन्यवाद।</text:span></text:p>
            <text:p><text:span text:style-name="T1">दिनांक </text:span><text:span text:style-name="T2">: ______________</text:span></text:p>
            <text:p><text:span text:style-name="T3">______________________</text:span></text:p>
            <text:p><text:span text:style-name="T3">____________________</text:span></text:p>
            <text:p><text:span text:style-name="T3"/></text:p>
            <text:p><text:span text:style-name="T3"/></text:p>
            <text:p><text:span text:style-name="T3">For office Work</text:span></text:p>
            <text:p text:style-name="P2"><text:span text:style-name="T3"/></text:p>
            <text:p><text:span text:style-name="T3"/></text:p>
          </draw:text-box>
        </draw:frame>
        <draw:frame draw:style-name="gr2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"><text:span text:style-name="T8">SRNO</text:span></text:p>
              </table:table-cell>
              <table:table-cell>
                <text:p text:style-name="P4"><text:span text:style-name="T8">Class</text:span></text:p>
              </table:table-cell>
              <table:table-cell table:style-name="ce2">
                <text:p text:style-name="P5"><text:span text:style-name="T9">Admission Date</text:span></text:p>
              </table:table-cell>
              <table:table-cell table:style-name="ce2">
                <text:p text:style-name="P5"><text:span text:style-name="T9">Admission Class</text:span></text:p>
              </table:table-cell>
              <table:table-cell table:style-name="ce2">
                <text:p text:style-name="P5"><text:span text:style-name="T9">Previous Result</text:span></text:p>
              </table:table-cell>
              <table:table-cell>
                <text:p text:style-name="P4"><text:span text:style-name="T8">Total Working Days</text:span></text:p>
              </table:table-cell>
              <table:table-cell>
                <text:p text:style-name="P4"><text:span text:style-name="T8">Attendance</text:span></text:p>
              </table:table-cell>
              <table:table-cell>
                <text:p text:style-name="P4"><text:span text:style-name="T8">Character</text:span></text:p>
              </table:table-cell>
              <table:table-cell>
                <text:p text:style-name="P4"><text:span text:style-name="T8">TC Date</text:span>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  <draw:page draw:name="page2" draw:style-name="dp1" draw:master-page-name="Default">
        <draw:frame draw:style-name="gr1" draw:text-style-name="P3" draw:layer="layout" svg:width="19.59cm" svg:height="24.477cm" svg:x="1cm" svg:y="1cm">
          <draw:text-box>
            <text:p><text:span text:style-name="T1">सेवा में </text:span><text:span text:style-name="T2">,</text:span></text:p>
            <text:p><text:span text:style-name="T3">श्रीमान प्रधानाचार्य जी</text:span></text:p>
            <text:p><text:span text:style-name="T3">MGGS Housing Board Bikaner</text:span></text:p>
            <text:p><text:span text:style-name="T3"/></text:p>
            <text:p text:style-name="P1"><text:span text:style-name="T4">विषय</text:span><text:span text:style-name="T1"> </text:span><text:span text:style-name="T2">: </text:span><text:span text:style-name="T2">स्थानांतरण प्रमाणपत्र</text:span><text:span text:style-name="T1"> </text:span><text:span text:style-name="T2">( </text:span><text:span text:style-name="T1">टीसी </text:span><text:span text:style-name="T2">) </text:span><text:span text:style-name="T1">हेतु आवेदन।</text:span></text:p>
            <text:p><text:span text:style-name="T4">महोदय जी</text:span><text:span text:style-name="T1"> </text:span><text:span text:style-name="T2">,</text:span></text:p>
            <text:p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><text:span text:style-name="T3"/></text:p>
            <text:p><text:span text:style-name="T3"/></text:p>
            <text:p text:style-name="P1"><text:span text:style-name="T1">अत </text:span><text:span text:style-name="T2">: <text:s/></text:span><text:span text:style-name="T1">मेरा आपसे अनुरोध है कि कृपया मुझे स्थानांतरण प्रमाणपत्र देने का कष्ट करें मैं आपका बहुत आभारी रहूंगा।</text:span></text:p>
            <text:p><text:span text:style-name="T3">धन्यवाद।</text:span></text:p>
            <text:p><text:span text:style-name="T1">दिनांक </text:span><text:span text:style-name="T2">: ______________</text:span></text:p>
            <text:p><text:span text:style-name="T3">______________________</text:span></text:p>
            <text:p><text:span text:style-name="T3">____________________</text:span></text:p>
            <text:p><text:span text:style-name="T3"/></text:p>
            <text:p><text:span text:style-name="T3"/></text:p>
            <text:p><text:span text:style-name="T3">For office Work</text:span></text:p>
            <text:p text:style-name="P2"><text:span text:style-name="T3"/></text:p>
            <text:p><text:span text:style-name="T3"/></text:p>
          </draw:text-box>
        </draw:frame>
        <draw:frame draw:style-name="gr2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"><text:span text:style-name="T8">SRNO</text:span></text:p>
              </table:table-cell>
              <table:table-cell>
                <text:p text:style-name="P4"><text:span text:style-name="T8">Class</text:span></text:p>
              </table:table-cell>
              <table:table-cell table:style-name="ce2">
                <text:p text:style-name="P5"><text:span text:style-name="T9">Admission Date</text:span></text:p>
              </table:table-cell>
              <table:table-cell table:style-name="ce2">
                <text:p text:style-name="P5"><text:span text:style-name="T9">Admission Class</text:span></text:p>
              </table:table-cell>
              <table:table-cell table:style-name="ce2">
                <text:p text:style-name="P5"><text:span text:style-name="T9">Previous Result</text:span></text:p>
              </table:table-cell>
              <table:table-cell>
                <text:p text:style-name="P4"><text:span text:style-name="T8">Total Working Days</text:span></text:p>
              </table:table-cell>
              <table:table-cell>
                <text:p text:style-name="P4"><text:span text:style-name="T8">Attendance</text:span></text:p>
              </table:table-cell>
              <table:table-cell>
                <text:p text:style-name="P4"><text:span text:style-name="T8">Character</text:span></text:p>
              </table:table-cell>
              <table:table-cell>
                <text:p text:style-name="P4"><text:span text:style-name="T8">TC Date</text:span>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ublic Sans" svg:font-family="'Public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Mangal" style:font-family-complex="Mangal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Mangal" style:font-family-complex="Manga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4:00:50.364000000</meta:creation-date>
    <dc:date>2026-07-08T07:32:13.533241978</dc:date>
    <meta:editing-duration>PT13M45S</meta:editing-duration>
    <meta:editing-cycles>9</meta:editing-cycles>
    <meta:generator>LibreOffice/25.2.3.2$Linux_X86_64 LibreOffice_project/520$Build-2</meta:generator>
    <meta:document-statistic meta:object-count="6"/>
  </office:meta>
</office:document-meta>
</file>